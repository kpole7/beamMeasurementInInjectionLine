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>
      <style:table-cell-properties fo:background-color="#ffff00"/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oto Mon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#REF!=1; TYPE(#REF!)=8); #REF!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7]&lt;&gt;&quot;&quot;; UPPER(ORG.LIBREOFFICE.REGEX([.H2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28]&lt;&gt;&quot;&quot;; UPPER(ORG.LIBREOFFICE.REGEX([.H2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29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2]=1; TYPE([.A32])=8); [.A32]+1; IF( OR([.A31]=1; TYPE([.A31])=8); [.A31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3]=1; TYPE([.A33])=8); [.A33]+1; IF( OR([.A32]=1; TYPE([.A32])=8); [.A32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5]=1; TYPE([.A35])=8); [.A35]+1; IF( OR([.A34]=1; TYPE([.A34])=8); [.A34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39]&lt;&gt;&quot;&quot;; UPPER(ORG.LIBREOFFICE.REGEX([.H39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1]&lt;&gt;&quot;&quot;; UPPER(ORG.LIBREOFFICE.REGEX([.H4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4]=1; TYPE([.A44])=8); [.A44]+1; IF( OR([.A41]=1; TYPE([.A41])=8); [.A41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5]&lt;&gt;&quot;&quot;; UPPER(ORG.LIBREOFFICE.REGEX([.H45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5]=1; TYPE([.A45])=8); [.A45]+1; IF( OR([.A41]=1; TYPE([.A41])=8); [.A41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4]&lt;&gt;&quot;&quot;; UPPER(ORG.LIBREOFFICE.REGEX([.H5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2]&lt;&gt;&quot;&quot;; UPPER(ORG.LIBREOFFICE.REGEX([.H6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87]&lt;&gt;&quot;&quot;; UPPER(ORG.LIBREOFFICE.REGEX([.H8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2]&lt;&gt;&quot;&quot;; UPPER(ORG.LIBREOFFICE.REGEX([.H1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4]&lt;&gt;&quot;&quot;; UPPER(ORG.LIBREOFFICE.REGEX([.H11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27]&lt;&gt;&quot;&quot;; UPPER(ORG.LIBREOFFICE.REGEX([.H12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0]&lt;&gt;&quot;&quot;; UPPER(ORG.LIBREOFFICE.REGEX([.H14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5]&lt;&gt;&quot;&quot;; UPPER(ORG.LIBREOFFICE.REGEX([.H14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0]&lt;&gt;&quot;&quot;; UPPER(ORG.LIBREOFFICE.REGEX([.H15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5]=1; TYPE([.A155])=8); [.A155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0]&lt;&gt;&quot;&quot;; UPPER(ORG.LIBREOFFICE.REGEX([.H17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3]&lt;&gt;&quot;&quot;; UPPER(ORG.LIBREOFFICE.REGEX([.H17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3]=1; TYPE([.A173])=8); [.A173]+1; IF( OR([.A172]=1; TYPE([.A172])=8); [.A172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4]&lt;&gt;&quot;&quot;; UPPER(ORG.LIBREOFFICE.REGEX([.H174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7]&lt;&gt;&quot;&quot;; UPPER(ORG.LIBREOFFICE.REGEX([.H17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2]&lt;&gt;&quot;&quot;; UPPER(ORG.LIBREOFFICE.REGEX([.H18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5]&lt;&gt;&quot;&quot;; UPPER(ORG.LIBREOFFICE.REGEX([.H18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6]&lt;&gt;&quot;&quot;; UPPER(ORG.LIBREOFFICE.REGEX([.H18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7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8]=1; TYPE([.A188])=8); [.A188]+1; IF( OR([.A187]=1; TYPE([.A187])=8); [.A187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89]&lt;&gt;&quot;&quot;; UPPER(ORG.LIBREOFFICE.REGEX([.H189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2]&lt;&gt;&quot;&quot;; UPPER(ORG.LIBREOFFICE.REGEX([.H19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8]&lt;&gt;&quot;&quot;; UPPER(ORG.LIBREOFFICE.REGEX([.H19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REQUESTED_STATE" calcext:value-type="string">
            <text:p>CUP1_REQUESTED_STATE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REQUESTED_STATE 13" calcext:value-type="string">
            <text:p>#define MODBUS_ADDR_CUP1_REQUESTED_STATE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REQUESTED_STATE" calcext:value-type="string">
            <text:p>CUP2_REQUESTED_STATE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REQUESTED_STATE 14" calcext:value-type="string">
            <text:p>#define MODBUS_ADDR_CUP2_REQUESTED_STATE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REQUESTED_STATE" calcext:value-type="string">
            <text:p>CUP3_REQUESTED_STATE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REQUESTED_STATE 15" calcext:value-type="string">
            <text:p>#define MODBUS_ADDR_CUP3_REQUESTED_STATE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ACTUATOR1_CONTROL" calcext:value-type="string">
            <text:p>ACTUATOR1_CONTROL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#define MODBUS_ADDR_ACTUATOR1_CONTROL 16" calcext:value-type="string">
            <text:p>#define MODBUS_ADDR_ACTUATOR1_CONTROL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ACTUATOR2_CONTROL" calcext:value-type="string">
            <text:p>ACTUATOR2_CONTROL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#define MODBUS_ADDR_ACTUATOR2_CONTROL 17" calcext:value-type="string">
            <text:p>#define MODBUS_ADDR_ACTUATOR2_CONTROL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ACTUATOR3_CONTROL_IN" calcext:value-type="string">
            <text:p>ACTUATOR3_CONTROL_IN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#define MODBUS_ADDR_ACTUATOR3_CONTROL_IN 18" calcext:value-type="string">
            <text:p>#define MODBUS_ADDR_ACTUATOR3_CONTROL_IN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 office:value-type="string" office:string-value="ACTUATOR3_CONTROL_OUT" calcext:value-type="string">
            <text:p>ACTUATOR3_CONTROL_OUT</text:p>
          </table:table-cell>
          <table:table-cell table:formula="of:=IF([$List.A25] &lt;&gt;&quot;&quot;; [$List.A25]; &quot;&quot;)" office:value-type="float" office:value="19" calcext:value-type="float">
            <text:p>19</text:p>
          </table:table-cell>
          <table:table-cell/>
          <table:table-cell table:formula="of:=IF([.A25]&lt;&gt;&quot;&quot;; COM.MICROSOFT.CONCAT(&quot;#define MODBUS_ADDR_&quot;; [.A25]; &quot; &quot;; [.B25]); &quot;&quot;)" office:value-type="string" office:string-value="#define MODBUS_ADDR_ACTUATOR3_CONTROL_OUT 19" calcext:value-type="string">
            <text:p>#define MODBUS_ADDR_ACTUATOR3_CONTROL_OUT 19</text:p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3_CONTROL_BRAKE" calcext:value-type="string">
            <text:p>ACTUATOR3_CONTROL_BRAKE</text:p>
          </table:table-cell>
          <table:table-cell table:formula="of:=IF([$List.A26] &lt;&gt;&quot;&quot;; [$List.A26]; &quot;&quot;)" office:value-type="float" office:value="20" calcext:value-type="float">
            <text:p>20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#define MODBUS_ADDR_ACTUATOR3_CONTROL_BRAKE 20" calcext:value-type="string">
            <text:p>#define MODBUS_ADDR_ACTUATOR3_CONTROL_BRAKE 20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>
            <text:p/>
          </table:table-cell>
          <table:table-cell table:formula="of:=IF([$List.A27] &lt;&gt;&quot;&quot;; [$List.A27]; &quot;&quot;)">
            <text:p/>
          </table:table-cell>
          <table:table-cell/>
          <table:table-cell table:formula="of:=IF([.A27]&lt;&gt;&quot;&quot;; COM.MICROSOFT.CONCAT(&quot;#define MODBUS_ADDR_&quot;; [.A27]; &quot; &quot;; [.B27]); &quot;&quot;)">
            <text:p/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>
            <text:p/>
          </table:table-cell>
          <table:table-cell table:formula="of:=IF([$List.A28] &lt;&gt;&quot;&quot;; [$List.A28]; &quot;&quot;)">
            <text:p/>
          </table:table-cell>
          <table:table-cell/>
          <table:table-cell table:formula="of:=IF([.A28]&lt;&gt;&quot;&quot;; COM.MICROSOFT.CONCAT(&quot;#define MODBUS_ADDR_&quot;; [.A28]; &quot; &quot;; [.B28]); &quot;&quot;)">
            <text:p/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ERROR_CODE" calcext:value-type="string">
            <text:p>ERROR_CODE</text:p>
          </table:table-cell>
          <table:table-cell table:formula="of:=IF([$List.A29] &lt;&gt;&quot;&quot;; [$List.A29]; &quot;&quot;)" office:value-type="float" office:value="1000" calcext:value-type="float">
            <text:p>1000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LAST_ERROR" calcext:value-type="string">
            <text:p>LAST_ERROR</text:p>
          </table:table-cell>
          <table:table-cell table:formula="of:=IF([$List.A30] &lt;&gt;&quot;&quot;; [$List.A30]; &quot;&quot;)" office:value-type="float" office:value="1001" calcext:value-type="float">
            <text:p>1001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 office:value-type="string" office:string-value="ERROR_STORAGE" calcext:value-type="string">
            <text:p>ERROR_STORAGE</text:p>
          </table:table-cell>
          <table:table-cell table:formula="of:=IF([$List.A31] &lt;&gt;&quot;&quot;; [$List.A31]; &quot;&quot;)" office:value-type="float" office:value="1002" calcext:value-type="float">
            <text:p>1002</text:p>
          </table:table-cell>
          <table:table-cell/>
          <table:table-cell table:formula="of:=IF([.A31]&lt;&gt;&quot;&quot;; COM.MICROSOFT.CONCAT(&quot;#define MODBUS_ADDR_&quot;; [.A31]; &quot; &quot;; [.B31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2]&lt;&gt;&quot;&quot;; COM.MICROSOFT.CONCAT(&quot;#define MODBUS_ADDR_&quot;; [.A32]; &quot; &quot;; [.B32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TIME_LIMIT_INSERTING1" calcext:value-type="string">
            <text:p>TIME_LIMIT_INSERTING1</text:p>
          </table:table-cell>
          <table:table-cell table:formula="of:=IF([$List.A33] &lt;&gt;&quot;&quot;; [$List.A33]; &quot;&quot;)" office:value-type="float" office:value="1003" calcext:value-type="float">
            <text:p>1003</text:p>
          </table:table-cell>
          <table:table-cell/>
          <table:table-cell table:formula="of:=IF([.A33]&lt;&gt;&quot;&quot;; COM.MICROSOFT.CONCAT(&quot;#define MODBUS_ADDR_&quot;; [.A33]; &quot; &quot;; [.B33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TIME_LIMIT_INSERTING2" calcext:value-type="string">
            <text:p>TIME_LIMIT_INSERTING2</text:p>
          </table:table-cell>
          <table:table-cell table:formula="of:=IF([$List.A34] &lt;&gt;&quot;&quot;; [$List.A34]; &quot;&quot;)" office:value-type="float" office:value="1004" calcext:value-type="float">
            <text:p>1004</text:p>
          </table:table-cell>
          <table:table-cell/>
          <table:table-cell table:formula="of:=IF([.A34]&lt;&gt;&quot;&quot;; COM.MICROSOFT.CONCAT(&quot;#define MODBUS_ADDR_&quot;; [.A34]; &quot; &quot;; [.B34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TIME_LIMIT_INSERTING3" calcext:value-type="string">
            <text:p>TIME_LIMIT_INSERTING3</text:p>
          </table:table-cell>
          <table:table-cell table:formula="of:=IF([$List.A35] &lt;&gt;&quot;&quot;; [$List.A35]; &quot;&quot;)" office:value-type="float" office:value="1005" calcext:value-type="float">
            <text:p>1005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 office:value-type="string" office:string-value="TIME_LIMIT_WITHDRAWING1" calcext:value-type="string">
            <text:p>TIME_LIMIT_WITHDRAWING1</text:p>
          </table:table-cell>
          <table:table-cell table:formula="of:=IF([$List.A36] &lt;&gt;&quot;&quot;; [$List.A36]; &quot;&quot;)" office:value-type="float" office:value="1006" calcext:value-type="float">
            <text:p>1006</text:p>
          </table:table-cell>
          <table:table-cell/>
          <table:table-cell table:formula="of:=IF([.A36]&lt;&gt;&quot;&quot;; COM.MICROSOFT.CONCAT(&quot;#define MODBUS_ADDR_&quot;; [.A36]; &quot; &quot;; [.B36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WITHDRAWING2" calcext:value-type="string">
            <text:p>TIME_LIMIT_WITHDRAWING2</text:p>
          </table:table-cell>
          <table:table-cell table:formula="of:=IF([$List.A37] &lt;&gt;&quot;&quot;; [$List.A37]; &quot;&quot;)" office:value-type="float" office:value="1007" calcext:value-type="float">
            <text:p>1007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WITHDRAWING3" calcext:value-type="string">
            <text:p>TIME_LIMIT_WITHDRAWING3</text:p>
          </table:table-cell>
          <table:table-cell table:formula="of:=IF([$List.A38] &lt;&gt;&quot;&quot;; [$List.A38]; &quot;&quot;)" office:value-type="float" office:value="1008" calcext:value-type="float">
            <text:p>1008</text:p>
          </table:table-cell>
          <table:table-cell/>
          <table:table-cell table:formula="of:=IF([.A38]&lt;&gt;&quot;&quot;; COM.MICROSOFT.CONCAT(&quot;#define MODBUS_ADDR_&quot;; [.A38]; &quot; &quot;; [.B38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>
            <text:p/>
          </table:table-cell>
          <table:table-cell table:formula="of:=IF([$List.A39] &lt;&gt;&quot;&quot;; [$List.A39]; &quot;&quot;)">
            <text:p/>
          </table:table-cell>
          <table:table-cell/>
          <table:table-cell table:formula="of:=IF([.A39]&lt;&gt;&quot;&quot;; COM.MICROSOFT.CONCAT(&quot;#define MODBUS_ADDR_&quot;; [.A39]; &quot; &quot;; [.B39]); &quot;&quot;)">
            <text:p/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ACTIVE_CUP" calcext:value-type="string">
            <text:p>ACTIVE_CUP</text:p>
          </table:table-cell>
          <table:table-cell table:formula="of:=IF([$List.A40] &lt;&gt;&quot;&quot;; [$List.A40]; &quot;&quot;)" office:value-type="float" office:value="1009" calcext:value-type="float">
            <text:p>1009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>
            <text:p/>
          </table:table-cell>
          <table:table-cell table:formula="of:=IF([$List.A41] &lt;&gt;&quot;&quot;; [$List.A41]; &quot;&quot;)">
            <text:p/>
          </table:table-cell>
          <table:table-cell/>
          <table:table-cell table:formula="of:=IF([.A41]&lt;&gt;&quot;&quot;; COM.MICROSOFT.CONCAT(&quot;#define MODBUS_ADDR_&quot;; [.A41]; &quot; &quot;; [.B41]); &quot;&quot;)">
            <text:p/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CUP1_FSM_STATE" calcext:value-type="string">
            <text:p>CUP1_FSM_STATE</text:p>
          </table:table-cell>
          <table:table-cell table:formula="of:=IF([$List.A42] &lt;&gt;&quot;&quot;; [$List.A42]; &quot;&quot;)" office:value-type="float" office:value="1010" calcext:value-type="float">
            <text:p>1010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 office:value-type="string" office:string-value="CUP2_FSM_STATE" calcext:value-type="string">
            <text:p>CUP2_FSM_STATE</text:p>
          </table:table-cell>
          <table:table-cell table:formula="of:=IF([$List.A43] &lt;&gt;&quot;&quot;; [$List.A43]; &quot;&quot;)" office:value-type="float" office:value="1011" calcext:value-type="float">
            <text:p>1011</text:p>
          </table:table-cell>
          <table:table-cell/>
          <table:table-cell table:formula="of:=IF([.A43]&lt;&gt;&quot;&quot;; COM.MICROSOFT.CONCAT(&quot;#define MODBUS_ADDR_&quot;; [.A43]; &quot; &quot;; [.B43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CUP3_FSM_STATE" calcext:value-type="string">
            <text:p>CUP3_FSM_STATE</text:p>
          </table:table-cell>
          <table:table-cell table:formula="of:=IF([$List.A44] &lt;&gt;&quot;&quot;; [$List.A44]; &quot;&quot;)" office:value-type="float" office:value="1012" calcext:value-type="float">
            <text:p>1012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 office:value-type="string" office:string-value="CUP1_ERROR" calcext:value-type="string">
            <text:p>CUP1_ERROR</text:p>
          </table:table-cell>
          <table:table-cell table:formula="of:=IF([$List.A45] &lt;&gt;&quot;&quot;; [$List.A45]; &quot;&quot;)" office:value-type="float" office:value="1013" calcext:value-type="float">
            <text:p>1013</text:p>
          </table:table-cell>
          <table:table-cell/>
          <table:table-cell table:formula="of:=IF([.A45]&lt;&gt;&quot;&quot;; COM.MICROSOFT.CONCAT(&quot;#define MODBUS_ADDR_&quot;; [.A45]; &quot; &quot;; [.B45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2_ERROR" calcext:value-type="string">
            <text:p>CUP2_ERROR</text:p>
          </table:table-cell>
          <table:table-cell table:formula="of:=IF([$List.A46] &lt;&gt;&quot;&quot;; [$List.A46]; &quot;&quot;)" office:value-type="float" office:value="1014" calcext:value-type="float">
            <text:p>1014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3_ERROR" calcext:value-type="string">
            <text:p>CUP3_ERROR</text:p>
          </table:table-cell>
          <table:table-cell table:formula="of:=IF([$List.A47] &lt;&gt;&quot;&quot;; [$List.A47]; &quot;&quot;)" office:value-type="float" office:value="1015" calcext:value-type="float">
            <text:p>1015</text:p>
          </table:table-cell>
          <table:table-cell/>
          <table:table-cell table:formula="of:=IF([.A47]&lt;&gt;&quot;&quot;; COM.MICROSOFT.CONCAT(&quot;#define MODBUS_ADDR_&quot;; [.A47]; &quot; &quot;; [.B47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1_LAST_ERROR" calcext:value-type="string">
            <text:p>CUP1_LAST_ERROR</text:p>
          </table:table-cell>
          <table:table-cell table:formula="of:=IF([$List.A48] &lt;&gt;&quot;&quot;; [$List.A48]; &quot;&quot;)" office:value-type="float" office:value="1016" calcext:value-type="float">
            <text:p>1016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2_LAST_ERROR" calcext:value-type="string">
            <text:p>CUP2_LAST_ERROR</text:p>
          </table:table-cell>
          <table:table-cell table:formula="of:=IF([$List.A49] &lt;&gt;&quot;&quot;; [$List.A49]; &quot;&quot;)" office:value-type="float" office:value="1017" calcext:value-type="float">
            <text:p>1017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3_LAST_ERROR" calcext:value-type="string">
            <text:p>CUP3_LAST_ERROR</text:p>
          </table:table-cell>
          <table:table-cell table:formula="of:=IF([$List.A50] &lt;&gt;&quot;&quot;; [$List.A50]; &quot;&quot;)" office:value-type="float" office:value="1018" calcext:value-type="float">
            <text:p>1018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1_ERROR_STORAGE" calcext:value-type="string">
            <text:p>CUP1_ERROR_STORAGE</text:p>
          </table:table-cell>
          <table:table-cell table:formula="of:=IF([$List.A51] &lt;&gt;&quot;&quot;; [$List.A51]; &quot;&quot;)" office:value-type="float" office:value="1019" calcext:value-type="float">
            <text:p>1019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2_ERROR_STORAGE" calcext:value-type="string">
            <text:p>CUP2_ERROR_STORAGE</text:p>
          </table:table-cell>
          <table:table-cell table:formula="of:=IF([$List.A52] &lt;&gt;&quot;&quot;; [$List.A52]; &quot;&quot;)" office:value-type="float" office:value="1020" calcext:value-type="float">
            <text:p>1020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3_ERROR_STORAGE" calcext:value-type="string">
            <text:p>CUP3_ERROR_STORAGE</text:p>
          </table:table-cell>
          <table:table-cell table:formula="of:=IF([$List.A53] &lt;&gt;&quot;&quot;; [$List.A53]; &quot;&quot;)" office:value-type="float" office:value="1021" calcext:value-type="float">
            <text:p>1021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>
            <text:p/>
          </table:table-cell>
          <table:table-cell table:formula="of:=IF([$List.A54] &lt;&gt;&quot;&quot;; [$List.A54]; &quot;&quot;)">
            <text:p/>
          </table:table-cell>
          <table:table-cell/>
          <table:table-cell table:formula="of:=IF([.A54]&lt;&gt;&quot;&quot;; COM.MICROSOFT.CONCAT(&quot;#define MODBUS_ADDR_&quot;; [.A54]; &quot; &quot;; [.B54]); &quot;&quot;)">
            <text:p/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INSTALLED_CUPS" calcext:value-type="string">
            <text:p>INSTALLED_CUPS</text:p>
          </table:table-cell>
          <table:table-cell table:formula="of:=IF([$List.A55] &lt;&gt;&quot;&quot;; [$List.A55]; &quot;&quot;)" office:value-type="float" office:value="1022" calcext:value-type="float">
            <text:p>1022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ELECTRODES_CUP1" calcext:value-type="string">
            <text:p>ELECTRODES_CUP1</text:p>
          </table:table-cell>
          <table:table-cell table:formula="of:=IF([$List.A56] &lt;&gt;&quot;&quot;; [$List.A56]; &quot;&quot;)" office:value-type="float" office:value="1023" calcext:value-type="float">
            <text:p>1023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ELECTRODES_CUP2" calcext:value-type="string">
            <text:p>ELECTRODES_CUP2</text:p>
          </table:table-cell>
          <table:table-cell table:formula="of:=IF([$List.A57] &lt;&gt;&quot;&quot;; [$List.A57]; &quot;&quot;)" office:value-type="float" office:value="1024" calcext:value-type="float">
            <text:p>1024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 office:value-type="string" office:string-value="ELECTRODES_CUP3" calcext:value-type="string">
            <text:p>ELECTRODES_CUP3</text:p>
          </table:table-cell>
          <table:table-cell table:formula="of:=IF([$List.A58] &lt;&gt;&quot;&quot;; [$List.A58]; &quot;&quot;)" office:value-type="float" office:value="1025" calcext:value-type="float">
            <text:p>1025</text:p>
          </table:table-cell>
          <table:table-cell/>
          <table:table-cell table:formula="of:=IF([.A58]&lt;&gt;&quot;&quot;; COM.MICROSOFT.CONCAT(&quot;#define MODBUS_ADDR_&quot;; [.A58]; &quot; &quot;; [.B58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CUP1_TYPE" calcext:value-type="string">
            <text:p>CUP1_TYPE</text:p>
          </table:table-cell>
          <table:table-cell table:formula="of:=IF([$List.A59] &lt;&gt;&quot;&quot;; [$List.A59]; &quot;&quot;)" office:value-type="float" office:value="1026" calcext:value-type="float">
            <text:p>1026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CUP2_TYPE" calcext:value-type="string">
            <text:p>CUP2_TYPE</text:p>
          </table:table-cell>
          <table:table-cell table:formula="of:=IF([$List.A60] &lt;&gt;&quot;&quot;; [$List.A60]; &quot;&quot;)" office:value-type="float" office:value="1027" calcext:value-type="float">
            <text:p>1027</text:p>
          </table:table-cell>
          <table:table-cell/>
          <table:table-cell table:formula="of:=IF([.A60]&lt;&gt;&quot;&quot;; COM.MICROSOFT.CONCAT(&quot;#define MODBUS_ADDR_&quot;; [.A60]; &quot; &quot;; [.B60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CUP3_TYPE" calcext:value-type="string">
            <text:p>CUP3_TYPE</text:p>
          </table:table-cell>
          <table:table-cell table:formula="of:=IF([$List.A61] &lt;&gt;&quot;&quot;; [$List.A61]; &quot;&quot;)" office:value-type="float" office:value="1028" calcext:value-type="float">
            <text:p>1028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>
            <text:p/>
          </table:table-cell>
          <table:table-cell table:formula="of:=IF([$List.A62] &lt;&gt;&quot;&quot;; [$List.A62]; &quot;&quot;)">
            <text:p/>
          </table:table-cell>
          <table:table-cell/>
          <table:table-cell table:formula="of:=IF([.A62]&lt;&gt;&quot;&quot;; COM.MICROSOFT.CONCAT(&quot;#define MODBUS_ADDR_&quot;; [.A62]; &quot; &quot;; [.B62]); &quot;&quot;)">
            <text:p/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CHANNEL1_GAIN1_OFFSET" calcext:value-type="string">
            <text:p>CUP1_CHANNEL1_GAIN1_OFFSET</text:p>
          </table:table-cell>
          <table:table-cell table:formula="of:=IF([$List.A63] &lt;&gt;&quot;&quot;; [$List.A63]; &quot;&quot;)" office:value-type="float" office:value="1029" calcext:value-type="float">
            <text:p>1029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CUP1_CHANNEL1_GAIN1_OFFSET 1029" calcext:value-type="string">
            <text:p>#define MODBUS_ADDR_CUP1_CHANNEL1_GAIN1_OFFSET 1029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1_CHANNEL2_GAIN1_OFFSET" calcext:value-type="string">
            <text:p>CUP1_CHANNEL2_GAIN1_OFFSET</text:p>
          </table:table-cell>
          <table:table-cell table:formula="of:=IF([$List.A64] &lt;&gt;&quot;&quot;; [$List.A64]; &quot;&quot;)" office:value-type="float" office:value="1030" calcext:value-type="float">
            <text:p>1030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CUP1_CHANNEL2_GAIN1_OFFSET 1030" calcext:value-type="string">
            <text:p>#define MODBUS_ADDR_CUP1_CHANNEL2_GAIN1_OFFSET 1030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1_CHANNEL3_GAIN1_OFFSET" calcext:value-type="string">
            <text:p>CUP1_CHANNEL3_GAIN1_OFFSET</text:p>
          </table:table-cell>
          <table:table-cell table:formula="of:=IF([$List.A65] &lt;&gt;&quot;&quot;; [$List.A65]; &quot;&quot;)" office:value-type="float" office:value="1031" calcext:value-type="float">
            <text:p>1031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1_CHANNEL3_GAIN1_OFFSET 1031" calcext:value-type="string">
            <text:p>#define MODBUS_ADDR_CUP1_CHANNEL3_GAIN1_OFFSET 1031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 office:value-type="string" office:string-value="CUP1_CHANNEL4_GAIN1_OFFSET" calcext:value-type="string">
            <text:p>CUP1_CHANNEL4_GAIN1_OFFSET</text:p>
          </table:table-cell>
          <table:table-cell table:formula="of:=IF([$List.A66] &lt;&gt;&quot;&quot;; [$List.A66]; &quot;&quot;)" office:value-type="float" office:value="1032" calcext:value-type="float">
            <text:p>1032</text:p>
          </table:table-cell>
          <table:table-cell/>
          <table:table-cell table:formula="of:=IF([.A66]&lt;&gt;&quot;&quot;; COM.MICROSOFT.CONCAT(&quot;#define MODBUS_ADDR_&quot;; [.A66]; &quot; &quot;; [.B66]); &quot;&quot;)" office:value-type="string" office:string-value="#define MODBUS_ADDR_CUP1_CHANNEL4_GAIN1_OFFSET 1032" calcext:value-type="string">
            <text:p>#define MODBUS_ADDR_CUP1_CHANNEL4_GAIN1_OFFSET 1032</text:p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UP2_CHANNEL1_GAIN1_OFFSET" calcext:value-type="string">
            <text:p>CUP2_CHANNEL1_GAIN1_OFFSET</text:p>
          </table:table-cell>
          <table:table-cell table:formula="of:=IF([$List.A67] &lt;&gt;&quot;&quot;; [$List.A67]; &quot;&quot;)" office:value-type="float" office:value="1033" calcext:value-type="float">
            <text:p>1033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UP2_CHANNEL1_GAIN1_OFFSET 1033" calcext:value-type="string">
            <text:p>#define MODBUS_ADDR_CUP2_CHANNEL1_GAIN1_OFFSET 1033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UP2_CHANNEL2_GAIN1_OFFSET" calcext:value-type="string">
            <text:p>CUP2_CHANNEL2_GAIN1_OFFSET</text:p>
          </table:table-cell>
          <table:table-cell table:formula="of:=IF([$List.A68] &lt;&gt;&quot;&quot;; [$List.A68]; &quot;&quot;)" office:value-type="float" office:value="1034" calcext:value-type="float">
            <text:p>1034</text:p>
          </table:table-cell>
          <table:table-cell/>
          <table:table-cell table:formula="of:=IF([.A68]&lt;&gt;&quot;&quot;; COM.MICROSOFT.CONCAT(&quot;#define MODBUS_ADDR_&quot;; [.A68]; &quot; &quot;; [.B68]); &quot;&quot;)" office:value-type="string" office:string-value="#define MODBUS_ADDR_CUP2_CHANNEL2_GAIN1_OFFSET 1034" calcext:value-type="string">
            <text:p>#define MODBUS_ADDR_CUP2_CHANNEL2_GAIN1_OFFSET 1034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UP2_CHANNEL3_GAIN1_OFFSET" calcext:value-type="string">
            <text:p>CUP2_CHANNEL3_GAIN1_OFFSET</text:p>
          </table:table-cell>
          <table:table-cell table:formula="of:=IF([$List.A69] &lt;&gt;&quot;&quot;; [$List.A69]; &quot;&quot;)" office:value-type="float" office:value="1035" calcext:value-type="float">
            <text:p>1035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UP2_CHANNEL3_GAIN1_OFFSET 1035" calcext:value-type="string">
            <text:p>#define MODBUS_ADDR_CUP2_CHANNEL3_GAIN1_OFFSET 1035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UP2_CHANNEL4_GAIN1_OFFSET" calcext:value-type="string">
            <text:p>CUP2_CHANNEL4_GAIN1_OFFSET</text:p>
          </table:table-cell>
          <table:table-cell table:formula="of:=IF([$List.A70] &lt;&gt;&quot;&quot;; [$List.A70]; &quot;&quot;)" office:value-type="float" office:value="1036" calcext:value-type="float">
            <text:p>1036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UP2_CHANNEL4_GAIN1_OFFSET 1036" calcext:value-type="string">
            <text:p>#define MODBUS_ADDR_CUP2_CHANNEL4_GAIN1_OFFSET 1036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 office:value-type="string" office:string-value="CUP3_CHANNEL1_GAIN1_OFFSET" calcext:value-type="string">
            <text:p>CUP3_CHANNEL1_GAIN1_OFFSET</text:p>
          </table:table-cell>
          <table:table-cell table:formula="of:=IF([$List.A71] &lt;&gt;&quot;&quot;; [$List.A71]; &quot;&quot;)" office:value-type="float" office:value="1037" calcext:value-type="float">
            <text:p>1037</text:p>
          </table:table-cell>
          <table:table-cell/>
          <table:table-cell table:formula="of:=IF([.A71]&lt;&gt;&quot;&quot;; COM.MICROSOFT.CONCAT(&quot;#define MODBUS_ADDR_&quot;; [.A71]; &quot; &quot;; [.B71]); &quot;&quot;)" office:value-type="string" office:string-value="#define MODBUS_ADDR_CUP3_CHANNEL1_GAIN1_OFFSET 1037" calcext:value-type="string">
            <text:p>#define MODBUS_ADDR_CUP3_CHANNEL1_GAIN1_OFFSET 1037</text:p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3_CHANNEL2_GAIN1_OFFSET" calcext:value-type="string">
            <text:p>CUP3_CHANNEL2_GAIN1_OFFSET</text:p>
          </table:table-cell>
          <table:table-cell table:formula="of:=IF([$List.A72] &lt;&gt;&quot;&quot;; [$List.A72]; &quot;&quot;)" office:value-type="float" office:value="1038" calcext:value-type="float">
            <text:p>1038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3_CHANNEL2_GAIN1_OFFSET 1038" calcext:value-type="string">
            <text:p>#define MODBUS_ADDR_CUP3_CHANNEL2_GAIN1_OFFSET 1038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3_CHANNEL3_GAIN1_OFFSET" calcext:value-type="string">
            <text:p>CUP3_CHANNEL3_GAIN1_OFFSET</text:p>
          </table:table-cell>
          <table:table-cell table:formula="of:=IF([$List.A73] &lt;&gt;&quot;&quot;; [$List.A73]; &quot;&quot;)" office:value-type="float" office:value="1039" calcext:value-type="float">
            <text:p>1039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3_CHANNEL3_GAIN1_OFFSET 1039" calcext:value-type="string">
            <text:p>#define MODBUS_ADDR_CUP3_CHANNEL3_GAIN1_OFFSET 1039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3_CHANNEL4_GAIN1_OFFSET" calcext:value-type="string">
            <text:p>CUP3_CHANNEL4_GAIN1_OFFSET</text:p>
          </table:table-cell>
          <table:table-cell table:formula="of:=IF([$List.A74] &lt;&gt;&quot;&quot;; [$List.A74]; &quot;&quot;)" office:value-type="float" office:value="1040" calcext:value-type="float">
            <text:p>1040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3_CHANNEL4_GAIN1_OFFSET 1040" calcext:value-type="string">
            <text:p>#define MODBUS_ADDR_CUP3_CHANNEL4_GAIN1_OFFSET 1040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1_CHANNEL1_GAIN2_OFFSET" calcext:value-type="string">
            <text:p>CUP1_CHANNEL1_GAIN2_OFFSET</text:p>
          </table:table-cell>
          <table:table-cell table:formula="of:=IF([$List.A75] &lt;&gt;&quot;&quot;; [$List.A75]; &quot;&quot;)" office:value-type="float" office:value="1041" calcext:value-type="float">
            <text:p>1041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1_CHANNEL1_GAIN2_OFFSET 1041" calcext:value-type="string">
            <text:p>#define MODBUS_ADDR_CUP1_CHANNEL1_GAIN2_OFFSET 1041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1_CHANNEL2_GAIN2_OFFSET" calcext:value-type="string">
            <text:p>CUP1_CHANNEL2_GAIN2_OFFSET</text:p>
          </table:table-cell>
          <table:table-cell table:formula="of:=IF([$List.A76] &lt;&gt;&quot;&quot;; [$List.A76]; &quot;&quot;)" office:value-type="float" office:value="1042" calcext:value-type="float">
            <text:p>1042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1_CHANNEL2_GAIN2_OFFSET 1042" calcext:value-type="string">
            <text:p>#define MODBUS_ADDR_CUP1_CHANNEL2_GAIN2_OFFSET 1042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1_CHANNEL3_GAIN2_OFFSET" calcext:value-type="string">
            <text:p>CUP1_CHANNEL3_GAIN2_OFFSET</text:p>
          </table:table-cell>
          <table:table-cell table:formula="of:=IF([$List.A77] &lt;&gt;&quot;&quot;; [$List.A77]; &quot;&quot;)" office:value-type="float" office:value="1043" calcext:value-type="float">
            <text:p>1043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1_CHANNEL3_GAIN2_OFFSET 1043" calcext:value-type="string">
            <text:p>#define MODBUS_ADDR_CUP1_CHANNEL3_GAIN2_OFFSET 1043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1_CHANNEL4_GAIN2_OFFSET" calcext:value-type="string">
            <text:p>CUP1_CHANNEL4_GAIN2_OFFSET</text:p>
          </table:table-cell>
          <table:table-cell table:formula="of:=IF([$List.A78] &lt;&gt;&quot;&quot;; [$List.A78]; &quot;&quot;)" office:value-type="float" office:value="1044" calcext:value-type="float">
            <text:p>1044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1_CHANNEL4_GAIN2_OFFSET 1044" calcext:value-type="string">
            <text:p>#define MODBUS_ADDR_CUP1_CHANNEL4_GAIN2_OFFSET 1044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2_CHANNEL1_GAIN2_OFFSET" calcext:value-type="string">
            <text:p>CUP2_CHANNEL1_GAIN2_OFFSET</text:p>
          </table:table-cell>
          <table:table-cell table:formula="of:=IF([$List.A79] &lt;&gt;&quot;&quot;; [$List.A79]; &quot;&quot;)" office:value-type="float" office:value="1045" calcext:value-type="float">
            <text:p>1045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2_CHANNEL1_GAIN2_OFFSET 1045" calcext:value-type="string">
            <text:p>#define MODBUS_ADDR_CUP2_CHANNEL1_GAIN2_OFFSET 1045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2_CHANNEL2_GAIN2_OFFSET" calcext:value-type="string">
            <text:p>CUP2_CHANNEL2_GAIN2_OFFSET</text:p>
          </table:table-cell>
          <table:table-cell table:formula="of:=IF([$List.A80] &lt;&gt;&quot;&quot;; [$List.A80]; &quot;&quot;)" office:value-type="float" office:value="1046" calcext:value-type="float">
            <text:p>1046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2_CHANNEL2_GAIN2_OFFSET 1046" calcext:value-type="string">
            <text:p>#define MODBUS_ADDR_CUP2_CHANNEL2_GAIN2_OFFSET 1046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2_CHANNEL3_GAIN2_OFFSET" calcext:value-type="string">
            <text:p>CUP2_CHANNEL3_GAIN2_OFFSET</text:p>
          </table:table-cell>
          <table:table-cell table:formula="of:=IF([$List.A81] &lt;&gt;&quot;&quot;; [$List.A81]; &quot;&quot;)" office:value-type="float" office:value="1047" calcext:value-type="float">
            <text:p>1047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2_CHANNEL3_GAIN2_OFFSET 1047" calcext:value-type="string">
            <text:p>#define MODBUS_ADDR_CUP2_CHANNEL3_GAIN2_OFFSET 1047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2_CHANNEL4_GAIN2_OFFSET" calcext:value-type="string">
            <text:p>CUP2_CHANNEL4_GAIN2_OFFSET</text:p>
          </table:table-cell>
          <table:table-cell table:formula="of:=IF([$List.A82] &lt;&gt;&quot;&quot;; [$List.A82]; &quot;&quot;)" office:value-type="float" office:value="1048" calcext:value-type="float">
            <text:p>1048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2_CHANNEL4_GAIN2_OFFSET 1048" calcext:value-type="string">
            <text:p>#define MODBUS_ADDR_CUP2_CHANNEL4_GAIN2_OFFSET 1048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3_CHANNEL1_GAIN2_OFFSET" calcext:value-type="string">
            <text:p>CUP3_CHANNEL1_GAIN2_OFFSET</text:p>
          </table:table-cell>
          <table:table-cell table:formula="of:=IF([$List.A83] &lt;&gt;&quot;&quot;; [$List.A83]; &quot;&quot;)" office:value-type="float" office:value="1049" calcext:value-type="float">
            <text:p>1049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3_CHANNEL1_GAIN2_OFFSET 1049" calcext:value-type="string">
            <text:p>#define MODBUS_ADDR_CUP3_CHANNEL1_GAIN2_OFFSET 1049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3_CHANNEL2_GAIN2_OFFSET" calcext:value-type="string">
            <text:p>CUP3_CHANNEL2_GAIN2_OFFSET</text:p>
          </table:table-cell>
          <table:table-cell table:formula="of:=IF([$List.A84] &lt;&gt;&quot;&quot;; [$List.A84]; &quot;&quot;)" office:value-type="float" office:value="1050" calcext:value-type="float">
            <text:p>1050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3_CHANNEL2_GAIN2_OFFSET 1050" calcext:value-type="string">
            <text:p>#define MODBUS_ADDR_CUP3_CHANNEL2_GAIN2_OFFSET 1050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3_CHANNEL3_GAIN2_OFFSET" calcext:value-type="string">
            <text:p>CUP3_CHANNEL3_GAIN2_OFFSET</text:p>
          </table:table-cell>
          <table:table-cell table:formula="of:=IF([$List.A85] &lt;&gt;&quot;&quot;; [$List.A85]; &quot;&quot;)" office:value-type="float" office:value="1051" calcext:value-type="float">
            <text:p>1051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3_CHANNEL3_GAIN2_OFFSET 1051" calcext:value-type="string">
            <text:p>#define MODBUS_ADDR_CUP3_CHANNEL3_GAIN2_OFFSET 1051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3_CHANNEL4_GAIN2_OFFSET" calcext:value-type="string">
            <text:p>CUP3_CHANNEL4_GAIN2_OFFSET</text:p>
          </table:table-cell>
          <table:table-cell table:formula="of:=IF([$List.A86] &lt;&gt;&quot;&quot;; [$List.A86]; &quot;&quot;)" office:value-type="float" office:value="1052" calcext:value-type="float">
            <text:p>1052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3_CHANNEL4_GAIN2_OFFSET 1052" calcext:value-type="string">
            <text:p>#define MODBUS_ADDR_CUP3_CHANNEL4_GAIN2_OFFSET 1052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>
            <text:p/>
          </table:table-cell>
          <table:table-cell table:formula="of:=IF([$List.A87] &lt;&gt;&quot;&quot;; [$List.A87]; &quot;&quot;)">
            <text:p/>
          </table:table-cell>
          <table:table-cell/>
          <table:table-cell table:formula="of:=IF([.A87]&lt;&gt;&quot;&quot;; COM.MICROSOFT.CONCAT(&quot;#define MODBUS_ADDR_&quot;; [.A87]; &quot; &quot;; [.B87]); &quot;&quot;)">
            <text:p/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1_CHANNEL1_GAIN1_FACTOR" calcext:value-type="string">
            <text:p>CUP1_CHANNEL1_GAIN1_FACTOR</text:p>
          </table:table-cell>
          <table:table-cell table:formula="of:=IF([$List.A88] &lt;&gt;&quot;&quot;; [$List.A88]; &quot;&quot;)" office:value-type="float" office:value="1053" calcext:value-type="float">
            <text:p>1053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1_CHANNEL1_GAIN1_FACTOR 1053" calcext:value-type="string">
            <text:p>#define MODBUS_ADDR_CUP1_CHANNEL1_GAIN1_FACTOR 1053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1_CHANNEL2_GAIN1_FACTOR" calcext:value-type="string">
            <text:p>CUP1_CHANNEL2_GAIN1_FACTOR</text:p>
          </table:table-cell>
          <table:table-cell table:formula="of:=IF([$List.A89] &lt;&gt;&quot;&quot;; [$List.A89]; &quot;&quot;)" office:value-type="float" office:value="1054" calcext:value-type="float">
            <text:p>1054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1_CHANNEL2_GAIN1_FACTOR 1054" calcext:value-type="string">
            <text:p>#define MODBUS_ADDR_CUP1_CHANNEL2_GAIN1_FACTOR 1054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1_CHANNEL3_GAIN1_FACTOR" calcext:value-type="string">
            <text:p>CUP1_CHANNEL3_GAIN1_FACTOR</text:p>
          </table:table-cell>
          <table:table-cell table:formula="of:=IF([$List.A90] &lt;&gt;&quot;&quot;; [$List.A90]; &quot;&quot;)" office:value-type="float" office:value="1055" calcext:value-type="float">
            <text:p>1055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1_CHANNEL3_GAIN1_FACTOR 1055" calcext:value-type="string">
            <text:p>#define MODBUS_ADDR_CUP1_CHANNEL3_GAIN1_FACTOR 1055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 office:value-type="string" office:string-value="CUP1_CHANNEL4_GAIN1_FACTOR" calcext:value-type="string">
            <text:p>CUP1_CHANNEL4_GAIN1_FACTOR</text:p>
          </table:table-cell>
          <table:table-cell table:formula="of:=IF([$List.A91] &lt;&gt;&quot;&quot;; [$List.A91]; &quot;&quot;)" office:value-type="float" office:value="1056" calcext:value-type="float">
            <text:p>1056</text:p>
          </table:table-cell>
          <table:table-cell/>
          <table:table-cell table:formula="of:=IF([.A91]&lt;&gt;&quot;&quot;; COM.MICROSOFT.CONCAT(&quot;#define MODBUS_ADDR_&quot;; [.A91]; &quot; &quot;; [.B91]); &quot;&quot;)" office:value-type="string" office:string-value="#define MODBUS_ADDR_CUP1_CHANNEL4_GAIN1_FACTOR 1056" calcext:value-type="string">
            <text:p>#define MODBUS_ADDR_CUP1_CHANNEL4_GAIN1_FACTOR 1056</text:p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2_CHANNEL1_GAIN1_FACTOR" calcext:value-type="string">
            <text:p>CUP2_CHANNEL1_GAIN1_FACTOR</text:p>
          </table:table-cell>
          <table:table-cell table:formula="of:=IF([$List.A92] &lt;&gt;&quot;&quot;; [$List.A92]; &quot;&quot;)" office:value-type="float" office:value="1057" calcext:value-type="float">
            <text:p>1057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2_CHANNEL1_GAIN1_FACTOR 1057" calcext:value-type="string">
            <text:p>#define MODBUS_ADDR_CUP2_CHANNEL1_GAIN1_FACTOR 1057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2_CHANNEL2_GAIN1_FACTOR" calcext:value-type="string">
            <text:p>CUP2_CHANNEL2_GAIN1_FACTOR</text:p>
          </table:table-cell>
          <table:table-cell table:formula="of:=IF([$List.A93] &lt;&gt;&quot;&quot;; [$List.A93]; &quot;&quot;)" office:value-type="float" office:value="1058" calcext:value-type="float">
            <text:p>1058</text:p>
          </table:table-cell>
          <table:table-cell/>
          <table:table-cell table:formula="of:=IF([.A93]&lt;&gt;&quot;&quot;; COM.MICROSOFT.CONCAT(&quot;#define MODBUS_ADDR_&quot;; [.A93]; &quot; &quot;; [.B93]); &quot;&quot;)" office:value-type="string" office:string-value="#define MODBUS_ADDR_CUP2_CHANNEL2_GAIN1_FACTOR 1058" calcext:value-type="string">
            <text:p>#define MODBUS_ADDR_CUP2_CHANNEL2_GAIN1_FACTOR 1058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2_CHANNEL3_GAIN1_FACTOR" calcext:value-type="string">
            <text:p>CUP2_CHANNEL3_GAIN1_FACTOR</text:p>
          </table:table-cell>
          <table:table-cell table:formula="of:=IF([$List.A94] &lt;&gt;&quot;&quot;; [$List.A94]; &quot;&quot;)" office:value-type="float" office:value="1059" calcext:value-type="float">
            <text:p>1059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2_CHANNEL3_GAIN1_FACTOR 1059" calcext:value-type="string">
            <text:p>#define MODBUS_ADDR_CUP2_CHANNEL3_GAIN1_FACTOR 1059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2_CHANNEL4_GAIN1_FACTOR" calcext:value-type="string">
            <text:p>CUP2_CHANNEL4_GAIN1_FACTOR</text:p>
          </table:table-cell>
          <table:table-cell table:formula="of:=IF([$List.A95] &lt;&gt;&quot;&quot;; [$List.A95]; &quot;&quot;)" office:value-type="float" office:value="1060" calcext:value-type="float">
            <text:p>1060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2_CHANNEL4_GAIN1_FACTOR 1060" calcext:value-type="string">
            <text:p>#define MODBUS_ADDR_CUP2_CHANNEL4_GAIN1_FACTOR 1060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 office:value-type="string" office:string-value="CUP3_CHANNEL1_GAIN1_FACTOR" calcext:value-type="string">
            <text:p>CUP3_CHANNEL1_GAIN1_FACTOR</text:p>
          </table:table-cell>
          <table:table-cell table:formula="of:=IF([$List.A96] &lt;&gt;&quot;&quot;; [$List.A96]; &quot;&quot;)" office:value-type="float" office:value="1061" calcext:value-type="float">
            <text:p>1061</text:p>
          </table:table-cell>
          <table:table-cell/>
          <table:table-cell table:formula="of:=IF([.A96]&lt;&gt;&quot;&quot;; COM.MICROSOFT.CONCAT(&quot;#define MODBUS_ADDR_&quot;; [.A96]; &quot; &quot;; [.B96]); &quot;&quot;)" office:value-type="string" office:string-value="#define MODBUS_ADDR_CUP3_CHANNEL1_GAIN1_FACTOR 1061" calcext:value-type="string">
            <text:p>#define MODBUS_ADDR_CUP3_CHANNEL1_GAIN1_FACTOR 1061</text:p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3_CHANNEL2_GAIN1_FACTOR" calcext:value-type="string">
            <text:p>CUP3_CHANNEL2_GAIN1_FACTOR</text:p>
          </table:table-cell>
          <table:table-cell table:formula="of:=IF([$List.A97] &lt;&gt;&quot;&quot;; [$List.A97]; &quot;&quot;)" office:value-type="float" office:value="1062" calcext:value-type="float">
            <text:p>1062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3_CHANNEL2_GAIN1_FACTOR 1062" calcext:value-type="string">
            <text:p>#define MODBUS_ADDR_CUP3_CHANNEL2_GAIN1_FACTOR 1062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3_CHANNEL3_GAIN1_FACTOR" calcext:value-type="string">
            <text:p>CUP3_CHANNEL3_GAIN1_FACTOR</text:p>
          </table:table-cell>
          <table:table-cell table:formula="of:=IF([$List.A98] &lt;&gt;&quot;&quot;; [$List.A98]; &quot;&quot;)" office:value-type="float" office:value="1063" calcext:value-type="float">
            <text:p>1063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3_CHANNEL3_GAIN1_FACTOR 1063" calcext:value-type="string">
            <text:p>#define MODBUS_ADDR_CUP3_CHANNEL3_GAIN1_FACTOR 1063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3_CHANNEL4_GAIN1_FACTOR" calcext:value-type="string">
            <text:p>CUP3_CHANNEL4_GAIN1_FACTOR</text:p>
          </table:table-cell>
          <table:table-cell table:formula="of:=IF([$List.A99] &lt;&gt;&quot;&quot;; [$List.A99]; &quot;&quot;)" office:value-type="float" office:value="1064" calcext:value-type="float">
            <text:p>1064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3_CHANNEL4_GAIN1_FACTOR 1064" calcext:value-type="string">
            <text:p>#define MODBUS_ADDR_CUP3_CHANNEL4_GAIN1_FACTOR 1064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1_CHANNEL1_GAIN2_FACTOR" calcext:value-type="string">
            <text:p>CUP1_CHANNEL1_GAIN2_FACTOR</text:p>
          </table:table-cell>
          <table:table-cell table:formula="of:=IF([$List.A100] &lt;&gt;&quot;&quot;; [$List.A100]; &quot;&quot;)" office:value-type="float" office:value="1065" calcext:value-type="float">
            <text:p>1065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1_CHANNEL1_GAIN2_FACTOR 1065" calcext:value-type="string">
            <text:p>#define MODBUS_ADDR_CUP1_CHANNEL1_GAIN2_FACTOR 1065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1_CHANNEL2_GAIN2_FACTOR" calcext:value-type="string">
            <text:p>CUP1_CHANNEL2_GAIN2_FACTOR</text:p>
          </table:table-cell>
          <table:table-cell table:formula="of:=IF([$List.A101] &lt;&gt;&quot;&quot;; [$List.A101]; &quot;&quot;)" office:value-type="float" office:value="1066" calcext:value-type="float">
            <text:p>1066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1_CHANNEL2_GAIN2_FACTOR 1066" calcext:value-type="string">
            <text:p>#define MODBUS_ADDR_CUP1_CHANNEL2_GAIN2_FACTOR 1066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1_CHANNEL3_GAIN2_FACTOR" calcext:value-type="string">
            <text:p>CUP1_CHANNEL3_GAIN2_FACTOR</text:p>
          </table:table-cell>
          <table:table-cell table:formula="of:=IF([$List.A102] &lt;&gt;&quot;&quot;; [$List.A102]; &quot;&quot;)" office:value-type="float" office:value="1067" calcext:value-type="float">
            <text:p>1067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1_CHANNEL3_GAIN2_FACTOR 1067" calcext:value-type="string">
            <text:p>#define MODBUS_ADDR_CUP1_CHANNEL3_GAIN2_FACTOR 1067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1_CHANNEL4_GAIN2_FACTOR" calcext:value-type="string">
            <text:p>CUP1_CHANNEL4_GAIN2_FACTOR</text:p>
          </table:table-cell>
          <table:table-cell table:formula="of:=IF([$List.A103] &lt;&gt;&quot;&quot;; [$List.A103]; &quot;&quot;)" office:value-type="float" office:value="1068" calcext:value-type="float">
            <text:p>1068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1_CHANNEL4_GAIN2_FACTOR 1068" calcext:value-type="string">
            <text:p>#define MODBUS_ADDR_CUP1_CHANNEL4_GAIN2_FACTOR 1068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2_CHANNEL1_GAIN2_FACTOR" calcext:value-type="string">
            <text:p>CUP2_CHANNEL1_GAIN2_FACTOR</text:p>
          </table:table-cell>
          <table:table-cell table:formula="of:=IF([$List.A104] &lt;&gt;&quot;&quot;; [$List.A104]; &quot;&quot;)" office:value-type="float" office:value="1069" calcext:value-type="float">
            <text:p>1069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2_CHANNEL1_GAIN2_FACTOR 1069" calcext:value-type="string">
            <text:p>#define MODBUS_ADDR_CUP2_CHANNEL1_GAIN2_FACTOR 1069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2_CHANNEL2_GAIN2_FACTOR" calcext:value-type="string">
            <text:p>CUP2_CHANNEL2_GAIN2_FACTOR</text:p>
          </table:table-cell>
          <table:table-cell table:formula="of:=IF([$List.A105] &lt;&gt;&quot;&quot;; [$List.A105]; &quot;&quot;)" office:value-type="float" office:value="1070" calcext:value-type="float">
            <text:p>1070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2_CHANNEL2_GAIN2_FACTOR 1070" calcext:value-type="string">
            <text:p>#define MODBUS_ADDR_CUP2_CHANNEL2_GAIN2_FACTOR 1070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2_CHANNEL3_GAIN2_FACTOR" calcext:value-type="string">
            <text:p>CUP2_CHANNEL3_GAIN2_FACTOR</text:p>
          </table:table-cell>
          <table:table-cell table:formula="of:=IF([$List.A106] &lt;&gt;&quot;&quot;; [$List.A106]; &quot;&quot;)" office:value-type="float" office:value="1071" calcext:value-type="float">
            <text:p>1071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2_CHANNEL3_GAIN2_FACTOR 1071" calcext:value-type="string">
            <text:p>#define MODBUS_ADDR_CUP2_CHANNEL3_GAIN2_FACTOR 1071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2_CHANNEL4_GAIN2_FACTOR" calcext:value-type="string">
            <text:p>CUP2_CHANNEL4_GAIN2_FACTOR</text:p>
          </table:table-cell>
          <table:table-cell table:formula="of:=IF([$List.A107] &lt;&gt;&quot;&quot;; [$List.A107]; &quot;&quot;)" office:value-type="float" office:value="1072" calcext:value-type="float">
            <text:p>1072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2_CHANNEL4_GAIN2_FACTOR 1072" calcext:value-type="string">
            <text:p>#define MODBUS_ADDR_CUP2_CHANNEL4_GAIN2_FACTOR 1072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3_CHANNEL1_GAIN2_FACTOR" calcext:value-type="string">
            <text:p>CUP3_CHANNEL1_GAIN2_FACTOR</text:p>
          </table:table-cell>
          <table:table-cell table:formula="of:=IF([$List.A108] &lt;&gt;&quot;&quot;; [$List.A108]; &quot;&quot;)" office:value-type="float" office:value="1073" calcext:value-type="float">
            <text:p>1073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3_CHANNEL1_GAIN2_FACTOR 1073" calcext:value-type="string">
            <text:p>#define MODBUS_ADDR_CUP3_CHANNEL1_GAIN2_FACTOR 1073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3_CHANNEL2_GAIN2_FACTOR" calcext:value-type="string">
            <text:p>CUP3_CHANNEL2_GAIN2_FACTOR</text:p>
          </table:table-cell>
          <table:table-cell table:formula="of:=IF([$List.A109] &lt;&gt;&quot;&quot;; [$List.A109]; &quot;&quot;)" office:value-type="float" office:value="1074" calcext:value-type="float">
            <text:p>1074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3_CHANNEL2_GAIN2_FACTOR 1074" calcext:value-type="string">
            <text:p>#define MODBUS_ADDR_CUP3_CHANNEL2_GAIN2_FACTOR 1074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3_CHANNEL3_GAIN2_FACTOR" calcext:value-type="string">
            <text:p>CUP3_CHANNEL3_GAIN2_FACTOR</text:p>
          </table:table-cell>
          <table:table-cell table:formula="of:=IF([$List.A110] &lt;&gt;&quot;&quot;; [$List.A110]; &quot;&quot;)" office:value-type="float" office:value="1075" calcext:value-type="float">
            <text:p>1075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3_CHANNEL3_GAIN2_FACTOR 1075" calcext:value-type="string">
            <text:p>#define MODBUS_ADDR_CUP3_CHANNEL3_GAIN2_FACTOR 1075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3_CHANNEL4_GAIN2_FACTOR" calcext:value-type="string">
            <text:p>CUP3_CHANNEL4_GAIN2_FACTOR</text:p>
          </table:table-cell>
          <table:table-cell table:formula="of:=IF([$List.A111] &lt;&gt;&quot;&quot;; [$List.A111]; &quot;&quot;)" office:value-type="float" office:value="1076" calcext:value-type="float">
            <text:p>1076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3_CHANNEL4_GAIN2_FACTOR 1076" calcext:value-type="string">
            <text:p>#define MODBUS_ADDR_CUP3_CHANNEL4_GAIN2_FACTOR 1076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>
            <text:p/>
          </table:table-cell>
          <table:table-cell table:formula="of:=IF([$List.A112] &lt;&gt;&quot;&quot;; [$List.A112]; &quot;&quot;)">
            <text:p/>
          </table:table-cell>
          <table:table-cell/>
          <table:table-cell table:formula="of:=IF([.A112]&lt;&gt;&quot;&quot;; COM.MICROSOFT.CONCAT(&quot;#define MODBUS_ADDR_&quot;; [.A112]; &quot; &quot;; [.B112]); &quot;&quot;)">
            <text:p/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RANGE_CHANGE_THRESHOLD" calcext:value-type="string">
            <text:p>RANGE_CHANGE_THRESHOLD</text:p>
          </table:table-cell>
          <table:table-cell table:formula="of:=IF([$List.A113] &lt;&gt;&quot;&quot;; [$List.A113]; &quot;&quot;)" office:value-type="float" office:value="1077" calcext:value-type="float">
            <text:p>1077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RANGE_CHANGE_THRESHOLD 1077" calcext:value-type="string">
            <text:p>#define MODBUS_ADDR_RANGE_CHANGE_THRESHOLD 1077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>
            <text:p/>
          </table:table-cell>
          <table:table-cell table:formula="of:=IF([$List.A114] &lt;&gt;&quot;&quot;; [$List.A114]; &quot;&quot;)">
            <text:p/>
          </table:table-cell>
          <table:table-cell/>
          <table:table-cell table:formula="of:=IF([.A114]&lt;&gt;&quot;&quot;; COM.MICROSOFT.CONCAT(&quot;#define MODBUS_ADDR_&quot;; [.A114]; &quot; &quot;; [.B114]); &quot;&quot;)">
            <text:p/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1_CHANNEL1_LOWER_LIMIT" calcext:value-type="string">
            <text:p>CUP1_CHANNEL1_LOWER_LIMIT</text:p>
          </table:table-cell>
          <table:table-cell table:formula="of:=IF([$List.A115] &lt;&gt;&quot;&quot;; [$List.A115]; &quot;&quot;)" office:value-type="float" office:value="1078" calcext:value-type="float">
            <text:p>1078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1_CHANNEL1_LOWER_LIMIT 1078" calcext:value-type="string">
            <text:p>#define MODBUS_ADDR_CUP1_CHANNEL1_LOWER_LIMIT 1078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 office:value-type="string" office:string-value="CUP1_CHANNEL2_LOWER_LIMIT" calcext:value-type="string">
            <text:p>CUP1_CHANNEL2_LOWER_LIMIT</text:p>
          </table:table-cell>
          <table:table-cell table:formula="of:=IF([$List.A116] &lt;&gt;&quot;&quot;; [$List.A116]; &quot;&quot;)" office:value-type="float" office:value="1079" calcext:value-type="float">
            <text:p>1079</text:p>
          </table:table-cell>
          <table:table-cell/>
          <table:table-cell table:formula="of:=IF([.A116]&lt;&gt;&quot;&quot;; COM.MICROSOFT.CONCAT(&quot;#define MODBUS_ADDR_&quot;; [.A116]; &quot; &quot;; [.B116]); &quot;&quot;)" office:value-type="string" office:string-value="#define MODBUS_ADDR_CUP1_CHANNEL2_LOWER_LIMIT 1079" calcext:value-type="string">
            <text:p>#define MODBUS_ADDR_CUP1_CHANNEL2_LOWER_LIMIT 1079</text:p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CUP1_CHANNEL3_LOWER_LIMIT" calcext:value-type="string">
            <text:p>CUP1_CHANNEL3_LOWER_LIMIT</text:p>
          </table:table-cell>
          <table:table-cell table:formula="of:=IF([$List.A117] &lt;&gt;&quot;&quot;; [$List.A117]; &quot;&quot;)" office:value-type="float" office:value="1080" calcext:value-type="float">
            <text:p>1080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CUP1_CHANNEL3_LOWER_LIMIT 1080" calcext:value-type="string">
            <text:p>#define MODBUS_ADDR_CUP1_CHANNEL3_LOWER_LIMIT 1080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 office:value-type="string" office:string-value="CUP1_CHANNEL4_LOWER_LIMIT" calcext:value-type="string">
            <text:p>CUP1_CHANNEL4_LOWER_LIMIT</text:p>
          </table:table-cell>
          <table:table-cell table:formula="of:=IF([$List.A118] &lt;&gt;&quot;&quot;; [$List.A118]; &quot;&quot;)" office:value-type="float" office:value="1081" calcext:value-type="float">
            <text:p>1081</text:p>
          </table:table-cell>
          <table:table-cell/>
          <table:table-cell table:formula="of:=IF([.A118]&lt;&gt;&quot;&quot;; COM.MICROSOFT.CONCAT(&quot;#define MODBUS_ADDR_&quot;; [.A118]; &quot; &quot;; [.B118]); &quot;&quot;)" office:value-type="string" office:string-value="#define MODBUS_ADDR_CUP1_CHANNEL4_LOWER_LIMIT 1081" calcext:value-type="string">
            <text:p>#define MODBUS_ADDR_CUP1_CHANNEL4_LOWER_LIMIT 1081</text:p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2_CHANNEL1_LOWER_LIMIT" calcext:value-type="string">
            <text:p>CUP2_CHANNEL1_LOWER_LIMIT</text:p>
          </table:table-cell>
          <table:table-cell table:formula="of:=IF([$List.A119] &lt;&gt;&quot;&quot;; [$List.A119]; &quot;&quot;)" office:value-type="float" office:value="1082" calcext:value-type="float">
            <text:p>1082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CUP2_CHANNEL1_LOWER_LIMIT 1082" calcext:value-type="string">
            <text:p>#define MODBUS_ADDR_CUP2_CHANNEL1_LOWER_LIMIT 1082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2_CHANNEL2_LOWER_LIMIT" calcext:value-type="string">
            <text:p>CUP2_CHANNEL2_LOWER_LIMIT</text:p>
          </table:table-cell>
          <table:table-cell table:formula="of:=IF([$List.A120] &lt;&gt;&quot;&quot;; [$List.A120]; &quot;&quot;)" office:value-type="float" office:value="1083" calcext:value-type="float">
            <text:p>1083</text:p>
          </table:table-cell>
          <table:table-cell/>
          <table:table-cell table:formula="of:=IF([.A120]&lt;&gt;&quot;&quot;; COM.MICROSOFT.CONCAT(&quot;#define MODBUS_ADDR_&quot;; [.A120]; &quot; &quot;; [.B120]); &quot;&quot;)" office:value-type="string" office:string-value="#define MODBUS_ADDR_CUP2_CHANNEL2_LOWER_LIMIT 1083" calcext:value-type="string">
            <text:p>#define MODBUS_ADDR_CUP2_CHANNEL2_LOWER_LIMIT 1083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 office:value-type="string" office:string-value="CUP2_CHANNEL3_LOWER_LIMIT" calcext:value-type="string">
            <text:p>CUP2_CHANNEL3_LOWER_LIMIT</text:p>
          </table:table-cell>
          <table:table-cell table:formula="of:=IF([$List.A121] &lt;&gt;&quot;&quot;; [$List.A121]; &quot;&quot;)" office:value-type="float" office:value="1084" calcext:value-type="float">
            <text:p>1084</text:p>
          </table:table-cell>
          <table:table-cell/>
          <table:table-cell table:formula="of:=IF([.A121]&lt;&gt;&quot;&quot;; COM.MICROSOFT.CONCAT(&quot;#define MODBUS_ADDR_&quot;; [.A121]; &quot; &quot;; [.B121]); &quot;&quot;)" office:value-type="string" office:string-value="#define MODBUS_ADDR_CUP2_CHANNEL3_LOWER_LIMIT 1084" calcext:value-type="string">
            <text:p>#define MODBUS_ADDR_CUP2_CHANNEL3_LOWER_LIMIT 1084</text:p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2_CHANNEL4_LOWER_LIMIT" calcext:value-type="string">
            <text:p>CUP2_CHANNEL4_LOWER_LIMIT</text:p>
          </table:table-cell>
          <table:table-cell table:formula="of:=IF([$List.A122] &lt;&gt;&quot;&quot;; [$List.A122]; &quot;&quot;)" office:value-type="float" office:value="1085" calcext:value-type="float">
            <text:p>1085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2_CHANNEL4_LOWER_LIMIT 1085" calcext:value-type="string">
            <text:p>#define MODBUS_ADDR_CUP2_CHANNEL4_LOWER_LIMIT 1085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3_CHANNEL1_LOWER_LIMIT" calcext:value-type="string">
            <text:p>CUP3_CHANNEL1_LOWER_LIMIT</text:p>
          </table:table-cell>
          <table:table-cell table:formula="of:=IF([$List.A123] &lt;&gt;&quot;&quot;; [$List.A123]; &quot;&quot;)" office:value-type="float" office:value="1086" calcext:value-type="float">
            <text:p>1086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3_CHANNEL1_LOWER_LIMIT 1086" calcext:value-type="string">
            <text:p>#define MODBUS_ADDR_CUP3_CHANNEL1_LOWER_LIMIT 1086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3_CHANNEL2_LOWER_LIMIT" calcext:value-type="string">
            <text:p>CUP3_CHANNEL2_LOWER_LIMIT</text:p>
          </table:table-cell>
          <table:table-cell table:formula="of:=IF([$List.A124] &lt;&gt;&quot;&quot;; [$List.A124]; &quot;&quot;)" office:value-type="float" office:value="1087" calcext:value-type="float">
            <text:p>1087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3_CHANNEL2_LOWER_LIMIT 1087" calcext:value-type="string">
            <text:p>#define MODBUS_ADDR_CUP3_CHANNEL2_LOWER_LIMIT 1087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3_CHANNEL3_LOWER_LIMIT" calcext:value-type="string">
            <text:p>CUP3_CHANNEL3_LOWER_LIMIT</text:p>
          </table:table-cell>
          <table:table-cell table:formula="of:=IF([$List.A125] &lt;&gt;&quot;&quot;; [$List.A125]; &quot;&quot;)" office:value-type="float" office:value="1088" calcext:value-type="float">
            <text:p>1088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3_CHANNEL3_LOWER_LIMIT 1088" calcext:value-type="string">
            <text:p>#define MODBUS_ADDR_CUP3_CHANNEL3_LOWER_LIMIT 1088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3_CHANNEL4_LOWER_LIMIT" calcext:value-type="string">
            <text:p>CUP3_CHANNEL4_LOWER_LIMIT</text:p>
          </table:table-cell>
          <table:table-cell table:formula="of:=IF([$List.A126] &lt;&gt;&quot;&quot;; [$List.A126]; &quot;&quot;)" office:value-type="float" office:value="1089" calcext:value-type="float">
            <text:p>1089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3_CHANNEL4_LOWER_LIMIT 1089" calcext:value-type="string">
            <text:p>#define MODBUS_ADDR_CUP3_CHANNEL4_LOWER_LIMIT 1089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>
            <text:p/>
          </table:table-cell>
          <table:table-cell table:formula="of:=IF([$List.A127] &lt;&gt;&quot;&quot;; [$List.A127]; &quot;&quot;)">
            <text:p/>
          </table:table-cell>
          <table:table-cell/>
          <table:table-cell table:formula="of:=IF([.A127]&lt;&gt;&quot;&quot;; COM.MICROSOFT.CONCAT(&quot;#define MODBUS_ADDR_&quot;; [.A127]; &quot; &quot;; [.B127]); &quot;&quot;)">
            <text:p/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1_CHANNEL1_UPPER_LIMIT" calcext:value-type="string">
            <text:p>CUP1_CHANNEL1_UPPER_LIMIT</text:p>
          </table:table-cell>
          <table:table-cell table:formula="of:=IF([$List.A128] &lt;&gt;&quot;&quot;; [$List.A128]; &quot;&quot;)" office:value-type="float" office:value="1090" calcext:value-type="float">
            <text:p>1090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1_CHANNEL1_UPPER_LIMIT 1090" calcext:value-type="string">
            <text:p>#define MODBUS_ADDR_CUP1_CHANNEL1_UPPER_LIMIT 1090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1_CHANNEL2_UPPER_LIMIT" calcext:value-type="string">
            <text:p>CUP1_CHANNEL2_UPPER_LIMIT</text:p>
          </table:table-cell>
          <table:table-cell table:formula="of:=IF([$List.A129] &lt;&gt;&quot;&quot;; [$List.A129]; &quot;&quot;)" office:value-type="float" office:value="1091" calcext:value-type="float">
            <text:p>1091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1_CHANNEL2_UPPER_LIMIT 1091" calcext:value-type="string">
            <text:p>#define MODBUS_ADDR_CUP1_CHANNEL2_UPPER_LIMIT 1091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1_CHANNEL3_UPPER_LIMIT" calcext:value-type="string">
            <text:p>CUP1_CHANNEL3_UPPER_LIMIT</text:p>
          </table:table-cell>
          <table:table-cell table:formula="of:=IF([$List.A130] &lt;&gt;&quot;&quot;; [$List.A130]; &quot;&quot;)" office:value-type="float" office:value="1092" calcext:value-type="float">
            <text:p>1092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1_CHANNEL3_UPPER_LIMIT 1092" calcext:value-type="string">
            <text:p>#define MODBUS_ADDR_CUP1_CHANNEL3_UPPER_LIMIT 1092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 office:value-type="string" office:string-value="CUP1_CHANNEL4_UPPER_LIMIT" calcext:value-type="string">
            <text:p>CUP1_CHANNEL4_UPPER_LIMIT</text:p>
          </table:table-cell>
          <table:table-cell table:formula="of:=IF([$List.A131] &lt;&gt;&quot;&quot;; [$List.A131]; &quot;&quot;)" office:value-type="float" office:value="1093" calcext:value-type="float">
            <text:p>1093</text:p>
          </table:table-cell>
          <table:table-cell/>
          <table:table-cell table:formula="of:=IF([.A131]&lt;&gt;&quot;&quot;; COM.MICROSOFT.CONCAT(&quot;#define MODBUS_ADDR_&quot;; [.A131]; &quot; &quot;; [.B131]); &quot;&quot;)" office:value-type="string" office:string-value="#define MODBUS_ADDR_CUP1_CHANNEL4_UPPER_LIMIT 1093" calcext:value-type="string">
            <text:p>#define MODBUS_ADDR_CUP1_CHANNEL4_UPPER_LIMIT 1093</text:p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2_CHANNEL1_UPPER_LIMIT" calcext:value-type="string">
            <text:p>CUP2_CHANNEL1_UPPER_LIMIT</text:p>
          </table:table-cell>
          <table:table-cell table:formula="of:=IF([$List.A132] &lt;&gt;&quot;&quot;; [$List.A132]; &quot;&quot;)" office:value-type="float" office:value="1094" calcext:value-type="float">
            <text:p>1094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2_CHANNEL1_UPPER_LIMIT 1094" calcext:value-type="string">
            <text:p>#define MODBUS_ADDR_CUP2_CHANNEL1_UPPER_LIMIT 1094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2_CHANNEL2_UPPER_LIMIT" calcext:value-type="string">
            <text:p>CUP2_CHANNEL2_UPPER_LIMIT</text:p>
          </table:table-cell>
          <table:table-cell table:formula="of:=IF([$List.A133] &lt;&gt;&quot;&quot;; [$List.A133]; &quot;&quot;)" office:value-type="float" office:value="1095" calcext:value-type="float">
            <text:p>1095</text:p>
          </table:table-cell>
          <table:table-cell/>
          <table:table-cell table:formula="of:=IF([.A133]&lt;&gt;&quot;&quot;; COM.MICROSOFT.CONCAT(&quot;#define MODBUS_ADDR_&quot;; [.A133]; &quot; &quot;; [.B133]); &quot;&quot;)" office:value-type="string" office:string-value="#define MODBUS_ADDR_CUP2_CHANNEL2_UPPER_LIMIT 1095" calcext:value-type="string">
            <text:p>#define MODBUS_ADDR_CUP2_CHANNEL2_UPPER_LIMIT 1095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2_CHANNEL3_UPPER_LIMIT" calcext:value-type="string">
            <text:p>CUP2_CHANNEL3_UPPER_LIMIT</text:p>
          </table:table-cell>
          <table:table-cell table:formula="of:=IF([$List.A134] &lt;&gt;&quot;&quot;; [$List.A134]; &quot;&quot;)" office:value-type="float" office:value="1096" calcext:value-type="float">
            <text:p>1096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2_CHANNEL3_UPPER_LIMIT 1096" calcext:value-type="string">
            <text:p>#define MODBUS_ADDR_CUP2_CHANNEL3_UPPER_LIMIT 1096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2_CHANNEL4_UPPER_LIMIT" calcext:value-type="string">
            <text:p>CUP2_CHANNEL4_UPPER_LIMIT</text:p>
          </table:table-cell>
          <table:table-cell table:formula="of:=IF([$List.A135] &lt;&gt;&quot;&quot;; [$List.A135]; &quot;&quot;)" office:value-type="float" office:value="1097" calcext:value-type="float">
            <text:p>1097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2_CHANNEL4_UPPER_LIMIT 1097" calcext:value-type="string">
            <text:p>#define MODBUS_ADDR_CUP2_CHANNEL4_UPPER_LIMIT 1097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3_CHANNEL1_UPPER_LIMIT" calcext:value-type="string">
            <text:p>CUP3_CHANNEL1_UPPER_LIMIT</text:p>
          </table:table-cell>
          <table:table-cell table:formula="of:=IF([$List.A136] &lt;&gt;&quot;&quot;; [$List.A136]; &quot;&quot;)" office:value-type="float" office:value="1098" calcext:value-type="float">
            <text:p>1098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3_CHANNEL1_UPPER_LIMIT 1098" calcext:value-type="string">
            <text:p>#define MODBUS_ADDR_CUP3_CHANNEL1_UPPER_LIMIT 1098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3_CHANNEL2_UPPER_LIMIT" calcext:value-type="string">
            <text:p>CUP3_CHANNEL2_UPPER_LIMIT</text:p>
          </table:table-cell>
          <table:table-cell table:formula="of:=IF([$List.A137] &lt;&gt;&quot;&quot;; [$List.A137]; &quot;&quot;)" office:value-type="float" office:value="1099" calcext:value-type="float">
            <text:p>1099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3_CHANNEL2_UPPER_LIMIT 1099" calcext:value-type="string">
            <text:p>#define MODBUS_ADDR_CUP3_CHANNEL2_UPPER_LIMIT 1099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3_CHANNEL3_UPPER_LIMIT" calcext:value-type="string">
            <text:p>CUP3_CHANNEL3_UPPER_LIMIT</text:p>
          </table:table-cell>
          <table:table-cell table:formula="of:=IF([$List.A138] &lt;&gt;&quot;&quot;; [$List.A138]; &quot;&quot;)" office:value-type="float" office:value="1100" calcext:value-type="float">
            <text:p>1100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3_CHANNEL3_UPPER_LIMIT 1100" calcext:value-type="string">
            <text:p>#define MODBUS_ADDR_CUP3_CHANNEL3_UPPER_LIMIT 1100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3_CHANNEL4_UPPER_LIMIT" calcext:value-type="string">
            <text:p>CUP3_CHANNEL4_UPPER_LIMIT</text:p>
          </table:table-cell>
          <table:table-cell table:formula="of:=IF([$List.A139] &lt;&gt;&quot;&quot;; [$List.A139]; &quot;&quot;)" office:value-type="float" office:value="1101" calcext:value-type="float">
            <text:p>1101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3_CHANNEL4_UPPER_LIMIT 1101" calcext:value-type="string">
            <text:p>#define MODBUS_ADDR_CUP3_CHANNEL4_UPPER_LIMIT 1101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>
            <text:p/>
          </table:table-cell>
          <table:table-cell table:formula="of:=IF([$List.A140] &lt;&gt;&quot;&quot;; [$List.A140]; &quot;&quot;)">
            <text:p/>
          </table:table-cell>
          <table:table-cell/>
          <table:table-cell table:formula="of:=IF([.A140]&lt;&gt;&quot;&quot;; COM.MICROSOFT.CONCAT(&quot;#define MODBUS_ADDR_&quot;; [.A140]; &quot; &quot;; [.B140]); &quot;&quot;)">
            <text:p/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SIM_MECHANISM_PROPAGATION1_IN" calcext:value-type="string">
            <text:p>SIM_MECHANISM_PROPAGATION1_IN</text:p>
          </table:table-cell>
          <table:table-cell table:formula="of:=IF([$List.A141] &lt;&gt;&quot;&quot;; [$List.A141]; &quot;&quot;)" office:value-type="float" office:value="1102" calcext:value-type="float">
            <text:p>1102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SIM_MECHANISM_PROPAGATION1_IN 1102" calcext:value-type="string">
            <text:p>#define MODBUS_ADDR_SIM_MECHANISM_PROPAGATION1_IN 1102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42] &lt;&gt;&quot;&quot;; [$List.A142]; &quot;&quot;)" office:value-type="float" office:value="1103" calcext:value-type="float">
            <text:p>1103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SIM_MECHANISM_PROPAGATION1_IN_RAND 1103" calcext:value-type="string">
            <text:p>#define MODBUS_ADDR_SIM_MECHANISM_PROPAGATION1_IN_RAND 1103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SIM_MECHANISM_PROPAGATION1_OUT" calcext:value-type="string">
            <text:p>SIM_MECHANISM_PROPAGATION1_OUT</text:p>
          </table:table-cell>
          <table:table-cell table:formula="of:=IF([$List.A143] &lt;&gt;&quot;&quot;; [$List.A143]; &quot;&quot;)" office:value-type="float" office:value="1104" calcext:value-type="float">
            <text:p>1104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SIM_MECHANISM_PROPAGATION1_OUT 1104" calcext:value-type="string">
            <text:p>#define MODBUS_ADDR_SIM_MECHANISM_PROPAGATION1_OUT 1104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44] &lt;&gt;&quot;&quot;; [$List.A144]; &quot;&quot;)" office:value-type="float" office:value="1105" calcext:value-type="float">
            <text:p>1105</text:p>
          </table:table-cell>
          <table:table-cell/>
          <table:table-cell table:formula="of:=IF([.A144]&lt;&gt;&quot;&quot;; COM.MICROSOFT.CONCAT(&quot;#define MODBUS_ADDR_&quot;; [.A144]; &quot; &quot;; [.B144]); &quot;&quot;)" office:value-type="string" office:string-value="#define MODBUS_ADDR_SIM_MECHANISM_PROPAGATION1_OUT_RAND 1105" calcext:value-type="string">
            <text:p>#define MODBUS_ADDR_SIM_MECHANISM_PROPAGATION1_OUT_RAND 1105</text:p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>
            <text:p/>
          </table:table-cell>
          <table:table-cell table:formula="of:=IF([$List.A145] &lt;&gt;&quot;&quot;; [$List.A145]; &quot;&quot;)">
            <text:p/>
          </table:table-cell>
          <table:table-cell/>
          <table:table-cell table:formula="of:=IF([.A145]&lt;&gt;&quot;&quot;; COM.MICROSOFT.CONCAT(&quot;#define MODBUS_ADDR_&quot;; [.A145]; &quot; &quot;; [.B145]); &quot;&quot;)">
            <text:p/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 office:value-type="string" office:string-value="SIM_MECHANISM_PROPAGATION2_IN" calcext:value-type="string">
            <text:p>SIM_MECHANISM_PROPAGATION2_IN</text:p>
          </table:table-cell>
          <table:table-cell table:formula="of:=IF([$List.A146] &lt;&gt;&quot;&quot;; [$List.A146]; &quot;&quot;)" office:value-type="float" office:value="1106" calcext:value-type="float">
            <text:p>1106</text:p>
          </table:table-cell>
          <table:table-cell/>
          <table:table-cell table:formula="of:=IF([.A146]&lt;&gt;&quot;&quot;; COM.MICROSOFT.CONCAT(&quot;#define MODBUS_ADDR_&quot;; [.A146]; &quot; &quot;; [.B146]); &quot;&quot;)" office:value-type="string" office:string-value="#define MODBUS_ADDR_SIM_MECHANISM_PROPAGATION2_IN 1106" calcext:value-type="string">
            <text:p>#define MODBUS_ADDR_SIM_MECHANISM_PROPAGATION2_IN 1106</text:p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47] &lt;&gt;&quot;&quot;; [$List.A147]; &quot;&quot;)" office:value-type="float" office:value="1107" calcext:value-type="float">
            <text:p>1107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SIM_MECHANISM_PROPAGATION2_IN_RAND 1107" calcext:value-type="string">
            <text:p>#define MODBUS_ADDR_SIM_MECHANISM_PROPAGATION2_IN_RAND 1107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SIM_MECHANISM_PROPAGATION2_OUT" calcext:value-type="string">
            <text:p>SIM_MECHANISM_PROPAGATION2_OUT</text:p>
          </table:table-cell>
          <table:table-cell table:formula="of:=IF([$List.A148] &lt;&gt;&quot;&quot;; [$List.A148]; &quot;&quot;)" office:value-type="float" office:value="1108" calcext:value-type="float">
            <text:p>1108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SIM_MECHANISM_PROPAGATION2_OUT 1108" calcext:value-type="string">
            <text:p>#define MODBUS_ADDR_SIM_MECHANISM_PROPAGATION2_OUT 1108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49] &lt;&gt;&quot;&quot;; [$List.A149]; &quot;&quot;)" office:value-type="float" office:value="1109" calcext:value-type="float">
            <text:p>1109</text:p>
          </table:table-cell>
          <table:table-cell/>
          <table:table-cell table:formula="of:=IF([.A149]&lt;&gt;&quot;&quot;; COM.MICROSOFT.CONCAT(&quot;#define MODBUS_ADDR_&quot;; [.A149]; &quot; &quot;; [.B149]); &quot;&quot;)" office:value-type="string" office:string-value="#define MODBUS_ADDR_SIM_MECHANISM_PROPAGATION2_OUT_RAND 1109" calcext:value-type="string">
            <text:p>#define MODBUS_ADDR_SIM_MECHANISM_PROPAGATION2_OUT_RAND 1109</text:p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>
            <text:p/>
          </table:table-cell>
          <table:table-cell table:formula="of:=IF([$List.A150] &lt;&gt;&quot;&quot;; [$List.A150]; &quot;&quot;)">
            <text:p/>
          </table:table-cell>
          <table:table-cell/>
          <table:table-cell table:formula="of:=IF([.A150]&lt;&gt;&quot;&quot;; COM.MICROSOFT.CONCAT(&quot;#define MODBUS_ADDR_&quot;; [.A150]; &quot; &quot;; [.B150]); &quot;&quot;)">
            <text:p/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SIM_MECHANISM_PROPAGATION3_IN" calcext:value-type="string">
            <text:p>SIM_MECHANISM_PROPAGATION3_IN</text:p>
          </table:table-cell>
          <table:table-cell table:formula="of:=IF([$List.A151] &lt;&gt;&quot;&quot;; [$List.A151]; &quot;&quot;)" office:value-type="float" office:value="1110" calcext:value-type="float">
            <text:p>1110</text:p>
          </table:table-cell>
          <table:table-cell/>
          <table:table-cell table:formula="of:=IF([.A151]&lt;&gt;&quot;&quot;; COM.MICROSOFT.CONCAT(&quot;#define MODBUS_ADDR_&quot;; [.A151]; &quot; &quot;; [.B151]); &quot;&quot;)" office:value-type="string" office:string-value="#define MODBUS_ADDR_SIM_MECHANISM_PROPAGATION3_IN 1110" calcext:value-type="string">
            <text:p>#define MODBUS_ADDR_SIM_MECHANISM_PROPAGATION3_IN 1110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52] &lt;&gt;&quot;&quot;; [$List.A152]; &quot;&quot;)" office:value-type="float" office:value="1111" calcext:value-type="float">
            <text:p>1111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SIM_MECHANISM_PROPAGATION3_IN_RAND 1111" calcext:value-type="string">
            <text:p>#define MODBUS_ADDR_SIM_MECHANISM_PROPAGATION3_IN_RAND 1111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SIM_MECHANISM_PROPAGATION3_OUT" calcext:value-type="string">
            <text:p>SIM_MECHANISM_PROPAGATION3_OUT</text:p>
          </table:table-cell>
          <table:table-cell table:formula="of:=IF([$List.A153] &lt;&gt;&quot;&quot;; [$List.A153]; &quot;&quot;)" office:value-type="float" office:value="1112" calcext:value-type="float">
            <text:p>1112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SIM_MECHANISM_PROPAGATION3_OUT 1112" calcext:value-type="string">
            <text:p>#define MODBUS_ADDR_SIM_MECHANISM_PROPAGATION3_OUT 1112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54] &lt;&gt;&quot;&quot;; [$List.A154]; &quot;&quot;)" office:value-type="float" office:value="1113" calcext:value-type="float">
            <text:p>1113</text:p>
          </table:table-cell>
          <table:table-cell/>
          <table:table-cell table:formula="of:=IF([.A154]&lt;&gt;&quot;&quot;; COM.MICROSOFT.CONCAT(&quot;#define MODBUS_ADDR_&quot;; [.A154]; &quot; &quot;; [.B154]); &quot;&quot;)" office:value-type="string" office:string-value="#define MODBUS_ADDR_SIM_MECHANISM_PROPAGATION3_OUT_RAND 1113" calcext:value-type="string">
            <text:p>#define MODBUS_ADDR_SIM_MECHANISM_PROPAGATION3_OUT_RAND 1113</text:p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SIM_MECHANISM3_INERTIAL_MOTION" calcext:value-type="string">
            <text:p>SIM_MECHANISM3_INERTIAL_MOTION</text:p>
          </table:table-cell>
          <table:table-cell table:formula="of:=IF([$List.A155] &lt;&gt;&quot;&quot;; [$List.A155]; &quot;&quot;)" office:value-type="float" office:value="1114" calcext:value-type="float">
            <text:p>1114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SIM_MECHANISM3_INERTIAL_MOTION 1114" calcext:value-type="string">
            <text:p>#define MODBUS_ADDR_SIM_MECHANISM3_INERTIAL_MOTION 1114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SIM_MECHANISM3_BRAKED_MOTION" calcext:value-type="string">
            <text:p>SIM_MECHANISM3_BRAKED_MOTION</text:p>
          </table:table-cell>
          <table:table-cell table:formula="of:=IF([$List.A156] &lt;&gt;&quot;&quot;; [$List.A156]; &quot;&quot;)" office:value-type="float" office:value="1115" calcext:value-type="float">
            <text:p>1115</text:p>
          </table:table-cell>
          <table:table-cell/>
          <table:table-cell table:formula="of:=IF([.A156]&lt;&gt;&quot;&quot;; COM.MICROSOFT.CONCAT(&quot;#define MODBUS_ADDR_&quot;; [.A156]; &quot; &quot;; [.B156]); &quot;&quot;)" office:value-type="string" office:string-value="#define MODBUS_ADDR_SIM_MECHANISM3_BRAKED_MOTION 1115" calcext:value-type="string">
            <text:p>#define MODBUS_ADDR_SIM_MECHANISM3_BRAKED_MOTION 1115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>
            <text:p/>
          </table:table-cell>
          <table:table-cell table:formula="of:=IF([$List.A157] &lt;&gt;&quot;&quot;; [$List.A157]; &quot;&quot;)">
            <text:p/>
          </table:table-cell>
          <table:table-cell/>
          <table:table-cell table:formula="of:=IF([.A157]&lt;&gt;&quot;&quot;; COM.MICROSOFT.CONCAT(&quot;#define MODBUS_ADDR_&quot;; [.A157]; &quot; &quot;; [.B157]); &quot;&quot;)">
            <text:p/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SIM_AMPLIFIER_CUP1_ELECTRODE1" calcext:value-type="string">
            <text:p>SIM_AMPLIFIER_CUP1_ELECTRODE1</text:p>
          </table:table-cell>
          <table:table-cell table:formula="of:=IF([$List.A158] &lt;&gt;&quot;&quot;; [$List.A158]; &quot;&quot;)" office:value-type="float" office:value="1116" calcext:value-type="float">
            <text:p>1116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SIM_AMPLIFIER_CUP1_ELECTRODE1 1116" calcext:value-type="string">
            <text:p>#define MODBUS_ADDR_SIM_AMPLIFIER_CUP1_ELECTRODE1 1116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 office:value-type="string" office:string-value="SIM_AMPLIFIER_CUP1_ELECTRODE2" calcext:value-type="string">
            <text:p>SIM_AMPLIFIER_CUP1_ELECTRODE2</text:p>
          </table:table-cell>
          <table:table-cell table:formula="of:=IF([$List.A159] &lt;&gt;&quot;&quot;; [$List.A159]; &quot;&quot;)" office:value-type="float" office:value="1117" calcext:value-type="float">
            <text:p>1117</text:p>
          </table:table-cell>
          <table:table-cell/>
          <table:table-cell table:formula="of:=IF([.A159]&lt;&gt;&quot;&quot;; COM.MICROSOFT.CONCAT(&quot;#define MODBUS_ADDR_&quot;; [.A159]; &quot; &quot;; [.B159]); &quot;&quot;)" office:value-type="string" office:string-value="#define MODBUS_ADDR_SIM_AMPLIFIER_CUP1_ELECTRODE2 1117" calcext:value-type="string">
            <text:p>#define MODBUS_ADDR_SIM_AMPLIFIER_CUP1_ELECTRODE2 1117</text:p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SIM_AMPLIFIER_CUP1_ELECTRODE3" calcext:value-type="string">
            <text:p>SIM_AMPLIFIER_CUP1_ELECTRODE3</text:p>
          </table:table-cell>
          <table:table-cell table:formula="of:=IF([$List.A160] &lt;&gt;&quot;&quot;; [$List.A160]; &quot;&quot;)" office:value-type="float" office:value="1118" calcext:value-type="float">
            <text:p>1118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SIM_AMPLIFIER_CUP1_ELECTRODE3 1118" calcext:value-type="string">
            <text:p>#define MODBUS_ADDR_SIM_AMPLIFIER_CUP1_ELECTRODE3 1118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 office:value-type="string" office:string-value="SIM_AMPLIFIER_CUP1_ELECTRODE4" calcext:value-type="string">
            <text:p>SIM_AMPLIFIER_CUP1_ELECTRODE4</text:p>
          </table:table-cell>
          <table:table-cell table:formula="of:=IF([$List.A161] &lt;&gt;&quot;&quot;; [$List.A161]; &quot;&quot;)" office:value-type="float" office:value="1119" calcext:value-type="float">
            <text:p>1119</text:p>
          </table:table-cell>
          <table:table-cell/>
          <table:table-cell table:formula="of:=IF([.A161]&lt;&gt;&quot;&quot;; COM.MICROSOFT.CONCAT(&quot;#define MODBUS_ADDR_&quot;; [.A161]; &quot; &quot;; [.B161]); &quot;&quot;)" office:value-type="string" office:string-value="#define MODBUS_ADDR_SIM_AMPLIFIER_CUP1_ELECTRODE4 1119" calcext:value-type="string">
            <text:p>#define MODBUS_ADDR_SIM_AMPLIFIER_CUP1_ELECTRODE4 1119</text:p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SIM_AMPLIFIER_CUP2_ELECTRODE1" calcext:value-type="string">
            <text:p>SIM_AMPLIFIER_CUP2_ELECTRODE1</text:p>
          </table:table-cell>
          <table:table-cell table:formula="of:=IF([$List.A162] &lt;&gt;&quot;&quot;; [$List.A162]; &quot;&quot;)" office:value-type="float" office:value="1120" calcext:value-type="float">
            <text:p>1120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SIM_AMPLIFIER_CUP2_ELECTRODE1 1120" calcext:value-type="string">
            <text:p>#define MODBUS_ADDR_SIM_AMPLIFIER_CUP2_ELECTRODE1 1120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SIM_AMPLIFIER_CUP2_ELECTRODE2" calcext:value-type="string">
            <text:p>SIM_AMPLIFIER_CUP2_ELECTRODE2</text:p>
          </table:table-cell>
          <table:table-cell table:formula="of:=IF([$List.A163] &lt;&gt;&quot;&quot;; [$List.A163]; &quot;&quot;)" office:value-type="float" office:value="1121" calcext:value-type="float">
            <text:p>1121</text:p>
          </table:table-cell>
          <table:table-cell/>
          <table:table-cell table:formula="of:=IF([.A163]&lt;&gt;&quot;&quot;; COM.MICROSOFT.CONCAT(&quot;#define MODBUS_ADDR_&quot;; [.A163]; &quot; &quot;; [.B163]); &quot;&quot;)" office:value-type="string" office:string-value="#define MODBUS_ADDR_SIM_AMPLIFIER_CUP2_ELECTRODE2 1121" calcext:value-type="string">
            <text:p>#define MODBUS_ADDR_SIM_AMPLIFIER_CUP2_ELECTRODE2 1121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SIM_AMPLIFIER_CUP2_ELECTRODE3" calcext:value-type="string">
            <text:p>SIM_AMPLIFIER_CUP2_ELECTRODE3</text:p>
          </table:table-cell>
          <table:table-cell table:formula="of:=IF([$List.A164] &lt;&gt;&quot;&quot;; [$List.A164]; &quot;&quot;)" office:value-type="float" office:value="1122" calcext:value-type="float">
            <text:p>1122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SIM_AMPLIFIER_CUP2_ELECTRODE3 1122" calcext:value-type="string">
            <text:p>#define MODBUS_ADDR_SIM_AMPLIFIER_CUP2_ELECTRODE3 1122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SIM_AMPLIFIER_CUP2_ELECTRODE4" calcext:value-type="string">
            <text:p>SIM_AMPLIFIER_CUP2_ELECTRODE4</text:p>
          </table:table-cell>
          <table:table-cell table:formula="of:=IF([$List.A165] &lt;&gt;&quot;&quot;; [$List.A165]; &quot;&quot;)" office:value-type="float" office:value="1123" calcext:value-type="float">
            <text:p>1123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SIM_AMPLIFIER_CUP2_ELECTRODE4 1123" calcext:value-type="string">
            <text:p>#define MODBUS_ADDR_SIM_AMPLIFIER_CUP2_ELECTRODE4 1123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SIM_AMPLIFIER_CUP3_ELECTRODE1" calcext:value-type="string">
            <text:p>SIM_AMPLIFIER_CUP3_ELECTRODE1</text:p>
          </table:table-cell>
          <table:table-cell table:formula="of:=IF([$List.A166] &lt;&gt;&quot;&quot;; [$List.A166]; &quot;&quot;)" office:value-type="float" office:value="1124" calcext:value-type="float">
            <text:p>1124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SIM_AMPLIFIER_CUP3_ELECTRODE1 1124" calcext:value-type="string">
            <text:p>#define MODBUS_ADDR_SIM_AMPLIFIER_CUP3_ELECTRODE1 1124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SIM_AMPLIFIER_CUP3_ELECTRODE2" calcext:value-type="string">
            <text:p>SIM_AMPLIFIER_CUP3_ELECTRODE2</text:p>
          </table:table-cell>
          <table:table-cell table:formula="of:=IF([$List.A167] &lt;&gt;&quot;&quot;; [$List.A167]; &quot;&quot;)" office:value-type="float" office:value="1125" calcext:value-type="float">
            <text:p>1125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SIM_AMPLIFIER_CUP3_ELECTRODE2 1125" calcext:value-type="string">
            <text:p>#define MODBUS_ADDR_SIM_AMPLIFIER_CUP3_ELECTRODE2 1125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SIM_AMPLIFIER_CUP3_ELECTRODE3" calcext:value-type="string">
            <text:p>SIM_AMPLIFIER_CUP3_ELECTRODE3</text:p>
          </table:table-cell>
          <table:table-cell table:formula="of:=IF([$List.A168] &lt;&gt;&quot;&quot;; [$List.A168]; &quot;&quot;)" office:value-type="float" office:value="1126" calcext:value-type="float">
            <text:p>1126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SIM_AMPLIFIER_CUP3_ELECTRODE3 1126" calcext:value-type="string">
            <text:p>#define MODBUS_ADDR_SIM_AMPLIFIER_CUP3_ELECTRODE3 1126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SIM_AMPLIFIER_CUP3_ELECTRODE4" calcext:value-type="string">
            <text:p>SIM_AMPLIFIER_CUP3_ELECTRODE4</text:p>
          </table:table-cell>
          <table:table-cell table:formula="of:=IF([$List.A169] &lt;&gt;&quot;&quot;; [$List.A169]; &quot;&quot;)" office:value-type="float" office:value="1127" calcext:value-type="float">
            <text:p>1127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SIM_AMPLIFIER_CUP3_ELECTRODE4 1127" calcext:value-type="string">
            <text:p>#define MODBUS_ADDR_SIM_AMPLIFIER_CUP3_ELECTRODE4 1127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>
            <text:p/>
          </table:table-cell>
          <table:table-cell table:formula="of:=IF([$List.A170] &lt;&gt;&quot;&quot;; [$List.A170]; &quot;&quot;)">
            <text:p/>
          </table:table-cell>
          <table:table-cell/>
          <table:table-cell table:formula="of:=IF([.A170]&lt;&gt;&quot;&quot;; COM.MICROSOFT.CONCAT(&quot;#define MODBUS_ADDR_&quot;; [.A170]; &quot; &quot;; [.B170]); &quot;&quot;)">
            <text:p/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SIM_AMPLIFIER_RANDOM_RATE" calcext:value-type="string">
            <text:p>SIM_AMPLIFIER_RANDOM_RATE</text:p>
          </table:table-cell>
          <table:table-cell table:formula="of:=IF([$List.A171] &lt;&gt;&quot;&quot;; [$List.A171]; &quot;&quot;)" office:value-type="float" office:value="1128" calcext:value-type="float">
            <text:p>1128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SIM_AMPLIFIER_RANDOM_RATE 1128" calcext:value-type="string">
            <text:p>#define MODBUS_ADDR_SIM_AMPLIFIER_RANDOM_RATE 1128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 office:value-type="string" office:string-value="SIM_AMPLIFIER_RANDOM_OFFSET" calcext:value-type="string">
            <text:p>SIM_AMPLIFIER_RANDOM_OFFSET</text:p>
          </table:table-cell>
          <table:table-cell table:formula="of:=IF([$List.A172] &lt;&gt;&quot;&quot;; [$List.A172]; &quot;&quot;)" office:value-type="float" office:value="1129" calcext:value-type="float">
            <text:p>1129</text:p>
          </table:table-cell>
          <table:table-cell/>
          <table:table-cell table:formula="of:=IF([.A172]&lt;&gt;&quot;&quot;; COM.MICROSOFT.CONCAT(&quot;#define MODBUS_ADDR_&quot;; [.A172]; &quot; &quot;; [.B172]); &quot;&quot;)" office:value-type="string" office:string-value="#define MODBUS_ADDR_SIM_AMPLIFIER_RANDOM_OFFSET 1129" calcext:value-type="string">
            <text:p>#define MODBUS_ADDR_SIM_AMPLIFIER_RANDOM_OFFSET 1129</text:p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>
            <text:p/>
          </table:table-cell>
          <table:table-cell table:formula="of:=IF([$List.A173] &lt;&gt;&quot;&quot;; [$List.A173]; &quot;&quot;)">
            <text:p/>
          </table:table-cell>
          <table:table-cell/>
          <table:table-cell table:formula="of:=IF([.A173]&lt;&gt;&quot;&quot;; COM.MICROSOFT.CONCAT(&quot;#define MODBUS_ADDR_&quot;; [.A173]; &quot; &quot;; [.B173]); &quot;&quot;)">
            <text:p/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 office:value-type="string" office:string-value="SIM_EXTERNAL_LOCK_PERIOD" calcext:value-type="string">
            <text:p>SIM_EXTERNAL_LOCK_PERIOD</text:p>
          </table:table-cell>
          <table:table-cell table:formula="of:=IF([$List.A174] &lt;&gt;&quot;&quot;; [$List.A174]; &quot;&quot;)" office:value-type="float" office:value="1130" calcext:value-type="float">
            <text:p>1130</text:p>
          </table:table-cell>
          <table:table-cell/>
          <table:table-cell table:formula="of:=IF([.A174]&lt;&gt;&quot;&quot;; COM.MICROSOFT.CONCAT(&quot;#define MODBUS_ADDR_&quot;; [.A174]; &quot; &quot;; [.B174]); &quot;&quot;)" office:value-type="string" office:string-value="#define MODBUS_ADDR_SIM_EXTERNAL_LOCK_PERIOD 1130" calcext:value-type="string">
            <text:p>#define MODBUS_ADDR_SIM_EXTERNAL_LOCK_PERIOD 1130</text:p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EXTERNAL_LOCK_DURATION" calcext:value-type="string">
            <text:p>SIM_EXTERNAL_LOCK_DURATION</text:p>
          </table:table-cell>
          <table:table-cell table:formula="of:=IF([$List.A175] &lt;&gt;&quot;&quot;; [$List.A175]; &quot;&quot;)" office:value-type="float" office:value="1131" calcext:value-type="float">
            <text:p>1131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EXTERNAL_LOCK_DURATION 1131" calcext:value-type="string">
            <text:p>#define MODBUS_ADDR_SIM_EXTERNAL_LOCK_DURATION 1131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EXTERNAL_LOCK_DELAY" calcext:value-type="string">
            <text:p>SIM_EXTERNAL_LOCK_DELAY</text:p>
          </table:table-cell>
          <table:table-cell table:formula="of:=IF([$List.A176] &lt;&gt;&quot;&quot;; [$List.A176]; &quot;&quot;)" office:value-type="float" office:value="1132" calcext:value-type="float">
            <text:p>1132</text:p>
          </table:table-cell>
          <table:table-cell/>
          <table:table-cell table:formula="of:=IF([.A176]&lt;&gt;&quot;&quot;; COM.MICROSOFT.CONCAT(&quot;#define MODBUS_ADDR_&quot;; [.A176]; &quot; &quot;; [.B176]); &quot;&quot;)" office:value-type="string" office:string-value="#define MODBUS_ADDR_SIM_EXTERNAL_LOCK_DELAY 1132" calcext:value-type="string">
            <text:p>#define MODBUS_ADDR_SIM_EXTERNAL_LOCK_DELAY 1132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>
            <text:p/>
          </table:table-cell>
          <table:table-cell table:formula="of:=IF([$List.A177] &lt;&gt;&quot;&quot;; [$List.A177]; &quot;&quot;)">
            <text:p/>
          </table:table-cell>
          <table:table-cell/>
          <table:table-cell table:formula="of:=IF([.A177]&lt;&gt;&quot;&quot;; COM.MICROSOFT.CONCAT(&quot;#define MODBUS_ADDR_&quot;; [.A177]; &quot; &quot;; [.B177]); &quot;&quot;)">
            <text:p/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EVENT_CODE" calcext:value-type="string">
            <text:p>SIM_EVENT_CODE</text:p>
          </table:table-cell>
          <table:table-cell table:formula="of:=IF([$List.A178] &lt;&gt;&quot;&quot;; [$List.A178]; &quot;&quot;)" office:value-type="float" office:value="1133" calcext:value-type="float">
            <text:p>1133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EVENT_CODE 1133" calcext:value-type="string">
            <text:p>#define MODBUS_ADDR_SIM_EVENT_CODE 1133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 office:value-type="string" office:string-value="SIM_EVENT_PERIOD" calcext:value-type="string">
            <text:p>SIM_EVENT_PERIOD</text:p>
          </table:table-cell>
          <table:table-cell table:formula="of:=IF([$List.A179] &lt;&gt;&quot;&quot;; [$List.A179]; &quot;&quot;)" office:value-type="float" office:value="1134" calcext:value-type="float">
            <text:p>1134</text:p>
          </table:table-cell>
          <table:table-cell/>
          <table:table-cell table:formula="of:=IF([.A179]&lt;&gt;&quot;&quot;; COM.MICROSOFT.CONCAT(&quot;#define MODBUS_ADDR_&quot;; [.A179]; &quot; &quot;; [.B179]); &quot;&quot;)" office:value-type="string" office:string-value="#define MODBUS_ADDR_SIM_EVENT_PERIOD 1134" calcext:value-type="string">
            <text:p>#define MODBUS_ADDR_SIM_EVENT_PERIOD 1134</text:p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EVENT_DURATION" calcext:value-type="string">
            <text:p>SIM_EVENT_DURATION</text:p>
          </table:table-cell>
          <table:table-cell table:formula="of:=IF([$List.A180] &lt;&gt;&quot;&quot;; [$List.A180]; &quot;&quot;)" office:value-type="float" office:value="1135" calcext:value-type="float">
            <text:p>1135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EVENT_DURATION 1135" calcext:value-type="string">
            <text:p>#define MODBUS_ADDR_SIM_EVENT_DURATION 1135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 office:value-type="string" office:string-value="SIM_EVENT_DELAY" calcext:value-type="string">
            <text:p>SIM_EVENT_DELAY</text:p>
          </table:table-cell>
          <table:table-cell table:formula="of:=IF([$List.A181] &lt;&gt;&quot;&quot;; [$List.A181]; &quot;&quot;)" office:value-type="float" office:value="1136" calcext:value-type="float">
            <text:p>1136</text:p>
          </table:table-cell>
          <table:table-cell/>
          <table:table-cell table:formula="of:=IF([.A181]&lt;&gt;&quot;&quot;; COM.MICROSOFT.CONCAT(&quot;#define MODBUS_ADDR_&quot;; [.A181]; &quot; &quot;; [.B181]); &quot;&quot;)" office:value-type="string" office:string-value="#define MODBUS_ADDR_SIM_EVENT_DELAY 1136" calcext:value-type="string">
            <text:p>#define MODBUS_ADDR_SIM_EVENT_DELAY 1136</text:p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>
            <text:p/>
          </table:table-cell>
          <table:table-cell table:formula="of:=IF([$List.A182] &lt;&gt;&quot;&quot;; [$List.A182]; &quot;&quot;)">
            <text:p/>
          </table:table-cell>
          <table:table-cell/>
          <table:table-cell table:formula="of:=IF([.A182]&lt;&gt;&quot;&quot;; COM.MICROSOFT.CONCAT(&quot;#define MODBUS_ADDR_&quot;; [.A182]; &quot; &quot;; [.B182]); &quot;&quot;)">
            <text:p/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DEBUG_PRINTOUTS" calcext:value-type="string">
            <text:p>DEBUG_PRINTOUTS</text:p>
          </table:table-cell>
          <table:table-cell table:formula="of:=IF([$List.A183] &lt;&gt;&quot;&quot;; [$List.A183]; &quot;&quot;)" office:value-type="float" office:value="1137" calcext:value-type="float">
            <text:p>1137</text:p>
          </table:table-cell>
          <table:table-cell/>
          <table:table-cell table:formula="of:=IF([.A183]&lt;&gt;&quot;&quot;; COM.MICROSOFT.CONCAT(&quot;#define MODBUS_ADDR_&quot;; [.A183]; &quot; &quot;; [.B183]); &quot;&quot;)" office:value-type="string" office:string-value="#define MODBUS_ADDR_DEBUG_PRINTOUTS 1137" calcext:value-type="string">
            <text:p>#define MODBUS_ADDR_DEBUG_PRINTOUTS 1137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 office:value-type="string" office:string-value="DEBUG_ARGUMENT1" calcext:value-type="string">
            <text:p>DEBUG_ARGUMENT1</text:p>
          </table:table-cell>
          <table:table-cell table:formula="of:=IF([$List.A184] &lt;&gt;&quot;&quot;; [$List.A184]; &quot;&quot;)" office:value-type="float" office:value="1138" calcext:value-type="float">
            <text:p>1138</text:p>
          </table:table-cell>
          <table:table-cell/>
          <table:table-cell table:formula="of:=IF([.A184]&lt;&gt;&quot;&quot;; COM.MICROSOFT.CONCAT(&quot;#define MODBUS_ADDR_&quot;; [.A184]; &quot; &quot;; [.B184]); &quot;&quot;)" office:value-type="string" office:string-value="#define MODBUS_ADDR_DEBUG_ARGUMENT1 1138" calcext:value-type="string">
            <text:p>#define MODBUS_ADDR_DEBUG_ARGUMENT1 1138</text:p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>
            <text:p/>
          </table:table-cell>
          <table:table-cell table:formula="of:=IF([$List.A185] &lt;&gt;&quot;&quot;; [$List.A185]; &quot;&quot;)">
            <text:p/>
          </table:table-cell>
          <table:table-cell/>
          <table:table-cell table:formula="of:=IF([.A185]&lt;&gt;&quot;&quot;; COM.MICROSOFT.CONCAT(&quot;#define MODBUS_ADDR_&quot;; [.A185]; &quot; &quot;; [.B185]); &quot;&quot;)">
            <text:p/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>
            <text:p/>
          </table:table-cell>
          <table:table-cell table:formula="of:=IF([$List.A186] &lt;&gt;&quot;&quot;; [$List.A186]; &quot;&quot;)">
            <text:p/>
          </table:table-cell>
          <table:table-cell/>
          <table:table-cell table:formula="of:=IF([.A186]&lt;&gt;&quot;&quot;; COM.MICROSOFT.CONCAT(&quot;#define MODBUS_ADDR_&quot;; [.A186]; &quot; &quot;; [.B186]); &quot;&quot;)">
            <text:p/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CUP1_CHANNEL1_SAMPLE" calcext:value-type="string">
            <text:p>CUP1_CHANNEL1_SAMPLE</text:p>
          </table:table-cell>
          <table:table-cell table:formula="of:=IF([$List.A187] &lt;&gt;&quot;&quot;; [$List.A187]; &quot;&quot;)" office:value-type="float" office:value="3001" calcext:value-type="float">
            <text:p>3001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CUP1_CHANNEL2_SAMPLE" calcext:value-type="string">
            <text:p>CUP1_CHANNEL2_SAMPLE</text:p>
          </table:table-cell>
          <table:table-cell table:formula="of:=IF([$List.A188] &lt;&gt;&quot;&quot;; [$List.A188]; &quot;&quot;)" office:value-type="float" office:value="3002" calcext:value-type="float">
            <text:p>3002</text:p>
          </table:table-cell>
          <table:table-cell/>
          <table:table-cell table:formula="of:=IF([.A188]&lt;&gt;&quot;&quot;; COM.MICROSOFT.CONCAT(&quot;#define MODBUS_ADDR_&quot;; [.A188]; &quot; &quot;; [.B188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 office:value-type="string" office:string-value="CUP1_CHANNEL3_SAMPLE" calcext:value-type="string">
            <text:p>CUP1_CHANNEL3_SAMPLE</text:p>
          </table:table-cell>
          <table:table-cell table:formula="of:=IF([$List.A189] &lt;&gt;&quot;&quot;; [$List.A189]; &quot;&quot;)" office:value-type="float" office:value="3003" calcext:value-type="float">
            <text:p>3003</text:p>
          </table:table-cell>
          <table:table-cell/>
          <table:table-cell table:formula="of:=IF([.A189]&lt;&gt;&quot;&quot;; COM.MICROSOFT.CONCAT(&quot;#define MODBUS_ADDR_&quot;; [.A189]; &quot; &quot;; [.B189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 office:value-type="string" office:string-value="CUP1_CHANNEL4_SAMPLE" calcext:value-type="string">
            <text:p>CUP1_CHANNEL4_SAMPLE</text:p>
          </table:table-cell>
          <table:table-cell table:formula="of:=IF([$List.A190] &lt;&gt;&quot;&quot;; [$List.A190]; &quot;&quot;)" office:value-type="float" office:value="3004" calcext:value-type="float">
            <text:p>3004</text:p>
          </table:table-cell>
          <table:table-cell/>
          <table:table-cell table:formula="of:=IF([.A190]&lt;&gt;&quot;&quot;; COM.MICROSOFT.CONCAT(&quot;#define MODBUS_ADDR_&quot;; [.A190]; &quot; &quot;; [.B190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 office:value-type="string" office:string-value="CUP1_CHANNEL_ERROR" calcext:value-type="string">
            <text:p>CUP1_CHANNEL_ERROR</text:p>
          </table:table-cell>
          <table:table-cell table:formula="of:=IF([$List.A191] &lt;&gt;&quot;&quot;; [$List.A191]; &quot;&quot;)" office:value-type="float" office:value="3005" calcext:value-type="float">
            <text:p>3005</text:p>
          </table:table-cell>
          <table:table-cell/>
          <table:table-cell table:formula="of:=IF([.A191]&lt;&gt;&quot;&quot;; COM.MICROSOFT.CONCAT(&quot;#define MODBUS_ADDR_&quot;; [.A191]; &quot; &quot;; [.B191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>
            <text:p/>
          </table:table-cell>
          <table:table-cell table:formula="of:=IF([$List.A192] &lt;&gt;&quot;&quot;; [$List.A192]; &quot;&quot;)">
            <text:p/>
          </table:table-cell>
          <table:table-cell/>
          <table:table-cell table:formula="of:=IF([.A192]&lt;&gt;&quot;&quot;; COM.MICROSOFT.CONCAT(&quot;#define MODBUS_ADDR_&quot;; [.A192]; &quot; &quot;; [.B192]); &quot;&quot;)">
            <text:p/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CUP2_CHANNEL1_SAMPLE" calcext:value-type="string">
            <text:p>CUP2_CHANNEL1_SAMPLE</text:p>
          </table:table-cell>
          <table:table-cell table:formula="of:=IF([$List.A193] &lt;&gt;&quot;&quot;; [$List.A193]; &quot;&quot;)" office:value-type="float" office:value="3006" calcext:value-type="float">
            <text:p>3006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CUP2_CHANNEL2_SAMPLE" calcext:value-type="string">
            <text:p>CUP2_CHANNEL2_SAMPLE</text:p>
          </table:table-cell>
          <table:table-cell table:formula="of:=IF([$List.A194] &lt;&gt;&quot;&quot;; [$List.A194]; &quot;&quot;)" office:value-type="float" office:value="3007" calcext:value-type="float">
            <text:p>3007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CUP2_CHANNEL3_SAMPLE" calcext:value-type="string">
            <text:p>CUP2_CHANNEL3_SAMPLE</text:p>
          </table:table-cell>
          <table:table-cell table:formula="of:=IF([$List.A195] &lt;&gt;&quot;&quot;; [$List.A195]; &quot;&quot;)" office:value-type="float" office:value="3008" calcext:value-type="float">
            <text:p>3008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 office:value-type="string" office:string-value="CUP2_CHANNEL4_SAMPLE" calcext:value-type="string">
            <text:p>CUP2_CHANNEL4_SAMPLE</text:p>
          </table:table-cell>
          <table:table-cell table:formula="of:=IF([$List.A196] &lt;&gt;&quot;&quot;; [$List.A196]; &quot;&quot;)" office:value-type="float" office:value="3009" calcext:value-type="float">
            <text:p>3009</text:p>
          </table:table-cell>
          <table:table-cell/>
          <table:table-cell table:formula="of:=IF([.A196]&lt;&gt;&quot;&quot;; COM.MICROSOFT.CONCAT(&quot;#define MODBUS_ADDR_&quot;; [.A196]; &quot; &quot;; [.B196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CUP2_CHANNEL_ERROR" calcext:value-type="string">
            <text:p>CUP2_CHANNEL_ERROR</text:p>
          </table:table-cell>
          <table:table-cell table:formula="of:=IF([$List.A197] &lt;&gt;&quot;&quot;; [$List.A197]; &quot;&quot;)" office:value-type="float" office:value="3010" calcext:value-type="float">
            <text:p>3010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>
            <text:p/>
          </table:table-cell>
          <table:table-cell table:formula="of:=IF([$List.A198] &lt;&gt;&quot;&quot;; [$List.A198]; &quot;&quot;)">
            <text:p/>
          </table:table-cell>
          <table:table-cell/>
          <table:table-cell table:formula="of:=IF([.A198]&lt;&gt;&quot;&quot;; COM.MICROSOFT.CONCAT(&quot;#define MODBUS_ADDR_&quot;; [.A198]; &quot; &quot;; [.B198]); &quot;&quot;)">
            <text:p/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CUP3_CHANNEL1_SAMPLE" calcext:value-type="string">
            <text:p>CUP3_CHANNEL1_SAMPLE</text:p>
          </table:table-cell>
          <table:table-cell table:formula="of:=IF([$List.A199] &lt;&gt;&quot;&quot;; [$List.A199]; &quot;&quot;)" office:value-type="float" office:value="3011" calcext:value-type="float">
            <text:p>3011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CUP3_CHANNEL2_SAMPLE" calcext:value-type="string">
            <text:p>CUP3_CHANNEL2_SAMPLE</text:p>
          </table:table-cell>
          <table:table-cell table:formula="of:=IF([$List.A200] &lt;&gt;&quot;&quot;; [$List.A200]; &quot;&quot;)" office:value-type="float" office:value="3012" calcext:value-type="float">
            <text:p>3012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CUP3_CHANNEL3_SAMPLE" calcext:value-type="string">
            <text:p>CUP3_CHANNEL3_SAMPLE</text:p>
          </table:table-cell>
          <table:table-cell table:formula="of:=IF([$List.A201] &lt;&gt;&quot;&quot;; [$List.A201]; &quot;&quot;)" office:value-type="float" office:value="3013" calcext:value-type="float">
            <text:p>3013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 office:value-type="string" office:string-value="CUP3_CHANNEL4_SAMPLE" calcext:value-type="string">
            <text:p>CUP3_CHANNEL4_SAMPLE</text:p>
          </table:table-cell>
          <table:table-cell table:formula="of:=IF([$List.A202] &lt;&gt;&quot;&quot;; [$List.A202]; &quot;&quot;)" office:value-type="float" office:value="3014" calcext:value-type="float">
            <text:p>3014</text:p>
          </table:table-cell>
          <table:table-cell/>
          <table:table-cell table:formula="of:=IF([.A202]&lt;&gt;&quot;&quot;; COM.MICROSOFT.CONCAT(&quot;#define MODBUS_ADDR_&quot;; [.A202]; &quot; &quot;; [.B202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CUP3_CHANNEL_ERROR" calcext:value-type="string">
            <text:p>CUP3_CHANNEL_ERROR</text:p>
          </table:table-cell>
          <table:table-cell table:formula="of:=IF([$List.A203] &lt;&gt;&quot;&quot;; [$List.A203]; &quot;&quot;)" office:value-type="float" office:value="3015" calcext:value-type="float">
            <text:p>3015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>
            <text:p/>
          </table:table-cell>
          <table:table-cell table:formula="of:=IF([$List.A204] &lt;&gt;&quot;&quot;; [$List.A204]; &quot;&quot;)">
            <text:p/>
          </table:table-cell>
          <table:table-cell/>
          <table:table-cell table:formula="of:=IF([.A204]&lt;&gt;&quot;&quot;; COM.MICROSOFT.CONCAT(&quot;#define MODBUS_ADDR_&quot;; [.A204]; &quot; &quot;; [.B204]); &quot;&quot;)">
            <text:p/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>
            <text:p/>
          </table:table-cell>
          <table:table-cell table:formula="of:=IF([$List.A205] &lt;&gt;&quot;&quot;; [$List.A205]; &quot;&quot;)">
            <text:p/>
          </table:table-cell>
          <table:table-cell/>
          <table:table-cell table:formula="of:=IF([.A205]&lt;&gt;&quot;&quot;; COM.MICROSOFT.CONCAT(&quot;#define MODBUS_ADDR_&quot;; [.A205]; &quot; &quot;; [.B205]); &quot;&quot;)">
            <text:p/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>
            <text:p/>
          </table:table-cell>
          <table:table-cell table:formula="of:=IF([$List.A206] &lt;&gt;&quot;&quot;; [$List.A206]; &quot;&quot;)">
            <text:p/>
          </table:table-cell>
          <table:table-cell/>
          <table:table-cell table:formula="of:=IF([.A206]&lt;&gt;&quot;&quot;; COM.MICROSOFT.CONCAT(&quot;#define MODBUS_ADDR_&quot;; [.A206]; &quot; &quot;; [.B206]); &quot;&quot;)">
            <text:p/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>
            <text:p/>
          </table:table-cell>
          <table:table-cell table:formula="of:=IF([$List.A207] &lt;&gt;&quot;&quot;; [$List.A207]; &quot;&quot;)">
            <text:p/>
          </table:table-cell>
          <table:table-cell/>
          <table:table-cell table:formula="of:=IF([.A207]&lt;&gt;&quot;&quot;; COM.MICROSOFT.CONCAT(&quot;#define MODBUS_ADDR_&quot;; [.A207]; &quot; &quot;; [.B207]); &quot;&quot;)">
            <text:p/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>
            <text:p/>
          </table:table-cell>
          <table:table-cell table:formula="of:=IF([$List.A208] &lt;&gt;&quot;&quot;; [$List.A208]; &quot;&quot;)">
            <text:p/>
          </table:table-cell>
          <table:table-cell/>
          <table:table-cell table:formula="of:=IF([.A208]&lt;&gt;&quot;&quot;; COM.MICROSOFT.CONCAT(&quot;#define MODBUS_ADDR_&quot;; [.A208]; &quot; &quot;; [.B208]); &quot;&quot;)">
            <text:p/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>
            <text:p/>
          </table:table-cell>
          <table:table-cell table:formula="of:=IF([$List.A209] &lt;&gt;&quot;&quot;; [$List.A209]; &quot;&quot;)">
            <text:p/>
          </table:table-cell>
          <table:table-cell/>
          <table:table-cell table:formula="of:=IF([.A209]&lt;&gt;&quot;&quot;; COM.MICROSOFT.CONCAT(&quot;#define MODBUS_ADDR_&quot;; [.A209]; &quot; &quot;; [.B209]); &quot;&quot;)">
            <text:p/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>
            <text:p/>
          </table:table-cell>
          <table:table-cell table:formula="of:=IF([$List.A210] &lt;&gt;&quot;&quot;; [$List.A210]; &quot;&quot;)">
            <text:p/>
          </table:table-cell>
          <table:table-cell/>
          <table:table-cell table:formula="of:=IF([.A210]&lt;&gt;&quot;&quot;; COM.MICROSOFT.CONCAT(&quot;#define MODBUS_ADDR_&quot;; [.A210]; &quot; &quot;; [.B210]); &quot;&quot;)">
            <text:p/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>
            <text:p/>
          </table:table-cell>
          <table:table-cell table:formula="of:=IF([$List.A211] &lt;&gt;&quot;&quot;; [$List.A211]; &quot;&quot;)">
            <text:p/>
          </table:table-cell>
          <table:table-cell/>
          <table:table-cell table:formula="of:=IF([.A211]&lt;&gt;&quot;&quot;; COM.MICROSOFT.CONCAT(&quot;#define MODBUS_ADDR_&quot;; [.A211]; &quot; &quot;; [.B211]); &quot;&quot;)">
            <text:p/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>
            <text:p/>
          </table:table-cell>
          <table:table-cell table:formula="of:=IF([$List.A212] &lt;&gt;&quot;&quot;; [$List.A212]; &quot;&quot;)">
            <text:p/>
          </table:table-cell>
          <table:table-cell/>
          <table:table-cell table:formula="of:=IF([.A212]&lt;&gt;&quot;&quot;; COM.MICROSOFT.CONCAT(&quot;#define MODBUS_ADDR_&quot;; [.A212]; &quot; &quot;; [.B212]); &quot;&quot;)">
            <text:p/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>
            <text:p/>
          </table:table-cell>
          <table:table-cell table:formula="of:=IF([$List.A213] &lt;&gt;&quot;&quot;; [$List.A213]; &quot;&quot;)">
            <text:p/>
          </table:table-cell>
          <table:table-cell/>
          <table:table-cell table:formula="of:=IF([.A213]&lt;&gt;&quot;&quot;; COM.MICROSOFT.CONCAT(&quot;#define MODBUS_ADDR_&quot;; [.A213]; &quot; &quot;; [.B213]); &quot;&quot;)">
            <text:p/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>
            <text:p/>
          </table:table-cell>
          <table:table-cell table:formula="of:=IF([$List.A214] &lt;&gt;&quot;&quot;; [$List.A214]; &quot;&quot;)">
            <text:p/>
          </table:table-cell>
          <table:table-cell/>
          <table:table-cell table:formula="of:=IF([.A214]&lt;&gt;&quot;&quot;; COM.MICROSOFT.CONCAT(&quot;#define MODBUS_ADDR_&quot;; [.A214]; &quot; &quot;; [.B214]); &quot;&quot;)">
            <text:p/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>
            <text:p/>
          </table:table-cell>
          <table:table-cell table:formula="of:=IF([$List.A215] &lt;&gt;&quot;&quot;; [$List.A215]; &quot;&quot;)">
            <text:p/>
          </table:table-cell>
          <table:table-cell/>
          <table:table-cell table:formula="of:=IF([.A215]&lt;&gt;&quot;&quot;; COM.MICROSOFT.CONCAT(&quot;#define MODBUS_ADDR_&quot;; [.A215]; &quot; &quot;; [.B215]); &quot;&quot;)">
            <text:p/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>
            <text:p/>
          </table:table-cell>
          <table:table-cell table:formula="of:=IF([$List.A216] &lt;&gt;&quot;&quot;; [$List.A216]; &quot;&quot;)">
            <text:p/>
          </table:table-cell>
          <table:table-cell/>
          <table:table-cell table:formula="of:=IF([.A216]&lt;&gt;&quot;&quot;; COM.MICROSOFT.CONCAT(&quot;#define MODBUS_ADDR_&quot;; [.A216]; &quot; &quot;; [.B216]); &quot;&quot;)">
            <text:p/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>
            <text:p/>
          </table:table-cell>
          <table:table-cell table:formula="of:=IF([$List.A217] &lt;&gt;&quot;&quot;; [$List.A217]; &quot;&quot;)">
            <text:p/>
          </table:table-cell>
          <table:table-cell/>
          <table:table-cell table:formula="of:=IF([.A217]&lt;&gt;&quot;&quot;; COM.MICROSOFT.CONCAT(&quot;#define MODBUS_ADDR_&quot;; [.A217]; &quot; &quot;; [.B217]); &quot;&quot;)">
            <text:p/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>
            <text:p/>
          </table:table-cell>
          <table:table-cell table:formula="of:=IF([$List.A218] &lt;&gt;&quot;&quot;; [$List.A218]; &quot;&quot;)">
            <text:p/>
          </table:table-cell>
          <table:table-cell/>
          <table:table-cell table:formula="of:=IF([.A218]&lt;&gt;&quot;&quot;; COM.MICROSOFT.CONCAT(&quot;#define MODBUS_ADDR_&quot;; [.A218]; &quot; &quot;; [.B218]); &quot;&quot;)">
            <text:p/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>
            <text:p/>
          </table:table-cell>
          <table:table-cell table:formula="of:=IF([$List.A219] &lt;&gt;&quot;&quot;; [$List.A219]; &quot;&quot;)">
            <text:p/>
          </table:table-cell>
          <table:table-cell/>
          <table:table-cell table:formula="of:=IF([.A219]&lt;&gt;&quot;&quot;; COM.MICROSOFT.CONCAT(&quot;#define MODBUS_ADDR_&quot;; [.A219]; &quot; &quot;; [.B219]); &quot;&quot;)">
            <text:p/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>
            <text:p/>
          </table:table-cell>
          <table:table-cell table:formula="of:=IF([$List.A220] &lt;&gt;&quot;&quot;; [$List.A220]; &quot;&quot;)">
            <text:p/>
          </table:table-cell>
          <table:table-cell/>
          <table:table-cell table:formula="of:=IF([.A220]&lt;&gt;&quot;&quot;; COM.MICROSOFT.CONCAT(&quot;#define MODBUS_ADDR_&quot;; [.A220]; &quot; &quot;; [.B220]); &quot;&quot;)">
            <text:p/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>
            <text:p/>
          </table:table-cell>
          <table:table-cell table:formula="of:=IF([$List.A221] &lt;&gt;&quot;&quot;; [$List.A221]; &quot;&quot;)">
            <text:p/>
          </table:table-cell>
          <table:table-cell/>
          <table:table-cell table:formula="of:=IF([.A221]&lt;&gt;&quot;&quot;; COM.MICROSOFT.CONCAT(&quot;#define MODBUS_ADDR_&quot;; [.A221]; &quot; &quot;; [.B221]); &quot;&quot;)">
            <text:p/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>
            <text:p/>
          </table:table-cell>
          <table:table-cell table:formula="of:=IF([$List.A222] &lt;&gt;&quot;&quot;; [$List.A222]; &quot;&quot;)">
            <text:p/>
          </table:table-cell>
          <table:table-cell/>
          <table:table-cell table:formula="of:=IF([.A222]&lt;&gt;&quot;&quot;; COM.MICROSOFT.CONCAT(&quot;#define MODBUS_ADDR_&quot;; [.A222]; &quot; &quot;; [.B222]); &quot;&quot;)">
            <text:p/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>
            <text:p/>
          </table:table-cell>
          <table:table-cell table:formula="of:=IF([$List.A223] &lt;&gt;&quot;&quot;; [$List.A223]; &quot;&quot;)">
            <text:p/>
          </table:table-cell>
          <table:table-cell/>
          <table:table-cell table:formula="of:=IF([.A223]&lt;&gt;&quot;&quot;; COM.MICROSOFT.CONCAT(&quot;#define MODBUS_ADDR_&quot;; [.A223]; &quot; &quot;; [.B223]); &quot;&quot;)">
            <text:p/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>
            <text:p/>
          </table:table-cell>
          <table:table-cell table:formula="of:=IF([$List.A224] &lt;&gt;&quot;&quot;; [$List.A224]; &quot;&quot;)">
            <text:p/>
          </table:table-cell>
          <table:table-cell/>
          <table:table-cell table:formula="of:=IF([.A224]&lt;&gt;&quot;&quot;; COM.MICROSOFT.CONCAT(&quot;#define MODBUS_ADDR_&quot;; [.A224]; &quot; &quot;; [.B224]); &quot;&quot;)">
            <text:p/>
          </table:table-cell>
          <table:table-cell table:number-columns-repeated="16378"/>
        </table:table-row>
        <table:table-row table:style-name="ro1">
          <table:table-cell table:formula="of:=IF([$List.A225] &lt;&gt;&quot;&quot;; [$List.I225]; &quot;&quot;)">
            <text:p/>
          </table:table-cell>
          <table:table-cell table:formula="of:=IF([$List.A225] &lt;&gt;&quot;&quot;; [$List.A225]; &quot;&quot;)">
            <text:p/>
          </table:table-cell>
          <table:table-cell/>
          <table:table-cell table:formula="of:=IF([.A225]&lt;&gt;&quot;&quot;; COM.MICROSOFT.CONCAT(&quot;#define MODBUS_ADDR_&quot;; [.A225]; &quot; &quot;; [.B225]); &quot;&quot;)">
            <text:p/>
          </table:table-cell>
          <table:table-cell table:number-columns-repeated="16378"/>
        </table:table-row>
        <table:table-row table:style-name="ro1">
          <table:table-cell table:formula="of:=IF([$List.A226] &lt;&gt;&quot;&quot;; [$List.I226]; &quot;&quot;)">
            <text:p/>
          </table:table-cell>
          <table:table-cell table:formula="of:=IF([$List.A226] &lt;&gt;&quot;&quot;; [$List.A226]; &quot;&quot;)">
            <text:p/>
          </table:table-cell>
          <table:table-cell/>
          <table:table-cell table:formula="of:=IF([.A226]&lt;&gt;&quot;&quot;; COM.MICROSOFT.CONCAT(&quot;#define MODBUS_ADDR_&quot;; [.A226]; &quot; &quot;; [.B226]); &quot;&quot;)">
            <text:p/>
          </table:table-cell>
          <table:table-cell table:number-columns-repeated="16378"/>
        </table:table-row>
        <table:table-row table:style-name="ro1">
          <table:table-cell table:formula="of:=IF([$List.A227] &lt;&gt;&quot;&quot;; [$List.I227]; &quot;&quot;)">
            <text:p/>
          </table:table-cell>
          <table:table-cell table:formula="of:=IF([$List.A227] &lt;&gt;&quot;&quot;; [$List.A227]; &quot;&quot;)">
            <text:p/>
          </table:table-cell>
          <table:table-cell/>
          <table:table-cell table:formula="of:=IF([.A227]&lt;&gt;&quot;&quot;; COM.MICROSOFT.CONCAT(&quot;#define MODBUS_ADDR_&quot;; [.A227]; &quot; &quot;; [.B227]); &quot;&quot;)">
            <text:p/>
          </table:table-cell>
          <table:table-cell table:number-columns-repeated="16378"/>
        </table:table-row>
        <table:table-row table:style-name="ro1">
          <table:table-cell table:formula="of:=IF([$List.A228] &lt;&gt;&quot;&quot;; [$List.I228]; &quot;&quot;)">
            <text:p/>
          </table:table-cell>
          <table:table-cell table:formula="of:=IF([$List.A228] &lt;&gt;&quot;&quot;; [$List.A228]; &quot;&quot;)">
            <text:p/>
          </table:table-cell>
          <table:table-cell/>
          <table:table-cell table:formula="of:=IF([.A228]&lt;&gt;&quot;&quot;; COM.MICROSOFT.CONCAT(&quot;#define MODBUS_ADDR_&quot;; [.A228]; &quot; &quot;; [.B228]); &quot;&quot;)">
            <text:p/>
          </table:table-cell>
          <table:table-cell table:number-columns-repeated="16378"/>
        </table:table-row>
        <table:table-row table:style-name="ro1">
          <table:table-cell table:formula="of:=IF([$List.A229] &lt;&gt;&quot;&quot;; [$List.I229]; &quot;&quot;)">
            <text:p/>
          </table:table-cell>
          <table:table-cell table:formula="of:=IF([$List.A229] &lt;&gt;&quot;&quot;; [$List.A229]; &quot;&quot;)">
            <text:p/>
          </table:table-cell>
          <table:table-cell/>
          <table:table-cell table:formula="of:=IF([.A229]&lt;&gt;&quot;&quot;; COM.MICROSOFT.CONCAT(&quot;#define MODBUS_ADDR_&quot;; [.A229]; &quot; &quot;; [.B229]); &quot;&quot;)">
            <text:p/>
          </table:table-cell>
          <table:table-cell table:number-columns-repeated="16378"/>
        </table:table-row>
        <table:table-row table:style-name="ro1">
          <table:table-cell table:formula="of:=IF([$List.A230] &lt;&gt;&quot;&quot;; [$List.I230]; &quot;&quot;)">
            <text:p/>
          </table:table-cell>
          <table:table-cell table:formula="of:=IF([$List.A230] &lt;&gt;&quot;&quot;; [$List.A230]; &quot;&quot;)">
            <text:p/>
          </table:table-cell>
          <table:table-cell/>
          <table:table-cell table:formula="of:=IF([.A230]&lt;&gt;&quot;&quot;; COM.MICROSOFT.CONCAT(&quot;#define MODBUS_ADDR_&quot;; [.A230]; &quot; &quot;; [.B230]); &quot;&quot;)">
            <text:p/>
          </table:table-cell>
          <table:table-cell table:number-columns-repeated="16378"/>
        </table:table-row>
        <table:table-row table:style-name="ro1">
          <table:table-cell table:style-name="ce15"/>
          <table:table-cell table:style-name="ce19"/>
          <table:table-cell table:style-name="ce15" table:number-columns-repeated="2"/>
          <table:table-cell table:number-columns-repeated="16378"/>
        </table:table-row>
        <table:table-row table:style-name="ro1" table:number-rows-repeated="104834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N/A" calcext:value-type="string">
            <text:p>N/A</text:p>
          </table:table-cell>
          <table:table-cell table:formula="of:=IF(AND(([.A5]=&quot;coil&quot;);([.C5]=&quot;true&quot;)); 1; &quot;&quot;)">
            <text:p/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>
            <text:p/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N/A" calcext:value-type="string">
            <text:p>N/A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N/A" calcext:value-type="string">
            <text:p>N/A</text:p>
          </table:table-cell>
          <table:table-cell table:formula="of:=IF(AND(([.A10]=&quot;coil&quot;);([.C10]=&quot;true&quot;)); 1; &quot;&quot;)">
            <text:p/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>
            <text:p/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N/A" calcext:value-type="string">
            <text:p>N/A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N/A" calcext:value-type="string">
            <text:p>N/A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REQUESTED_STATE" calcext:value-type="string">
            <text:p>CUP1_REQUESTED_STATE</text:p>
          </table:table-cell>
          <table:table-cell table:style-name="ce17" table:formula="of:=[$List.G18]" office:value-type="string" office:string-value="true" calcext:value-type="string">
            <text:p>true</text:p>
          </table:table-cell>
          <table:table-cell table:formula="of:=IF(AND(([.A18]=&quot;coil&quot;);([.C18]=&quot;true&quot;)); 1; &quot;&quot;)" office:value-type="float" office:value="1" calcext:value-type="float">
            <text:p>1</text:p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REQUESTED_STATE" calcext:value-type="string">
            <text:p>CUP2_REQUESTED_STATE</text:p>
          </table:table-cell>
          <table:table-cell table:style-name="ce17" table:formula="of:=[$List.G19]" office:value-type="string" office:string-value="true" calcext:value-type="string">
            <text:p>true</text:p>
          </table:table-cell>
          <table:table-cell table:formula="of:=IF(AND(([.A19]=&quot;coil&quot;);([.C19]=&quot;true&quot;)); 1; &quot;&quot;)" office:value-type="float" office:value="1" calcext:value-type="float">
            <text:p>1</text:p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REQUESTED_STATE" calcext:value-type="string">
            <text:p>CUP3_REQUESTED_STATE</text:p>
          </table:table-cell>
          <table:table-cell table:style-name="ce17" table:formula="of:=[$List.G20]" office:value-type="string" office:string-value="N/A" calcext:value-type="string">
            <text:p>N/A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>
            <text:p/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ACTUATOR1_CONTROL" calcext:value-type="string">
            <text:p>ACTUATOR1_CONTROL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2]=&quot;coil&quot;);([.C22]=&quot;true&quot;)); 1; &quot;&quot;)" office:value-type="float" office:value="1" calcext:value-type="float">
            <text:p>1</text:p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ACTUATOR2_CONTROL" calcext:value-type="string">
            <text:p>ACTUATOR2_CONTROL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3]=&quot;coil&quot;);([.C23]=&quot;true&quot;)); 1; &quot;&quot;)" office:value-type="float" office:value="1" calcext:value-type="float">
            <text:p>1</text:p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ACTUATOR3_CONTROL_IN" calcext:value-type="string">
            <text:p>ACTUATOR3_CONTROL_IN</text:p>
          </table:table-cell>
          <table:table-cell table:style-name="ce17" table:formula="of:=[$List.G24]" office:value-type="string" office:string-value="N/A" calcext:value-type="string">
            <text:p>N/A</text:p>
          </table:table-cell>
          <table:table-cell table:formula="of:=IF(AND(([.A24]=&quot;coil&quot;);([.C24]=&quot;true&quot;)); 1; &quot;&quot;)">
            <text:p/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>
            <text:p/>
          </table:table-cell>
        </table:table-row>
        <table:table-row table:style-name="ro1">
          <table:table-cell table:style-name="ce17" table:formula="of:=[$List.B25]" office:value-type="string" office:string-value="coil" calcext:value-type="string">
            <text:p>coil</text:p>
          </table:table-cell>
          <table:table-cell table:style-name="ce17" table:formula="of:=[$List.I25]" office:value-type="string" office:string-value="ACTUATOR3_CONTROL_OUT" calcext:value-type="string">
            <text:p>ACTUATOR3_CONTROL_OUT</text:p>
          </table:table-cell>
          <table:table-cell table:style-name="ce17" table:formula="of:=[$List.G25]" office:value-type="string" office:string-value="N/A" calcext:value-type="string">
            <text:p>N/A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3_CONTROL_BRAKE" calcext:value-type="string">
            <text:p>ACTUATOR3_CONTROL_BRAKE</text:p>
          </table:table-cell>
          <table:table-cell table:style-name="ce17" table:formula="of:=[$List.G26]" office:value-type="string" office:string-value="N/A" calcext:value-type="string">
            <text:p>N/A</text:p>
          </table:table-cell>
          <table:table-cell table:formula="of:=IF(AND(([.A26]=&quot;coil&quot;);([.C26]=&quot;true&quot;)); 1; &quot;&quot;)">
            <text:p/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>
            <text:p/>
          </table:table-cell>
        </table:table-row>
        <table:table-row table:style-name="ro1">
          <table:table-cell table:style-name="ce17" table:formula="of:=[$List.B27]" office:value-type="float" office:value="0" calcext:value-type="float">
            <text:p>0</text:p>
          </table:table-cell>
          <table:table-cell table:style-name="ce17" table:formula="of:=[$List.I27]">
            <text:p/>
          </table:table-cell>
          <table:table-cell table:style-name="ce17" table:formula="of:=[$List.G27]" office:value-type="float" office:value="0" calcext:value-type="float">
            <text:p>0</text:p>
          </table:table-cell>
          <table:table-cell table:formula="of:=IF(AND(([.A27]=&quot;coil&quot;);([.C27]=&quot;true&quot;)); 1; &quot;&quot;)">
            <text:p/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>
            <text:p/>
          </table:table-cell>
        </table:table-row>
        <table:table-row table:style-name="ro1">
          <table:table-cell table:style-name="ce17" table:formula="of:=[$List.B28]" office:value-type="float" office:value="0" calcext:value-type="float">
            <text:p>0</text:p>
          </table:table-cell>
          <table:table-cell table:style-name="ce17" table:formula="of:=[$List.I28]">
            <text:p/>
          </table:table-cell>
          <table:table-cell table:style-name="ce17" table:formula="of:=[$List.G28]" office:value-type="float" office:value="0" calcext:value-type="float">
            <text:p>0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holding reg." calcext:value-type="string">
            <text:p>holding reg.</text:p>
          </table:table-cell>
          <table:table-cell table:style-name="ce17" table:formula="of:=[$List.I29]" office:value-type="string" office:string-value="ERROR_CODE" calcext:value-type="string">
            <text:p>ERROR_CODE</text:p>
          </table:table-cell>
          <table:table-cell table:style-name="ce17" table:formula="of:=[$List.G29]" office:value-type="float" office:value="0" calcext:value-type="float">
            <text:p>0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holding reg." calcext:value-type="string">
            <text:p>holding reg.</text:p>
          </table:table-cell>
          <table:table-cell table:style-name="ce17" table:formula="of:=[$List.I30]" office:value-type="string" office:string-value="LAST_ERROR" calcext:value-type="string">
            <text:p>LAST_ERROR</text:p>
          </table:table-cell>
          <table:table-cell table:style-name="ce17" table:formula="of:=[$List.G30]" office:value-type="float" office:value="0" calcext:value-type="float">
            <text:p>0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string" office:string-value="holding reg." calcext:value-type="string">
            <text:p>holding reg.</text:p>
          </table:table-cell>
          <table:table-cell table:style-name="ce17" table:formula="of:=[$List.I31]" office:value-type="string" office:string-value="ERROR_STORAGE" calcext:value-type="string">
            <text:p>ERROR_STORAGE</text:p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TIME_LIMIT_INSERTING1" calcext:value-type="string">
            <text:p>TIME_LIMIT_INSERTING1</text:p>
          </table:table-cell>
          <table:table-cell table:style-name="ce17" table:formula="of:=[$List.G33]" office:value-type="float" office:value="700" calcext:value-type="float">
            <text:p>70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 office:value-type="float" office:value="1" calcext:value-type="float">
            <text:p>1</text:p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TIME_LIMIT_INSERTING2" calcext:value-type="string">
            <text:p>TIME_LIMIT_INSERTING2</text:p>
          </table:table-cell>
          <table:table-cell table:style-name="ce17" table:formula="of:=[$List.G34]" office:value-type="float" office:value="700" calcext:value-type="float">
            <text:p>70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 office:value-type="float" office:value="1" calcext:value-type="float">
            <text:p>1</text:p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TIME_LIMIT_INSERTING3" calcext:value-type="string">
            <text:p>TIME_LIMIT_INSERTING3</text:p>
          </table:table-cell>
          <table:table-cell table:style-name="ce17" table:formula="of:=[$List.G35]" office:value-type="float" office:value="4000" calcext:value-type="float">
            <text:p>400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 office:value-type="float" office:value="1" calcext:value-type="float">
            <text:p>1</text:p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36]" office:value-type="string" office:string-value="holding reg." calcext:value-type="string">
            <text:p>holding reg.</text:p>
          </table:table-cell>
          <table:table-cell table:style-name="ce17" table:formula="of:=[$List.I36]" office:value-type="string" office:string-value="TIME_LIMIT_WITHDRAWING1" calcext:value-type="string">
            <text:p>TIME_LIMIT_WITHDRAWING1</text:p>
          </table:table-cell>
          <table:table-cell table:style-name="ce17" table:formula="of:=[$List.G36]" office:value-type="float" office:value="300" calcext:value-type="float">
            <text:p>30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 office:value-type="float" office:value="1" calcext:value-type="float">
            <text:p>1</text:p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WITHDRAWING2" calcext:value-type="string">
            <text:p>TIME_LIMIT_WITHDRAWING2</text:p>
          </table:table-cell>
          <table:table-cell table:style-name="ce17" table:formula="of:=[$List.G37]" office:value-type="float" office:value="300" calcext:value-type="float">
            <text:p>30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 office:value-type="float" office:value="1" calcext:value-type="float">
            <text:p>1</text:p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WITHDRAWING3" calcext:value-type="string">
            <text:p>TIME_LIMIT_WITHDRAWING3</text:p>
          </table:table-cell>
          <table:table-cell table:style-name="ce17" table:formula="of:=[$List.G38]" office:value-type="float" office:value="4400" calcext:value-type="float">
            <text:p>440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 office:value-type="float" office:value="1" calcext:value-type="float">
            <text:p>1</text:p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39]" office:value-type="float" office:value="0" calcext:value-type="float">
            <text:p>0</text:p>
          </table:table-cell>
          <table:table-cell table:style-name="ce17" table:formula="of:=[$List.I39]">
            <text:p/>
          </table:table-cell>
          <table:table-cell table:style-name="ce17" table:formula="of:=[$List.G39]" office:value-type="float" office:value="0" calcext:value-type="float">
            <text:p>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>
            <text:p/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>
            <text:p/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ACTIVE_CUP" calcext:value-type="string">
            <text:p>ACTIVE_CUP</text:p>
          </table:table-cell>
          <table:table-cell table:style-name="ce17" table:formula="of:=[$List.G40]" office:value-type="float" office:value="1" calcext:value-type="float">
            <text:p>1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ACTIVE_CUP)] = 1u;" calcext:value-type="string">
            <text:p>ModbusHoldingRegisters[holdingIndexFromAddress(MODBUS_ADDR_ACTIVE_CUP)] = 1u;</text:p>
          </table:table-cell>
        </table:table-row>
        <table:table-row table:style-name="ro1">
          <table:table-cell table:style-name="ce17" table:formula="of:=[$List.B41]" office:value-type="float" office:value="0" calcext:value-type="float">
            <text:p>0</text:p>
          </table:table-cell>
          <table:table-cell table:style-name="ce17" table:formula="of:=[$List.I41]">
            <text:p/>
          </table:table-cell>
          <table:table-cell table:style-name="ce17" table:formula="of:=[$List.G41]" office:value-type="float" office:value="0" calcext:value-type="float">
            <text:p>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>
            <text:p/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>
            <text:p/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CUP1_FSM_STATE" calcext:value-type="string">
            <text:p>CUP1_FSM_STATE</text:p>
          </table:table-cell>
          <table:table-cell table:style-name="ce17" table:formula="of:=[$List.G42]" office:value-type="float" office:value="0" calcext:value-type="float">
            <text:p>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>
            <text:p/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>
            <text:p/>
          </table:table-cell>
        </table:table-row>
        <table:table-row table:style-name="ro1">
          <table:table-cell table:style-name="ce17" table:formula="of:=[$List.B43]" office:value-type="string" office:string-value="holding reg." calcext:value-type="string">
            <text:p>holding reg.</text:p>
          </table:table-cell>
          <table:table-cell table:style-name="ce17" table:formula="of:=[$List.I43]" office:value-type="string" office:string-value="CUP2_FSM_STATE" calcext:value-type="string">
            <text:p>CUP2_FSM_STATE</text:p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>
            <text:p/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CUP3_FSM_STATE" calcext:value-type="string">
            <text:p>CUP3_FSM_STATE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>
            <text:p/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>
            <text:p/>
          </table:table-cell>
        </table:table-row>
        <table:table-row table:style-name="ro1">
          <table:table-cell table:style-name="ce17" table:formula="of:=[$List.B45]" office:value-type="string" office:string-value="holding reg." calcext:value-type="string">
            <text:p>holding reg.</text:p>
          </table:table-cell>
          <table:table-cell table:style-name="ce17" table:formula="of:=[$List.I45]" office:value-type="string" office:string-value="CUP1_ERROR" calcext:value-type="string">
            <text:p>CUP1_ERROR</text:p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2_ERROR" calcext:value-type="string">
            <text:p>CUP2_ERROR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>
            <text:p/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3_ERROR" calcext:value-type="string">
            <text:p>CUP3_ERROR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1_LAST_ERROR" calcext:value-type="string">
            <text:p>CUP1_LAST_ERROR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2_LAST_ERROR" calcext:value-type="string">
            <text:p>CUP2_LAST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3_LAST_ERROR" calcext:value-type="string">
            <text:p>CUP3_LAST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1_ERROR_STORAGE" calcext:value-type="string">
            <text:p>CUP1_ERROR_STORAGE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2_ERROR_STORAGE" calcext:value-type="string">
            <text:p>CUP2_ERROR_STORAGE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3_ERROR_STORAGE" calcext:value-type="string">
            <text:p>CUP3_ERROR_STORAGE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float" office:value="0" calcext:value-type="float">
            <text:p>0</text:p>
          </table:table-cell>
          <table:table-cell table:style-name="ce17" table:formula="of:=[$List.I54]">
            <text:p/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INSTALLED_CUPS" calcext:value-type="string">
            <text:p>INSTALLED_CUPS</text:p>
          </table:table-cell>
          <table:table-cell table:style-name="ce17" table:formula="of:=[$List.G55]" office:value-type="float" office:value="3" calcext:value-type="float">
            <text:p>3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 office:value-type="float" office:value="1" calcext:value-type="float">
            <text:p>1</text:p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ELECTRODES_CUP1" calcext:value-type="string">
            <text:p>ELECTRODES_CUP1</text:p>
          </table:table-cell>
          <table:table-cell table:style-name="ce17" table:formula="of:=[$List.G56]" office:value-type="float" office:value="4" calcext:value-type="float">
            <text:p>4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 office:value-type="float" office:value="1" calcext:value-type="float">
            <text:p>1</text:p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ELECTRODES_CUP2" calcext:value-type="string">
            <text:p>ELECTRODES_CUP2</text:p>
          </table:table-cell>
          <table:table-cell table:style-name="ce17" table:formula="of:=[$List.G57]" office:value-type="float" office:value="4" calcext:value-type="float">
            <text:p>4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 office:value-type="float" office:value="1" calcext:value-type="float">
            <text:p>1</text:p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58]" office:value-type="string" office:string-value="holding reg." calcext:value-type="string">
            <text:p>holding reg.</text:p>
          </table:table-cell>
          <table:table-cell table:style-name="ce17" table:formula="of:=[$List.I58]" office:value-type="string" office:string-value="ELECTRODES_CUP3" calcext:value-type="string">
            <text:p>ELECTRODES_CUP3</text:p>
          </table:table-cell>
          <table:table-cell table:style-name="ce17" table:formula="of:=[$List.G58]" office:value-type="float" office:value="4" calcext:value-type="float">
            <text:p>4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 office:value-type="float" office:value="1" calcext:value-type="float">
            <text:p>1</text:p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CUP1_TYPE" calcext:value-type="string">
            <text:p>CUP1_TYPE</text:p>
          </table:table-cell>
          <table:table-cell table:style-name="ce17" table:formula="of:=[$List.G59]" office:value-type="float" office:value="0" calcext:value-type="float">
            <text:p>0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>
            <text:p/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>
            <text:p/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CUP2_TYPE" calcext:value-type="string">
            <text:p>CUP2_TYPE</text:p>
          </table:table-cell>
          <table:table-cell table:style-name="ce17" table:formula="of:=[$List.G60]" office:value-type="float" office:value="0" calcext:value-type="float">
            <text:p>0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>
            <text:p/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>
            <text:p/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CUP3_TYPE" calcext:value-type="string">
            <text:p>CUP3_TYPE</text:p>
          </table:table-cell>
          <table:table-cell table:style-name="ce17" table:formula="of:=[$List.G61]" office:value-type="float" office:value="1" calcext:value-type="float">
            <text:p>1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CUP3_TYPE)] = 1u;" calcext:value-type="string">
            <text:p>ModbusHoldingRegisters[holdingIndexFromAddress(MODBUS_ADDR_CUP3_TYPE)] = 1u;</text:p>
          </table:table-cell>
        </table:table-row>
        <table:table-row table:style-name="ro1">
          <table:table-cell table:style-name="ce17" table:formula="of:=[$List.B62]" office:value-type="float" office:value="0" calcext:value-type="float">
            <text:p>0</text:p>
          </table:table-cell>
          <table:table-cell table:style-name="ce17" table:formula="of:=[$List.I62]">
            <text:p/>
          </table:table-cell>
          <table:table-cell table:style-name="ce17" table:formula="of:=[$List.G62]" office:value-type="float" office:value="0" calcext:value-type="float">
            <text:p>0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>
            <text:p/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>
            <text:p/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CHANNEL1_GAIN1_OFFSET" calcext:value-type="string">
            <text:p>CUP1_CHANNEL1_GAIN1_OFFSET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1_CHANNEL2_GAIN1_OFFSET" calcext:value-type="string">
            <text:p>CUP1_CHANNEL2_GAIN1_OFFSET</text:p>
          </table:table-cell>
          <table:table-cell table:style-name="ce17" table:formula="of:=[$List.G64]" office:value-type="float" office:value="0" calcext:value-type="float">
            <text:p>0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>
            <text:p/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>
            <text:p/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1_CHANNEL3_GAIN1_OFFSET" calcext:value-type="string">
            <text:p>CUP1_CHANNEL3_GAIN1_OFFSET</text:p>
          </table:table-cell>
          <table:table-cell table:style-name="ce17" table:formula="of:=[$List.G65]" office:value-type="float" office:value="0" calcext:value-type="float">
            <text:p>0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>
            <text:p/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>
            <text:p/>
          </table:table-cell>
        </table:table-row>
        <table:table-row table:style-name="ro1">
          <table:table-cell table:style-name="ce17" table:formula="of:=[$List.B66]" office:value-type="string" office:string-value="holding reg." calcext:value-type="string">
            <text:p>holding reg.</text:p>
          </table:table-cell>
          <table:table-cell table:style-name="ce17" table:formula="of:=[$List.I66]" office:value-type="string" office:string-value="CUP1_CHANNEL4_GAIN1_OFFSET" calcext:value-type="string">
            <text:p>CUP1_CHANNEL4_GAIN1_OFFSET</text:p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UP2_CHANNEL1_GAIN1_OFFSET" calcext:value-type="string">
            <text:p>CUP2_CHANNEL1_GAIN1_OFFSET</text:p>
          </table:table-cell>
          <table:table-cell table:style-name="ce17" table:formula="of:=[$List.G67]" office:value-type="float" office:value="0" calcext:value-type="float">
            <text:p>0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>
            <text:p/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>
            <text:p/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UP2_CHANNEL2_GAIN1_OFFSET" calcext:value-type="string">
            <text:p>CUP2_CHANNEL2_GAIN1_OFFSET</text:p>
          </table:table-cell>
          <table:table-cell table:style-name="ce17" table:formula="of:=[$List.G68]" office:value-type="float" office:value="0" calcext:value-type="float">
            <text:p>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>
            <text:p/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>
            <text:p/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UP2_CHANNEL3_GAIN1_OFFSET" calcext:value-type="string">
            <text:p>CUP2_CHANNEL3_GAIN1_OFFSET</text:p>
          </table:table-cell>
          <table:table-cell table:style-name="ce17" table:formula="of:=[$List.G69]" office:value-type="float" office:value="0" calcext:value-type="float">
            <text:p>0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>
            <text:p/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>
            <text:p/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UP2_CHANNEL4_GAIN1_OFFSET" calcext:value-type="string">
            <text:p>CUP2_CHANNEL4_GAIN1_OFFSET</text:p>
          </table:table-cell>
          <table:table-cell table:style-name="ce17" table:formula="of:=[$List.G70]" office:value-type="float" office:value="0" calcext:value-type="float">
            <text:p>0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>
            <text:p/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>
            <text:p/>
          </table:table-cell>
        </table:table-row>
        <table:table-row table:style-name="ro1">
          <table:table-cell table:style-name="ce17" table:formula="of:=[$List.B71]" office:value-type="string" office:string-value="holding reg." calcext:value-type="string">
            <text:p>holding reg.</text:p>
          </table:table-cell>
          <table:table-cell table:style-name="ce17" table:formula="of:=[$List.I71]" office:value-type="string" office:string-value="CUP3_CHANNEL1_GAIN1_OFFSET" calcext:value-type="string">
            <text:p>CUP3_CHANNEL1_GAIN1_OFFSET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3_CHANNEL2_GAIN1_OFFSET" calcext:value-type="string">
            <text:p>CUP3_CHANNEL2_GAIN1_OFFSET</text:p>
          </table:table-cell>
          <table:table-cell table:style-name="ce17" table:formula="of:=[$List.G72]" office:value-type="float" office:value="0" calcext:value-type="float">
            <text:p>0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>
            <text:p/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>
            <text:p/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3_CHANNEL3_GAIN1_OFFSET" calcext:value-type="string">
            <text:p>CUP3_CHANNEL3_GAIN1_OFFSET</text:p>
          </table:table-cell>
          <table:table-cell table:style-name="ce17" table:formula="of:=[$List.G73]" office:value-type="float" office:value="0" calcext:value-type="float">
            <text:p>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>
            <text:p/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>
            <text:p/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3_CHANNEL4_GAIN1_OFFSET" calcext:value-type="string">
            <text:p>CUP3_CHANNEL4_GAIN1_OFFSET</text:p>
          </table:table-cell>
          <table:table-cell table:style-name="ce17" table:formula="of:=[$List.G74]" office:value-type="float" office:value="0" calcext:value-type="float">
            <text:p>0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>
            <text:p/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>
            <text:p/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1_CHANNEL1_GAIN2_OFFSET" calcext:value-type="string">
            <text:p>CUP1_CHANNEL1_GAIN2_OFFSET</text:p>
          </table:table-cell>
          <table:table-cell table:style-name="ce17" table:formula="of:=[$List.G75]" office:value-type="float" office:value="0" calcext:value-type="float">
            <text:p>0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>
            <text:p/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>
            <text:p/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1_CHANNEL2_GAIN2_OFFSET" calcext:value-type="string">
            <text:p>CUP1_CHANNEL2_GAIN2_OFFSET</text:p>
          </table:table-cell>
          <table:table-cell table:style-name="ce17" table:formula="of:=[$List.G76]" office:value-type="float" office:value="0" calcext:value-type="float">
            <text:p>0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>
            <text:p/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>
            <text:p/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1_CHANNEL3_GAIN2_OFFSET" calcext:value-type="string">
            <text:p>CUP1_CHANNEL3_GAIN2_OFFSET</text:p>
          </table:table-cell>
          <table:table-cell table:style-name="ce17" table:formula="of:=[$List.G77]" office:value-type="float" office:value="0" calcext:value-type="float">
            <text:p>0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>
            <text:p/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>
            <text:p/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4_GAIN2_OFFSET" calcext:value-type="string">
            <text:p>CUP1_CHANNEL4_GAIN2_OFFSET</text:p>
          </table:table-cell>
          <table:table-cell table:style-name="ce17" table:formula="of:=[$List.G78]" office:value-type="float" office:value="0" calcext:value-type="float">
            <text:p>0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>
            <text:p/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>
            <text:p/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2_CHANNEL1_GAIN2_OFFSET" calcext:value-type="string">
            <text:p>CUP2_CHANNEL1_GAIN2_OFFSET</text:p>
          </table:table-cell>
          <table:table-cell table:style-name="ce17" table:formula="of:=[$List.G79]" office:value-type="float" office:value="0" calcext:value-type="float">
            <text:p>0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>
            <text:p/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>
            <text:p/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2_CHANNEL2_GAIN2_OFFSET" calcext:value-type="string">
            <text:p>CUP2_CHANNEL2_GAIN2_OFFSET</text:p>
          </table:table-cell>
          <table:table-cell table:style-name="ce17" table:formula="of:=[$List.G80]" office:value-type="float" office:value="0" calcext:value-type="float">
            <text:p>0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>
            <text:p/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>
            <text:p/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2_CHANNEL3_GAIN2_OFFSET" calcext:value-type="string">
            <text:p>CUP2_CHANNEL3_GAIN2_OFFSET</text:p>
          </table:table-cell>
          <table:table-cell table:style-name="ce17" table:formula="of:=[$List.G81]" office:value-type="float" office:value="0" calcext:value-type="float">
            <text:p>0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>
            <text:p/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>
            <text:p/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2_CHANNEL4_GAIN2_OFFSET" calcext:value-type="string">
            <text:p>CUP2_CHANNEL4_GAIN2_OFFSET</text:p>
          </table:table-cell>
          <table:table-cell table:style-name="ce17" table:formula="of:=[$List.G82]" office:value-type="float" office:value="0" calcext:value-type="float">
            <text:p>0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>
            <text:p/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>
            <text:p/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3_CHANNEL1_GAIN2_OFFSET" calcext:value-type="string">
            <text:p>CUP3_CHANNEL1_GAIN2_OFFSET</text:p>
          </table:table-cell>
          <table:table-cell table:style-name="ce17" table:formula="of:=[$List.G83]" office:value-type="float" office:value="0" calcext:value-type="float">
            <text:p>0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>
            <text:p/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>
            <text:p/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3_CHANNEL2_GAIN2_OFFSET" calcext:value-type="string">
            <text:p>CUP3_CHANNEL2_GAIN2_OFFSET</text:p>
          </table:table-cell>
          <table:table-cell table:style-name="ce17" table:formula="of:=[$List.G84]" office:value-type="float" office:value="0" calcext:value-type="float">
            <text:p>0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>
            <text:p/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>
            <text:p/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3_CHANNEL3_GAIN2_OFFSET" calcext:value-type="string">
            <text:p>CUP3_CHANNEL3_GAIN2_OFFSET</text:p>
          </table:table-cell>
          <table:table-cell table:style-name="ce17" table:formula="of:=[$List.G85]" office:value-type="float" office:value="0" calcext:value-type="float">
            <text:p>0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>
            <text:p/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>
            <text:p/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3_CHANNEL4_GAIN2_OFFSET" calcext:value-type="string">
            <text:p>CUP3_CHANNEL4_GAIN2_OFFSET</text:p>
          </table:table-cell>
          <table:table-cell table:style-name="ce17" table:formula="of:=[$List.G86]" office:value-type="float" office:value="0" calcext:value-type="float">
            <text:p>0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>
            <text:p/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>
            <text:p/>
          </table:table-cell>
        </table:table-row>
        <table:table-row table:style-name="ro1">
          <table:table-cell table:style-name="ce17" table:formula="of:=[$List.B87]" office:value-type="float" office:value="0" calcext:value-type="float">
            <text:p>0</text:p>
          </table:table-cell>
          <table:table-cell table:style-name="ce17" table:formula="of:=[$List.I87]">
            <text:p/>
          </table:table-cell>
          <table:table-cell table:style-name="ce17" table:formula="of:=[$List.G87]" office:value-type="float" office:value="0" calcext:value-type="float">
            <text:p>0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>
            <text:p/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>
            <text:p/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1_CHANNEL1_GAIN1_FACTOR" calcext:value-type="string">
            <text:p>CUP1_CHANNEL1_GAIN1_FACTOR</text:p>
          </table:table-cell>
          <table:table-cell table:style-name="ce17" table:formula="of:=[$List.G88]" office:value-type="float" office:value="14000" calcext:value-type="float">
            <text:p>14000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 office:value-type="float" office:value="1" calcext:value-type="float">
            <text:p>1</text:p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 office:value-type="string" office:string-value="ModbusHoldingRegisters[holdingIndexFromAddress(MODBUS_ADDR_CUP1_CHANNEL1_GAIN1_FACTOR)] = 14000u;" calcext:value-type="string">
            <text:p>ModbusHoldingRegisters[holdingIndexFromAddress(MODBUS_ADDR_CUP1_CHANNEL1_GAIN1_FACTOR)] = 14000u;</text:p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1_CHANNEL2_GAIN1_FACTOR" calcext:value-type="string">
            <text:p>CUP1_CHANNEL2_GAIN1_FACTOR</text:p>
          </table:table-cell>
          <table:table-cell table:style-name="ce17" table:formula="of:=[$List.G89]" office:value-type="float" office:value="14000" calcext:value-type="float">
            <text:p>14000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 office:value-type="float" office:value="1" calcext:value-type="float">
            <text:p>1</text:p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 office:value-type="string" office:string-value="ModbusHoldingRegisters[holdingIndexFromAddress(MODBUS_ADDR_CUP1_CHANNEL2_GAIN1_FACTOR)] = 14000u;" calcext:value-type="string">
            <text:p>ModbusHoldingRegisters[holdingIndexFromAddress(MODBUS_ADDR_CUP1_CHANNEL2_GAIN1_FACTOR)] = 14000u;</text:p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1_CHANNEL3_GAIN1_FACTOR" calcext:value-type="string">
            <text:p>CUP1_CHANNEL3_GAIN1_FACTOR</text:p>
          </table:table-cell>
          <table:table-cell table:style-name="ce17" table:formula="of:=[$List.G90]" office:value-type="float" office:value="14000" calcext:value-type="float">
            <text:p>14000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 office:value-type="float" office:value="1" calcext:value-type="float">
            <text:p>1</text:p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 office:value-type="string" office:string-value="ModbusHoldingRegisters[holdingIndexFromAddress(MODBUS_ADDR_CUP1_CHANNEL3_GAIN1_FACTOR)] = 14000u;" calcext:value-type="string">
            <text:p>ModbusHoldingRegisters[holdingIndexFromAddress(MODBUS_ADDR_CUP1_CHANNEL3_GAIN1_FACTOR)] = 14000u;</text:p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4_GAIN1_FACTOR" calcext:value-type="string">
            <text:p>CUP1_CHANNEL4_GAIN1_FACTOR</text:p>
          </table:table-cell>
          <table:table-cell table:style-name="ce17" table:formula="of:=[$List.G91]" office:value-type="float" office:value="14000" calcext:value-type="float">
            <text:p>14000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 office:value-type="float" office:value="1" calcext:value-type="float">
            <text:p>1</text:p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 office:value-type="string" office:string-value="ModbusHoldingRegisters[holdingIndexFromAddress(MODBUS_ADDR_CUP1_CHANNEL4_GAIN1_FACTOR)] = 14000u;" calcext:value-type="string">
            <text:p>ModbusHoldingRegisters[holdingIndexFromAddress(MODBUS_ADDR_CUP1_CHANNEL4_GAIN1_FACTOR)] = 14000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2_CHANNEL1_GAIN1_FACTOR" calcext:value-type="string">
            <text:p>CUP2_CHANNEL1_GAIN1_FACTOR</text:p>
          </table:table-cell>
          <table:table-cell table:style-name="ce17" table:formula="of:=[$List.G92]" office:value-type="float" office:value="14000" calcext:value-type="float">
            <text:p>14000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2_CHANNEL1_GAIN1_FACTOR)] = 14000u;" calcext:value-type="string">
            <text:p>ModbusHoldingRegisters[holdingIndexFromAddress(MODBUS_ADDR_CUP2_CHANNEL1_GAIN1_FACTOR)] = 14000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2_CHANNEL2_GAIN1_FACTOR" calcext:value-type="string">
            <text:p>CUP2_CHANNEL2_GAIN1_FACTOR</text:p>
          </table:table-cell>
          <table:table-cell table:style-name="ce17" table:formula="of:=[$List.G93]" office:value-type="float" office:value="14000" calcext:value-type="float">
            <text:p>14000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2_CHANNEL2_GAIN1_FACTOR)] = 14000u;" calcext:value-type="string">
            <text:p>ModbusHoldingRegisters[holdingIndexFromAddress(MODBUS_ADDR_CUP2_CHANNEL2_GAIN1_FACTOR)] = 14000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2_CHANNEL3_GAIN1_FACTOR" calcext:value-type="string">
            <text:p>CUP2_CHANNEL3_GAIN1_FACTOR</text:p>
          </table:table-cell>
          <table:table-cell table:style-name="ce17" table:formula="of:=[$List.G94]" office:value-type="float" office:value="14000" calcext:value-type="float">
            <text:p>14000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2_CHANNEL3_GAIN1_FACTOR)] = 14000u;" calcext:value-type="string">
            <text:p>ModbusHoldingRegisters[holdingIndexFromAddress(MODBUS_ADDR_CUP2_CHANNEL3_GAIN1_FACTOR)] = 14000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2_CHANNEL4_GAIN1_FACTOR" calcext:value-type="string">
            <text:p>CUP2_CHANNEL4_GAIN1_FACTOR</text:p>
          </table:table-cell>
          <table:table-cell table:style-name="ce17" table:formula="of:=[$List.G95]" office:value-type="float" office:value="14000" calcext:value-type="float">
            <text:p>14000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2_CHANNEL4_GAIN1_FACTOR)] = 14000u;" calcext:value-type="string">
            <text:p>ModbusHoldingRegisters[holdingIndexFromAddress(MODBUS_ADDR_CUP2_CHANNEL4_GAIN1_FACTOR)] = 14000u;</text:p>
          </table:table-cell>
        </table:table-row>
        <table:table-row table:style-name="ro1">
          <table:table-cell table:style-name="ce17" table:formula="of:=[$List.B96]" office:value-type="string" office:string-value="holding reg." calcext:value-type="string">
            <text:p>holding reg.</text:p>
          </table:table-cell>
          <table:table-cell table:style-name="ce17" table:formula="of:=[$List.I96]" office:value-type="string" office:string-value="CUP3_CHANNEL1_GAIN1_FACTOR" calcext:value-type="string">
            <text:p>CUP3_CHANNEL1_GAIN1_FACTOR</text:p>
          </table:table-cell>
          <table:table-cell table:style-name="ce17" table:formula="of:=[$List.G96]" office:value-type="float" office:value="14000" calcext:value-type="float">
            <text:p>1400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 office:value-type="float" office:value="1" calcext:value-type="float">
            <text:p>1</text:p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 office:value-type="string" office:string-value="ModbusHoldingRegisters[holdingIndexFromAddress(MODBUS_ADDR_CUP3_CHANNEL1_GAIN1_FACTOR)] = 14000u;" calcext:value-type="string">
            <text:p>ModbusHoldingRegisters[holdingIndexFromAddress(MODBUS_ADDR_CUP3_CHANNEL1_GAIN1_FACTOR)] = 14000u;</text:p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3_CHANNEL2_GAIN1_FACTOR" calcext:value-type="string">
            <text:p>CUP3_CHANNEL2_GAIN1_FACTOR</text:p>
          </table:table-cell>
          <table:table-cell table:style-name="ce17" table:formula="of:=[$List.G97]" office:value-type="float" office:value="14000" calcext:value-type="float">
            <text:p>14000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3_CHANNEL2_GAIN1_FACTOR)] = 14000u;" calcext:value-type="string">
            <text:p>ModbusHoldingRegisters[holdingIndexFromAddress(MODBUS_ADDR_CUP3_CHANNEL2_GAIN1_FACTOR)] = 14000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3_CHANNEL3_GAIN1_FACTOR" calcext:value-type="string">
            <text:p>CUP3_CHANNEL3_GAIN1_FACTOR</text:p>
          </table:table-cell>
          <table:table-cell table:style-name="ce17" table:formula="of:=[$List.G98]" office:value-type="float" office:value="14000" calcext:value-type="float">
            <text:p>14000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3_CHANNEL3_GAIN1_FACTOR)] = 14000u;" calcext:value-type="string">
            <text:p>ModbusHoldingRegisters[holdingIndexFromAddress(MODBUS_ADDR_CUP3_CHANNEL3_GAIN1_FACTOR)] = 14000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3_CHANNEL4_GAIN1_FACTOR" calcext:value-type="string">
            <text:p>CUP3_CHANNEL4_GAIN1_FACTOR</text:p>
          </table:table-cell>
          <table:table-cell table:style-name="ce17" table:formula="of:=[$List.G99]" office:value-type="float" office:value="14000" calcext:value-type="float">
            <text:p>14000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3_CHANNEL4_GAIN1_FACTOR)] = 14000u;" calcext:value-type="string">
            <text:p>ModbusHoldingRegisters[holdingIndexFromAddress(MODBUS_ADDR_CUP3_CHANNEL4_GAIN1_FACTOR)] = 14000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1_CHANNEL1_GAIN2_FACTOR" calcext:value-type="string">
            <text:p>CUP1_CHANNEL1_GAIN2_FACTOR</text:p>
          </table:table-cell>
          <table:table-cell table:style-name="ce17" table:formula="of:=[$List.G100]" office:value-type="float" office:value="14000" calcext:value-type="float">
            <text:p>1400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1_CHANNEL1_GAIN2_FACTOR)] = 14000u;" calcext:value-type="string">
            <text:p>ModbusHoldingRegisters[holdingIndexFromAddress(MODBUS_ADDR_CUP1_CHANNEL1_GAIN2_FACTOR)] = 1400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1_CHANNEL2_GAIN2_FACTOR" calcext:value-type="string">
            <text:p>CUP1_CHANNEL2_GAIN2_FACTOR</text:p>
          </table:table-cell>
          <table:table-cell table:style-name="ce17" table:formula="of:=[$List.G101]" office:value-type="float" office:value="14000" calcext:value-type="float">
            <text:p>14000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1_CHANNEL2_GAIN2_FACTOR)] = 14000u;" calcext:value-type="string">
            <text:p>ModbusHoldingRegisters[holdingIndexFromAddress(MODBUS_ADDR_CUP1_CHANNEL2_GAIN2_FACTOR)] = 14000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1_CHANNEL3_GAIN2_FACTOR" calcext:value-type="string">
            <text:p>CUP1_CHANNEL3_GAIN2_FACTOR</text:p>
          </table:table-cell>
          <table:table-cell table:style-name="ce17" table:formula="of:=[$List.G102]" office:value-type="float" office:value="14000" calcext:value-type="float">
            <text:p>14000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1_CHANNEL3_GAIN2_FACTOR)] = 14000u;" calcext:value-type="string">
            <text:p>ModbusHoldingRegisters[holdingIndexFromAddress(MODBUS_ADDR_CUP1_CHANNEL3_GAIN2_FACTOR)] = 14000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1_CHANNEL4_GAIN2_FACTOR" calcext:value-type="string">
            <text:p>CUP1_CHANNEL4_GAIN2_FACTOR</text:p>
          </table:table-cell>
          <table:table-cell table:style-name="ce17" table:formula="of:=[$List.G103]" office:value-type="float" office:value="14000" calcext:value-type="float">
            <text:p>14000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1_CHANNEL4_GAIN2_FACTOR)] = 14000u;" calcext:value-type="string">
            <text:p>ModbusHoldingRegisters[holdingIndexFromAddress(MODBUS_ADDR_CUP1_CHANNEL4_GAIN2_FACTOR)] = 14000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2_CHANNEL1_GAIN2_FACTOR" calcext:value-type="string">
            <text:p>CUP2_CHANNEL1_GAIN2_FACTOR</text:p>
          </table:table-cell>
          <table:table-cell table:style-name="ce17" table:formula="of:=[$List.G104]" office:value-type="float" office:value="14000" calcext:value-type="float">
            <text:p>14000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2_CHANNEL1_GAIN2_FACTOR)] = 14000u;" calcext:value-type="string">
            <text:p>ModbusHoldingRegisters[holdingIndexFromAddress(MODBUS_ADDR_CUP2_CHANNEL1_GAIN2_FACTOR)] = 14000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2_CHANNEL2_GAIN2_FACTOR" calcext:value-type="string">
            <text:p>CUP2_CHANNEL2_GAIN2_FACTOR</text:p>
          </table:table-cell>
          <table:table-cell table:style-name="ce17" table:formula="of:=[$List.G105]" office:value-type="float" office:value="14000" calcext:value-type="float">
            <text:p>14000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2_CHANNEL2_GAIN2_FACTOR)] = 14000u;" calcext:value-type="string">
            <text:p>ModbusHoldingRegisters[holdingIndexFromAddress(MODBUS_ADDR_CUP2_CHANNEL2_GAIN2_FACTOR)] = 14000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2_CHANNEL3_GAIN2_FACTOR" calcext:value-type="string">
            <text:p>CUP2_CHANNEL3_GAIN2_FACTOR</text:p>
          </table:table-cell>
          <table:table-cell table:style-name="ce17" table:formula="of:=[$List.G106]" office:value-type="float" office:value="14000" calcext:value-type="float">
            <text:p>14000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2_CHANNEL3_GAIN2_FACTOR)] = 14000u;" calcext:value-type="string">
            <text:p>ModbusHoldingRegisters[holdingIndexFromAddress(MODBUS_ADDR_CUP2_CHANNEL3_GAIN2_FACTOR)] = 14000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4_GAIN2_FACTOR" calcext:value-type="string">
            <text:p>CUP2_CHANNEL4_GAIN2_FACTOR</text:p>
          </table:table-cell>
          <table:table-cell table:style-name="ce17" table:formula="of:=[$List.G107]" office:value-type="float" office:value="14000" calcext:value-type="float">
            <text:p>14000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2_CHANNEL4_GAIN2_FACTOR)] = 14000u;" calcext:value-type="string">
            <text:p>ModbusHoldingRegisters[holdingIndexFromAddress(MODBUS_ADDR_CUP2_CHANNEL4_GAIN2_FACTOR)] = 14000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3_CHANNEL1_GAIN2_FACTOR" calcext:value-type="string">
            <text:p>CUP3_CHANNEL1_GAIN2_FACTOR</text:p>
          </table:table-cell>
          <table:table-cell table:style-name="ce17" table:formula="of:=[$List.G108]" office:value-type="float" office:value="14000" calcext:value-type="float">
            <text:p>14000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3_CHANNEL1_GAIN2_FACTOR)] = 14000u;" calcext:value-type="string">
            <text:p>ModbusHoldingRegisters[holdingIndexFromAddress(MODBUS_ADDR_CUP3_CHANNEL1_GAIN2_FACTOR)] = 14000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3_CHANNEL2_GAIN2_FACTOR" calcext:value-type="string">
            <text:p>CUP3_CHANNEL2_GAIN2_FACTOR</text:p>
          </table:table-cell>
          <table:table-cell table:style-name="ce17" table:formula="of:=[$List.G109]" office:value-type="float" office:value="14000" calcext:value-type="float">
            <text:p>14000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3_CHANNEL2_GAIN2_FACTOR)] = 14000u;" calcext:value-type="string">
            <text:p>ModbusHoldingRegisters[holdingIndexFromAddress(MODBUS_ADDR_CUP3_CHANNEL2_GAIN2_FACTOR)] = 14000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3_CHANNEL3_GAIN2_FACTOR" calcext:value-type="string">
            <text:p>CUP3_CHANNEL3_GAIN2_FACTOR</text:p>
          </table:table-cell>
          <table:table-cell table:style-name="ce17" table:formula="of:=[$List.G110]" office:value-type="float" office:value="14000" calcext:value-type="float">
            <text:p>14000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3_CHANNEL3_GAIN2_FACTOR)] = 14000u;" calcext:value-type="string">
            <text:p>ModbusHoldingRegisters[holdingIndexFromAddress(MODBUS_ADDR_CUP3_CHANNEL3_GAIN2_FACTOR)] = 14000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3_CHANNEL4_GAIN2_FACTOR" calcext:value-type="string">
            <text:p>CUP3_CHANNEL4_GAIN2_FACTOR</text:p>
          </table:table-cell>
          <table:table-cell table:style-name="ce17" table:formula="of:=[$List.G111]" office:value-type="float" office:value="14000" calcext:value-type="float">
            <text:p>14000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3_CHANNEL4_GAIN2_FACTOR)] = 14000u;" calcext:value-type="string">
            <text:p>ModbusHoldingRegisters[holdingIndexFromAddress(MODBUS_ADDR_CUP3_CHANNEL4_GAIN2_FACTOR)] = 14000u;</text:p>
          </table:table-cell>
        </table:table-row>
        <table:table-row table:style-name="ro1">
          <table:table-cell table:style-name="ce17" table:formula="of:=[$List.B112]" office:value-type="float" office:value="0" calcext:value-type="float">
            <text:p>0</text:p>
          </table:table-cell>
          <table:table-cell table:style-name="ce17" table:formula="of:=[$List.I112]">
            <text:p/>
          </table:table-cell>
          <table:table-cell table:style-name="ce17" table:formula="of:=[$List.G112]" office:value-type="float" office:value="0" calcext:value-type="float">
            <text:p>0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>
            <text:p/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>
            <text:p/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RANGE_CHANGE_THRESHOLD" calcext:value-type="string">
            <text:p>RANGE_CHANGE_THRESHOLD</text:p>
          </table:table-cell>
          <table:table-cell table:style-name="ce17" table:formula="of:=[$List.G113]" office:value-type="float" office:value="170" calcext:value-type="float">
            <text:p>170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RANGE_CHANGE_THRESHOLD)] = 170u;" calcext:value-type="string">
            <text:p>ModbusHoldingRegisters[holdingIndexFromAddress(MODBUS_ADDR_RANGE_CHANGE_THRESHOLD)] = 170u;</text:p>
          </table:table-cell>
        </table:table-row>
        <table:table-row table:style-name="ro1">
          <table:table-cell table:style-name="ce17" table:formula="of:=[$List.B114]" office:value-type="float" office:value="0" calcext:value-type="float">
            <text:p>0</text:p>
          </table:table-cell>
          <table:table-cell table:style-name="ce17" table:formula="of:=[$List.I114]">
            <text:p/>
          </table:table-cell>
          <table:table-cell table:style-name="ce17" table:formula="of:=[$List.G114]" office:value-type="float" office:value="0" calcext:value-type="float">
            <text:p>0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>
            <text:p/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>
            <text:p/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1_CHANNEL1_LOWER_LIMIT" calcext:value-type="string">
            <text:p>CUP1_CHANNEL1_LOWER_LIMIT</text:p>
          </table:table-cell>
          <table:table-cell table:style-name="ce17" table:formula="of:=[$List.G115]" office:value-type="float" office:value="0" calcext:value-type="float">
            <text:p>0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>
            <text:p/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>
            <text:p/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CUP1_CHANNEL2_LOWER_LIMIT" calcext:value-type="string">
            <text:p>CUP1_CHANNEL2_LOWER_LIMIT</text:p>
          </table:table-cell>
          <table:table-cell table:style-name="ce17" table:formula="of:=[$List.G116]" office:value-type="float" office:value="0" calcext:value-type="float">
            <text:p>0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>
            <text:p/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>
            <text:p/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CUP1_CHANNEL3_LOWER_LIMIT" calcext:value-type="string">
            <text:p>CUP1_CHANNEL3_LOWER_LIMIT</text:p>
          </table:table-cell>
          <table:table-cell table:style-name="ce17" table:formula="of:=[$List.G117]" office:value-type="float" office:value="0" calcext:value-type="float">
            <text:p>0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>
            <text:p/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>
            <text:p/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1_CHANNEL4_LOWER_LIMIT" calcext:value-type="string">
            <text:p>CUP1_CHANNEL4_LOWER_LIMIT</text:p>
          </table:table-cell>
          <table:table-cell table:style-name="ce17" table:formula="of:=[$List.G118]" office:value-type="float" office:value="0" calcext:value-type="float">
            <text:p>0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>
            <text:p/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>
            <text:p/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2_CHANNEL1_LOWER_LIMIT" calcext:value-type="string">
            <text:p>CUP2_CHANNEL1_LOWER_LIMIT</text:p>
          </table:table-cell>
          <table:table-cell table:style-name="ce17" table:formula="of:=[$List.G119]" office:value-type="float" office:value="0" calcext:value-type="float">
            <text:p>0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>
            <text:p/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>
            <text:p/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2_CHANNEL2_LOWER_LIMIT" calcext:value-type="string">
            <text:p>CUP2_CHANNEL2_LOWER_LIMIT</text:p>
          </table:table-cell>
          <table:table-cell table:style-name="ce17" table:formula="of:=[$List.G120]" office:value-type="float" office:value="0" calcext:value-type="float">
            <text:p>0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>
            <text:p/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>
            <text:p/>
          </table:table-cell>
        </table:table-row>
        <table:table-row table:style-name="ro1">
          <table:table-cell table:style-name="ce17" table:formula="of:=[$List.B121]" office:value-type="string" office:string-value="holding reg." calcext:value-type="string">
            <text:p>holding reg.</text:p>
          </table:table-cell>
          <table:table-cell table:style-name="ce17" table:formula="of:=[$List.I121]" office:value-type="string" office:string-value="CUP2_CHANNEL3_LOWER_LIMIT" calcext:value-type="string">
            <text:p>CUP2_CHANNEL3_LOWER_LIMIT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2_CHANNEL4_LOWER_LIMIT" calcext:value-type="string">
            <text:p>CUP2_CHANNEL4_LOWER_LIMIT</text:p>
          </table:table-cell>
          <table:table-cell table:style-name="ce17" table:formula="of:=[$List.G122]" office:value-type="float" office:value="0" calcext:value-type="float">
            <text:p>0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>
            <text:p/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>
            <text:p/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3_CHANNEL1_LOWER_LIMIT" calcext:value-type="string">
            <text:p>CUP3_CHANNEL1_LOWER_LIMIT</text:p>
          </table:table-cell>
          <table:table-cell table:style-name="ce17" table:formula="of:=[$List.G123]" office:value-type="float" office:value="0" calcext:value-type="float">
            <text:p>0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>
            <text:p/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>
            <text:p/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3_CHANNEL2_LOWER_LIMIT" calcext:value-type="string">
            <text:p>CUP3_CHANNEL2_LOWER_LIMIT</text:p>
          </table:table-cell>
          <table:table-cell table:style-name="ce17" table:formula="of:=[$List.G124]" office:value-type="float" office:value="0" calcext:value-type="float">
            <text:p>0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>
            <text:p/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>
            <text:p/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3_CHANNEL3_LOWER_LIMIT" calcext:value-type="string">
            <text:p>CUP3_CHANNEL3_LOWER_LIMIT</text:p>
          </table:table-cell>
          <table:table-cell table:style-name="ce17" table:formula="of:=[$List.G125]" office:value-type="float" office:value="0" calcext:value-type="float">
            <text:p>0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>
            <text:p/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>
            <text:p/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4_LOWER_LIMIT" calcext:value-type="string">
            <text:p>CUP3_CHANNEL4_LOWER_LIMIT</text:p>
          </table:table-cell>
          <table:table-cell table:style-name="ce17" table:formula="of:=[$List.G126]" office:value-type="float" office:value="0" calcext:value-type="float">
            <text:p>0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>
            <text:p/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>
            <text:p/>
          </table:table-cell>
        </table:table-row>
        <table:table-row table:style-name="ro1">
          <table:table-cell table:style-name="ce17" table:formula="of:=[$List.B127]" office:value-type="float" office:value="0" calcext:value-type="float">
            <text:p>0</text:p>
          </table:table-cell>
          <table:table-cell table:style-name="ce17" table:formula="of:=[$List.I127]">
            <text:p/>
          </table:table-cell>
          <table:table-cell table:style-name="ce17" table:formula="of:=[$List.G127]" office:value-type="float" office:value="0" calcext:value-type="float">
            <text:p>0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>
            <text:p/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>
            <text:p/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1_CHANNEL1_UPPER_LIMIT" calcext:value-type="string">
            <text:p>CUP1_CHANNEL1_UPPER_LIMIT</text:p>
          </table:table-cell>
          <table:table-cell table:style-name="ce17" table:formula="of:=[$List.G128]" office:value-type="float" office:value="65535" calcext:value-type="float">
            <text:p>65535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 office:value-type="float" office:value="1" calcext:value-type="float">
            <text:p>1</text:p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1_CHANNEL2_UPPER_LIMIT" calcext:value-type="string">
            <text:p>CUP1_CHANNEL2_UPPER_LIMIT</text:p>
          </table:table-cell>
          <table:table-cell table:style-name="ce17" table:formula="of:=[$List.G129]" office:value-type="float" office:value="65535" calcext:value-type="float">
            <text:p>65535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 office:value-type="float" office:value="1" calcext:value-type="float">
            <text:p>1</text:p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1_CHANNEL3_UPPER_LIMIT" calcext:value-type="string">
            <text:p>CUP1_CHANNEL3_UPPER_LIMIT</text:p>
          </table:table-cell>
          <table:table-cell table:style-name="ce17" table:formula="of:=[$List.G130]" office:value-type="float" office:value="65535" calcext:value-type="float">
            <text:p>65535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 office:value-type="float" office:value="1" calcext:value-type="float">
            <text:p>1</text:p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1_CHANNEL4_UPPER_LIMIT" calcext:value-type="string">
            <text:p>CUP1_CHANNEL4_UPPER_LIMIT</text:p>
          </table:table-cell>
          <table:table-cell table:style-name="ce17" table:formula="of:=[$List.G131]" office:value-type="float" office:value="65535" calcext:value-type="float">
            <text:p>65535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 office:value-type="float" office:value="1" calcext:value-type="float">
            <text:p>1</text:p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2_CHANNEL1_UPPER_LIMIT" calcext:value-type="string">
            <text:p>CUP2_CHANNEL1_UPPER_LIMIT</text:p>
          </table:table-cell>
          <table:table-cell table:style-name="ce17" table:formula="of:=[$List.G132]" office:value-type="float" office:value="65535" calcext:value-type="float">
            <text:p>65535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2_CHANNEL2_UPPER_LIMIT" calcext:value-type="string">
            <text:p>CUP2_CHANNEL2_UPPER_LIMIT</text:p>
          </table:table-cell>
          <table:table-cell table:style-name="ce17" table:formula="of:=[$List.G133]" office:value-type="float" office:value="65535" calcext:value-type="float">
            <text:p>65535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2_CHANNEL3_UPPER_LIMIT" calcext:value-type="string">
            <text:p>CUP2_CHANNEL3_UPPER_LIMIT</text:p>
          </table:table-cell>
          <table:table-cell table:style-name="ce17" table:formula="of:=[$List.G134]" office:value-type="float" office:value="65535" calcext:value-type="float">
            <text:p>65535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2_CHANNEL4_UPPER_LIMIT" calcext:value-type="string">
            <text:p>CUP2_CHANNEL4_UPPER_LIMIT</text:p>
          </table:table-cell>
          <table:table-cell table:style-name="ce17" table:formula="of:=[$List.G135]" office:value-type="float" office:value="65535" calcext:value-type="float">
            <text:p>65535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3_CHANNEL1_UPPER_LIMIT" calcext:value-type="string">
            <text:p>CUP3_CHANNEL1_UPPER_LIMIT</text:p>
          </table:table-cell>
          <table:table-cell table:style-name="ce17" table:formula="of:=[$List.G136]" office:value-type="float" office:value="65535" calcext:value-type="float">
            <text:p>6553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3_CHANNEL2_UPPER_LIMIT" calcext:value-type="string">
            <text:p>CUP3_CHANNEL2_UPPER_LIMIT</text:p>
          </table:table-cell>
          <table:table-cell table:style-name="ce17" table:formula="of:=[$List.G137]" office:value-type="float" office:value="65535" calcext:value-type="float">
            <text:p>65535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3_CHANNEL3_UPPER_LIMIT" calcext:value-type="string">
            <text:p>CUP3_CHANNEL3_UPPER_LIMIT</text:p>
          </table:table-cell>
          <table:table-cell table:style-name="ce17" table:formula="of:=[$List.G138]" office:value-type="float" office:value="65535" calcext:value-type="float">
            <text:p>6553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4_UPPER_LIMIT" calcext:value-type="string">
            <text:p>CUP3_CHANNEL4_UPPER_LIMIT</text:p>
          </table:table-cell>
          <table:table-cell table:style-name="ce17" table:formula="of:=[$List.G139]" office:value-type="float" office:value="65535" calcext:value-type="float">
            <text:p>65535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40]" office:value-type="float" office:value="0" calcext:value-type="float">
            <text:p>0</text:p>
          </table:table-cell>
          <table:table-cell table:style-name="ce17" table:formula="of:=[$List.I140]">
            <text:p/>
          </table:table-cell>
          <table:table-cell table:style-name="ce17" table:formula="of:=[$List.G140]" office:value-type="float" office:value="0" calcext:value-type="float">
            <text:p>0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>
            <text:p/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>
            <text:p/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41]" office:value-type="float" office:value="300" calcext:value-type="float">
            <text:p>300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42]" office:value-type="float" office:value="0" calcext:value-type="float">
            <text:p>0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>
            <text:p/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>
            <text:p/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43]" office:value-type="float" office:value="100" calcext:value-type="float">
            <text:p>100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44]" office:value-type="float" office:value="0" calcext:value-type="float">
            <text:p>0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>
            <text:p/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>
            <text:p/>
          </table:table-cell>
        </table:table-row>
        <table:table-row table:style-name="ro1">
          <table:table-cell table:style-name="ce17" table:formula="of:=[$List.B145]" office:value-type="float" office:value="0" calcext:value-type="float">
            <text:p>0</text:p>
          </table:table-cell>
          <table:table-cell table:style-name="ce17" table:formula="of:=[$List.I145]">
            <text:p/>
          </table:table-cell>
          <table:table-cell table:style-name="ce17" table:formula="of:=[$List.G145]" office:value-type="float" office:value="0" calcext:value-type="float">
            <text:p>0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>
            <text:p/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>
            <text:p/>
          </table:table-cell>
        </table:table-row>
        <table:table-row table:style-name="ro1">
          <table:table-cell table:style-name="ce17" table:formula="of:=[$List.B146]" office:value-type="string" office:string-value="holding reg." calcext:value-type="string">
            <text:p>holding reg.</text:p>
          </table:table-cell>
          <table:table-cell table:style-name="ce17" table:formula="of:=[$List.I146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46]" office:value-type="float" office:value="300" calcext:value-type="float">
            <text:p>30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 office:value-type="float" office:value="1" calcext:value-type="float">
            <text:p>1</text:p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>
            <text:p/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>
            <text:p/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48]" office:value-type="float" office:value="100" calcext:value-type="float">
            <text:p>10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 office:value-type="float" office:value="1" calcext:value-type="float">
            <text:p>1</text:p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>
            <text:p/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>
            <text:p/>
          </table:table-cell>
        </table:table-row>
        <table:table-row table:style-name="ro1">
          <table:table-cell table:style-name="ce17" table:formula="of:=[$List.B150]" office:value-type="float" office:value="0" calcext:value-type="float">
            <text:p>0</text:p>
          </table:table-cell>
          <table:table-cell table:style-name="ce17" table:formula="of:=[$List.I150]">
            <text:p/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51]" office:value-type="float" office:value="1500" calcext:value-type="float">
            <text:p>150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 office:value-type="float" office:value="1" calcext:value-type="float">
            <text:p>1</text:p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>
            <text:p/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>
            <text:p/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53]" office:value-type="float" office:value="2000" calcext:value-type="float">
            <text:p>200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 office:value-type="float" office:value="1" calcext:value-type="float">
            <text:p>1</text:p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>
            <text:p/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55]" office:value-type="float" office:value="70" calcext:value-type="float">
            <text:p>7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 office:value-type="float" office:value="1" calcext:value-type="float">
            <text:p>1</text:p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SIM_MECHANISM3_BRAKED_MOTION" calcext:value-type="string">
            <text:p>SIM_MECHANISM3_BRAKED_MOTION</text:p>
          </table:table-cell>
          <table:table-cell table:style-name="ce17" table:formula="of:=[$List.G156]" office:value-type="float" office:value="7" calcext:value-type="float">
            <text:p>7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 office:value-type="float" office:value="1" calcext:value-type="float">
            <text:p>1</text:p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57]" office:value-type="float" office:value="0" calcext:value-type="float">
            <text:p>0</text:p>
          </table:table-cell>
          <table:table-cell table:style-name="ce17" table:formula="of:=[$List.I157]" office:value-type="float" office:value="0" calcext:value-type="float">
            <text:p>0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>
            <text:p/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9]" office:value-type="string" office:string-value="holding reg." calcext:value-type="string">
            <text:p>holding reg.</text:p>
          </table:table-cell>
          <table:table-cell table:style-name="ce17" table:formula="of:=[$List.I159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59]" office:value-type="float" office:value="0" calcext:value-type="float">
            <text:p>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>
            <text:p/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>
            <text:p/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60]" office:value-type="float" office:value="0" calcext:value-type="float">
            <text:p>0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>
            <text:p/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>
            <text:p/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61]" office:value-type="float" office:value="0" calcext:value-type="float">
            <text:p>0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>
            <text:p/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>
            <text:p/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62]" office:value-type="float" office:value="0" calcext:value-type="float">
            <text:p>0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>
            <text:p/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>
            <text:p/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63]" office:value-type="float" office:value="0" calcext:value-type="float">
            <text:p>0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>
            <text:p/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>
            <text:p/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64]" office:value-type="float" office:value="0" calcext:value-type="float">
            <text:p>0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>
            <text:p/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>
            <text:p/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65]" office:value-type="float" office:value="0" calcext:value-type="float">
            <text:p>0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>
            <text:p/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>
            <text:p/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66]" office:value-type="float" office:value="0" calcext:value-type="float">
            <text:p>0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>
            <text:p/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>
            <text:p/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67]" office:value-type="float" office:value="0" calcext:value-type="float">
            <text:p>0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>
            <text:p/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>
            <text:p/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SIM_AMPLIFIER_CUP3_ELECTRODE3" calcext:value-type="string">
            <text:p>SIM_AMPLIFIER_CUP3_ELECTRODE3</text:p>
          </table:table-cell>
          <table:table-cell table:style-name="ce17" table:formula="of:=[$List.G168]" office:value-type="float" office:value="0" calcext:value-type="float">
            <text:p>0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>
            <text:p/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>
            <text:p/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SIM_AMPLIFIER_CUP3_ELECTRODE4" calcext:value-type="string">
            <text:p>SIM_AMPLIFIER_CUP3_ELECTRODE4</text:p>
          </table:table-cell>
          <table:table-cell table:style-name="ce17" table:formula="of:=[$List.G169]" office:value-type="float" office:value="0" calcext:value-type="float">
            <text:p>0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>
            <text:p/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>
            <text:p/>
          </table:table-cell>
        </table:table-row>
        <table:table-row table:style-name="ro1">
          <table:table-cell table:style-name="ce17" table:formula="of:=[$List.B170]" office:value-type="float" office:value="0" calcext:value-type="float">
            <text:p>0</text:p>
          </table:table-cell>
          <table:table-cell table:style-name="ce17" table:formula="of:=[$List.I170]">
            <text:p/>
          </table:table-cell>
          <table:table-cell table:style-name="ce17" table:formula="of:=[$List.G170]" office:value-type="float" office:value="0" calcext:value-type="float">
            <text:p>0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>
            <text:p/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>
            <text:p/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SIM_AMPLIFIER_RANDOM_RATE" calcext:value-type="string">
            <text:p>SIM_AMPLIFIER_RANDOM_RATE</text:p>
          </table:table-cell>
          <table:table-cell table:style-name="ce17" table:formula="of:=[$List.G171]" office:value-type="float" office:value="0" calcext:value-type="float">
            <text:p>0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>
            <text:p/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>
            <text:p/>
          </table:table-cell>
        </table:table-row>
        <table:table-row table:style-name="ro1">
          <table:table-cell table:style-name="ce17" table:formula="of:=[$List.B172]" office:value-type="string" office:string-value="holding reg." calcext:value-type="string">
            <text:p>holding reg.</text:p>
          </table:table-cell>
          <table:table-cell table:style-name="ce17" table:formula="of:=[$List.I172]" office:value-type="string" office:string-value="SIM_AMPLIFIER_RANDOM_OFFSET" calcext:value-type="string">
            <text:p>SIM_AMPLIFIER_RANDOM_OFFSET</text:p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float" office:value="0" calcext:value-type="float">
            <text:p>0</text:p>
          </table:table-cell>
          <table:table-cell table:style-name="ce17" table:formula="of:=[$List.I173]">
            <text:p/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string" office:string-value="holding reg." calcext:value-type="string">
            <text:p>holding reg.</text:p>
          </table:table-cell>
          <table:table-cell table:style-name="ce17" table:formula="of:=[$List.I174]" office:value-type="string" office:string-value="SIM_EXTERNAL_LOCK_PERIOD" calcext:value-type="string">
            <text:p>SIM_EXTERNAL_LOCK_PERIOD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EXTERNAL_LOCK_DURATION" calcext:value-type="string">
            <text:p>SIM_EXTERNAL_LOCK_DURATION</text:p>
          </table:table-cell>
          <table:table-cell table:style-name="ce17" table:formula="of:=[$List.G175]" office:value-type="float" office:value="0" calcext:value-type="float">
            <text:p>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>
            <text:p/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>
            <text:p/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EXTERNAL_LOCK_DELAY" calcext:value-type="string">
            <text:p>SIM_EXTERNAL_LOCK_DELAY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float" office:value="0" calcext:value-type="float">
            <text:p>0</text:p>
          </table:table-cell>
          <table:table-cell table:style-name="ce17" table:formula="of:=[$List.I177]">
            <text:p/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EVENT_CODE" calcext:value-type="string">
            <text:p>SIM_EVENT_CODE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EVENT_PERIOD" calcext:value-type="string">
            <text:p>SIM_EVENT_PERIOD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EVENT_DURATION" calcext:value-type="string">
            <text:p>SIM_EVENT_DURATION</text:p>
          </table:table-cell>
          <table:table-cell table:style-name="ce17" table:formula="of:=[$List.G180]" office:value-type="float" office:value="0" calcext:value-type="float">
            <text:p>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>
            <text:p/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>
            <text:p/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EVENT_DELAY" calcext:value-type="string">
            <text:p>SIM_EVENT_DELAY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float" office:value="0" calcext:value-type="float">
            <text:p>0</text:p>
          </table:table-cell>
          <table:table-cell table:style-name="ce17" table:formula="of:=[$List.I182]">
            <text:p/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DEBUG_PRINTOUTS" calcext:value-type="string">
            <text:p>DEBUG_PRINTOUTS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DEBUG_ARGUMENT1" calcext:value-type="string">
            <text:p>DEBUG_ARGUMENT1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float" office:value="0" calcext:value-type="float">
            <text:p>0</text:p>
          </table:table-cell>
          <table:table-cell table:style-name="ce17" table:formula="of:=[$List.I185]">
            <text:p/>
          </table:table-cell>
          <table:table-cell table:style-name="ce17" table:formula="of:=[$List.G185]" office:value-type="float" office:value="0" calcext:value-type="float">
            <text:p>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>
            <text:p/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>
            <text:p/>
          </table:table-cell>
        </table:table-row>
        <table:table-row table:style-name="ro1">
          <table:table-cell table:style-name="ce17" table:formula="of:=[$List.B186]" office:value-type="float" office:value="0" calcext:value-type="float">
            <text:p>0</text:p>
          </table:table-cell>
          <table:table-cell table:style-name="ce17" table:formula="of:=[$List.I186]">
            <text:p/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input reg." calcext:value-type="string">
            <text:p>input reg.</text:p>
          </table:table-cell>
          <table:table-cell table:style-name="ce17" table:formula="of:=[$List.I187]" office:value-type="string" office:string-value="CUP1_CHANNEL1_SAMPLE" calcext:value-type="string">
            <text:p>CUP1_CHANNEL1_SAMPLE</text:p>
          </table:table-cell>
          <table:table-cell table:style-name="ce17" table:formula="of:=[$List.G187]" office:value-type="string" office:string-value="N/A" calcext:value-type="string">
            <text:p>N/A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>
            <text:p/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>
            <text:p/>
          </table:table-cell>
        </table:table-row>
        <table:table-row table:style-name="ro1">
          <table:table-cell table:style-name="ce17" table:formula="of:=[$List.B188]" office:value-type="string" office:string-value="input reg." calcext:value-type="string">
            <text:p>input reg.</text:p>
          </table:table-cell>
          <table:table-cell table:style-name="ce17" table:formula="of:=[$List.I188]" office:value-type="string" office:string-value="CUP1_CHANNEL2_SAMPLE" calcext:value-type="string">
            <text:p>CUP1_CHANNEL2_SAMPLE</text:p>
          </table:table-cell>
          <table:table-cell table:style-name="ce17" table:formula="of:=[$List.G188]" office:value-type="string" office:string-value="N/A" calcext:value-type="string">
            <text:p>N/A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string" office:string-value="input reg." calcext:value-type="string">
            <text:p>input reg.</text:p>
          </table:table-cell>
          <table:table-cell table:style-name="ce17" table:formula="of:=[$List.I189]" office:value-type="string" office:string-value="CUP1_CHANNEL3_SAMPLE" calcext:value-type="string">
            <text:p>CUP1_CHANNEL3_SAMPLE</text:p>
          </table:table-cell>
          <table:table-cell table:style-name="ce17" table:formula="of:=[$List.G189]" office:value-type="string" office:string-value="N/A" calcext:value-type="string">
            <text:p>N/A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90]" office:value-type="string" office:string-value="input reg." calcext:value-type="string">
            <text:p>input reg.</text:p>
          </table:table-cell>
          <table:table-cell table:style-name="ce17" table:formula="of:=[$List.I190]" office:value-type="string" office:string-value="CUP1_CHANNEL4_SAMPLE" calcext:value-type="string">
            <text:p>CUP1_CHANNEL4_SAMPLE</text:p>
          </table:table-cell>
          <table:table-cell table:style-name="ce17" table:formula="of:=[$List.G190]" office:value-type="string" office:string-value="N/A" calcext:value-type="string">
            <text:p>N/A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input reg." calcext:value-type="string">
            <text:p>input reg.</text:p>
          </table:table-cell>
          <table:table-cell table:style-name="ce17" table:formula="of:=[$List.I191]" office:value-type="string" office:string-value="CUP1_CHANNEL_ERROR" calcext:value-type="string">
            <text:p>CUP1_CHANNEL_ERROR</text:p>
          </table:table-cell>
          <table:table-cell table:style-name="ce17" table:formula="of:=[$List.G191]" office:value-type="string" office:string-value="N/A" calcext:value-type="string">
            <text:p>N/A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float" office:value="0" calcext:value-type="float">
            <text:p>0</text:p>
          </table:table-cell>
          <table:table-cell table:style-name="ce17" table:formula="of:=[$List.I192]">
            <text:p/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input reg." calcext:value-type="string">
            <text:p>input reg.</text:p>
          </table:table-cell>
          <table:table-cell table:style-name="ce17" table:formula="of:=[$List.I193]" office:value-type="string" office:string-value="CUP2_CHANNEL1_SAMPLE" calcext:value-type="string">
            <text:p>CUP2_CHANNEL1_SAMPLE</text:p>
          </table:table-cell>
          <table:table-cell table:style-name="ce17" table:formula="of:=[$List.G193]" office:value-type="string" office:string-value="N/A" calcext:value-type="string">
            <text:p>N/A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input reg." calcext:value-type="string">
            <text:p>input reg.</text:p>
          </table:table-cell>
          <table:table-cell table:style-name="ce17" table:formula="of:=[$List.I194]" office:value-type="string" office:string-value="CUP2_CHANNEL2_SAMPLE" calcext:value-type="string">
            <text:p>CUP2_CHANNEL2_SAMPLE</text:p>
          </table:table-cell>
          <table:table-cell table:style-name="ce17" table:formula="of:=[$List.G194]" office:value-type="string" office:string-value="N/A" calcext:value-type="string">
            <text:p>N/A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input reg." calcext:value-type="string">
            <text:p>input reg.</text:p>
          </table:table-cell>
          <table:table-cell table:style-name="ce17" table:formula="of:=[$List.I195]" office:value-type="string" office:string-value="CUP2_CHANNEL3_SAMPLE" calcext:value-type="string">
            <text:p>CUP2_CHANNEL3_SAMPLE</text:p>
          </table:table-cell>
          <table:table-cell table:style-name="ce17" table:formula="of:=[$List.G195]" office:value-type="string" office:string-value="N/A" calcext:value-type="string">
            <text:p>N/A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input reg." calcext:value-type="string">
            <text:p>input reg.</text:p>
          </table:table-cell>
          <table:table-cell table:style-name="ce17" table:formula="of:=[$List.I196]" office:value-type="string" office:string-value="CUP2_CHANNEL4_SAMPLE" calcext:value-type="string">
            <text:p>CUP2_CHANNEL4_SAMPLE</text:p>
          </table:table-cell>
          <table:table-cell table:style-name="ce17" table:formula="of:=[$List.G196]" office:value-type="string" office:string-value="N/A" calcext:value-type="string">
            <text:p>N/A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input reg." calcext:value-type="string">
            <text:p>input reg.</text:p>
          </table:table-cell>
          <table:table-cell table:style-name="ce17" table:formula="of:=[$List.I197]" office:value-type="string" office:string-value="CUP2_CHANNEL_ERROR" calcext:value-type="string">
            <text:p>CUP2_CHANNEL_ERROR</text:p>
          </table:table-cell>
          <table:table-cell table:style-name="ce17" table:formula="of:=[$List.G197]" office:value-type="string" office:string-value="N/A" calcext:value-type="string">
            <text:p>N/A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float" office:value="0" calcext:value-type="float">
            <text:p>0</text:p>
          </table:table-cell>
          <table:table-cell table:style-name="ce17" table:formula="of:=[$List.I198]">
            <text:p/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input reg." calcext:value-type="string">
            <text:p>input reg.</text:p>
          </table:table-cell>
          <table:table-cell table:style-name="ce17" table:formula="of:=[$List.I199]" office:value-type="string" office:string-value="CUP3_CHANNEL1_SAMPLE" calcext:value-type="string">
            <text:p>CUP3_CHANNEL1_SAMPLE</text:p>
          </table:table-cell>
          <table:table-cell table:style-name="ce17" table:formula="of:=[$List.G199]" office:value-type="string" office:string-value="N/A" calcext:value-type="string">
            <text:p>N/A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input reg." calcext:value-type="string">
            <text:p>input reg.</text:p>
          </table:table-cell>
          <table:table-cell table:style-name="ce17" table:formula="of:=[$List.I200]" office:value-type="string" office:string-value="CUP3_CHANNEL2_SAMPLE" calcext:value-type="string">
            <text:p>CUP3_CHANNEL2_SAMPLE</text:p>
          </table:table-cell>
          <table:table-cell table:style-name="ce17" table:formula="of:=[$List.G200]" office:value-type="string" office:string-value="N/A" calcext:value-type="string">
            <text:p>N/A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input reg." calcext:value-type="string">
            <text:p>input reg.</text:p>
          </table:table-cell>
          <table:table-cell table:style-name="ce17" table:formula="of:=[$List.I201]" office:value-type="string" office:string-value="CUP3_CHANNEL3_SAMPLE" calcext:value-type="string">
            <text:p>CUP3_CHANNEL3_SAMPLE</text:p>
          </table:table-cell>
          <table:table-cell table:style-name="ce17" table:formula="of:=[$List.G201]" office:value-type="string" office:string-value="N/A" calcext:value-type="string">
            <text:p>N/A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string" office:string-value="input reg." calcext:value-type="string">
            <text:p>input reg.</text:p>
          </table:table-cell>
          <table:table-cell table:style-name="ce17" table:formula="of:=[$List.I202]" office:value-type="string" office:string-value="CUP3_CHANNEL4_SAMPLE" calcext:value-type="string">
            <text:p>CUP3_CHANNEL4_SAMPLE</text:p>
          </table:table-cell>
          <table:table-cell table:style-name="ce17" table:formula="of:=[$List.G202]" office:value-type="string" office:string-value="N/A" calcext:value-type="string">
            <text:p>N/A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input reg." calcext:value-type="string">
            <text:p>input reg.</text:p>
          </table:table-cell>
          <table:table-cell table:style-name="ce17" table:formula="of:=[$List.I203]" office:value-type="string" office:string-value="CUP3_CHANNEL_ERROR" calcext:value-type="string">
            <text:p>CUP3_CHANNEL_ERROR</text:p>
          </table:table-cell>
          <table:table-cell table:style-name="ce17" table:formula="of:=[$List.G203]" office:value-type="string" office:string-value="N/A" calcext:value-type="string">
            <text:p>N/A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float" office:value="0" calcext:value-type="float">
            <text:p>0</text:p>
          </table:table-cell>
          <table:table-cell table:style-name="ce17" table:formula="of:=[$List.I204]" office:value-type="float" office:value="0" calcext:value-type="float">
            <text:p>0</text:p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float" office:value="0" calcext:value-type="float">
            <text:p>0</text:p>
          </table:table-cell>
          <table:table-cell table:style-name="ce17" table:formula="of:=[$List.I205]" office:value-type="float" office:value="0" calcext:value-type="float">
            <text:p>0</text:p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float" office:value="0" calcext:value-type="float">
            <text:p>0</text:p>
          </table:table-cell>
          <table:table-cell table:style-name="ce17" table:formula="of:=[$List.I206]" office:value-type="float" office:value="0" calcext:value-type="float">
            <text:p>0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7]" office:value-type="float" office:value="0" calcext:value-type="float">
            <text:p>0</text:p>
          </table:table-cell>
          <table:table-cell table:style-name="ce17" table:formula="of:=[$List.I207]" office:value-type="float" office:value="0" calcext:value-type="float">
            <text:p>0</text:p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8]" office:value-type="float" office:value="0" calcext:value-type="float">
            <text:p>0</text:p>
          </table:table-cell>
          <table:table-cell table:style-name="ce17" table:formula="of:=[$List.I208]" office:value-type="float" office:value="0" calcext:value-type="float">
            <text:p>0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9]" office:value-type="float" office:value="0" calcext:value-type="float">
            <text:p>0</text:p>
          </table:table-cell>
          <table:table-cell table:style-name="ce17" table:formula="of:=[$List.I209]" office:value-type="float" office:value="0" calcext:value-type="float">
            <text:p>0</text:p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10]" office:value-type="float" office:value="0" calcext:value-type="float">
            <text:p>0</text:p>
          </table:table-cell>
          <table:table-cell table:style-name="ce17" table:formula="of:=[$List.I210]" office:value-type="float" office:value="0" calcext:value-type="float">
            <text:p>0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11]" office:value-type="float" office:value="0" calcext:value-type="float">
            <text:p>0</text:p>
          </table:table-cell>
          <table:table-cell table:style-name="ce17" table:formula="of:=[$List.I211]" office:value-type="float" office:value="0" calcext:value-type="float">
            <text:p>0</text:p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12]" office:value-type="float" office:value="0" calcext:value-type="float">
            <text:p>0</text:p>
          </table:table-cell>
          <table:table-cell table:style-name="ce17" table:formula="of:=[$List.I212]" office:value-type="float" office:value="0" calcext:value-type="float">
            <text:p>0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13]" office:value-type="float" office:value="0" calcext:value-type="float">
            <text:p>0</text:p>
          </table:table-cell>
          <table:table-cell table:style-name="ce17" table:formula="of:=[$List.I213]" office:value-type="float" office:value="0" calcext:value-type="float">
            <text:p>0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14]" office:value-type="float" office:value="0" calcext:value-type="float">
            <text:p>0</text:p>
          </table:table-cell>
          <table:table-cell table:style-name="ce17" table:formula="of:=[$List.I214]" office:value-type="float" office:value="0" calcext:value-type="float">
            <text:p>0</text:p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15]" office:value-type="float" office:value="0" calcext:value-type="float">
            <text:p>0</text:p>
          </table:table-cell>
          <table:table-cell table:style-name="ce17" table:formula="of:=[$List.I215]" office:value-type="float" office:value="0" calcext:value-type="float">
            <text:p>0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6]" office:value-type="float" office:value="0" calcext:value-type="float">
            <text:p>0</text:p>
          </table:table-cell>
          <table:table-cell table:style-name="ce17" table:formula="of:=[$List.I216]" office:value-type="float" office:value="0" calcext:value-type="float">
            <text:p>0</text:p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7]" office:value-type="float" office:value="0" calcext:value-type="float">
            <text:p>0</text:p>
          </table:table-cell>
          <table:table-cell table:style-name="ce17" table:formula="of:=[$List.I217]" office:value-type="float" office:value="0" calcext:value-type="float">
            <text:p>0</text:p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8]" office:value-type="float" office:value="0" calcext:value-type="float">
            <text:p>0</text:p>
          </table:table-cell>
          <table:table-cell table:style-name="ce17" table:formula="of:=[$List.I218]" office:value-type="float" office:value="0" calcext:value-type="float">
            <text:p>0</text:p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9]" office:value-type="float" office:value="0" calcext:value-type="float">
            <text:p>0</text:p>
          </table:table-cell>
          <table:table-cell table:style-name="ce17" table:formula="of:=[$List.I219]" office:value-type="float" office:value="0" calcext:value-type="float">
            <text:p>0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20]" office:value-type="float" office:value="0" calcext:value-type="float">
            <text:p>0</text:p>
          </table:table-cell>
          <table:table-cell table:style-name="ce17" table:formula="of:=[$List.I220]" office:value-type="float" office:value="0" calcext:value-type="float">
            <text:p>0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21]" office:value-type="float" office:value="0" calcext:value-type="float">
            <text:p>0</text:p>
          </table:table-cell>
          <table:table-cell table:style-name="ce17" table:formula="of:=[$List.I221]" office:value-type="float" office:value="0" calcext:value-type="float">
            <text:p>0</text:p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22]" office:value-type="float" office:value="0" calcext:value-type="float">
            <text:p>0</text:p>
          </table:table-cell>
          <table:table-cell table:style-name="ce17" table:formula="of:=[$List.I222]" office:value-type="float" office:value="0" calcext:value-type="float">
            <text:p>0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23]" office:value-type="float" office:value="0" calcext:value-type="float">
            <text:p>0</text:p>
          </table:table-cell>
          <table:table-cell table:style-name="ce17" table:formula="of:=[$List.I223]" office:value-type="float" office:value="0" calcext:value-type="float">
            <text:p>0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24]" office:value-type="float" office:value="0" calcext:value-type="float">
            <text:p>0</text:p>
          </table:table-cell>
          <table:table-cell table:style-name="ce17" table:formula="of:=[$List.I224]" office:value-type="float" office:value="0" calcext:value-type="float">
            <text:p>0</text:p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25]" office:value-type="float" office:value="0" calcext:value-type="float">
            <text:p>0</text:p>
          </table:table-cell>
          <table:table-cell table:style-name="ce17" table:formula="of:=[$List.I225]" office:value-type="float" office:value="0" calcext:value-type="float">
            <text:p>0</text:p>
          </table:table-cell>
          <table:table-cell table:style-name="ce17" table:formula="of:=[$List.G225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6]" office:value-type="float" office:value="0" calcext:value-type="float">
            <text:p>0</text:p>
          </table:table-cell>
          <table:table-cell table:style-name="ce17" table:formula="of:=[$List.I226]" office:value-type="float" office:value="0" calcext:value-type="float">
            <text:p>0</text:p>
          </table:table-cell>
          <table:table-cell table:style-name="ce17" table:formula="of:=[$List.G226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7]" office:value-type="float" office:value="0" calcext:value-type="float">
            <text:p>0</text:p>
          </table:table-cell>
          <table:table-cell table:style-name="ce17" table:formula="of:=[$List.I227]" office:value-type="float" office:value="0" calcext:value-type="float">
            <text:p>0</text:p>
          </table:table-cell>
          <table:table-cell table:style-name="ce17" table:formula="of:=[$List.G227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8]" office:value-type="float" office:value="0" calcext:value-type="float">
            <text:p>0</text:p>
          </table:table-cell>
          <table:table-cell table:style-name="ce17" table:formula="of:=[$List.I228]" office:value-type="float" office:value="0" calcext:value-type="float">
            <text:p>0</text:p>
          </table:table-cell>
          <table:table-cell table:style-name="ce17" table:formula="of:=[$List.G228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9]" office:value-type="float" office:value="0" calcext:value-type="float">
            <text:p>0</text:p>
          </table:table-cell>
          <table:table-cell table:style-name="ce17" table:formula="of:=[$List.I229]" office:value-type="float" office:value="0" calcext:value-type="float">
            <text:p>0</text:p>
          </table:table-cell>
          <table:table-cell table:style-name="ce17" table:formula="of:=[$List.G229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30]" office:value-type="float" office:value="0" calcext:value-type="float">
            <text:p>0</text:p>
          </table:table-cell>
          <table:table-cell table:style-name="ce17" table:formula="of:=[$List.I230]" office:value-type="float" office:value="0" calcext:value-type="float">
            <text:p>0</text:p>
          </table:table-cell>
          <table:table-cell table:style-name="ce17" table:formula="of:=[$List.G230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>
          <table:table-cell table:style-name="ce17" table:formula="of:=[$List.B231]" office:value-type="float" office:value="0" calcext:value-type="float">
            <text:p>0</text:p>
          </table:table-cell>
          <table:table-cell table:style-name="ce17" table:formula="of:=[$List.I231]" office:value-type="float" office:value="0" calcext:value-type="float">
            <text:p>0</text:p>
          </table:table-cell>
          <table:table-cell table:style-name="ce17" table:formula="of:=[$List.G231]" office:value-type="float" office:value="0" calcext:value-type="float">
            <text:p>0</text:p>
          </table:table-cell>
          <table:table-cell table:formula="of:=IF(AND(([.A231]=&quot;coil&quot;);([.C231]=&quot;true&quot;)); 1; &quot;&quot;)">
            <text:p/>
          </table:table-cell>
          <table:table-cell table:formula="of:=IF(AND(([.A231]=&quot;holding reg.&quot;);([.C231] &lt;&gt; 0)); 1; &quot;&quot;)">
            <text:p/>
          </table:table-cell>
          <table:table-cell/>
          <table:table-cell table:formula="of:=IF([.D231]=1; COM.MICROSOFT.CONCAT(&quot;ModbusCoils[coilIndexFromAddress(MODBUS_ADDR_&quot;; [.B231]; &quot;)] = &quot;; [.C231]; &quot;;&quot;); IF([.E231]=1; COM.MICROSOFT.CONCAT(&quot;ModbusHoldingRegisters[holdingIndexFromAddress(MODBUS_ADDR_&quot;; [.B231]; &quot;)] = &quot;; [.C231]; &quot;u;&quot;); &quot;&quot;))">
            <text:p/>
          </table:table-cell>
        </table:table-row>
        <table:table-row table:style-name="ro1">
          <table:table-cell table:style-name="ce17" table:formula="of:=[$List.B232]" office:value-type="float" office:value="0" calcext:value-type="float">
            <text:p>0</text:p>
          </table:table-cell>
          <table:table-cell table:style-name="ce17" table:formula="of:=[$List.I232]" office:value-type="float" office:value="0" calcext:value-type="float">
            <text:p>0</text:p>
          </table:table-cell>
          <table:table-cell table:style-name="ce17" table:formula="of:=[$List.G232]" office:value-type="float" office:value="0" calcext:value-type="float">
            <text:p>0</text:p>
          </table:table-cell>
          <table:table-cell table:formula="of:=IF(AND(([.A232]=&quot;coil&quot;);([.C232]=&quot;true&quot;)); 1; &quot;&quot;)">
            <text:p/>
          </table:table-cell>
          <table:table-cell table:formula="of:=IF(AND(([.A232]=&quot;holding reg.&quot;);([.C232] &lt;&gt; 0)); 1; &quot;&quot;)">
            <text:p/>
          </table:table-cell>
          <table:table-cell/>
          <table:table-cell table:formula="of:=IF([.D232]=1; COM.MICROSOFT.CONCAT(&quot;ModbusCoils[coilIndexFromAddress(MODBUS_ADDR_&quot;; [.B232]; &quot;)] = &quot;; [.C232]; &quot;;&quot;); IF([.E232]=1; COM.MICROSOFT.CONCAT(&quot;ModbusHoldingRegisters[holdingIndexFromAddress(MODBUS_ADDR_&quot;; [.B232]; &quot;)] = &quot;; [.C232]; &quot;u;&quot;); &quot;&quot;))">
            <text:p/>
          </table:table-cell>
        </table:table-row>
        <table:table-row table:style-name="ro1">
          <table:table-cell table:style-name="ce17" table:formula="of:=[$List.B233]" office:value-type="float" office:value="0" calcext:value-type="float">
            <text:p>0</text:p>
          </table:table-cell>
          <table:table-cell table:style-name="ce17" table:formula="of:=[$List.I233]" office:value-type="float" office:value="0" calcext:value-type="float">
            <text:p>0</text:p>
          </table:table-cell>
          <table:table-cell table:style-name="ce17" table:formula="of:=[$List.G233]" office:value-type="float" office:value="0" calcext:value-type="float">
            <text:p>0</text:p>
          </table:table-cell>
          <table:table-cell table:formula="of:=IF(AND(([.A233]=&quot;coil&quot;);([.C233]=&quot;true&quot;)); 1; &quot;&quot;)">
            <text:p/>
          </table:table-cell>
          <table:table-cell table:formula="of:=IF(AND(([.A233]=&quot;holding reg.&quot;);([.C233] &lt;&gt; 0)); 1; &quot;&quot;)">
            <text:p/>
          </table:table-cell>
          <table:table-cell/>
          <table:table-cell table:formula="of:=IF([.D233]=1; COM.MICROSOFT.CONCAT(&quot;ModbusCoils[coilIndexFromAddress(MODBUS_ADDR_&quot;; [.B233]; &quot;)] = &quot;; [.C233]; &quot;;&quot;); IF([.E233]=1; COM.MICROSOFT.CONCAT(&quot;ModbusHoldingRegisters[holdingIndexFromAddress(MODBUS_ADDR_&quot;; [.B233]; &quot;)] = &quot;; [.C233]; &quot;u;&quot;); &quot;&quot;))">
            <text:p/>
          </table:table-cell>
        </table:table-row>
        <table:table-row table:style-name="ro1">
          <table:table-cell table:style-name="ce17" table:formula="of:=[$List.B234]" office:value-type="float" office:value="0" calcext:value-type="float">
            <text:p>0</text:p>
          </table:table-cell>
          <table:table-cell table:style-name="ce17" table:formula="of:=[$List.I234]" office:value-type="float" office:value="0" calcext:value-type="float">
            <text:p>0</text:p>
          </table:table-cell>
          <table:table-cell table:style-name="ce17" table:formula="of:=[$List.G234]" office:value-type="float" office:value="0" calcext:value-type="float">
            <text:p>0</text:p>
          </table:table-cell>
          <table:table-cell table:formula="of:=IF(AND(([.A234]=&quot;coil&quot;);([.C234]=&quot;true&quot;)); 1; &quot;&quot;)">
            <text:p/>
          </table:table-cell>
          <table:table-cell table:formula="of:=IF(AND(([.A234]=&quot;holding reg.&quot;);([.C234] &lt;&gt; 0)); 1; &quot;&quot;)">
            <text:p/>
          </table:table-cell>
          <table:table-cell/>
          <table:table-cell table:formula="of:=IF([.D234]=1; COM.MICROSOFT.CONCAT(&quot;ModbusCoils[coilIndexFromAddress(MODBUS_ADDR_&quot;; [.B234]; &quot;)] = &quot;; [.C234]; &quot;;&quot;); IF([.E234]=1; COM.MICROSOFT.CONCAT(&quot;ModbusHoldingRegisters[holdingIndexFromAddress(MODBUS_ADDR_&quot;; [.B234]; &quot;)] = &quot;; [.C234]; &quot;u;&quot;); &quot;&quot;))">
            <text:p/>
          </table:table-cell>
        </table:table-row>
        <table:table-row table:style-name="ro1">
          <table:table-cell table:style-name="ce17" table:formula="of:=[$List.B235]" office:value-type="float" office:value="0" calcext:value-type="float">
            <text:p>0</text:p>
          </table:table-cell>
          <table:table-cell table:style-name="ce17" table:formula="of:=[$List.I235]" office:value-type="float" office:value="0" calcext:value-type="float">
            <text:p>0</text:p>
          </table:table-cell>
          <table:table-cell table:style-name="ce17" table:formula="of:=[$List.G235]" office:value-type="float" office:value="0" calcext:value-type="float">
            <text:p>0</text:p>
          </table:table-cell>
          <table:table-cell table:formula="of:=IF(AND(([.A235]=&quot;coil&quot;);([.C235]=&quot;true&quot;)); 1; &quot;&quot;)">
            <text:p/>
          </table:table-cell>
          <table:table-cell table:formula="of:=IF(AND(([.A235]=&quot;holding reg.&quot;);([.C235] &lt;&gt; 0)); 1; &quot;&quot;)">
            <text:p/>
          </table:table-cell>
          <table:table-cell/>
          <table:table-cell table:formula="of:=IF([.D235]=1; COM.MICROSOFT.CONCAT(&quot;ModbusCoils[coilIndexFromAddress(MODBUS_ADDR_&quot;; [.B235]; &quot;)] = &quot;; [.C235]; &quot;;&quot;); IF([.E235]=1; COM.MICROSOFT.CONCAT(&quot;ModbusHoldingRegisters[holdingIndexFromAddress(MODBUS_ADDR_&quot;; [.B235]; &quot;)] = &quot;; [.C235]; &quot;u;&quot;); &quot;&quot;))">
            <text:p/>
          </table:table-cell>
        </table:table-row>
        <table:table-row table:style-name="ro1">
          <table:table-cell table:style-name="ce17" table:formula="of:=[$List.B236]" office:value-type="float" office:value="0" calcext:value-type="float">
            <text:p>0</text:p>
          </table:table-cell>
          <table:table-cell table:style-name="ce17" table:formula="of:=[$List.I236]" office:value-type="float" office:value="0" calcext:value-type="float">
            <text:p>0</text:p>
          </table:table-cell>
          <table:table-cell table:style-name="ce17" table:formula="of:=[$List.G236]" office:value-type="float" office:value="0" calcext:value-type="float">
            <text:p>0</text:p>
          </table:table-cell>
          <table:table-cell table:formula="of:=IF(AND(([.A236]=&quot;coil&quot;);([.C236]=&quot;true&quot;)); 1; &quot;&quot;)">
            <text:p/>
          </table:table-cell>
          <table:table-cell table:formula="of:=IF(AND(([.A236]=&quot;holding reg.&quot;);([.C236] &lt;&gt; 0)); 1; &quot;&quot;)">
            <text:p/>
          </table:table-cell>
          <table:table-cell/>
          <table:table-cell table:formula="of:=IF([.D236]=1; COM.MICROSOFT.CONCAT(&quot;ModbusCoils[coilIndexFromAddress(MODBUS_ADDR_&quot;; [.B236]; &quot;)] = &quot;; [.C236]; &quot;;&quot;); IF([.E236]=1; COM.MICROSOFT.CONCAT(&quot;ModbusHoldingRegisters[holdingIndexFromAddress(MODBUS_ADDR_&quot;; [.B236]; &quot;)] = &quot;; [.C236]; &quot;u;&quot;); &quot;&quot;))">
            <text:p/>
          </table:table-cell>
        </table:table-row>
        <table:table-row table:style-name="ro1">
          <table:table-cell table:style-name="ce17" table:formula="of:=[$List.B237]" office:value-type="float" office:value="0" calcext:value-type="float">
            <text:p>0</text:p>
          </table:table-cell>
          <table:table-cell table:style-name="ce17" table:formula="of:=[$List.I237]" office:value-type="float" office:value="0" calcext:value-type="float">
            <text:p>0</text:p>
          </table:table-cell>
          <table:table-cell table:style-name="ce17" table:formula="of:=[$List.G237]" office:value-type="float" office:value="0" calcext:value-type="float">
            <text:p>0</text:p>
          </table:table-cell>
          <table:table-cell table:formula="of:=IF(AND(([.A237]=&quot;coil&quot;);([.C237]=&quot;true&quot;)); 1; &quot;&quot;)">
            <text:p/>
          </table:table-cell>
          <table:table-cell table:formula="of:=IF(AND(([.A237]=&quot;holding reg.&quot;);([.C237] &lt;&gt; 0)); 1; &quot;&quot;)">
            <text:p/>
          </table:table-cell>
          <table:table-cell/>
          <table:table-cell table:formula="of:=IF([.D237]=1; COM.MICROSOFT.CONCAT(&quot;ModbusCoils[coilIndexFromAddress(MODBUS_ADDR_&quot;; [.B237]; &quot;)] = &quot;; [.C237]; &quot;;&quot;); IF([.E237]=1; COM.MICROSOFT.CONCAT(&quot;ModbusHoldingRegisters[holdingIndexFromAddress(MODBUS_ADDR_&quot;; [.B237]; &quot;)] = &quot;; [.C237]; &quot;u;&quot;); &quot;&quot;))">
            <text:p/>
          </table:table-cell>
        </table:table-row>
        <table:table-row table:style-name="ro1">
          <table:table-cell table:style-name="ce17" table:formula="of:=[$List.B238]" office:value-type="float" office:value="0" calcext:value-type="float">
            <text:p>0</text:p>
          </table:table-cell>
          <table:table-cell table:style-name="ce17" table:formula="of:=[$List.I238]" office:value-type="float" office:value="0" calcext:value-type="float">
            <text:p>0</text:p>
          </table:table-cell>
          <table:table-cell table:style-name="ce17" table:formula="of:=[$List.G238]" office:value-type="float" office:value="0" calcext:value-type="float">
            <text:p>0</text:p>
          </table:table-cell>
          <table:table-cell table:formula="of:=IF(AND(([.A238]=&quot;coil&quot;);([.C238]=&quot;true&quot;)); 1; &quot;&quot;)">
            <text:p/>
          </table:table-cell>
          <table:table-cell table:formula="of:=IF(AND(([.A238]=&quot;holding reg.&quot;);([.C238] &lt;&gt; 0)); 1; &quot;&quot;)">
            <text:p/>
          </table:table-cell>
          <table:table-cell/>
          <table:table-cell table:formula="of:=IF([.D238]=1; COM.MICROSOFT.CONCAT(&quot;ModbusCoils[coilIndexFromAddress(MODBUS_ADDR_&quot;; [.B238]; &quot;)] = &quot;; [.C238]; &quot;;&quot;); IF([.E238]=1; COM.MICROSOFT.CONCAT(&quot;ModbusHoldingRegisters[holdingIndexFromAddress(MODBUS_ADDR_&quot;; [.B238]; &quot;)] = &quot;; [.C238]; &quot;u;&quot;); &quot;&quot;))">
            <text:p/>
          </table:table-cell>
        </table:table-row>
        <table:table-row table:style-name="ro1">
          <table:table-cell table:style-name="ce17" table:formula="of:=[$List.B239]" office:value-type="float" office:value="0" calcext:value-type="float">
            <text:p>0</text:p>
          </table:table-cell>
          <table:table-cell table:style-name="ce17" table:formula="of:=[$List.I239]" office:value-type="float" office:value="0" calcext:value-type="float">
            <text:p>0</text:p>
          </table:table-cell>
          <table:table-cell table:style-name="ce17" table:formula="of:=[$List.G239]" office:value-type="float" office:value="0" calcext:value-type="float">
            <text:p>0</text:p>
          </table:table-cell>
          <table:table-cell table:formula="of:=IF(AND(([.A239]=&quot;coil&quot;);([.C239]=&quot;true&quot;)); 1; &quot;&quot;)">
            <text:p/>
          </table:table-cell>
          <table:table-cell table:formula="of:=IF(AND(([.A239]=&quot;holding reg.&quot;);([.C239] &lt;&gt; 0)); 1; &quot;&quot;)">
            <text:p/>
          </table:table-cell>
          <table:table-cell/>
          <table:table-cell table:formula="of:=IF([.D239]=1; COM.MICROSOFT.CONCAT(&quot;ModbusCoils[coilIndexFromAddress(MODBUS_ADDR_&quot;; [.B239]; &quot;)] = &quot;; [.C239]; &quot;;&quot;); IF([.E239]=1; COM.MICROSOFT.CONCAT(&quot;ModbusHoldingRegisters[holdingIndexFromAddress(MODBUS_ADDR_&quot;; [.B239]; &quot;)] = &quot;; [.C239]; &quot;u;&quot;); &quot;&quot;))">
            <text:p/>
          </table:table-cell>
        </table:table-row>
        <table:table-row table:style-name="ro1">
          <table:table-cell table:style-name="ce17" table:formula="of:=[$List.B240]" office:value-type="float" office:value="0" calcext:value-type="float">
            <text:p>0</text:p>
          </table:table-cell>
          <table:table-cell table:style-name="ce17" table:formula="of:=[$List.I240]" office:value-type="float" office:value="0" calcext:value-type="float">
            <text:p>0</text:p>
          </table:table-cell>
          <table:table-cell table:style-name="ce17" table:formula="of:=[$List.G240]" office:value-type="float" office:value="0" calcext:value-type="float">
            <text:p>0</text:p>
          </table:table-cell>
          <table:table-cell table:formula="of:=IF(AND(([.A240]=&quot;coil&quot;);([.C240]=&quot;true&quot;)); 1; &quot;&quot;)">
            <text:p/>
          </table:table-cell>
          <table:table-cell table:formula="of:=IF(AND(([.A240]=&quot;holding reg.&quot;);([.C240] &lt;&gt; 0)); 1; &quot;&quot;)">
            <text:p/>
          </table:table-cell>
          <table:table-cell/>
          <table:table-cell table:formula="of:=IF([.D240]=1; COM.MICROSOFT.CONCAT(&quot;ModbusCoils[coilIndexFromAddress(MODBUS_ADDR_&quot;; [.B240]; &quot;)] = &quot;; [.C240]; &quot;;&quot;); IF([.E240]=1; COM.MICROSOFT.CONCAT(&quot;ModbusHoldingRegisters[holdingIndexFromAddress(MODBUS_ADDR_&quot;; [.B240]; &quot;)] = &quot;; [.C240]; &quot;u;&quot;); &quot;&quot;))">
            <text:p/>
          </table:table-cell>
        </table:table-row>
        <table:table-row table:style-name="ro1">
          <table:table-cell table:style-name="ce17" table:formula="of:=[$List.B241]" office:value-type="float" office:value="0" calcext:value-type="float">
            <text:p>0</text:p>
          </table:table-cell>
          <table:table-cell table:style-name="ce17" table:formula="of:=[$List.I241]" office:value-type="float" office:value="0" calcext:value-type="float">
            <text:p>0</text:p>
          </table:table-cell>
          <table:table-cell table:style-name="ce17" table:formula="of:=[$List.G241]" office:value-type="float" office:value="0" calcext:value-type="float">
            <text:p>0</text:p>
          </table:table-cell>
          <table:table-cell table:formula="of:=IF(AND(([.A241]=&quot;coil&quot;);([.C241]=&quot;true&quot;)); 1; &quot;&quot;)">
            <text:p/>
          </table:table-cell>
          <table:table-cell table:formula="of:=IF(AND(([.A241]=&quot;holding reg.&quot;);([.C241] &lt;&gt; 0)); 1; &quot;&quot;)">
            <text:p/>
          </table:table-cell>
          <table:table-cell/>
          <table:table-cell table:formula="of:=IF([.D241]=1; COM.MICROSOFT.CONCAT(&quot;ModbusCoils[coilIndexFromAddress(MODBUS_ADDR_&quot;; [.B241]; &quot;)] = &quot;; [.C241]; &quot;;&quot;); IF([.E241]=1; COM.MICROSOFT.CONCAT(&quot;ModbusHoldingRegisters[holdingIndexFromAddress(MODBUS_ADDR_&quot;; [.B241]; &quot;)] = &quot;; [.C241]; &quot;u;&quot;); &quot;&quot;))">
            <text:p/>
          </table:table-cell>
        </table:table-row>
        <table:table-row table:style-name="ro1">
          <table:table-cell table:style-name="ce17" table:formula="of:=[$List.B242]" office:value-type="float" office:value="0" calcext:value-type="float">
            <text:p>0</text:p>
          </table:table-cell>
          <table:table-cell table:style-name="ce17" table:formula="of:=[$List.I242]" office:value-type="float" office:value="0" calcext:value-type="float">
            <text:p>0</text:p>
          </table:table-cell>
          <table:table-cell table:style-name="ce17" table:formula="of:=[$List.G242]" office:value-type="float" office:value="0" calcext:value-type="float">
            <text:p>0</text:p>
          </table:table-cell>
          <table:table-cell table:formula="of:=IF(AND(([.A242]=&quot;coil&quot;);([.C242]=&quot;true&quot;)); 1; &quot;&quot;)">
            <text:p/>
          </table:table-cell>
          <table:table-cell table:formula="of:=IF(AND(([.A242]=&quot;holding reg.&quot;);([.C242] &lt;&gt; 0)); 1; &quot;&quot;)">
            <text:p/>
          </table:table-cell>
          <table:table-cell/>
          <table:table-cell table:formula="of:=IF([.D242]=1; COM.MICROSOFT.CONCAT(&quot;ModbusCoils[coilIndexFromAddress(MODBUS_ADDR_&quot;; [.B242]; &quot;)] = &quot;; [.C242]; &quot;;&quot;); IF([.E242]=1; COM.MICROSOFT.CONCAT(&quot;ModbusHoldingRegisters[holdingIndexFromAddress(MODBUS_ADDR_&quot;; [.B242]; &quot;)] = &quot;; [.C242]; &quot;u;&quot;); &quot;&quot;))">
            <text:p/>
          </table:table-cell>
        </table:table-row>
        <table:table-row table:style-name="ro1">
          <table:table-cell table:style-name="ce17" table:formula="of:=[$List.B243]" office:value-type="float" office:value="0" calcext:value-type="float">
            <text:p>0</text:p>
          </table:table-cell>
          <table:table-cell table:style-name="ce17" table:formula="of:=[$List.I243]" office:value-type="float" office:value="0" calcext:value-type="float">
            <text:p>0</text:p>
          </table:table-cell>
          <table:table-cell table:style-name="ce17" table:formula="of:=[$List.G243]" office:value-type="float" office:value="0" calcext:value-type="float">
            <text:p>0</text:p>
          </table:table-cell>
          <table:table-cell table:formula="of:=IF(AND(([.A243]=&quot;coil&quot;);([.C243]=&quot;true&quot;)); 1; &quot;&quot;)">
            <text:p/>
          </table:table-cell>
          <table:table-cell table:formula="of:=IF(AND(([.A243]=&quot;holding reg.&quot;);([.C243] &lt;&gt; 0)); 1; &quot;&quot;)">
            <text:p/>
          </table:table-cell>
          <table:table-cell/>
          <table:table-cell table:formula="of:=IF([.D243]=1; COM.MICROSOFT.CONCAT(&quot;ModbusCoils[coilIndexFromAddress(MODBUS_ADDR_&quot;; [.B243]; &quot;)] = &quot;; [.C243]; &quot;;&quot;); IF([.E243]=1; COM.MICROSOFT.CONCAT(&quot;ModbusHoldingRegisters[holdingIndexFromAddress(MODBUS_ADDR_&quot;; [.B243]; &quot;)] = &quot;; [.C243]; &quot;u;&quot;); &quot;&quot;))">
            <text:p/>
          </table:table-cell>
        </table:table-row>
        <table:table-row table:style-name="ro1">
          <table:table-cell table:style-name="ce17" table:formula="of:=[$List.B244]" office:value-type="float" office:value="0" calcext:value-type="float">
            <text:p>0</text:p>
          </table:table-cell>
          <table:table-cell table:style-name="ce17" table:formula="of:=[$List.I244]" office:value-type="float" office:value="0" calcext:value-type="float">
            <text:p>0</text:p>
          </table:table-cell>
          <table:table-cell table:style-name="ce17" table:formula="of:=[$List.G244]" office:value-type="float" office:value="0" calcext:value-type="float">
            <text:p>0</text:p>
          </table:table-cell>
          <table:table-cell table:formula="of:=IF(AND(([.A244]=&quot;coil&quot;);([.C244]=&quot;true&quot;)); 1; &quot;&quot;)">
            <text:p/>
          </table:table-cell>
          <table:table-cell table:formula="of:=IF(AND(([.A244]=&quot;holding reg.&quot;);([.C244] &lt;&gt; 0)); 1; &quot;&quot;)">
            <text:p/>
          </table:table-cell>
          <table:table-cell/>
          <table:table-cell table:formula="of:=IF([.D244]=1; COM.MICROSOFT.CONCAT(&quot;ModbusCoils[coilIndexFromAddress(MODBUS_ADDR_&quot;; [.B244]; &quot;)] = &quot;; [.C244]; &quot;;&quot;); IF([.E244]=1; COM.MICROSOFT.CONCAT(&quot;ModbusHoldingRegisters[holdingIndexFromAddress(MODBUS_ADDR_&quot;; [.B244]; &quot;)] = &quot;; [.C244]; &quot;u;&quot;); &quot;&quot;))">
            <text:p/>
          </table:table-cell>
        </table:table-row>
        <table:table-row table:style-name="ro1">
          <table:table-cell table:style-name="ce17" table:formula="of:=[$List.B245]" office:value-type="float" office:value="0" calcext:value-type="float">
            <text:p>0</text:p>
          </table:table-cell>
          <table:table-cell table:style-name="ce17" table:formula="of:=[$List.I245]" office:value-type="float" office:value="0" calcext:value-type="float">
            <text:p>0</text:p>
          </table:table-cell>
          <table:table-cell table:style-name="ce17" table:formula="of:=[$List.G245]" office:value-type="float" office:value="0" calcext:value-type="float">
            <text:p>0</text:p>
          </table:table-cell>
          <table:table-cell table:formula="of:=IF(AND(([.A245]=&quot;coil&quot;);([.C245]=&quot;true&quot;)); 1; &quot;&quot;)">
            <text:p/>
          </table:table-cell>
          <table:table-cell table:formula="of:=IF(AND(([.A245]=&quot;holding reg.&quot;);([.C245] &lt;&gt; 0)); 1; &quot;&quot;)">
            <text:p/>
          </table:table-cell>
          <table:table-cell/>
          <table:table-cell table:formula="of:=IF([.D245]=1; COM.MICROSOFT.CONCAT(&quot;ModbusCoils[coilIndexFromAddress(MODBUS_ADDR_&quot;; [.B245]; &quot;)] = &quot;; [.C245]; &quot;;&quot;); IF([.E245]=1; COM.MICROSOFT.CONCAT(&quot;ModbusHoldingRegisters[holdingIndexFromAddress(MODBUS_ADDR_&quot;; [.B245]; &quot;)] = &quot;; [.C245]; &quot;u;&quot;); &quot;&quot;))">
            <text:p/>
          </table:table-cell>
        </table:table-row>
        <table:table-row table:style-name="ro1">
          <table:table-cell table:style-name="ce17" table:formula="of:=[$List.B246]" office:value-type="float" office:value="0" calcext:value-type="float">
            <text:p>0</text:p>
          </table:table-cell>
          <table:table-cell table:style-name="ce17" table:formula="of:=[$List.I246]" office:value-type="float" office:value="0" calcext:value-type="float">
            <text:p>0</text:p>
          </table:table-cell>
          <table:table-cell table:style-name="ce17" table:formula="of:=[$List.G246]" office:value-type="float" office:value="0" calcext:value-type="float">
            <text:p>0</text:p>
          </table:table-cell>
          <table:table-cell table:formula="of:=IF(AND(([.A246]=&quot;coil&quot;);([.C246]=&quot;true&quot;)); 1; &quot;&quot;)">
            <text:p/>
          </table:table-cell>
          <table:table-cell table:formula="of:=IF(AND(([.A246]=&quot;holding reg.&quot;);([.C246] &lt;&gt; 0)); 1; &quot;&quot;)">
            <text:p/>
          </table:table-cell>
          <table:table-cell/>
          <table:table-cell table:formula="of:=IF([.D246]=1; COM.MICROSOFT.CONCAT(&quot;ModbusCoils[coilIndexFromAddress(MODBUS_ADDR_&quot;; [.B246]; &quot;)] = &quot;; [.C246]; &quot;;&quot;); IF([.E246]=1; COM.MICROSOFT.CONCAT(&quot;ModbusHoldingRegisters[holdingIndexFromAddress(MODBUS_ADDR_&quot;; [.B246]; &quot;)] = &quot;; [.C246]; &quot;u;&quot;); &quot;&quot;))">
            <text:p/>
          </table:table-cell>
        </table:table-row>
        <table:table-row table:style-name="ro1">
          <table:table-cell table:style-name="ce17" table:formula="of:=[$List.B247]" office:value-type="float" office:value="0" calcext:value-type="float">
            <text:p>0</text:p>
          </table:table-cell>
          <table:table-cell table:style-name="ce17" table:formula="of:=[$List.I247]" office:value-type="float" office:value="0" calcext:value-type="float">
            <text:p>0</text:p>
          </table:table-cell>
          <table:table-cell table:style-name="ce17" table:formula="of:=[$List.G247]" office:value-type="float" office:value="0" calcext:value-type="float">
            <text:p>0</text:p>
          </table:table-cell>
          <table:table-cell table:formula="of:=IF(AND(([.A247]=&quot;coil&quot;);([.C247]=&quot;true&quot;)); 1; &quot;&quot;)">
            <text:p/>
          </table:table-cell>
          <table:table-cell table:formula="of:=IF(AND(([.A247]=&quot;holding reg.&quot;);([.C247] &lt;&gt; 0)); 1; &quot;&quot;)">
            <text:p/>
          </table:table-cell>
          <table:table-cell/>
          <table:table-cell table:formula="of:=IF([.D247]=1; COM.MICROSOFT.CONCAT(&quot;ModbusCoils[coilIndexFromAddress(MODBUS_ADDR_&quot;; [.B247]; &quot;)] = &quot;; [.C247]; &quot;;&quot;); IF([.E247]=1; COM.MICROSOFT.CONCAT(&quot;ModbusHoldingRegisters[holdingIndexFromAddress(MODBUS_ADDR_&quot;; [.B247]; &quot;)] = &quot;; [.C247]; &quot;u;&quot;); &quot;&quot;))">
            <text:p/>
          </table:table-cell>
        </table:table-row>
        <table:table-row table:style-name="ro1">
          <table:table-cell table:style-name="ce17" table:formula="of:=[$List.B248]" office:value-type="float" office:value="0" calcext:value-type="float">
            <text:p>0</text:p>
          </table:table-cell>
          <table:table-cell table:style-name="ce17" table:formula="of:=[$List.I248]" office:value-type="float" office:value="0" calcext:value-type="float">
            <text:p>0</text:p>
          </table:table-cell>
          <table:table-cell table:style-name="ce17" table:formula="of:=[$List.G248]" office:value-type="float" office:value="0" calcext:value-type="float">
            <text:p>0</text:p>
          </table:table-cell>
          <table:table-cell table:formula="of:=IF(AND(([.A248]=&quot;coil&quot;);([.C248]=&quot;true&quot;)); 1; &quot;&quot;)">
            <text:p/>
          </table:table-cell>
          <table:table-cell table:formula="of:=IF(AND(([.A248]=&quot;holding reg.&quot;);([.C248] &lt;&gt; 0)); 1; &quot;&quot;)">
            <text:p/>
          </table:table-cell>
          <table:table-cell/>
          <table:table-cell table:formula="of:=IF([.D248]=1; COM.MICROSOFT.CONCAT(&quot;ModbusCoils[coilIndexFromAddress(MODBUS_ADDR_&quot;; [.B248]; &quot;)] = &quot;; [.C248]; &quot;;&quot;); IF([.E248]=1; COM.MICROSOFT.CONCAT(&quot;ModbusHoldingRegisters[holdingIndexFromAddress(MODBUS_ADDR_&quot;; [.B248]; &quot;)] = &quot;; [.C248]; &quot;u;&quot;); &quot;&quot;))">
            <text:p/>
          </table:table-cell>
        </table:table-row>
        <table:table-row table:style-name="ro1">
          <table:table-cell table:style-name="ce17" table:formula="of:=[$List.B249]" office:value-type="float" office:value="0" calcext:value-type="float">
            <text:p>0</text:p>
          </table:table-cell>
          <table:table-cell table:style-name="ce17" table:formula="of:=[$List.I249]" office:value-type="float" office:value="0" calcext:value-type="float">
            <text:p>0</text:p>
          </table:table-cell>
          <table:table-cell table:style-name="ce17" table:formula="of:=[$List.G249]" office:value-type="float" office:value="0" calcext:value-type="float">
            <text:p>0</text:p>
          </table:table-cell>
          <table:table-cell table:formula="of:=IF(AND(([.A249]=&quot;coil&quot;);([.C249]=&quot;true&quot;)); 1; &quot;&quot;)">
            <text:p/>
          </table:table-cell>
          <table:table-cell table:formula="of:=IF(AND(([.A249]=&quot;holding reg.&quot;);([.C249] &lt;&gt; 0)); 1; &quot;&quot;)">
            <text:p/>
          </table:table-cell>
          <table:table-cell/>
          <table:table-cell table:formula="of:=IF([.D249]=1; COM.MICROSOFT.CONCAT(&quot;ModbusCoils[coilIndexFromAddress(MODBUS_ADDR_&quot;; [.B249]; &quot;)] = &quot;; [.C249]; &quot;;&quot;); IF([.E249]=1; COM.MICROSOFT.CONCAT(&quot;ModbusHoldingRegisters[holdingIndexFromAddress(MODBUS_ADDR_&quot;; [.B249]; &quot;)] = &quot;; [.C249]; &quot;u;&quot;); &quot;&quot;))">
            <text:p/>
          </table:table-cell>
        </table:table-row>
        <table:table-row table:style-name="ro1">
          <table:table-cell table:style-name="ce23" table:number-columns-repeated="3"/>
          <table:table-cell table:style-name="ce24" table:number-columns-repeated="2"/>
          <table:table-cell table:style-name="ce23" table:number-columns-repeated="2"/>
        </table:table-row>
        <table:table-row table:style-name="ro1" table:number-rows-repeated="10483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 style:data-style-name="N2" text:time-value="09:23:26.400925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15T09:31:46.843363569</dc:date>
    <meta:editing-duration>P1DT19H41M40S</meta:editing-duration>
    <meta:editing-cycles>196</meta:editing-cycles>
    <meta:generator>LibreOffice/24.2.7.2$Linux_X86_64 LibreOffice_project/420$Build-2</meta:generator>
    <meta:document-statistic meta:table-count="3" meta:cell-count="4285" meta:object-count="0"/>
  </office:meta>
</office:document-meta>
</file>