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5362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2.8091in"/>
    </style:style>
    <style:style style:name="co7" style:family="table-column">
      <style:table-column-properties fo:break-before="auto" style:column-width="3.3244in"/>
    </style:style>
    <style:style style:name="co8" style:family="table-column">
      <style:table-column-properties fo:break-before="auto" style:column-width="1.3835in"/>
    </style:style>
    <style:style style:name="co9" style:family="table-column">
      <style:table-column-properties fo:break-before="auto" style:column-width="1.7264in"/>
    </style:style>
    <style:style style:name="co10" style:family="table-column">
      <style:table-column-properties fo:break-before="auto" style:column-width="16.439in"/>
    </style:style>
    <style:style style:name="co11" style:family="table-column">
      <style:table-column-properties fo:break-before="auto" style:column-width="5.125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5626in"/>
    </style:style>
    <style:style style:name="co14" style:family="table-column">
      <style:table-column-properties fo:break-before="auto" style:column-width="0.3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13" style:family="table-cell" style:parent-style-name="Default">
      <style:text-properties style:font-name="Noto Mono"/>
    </style:style>
    <style:style style:name="ce15" style:family="table-cell" style:parent-style-name="Default" style:data-style-name="N0">
      <style:text-properties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7"/>
        <table:table-column table:style-name="co11" table:default-cell-style-name="ce3"/>
        <table:table-column table:style-name="co12" table:number-columns-repeated="16371" table:default-cell-style-name="ce3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RW/R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ternative name</text:p>
          </table:table-cell>
          <table:table-cell office:value-type="string" calcext:value-type="string">
            <text:p>Right to modify</text:p>
          </table:table-cell>
          <table:table-cell office:value-type="string" calcext:value-type="string">
            <text:p>Main application</text:p>
          </table:table-cell>
          <table:table-cell office:value-type="string" calcext:value-type="string">
            <text:p>Descrip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1638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1Control</text:p>
          </table:table-cell>
          <table:table-cell table:style-name="ce11" table:formula="of:=IF([.H3]&lt;&gt;&quot;&quot;; UPPER(ORG.LIBREOFFICE.REGEX([.H3];&quot;([a-z0-9])([A-Z])&quot;;&quot;$1_$2&quot;;&quot;g&quot;)); &quot;&quot;)" office:value-type="string" office:string-value="CUP1_CONTROL" calcext:value-type="string">
            <text:p>CUP1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1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3]=1; TYPE([.A3])=8); [.A3]+1; IF( OR([.A2]=1; TYPE([.A2])=8); [.A2]+1; 0))" office:value-type="float" office:value="2" calcext:value-type="float">
            <text:p>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1</text:p>
          </table:table-cell>
          <table:table-cell table:style-name="ce11" table:formula="of:=IF([.H4]&lt;&gt;&quot;&quot;; UPPER(ORG.LIBREOFFICE.REGEX([.H4];&quot;([a-z0-9])([A-Z])&quot;;&quot;$1_$2&quot;;&quot;g&quot;)); &quot;&quot;)" office:value-type="string" office:string-value="EXTERNAL_INHIBITION1" calcext:value-type="string">
            <text:p>EXTERNAL_INHIBITION1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not installed; always equals 'false'</text:p>
          </table:table-cell>
          <table:table-cell table:number-columns-repeated="16372"/>
        </table:table-row>
        <table:table-row table:style-name="ro1">
          <table:table-cell table:style-name="ce3" table:formula="of:=IF( OR([.A4]=1; TYPE([.A4])=8); [.A4]+1; IF( OR([.A3]=1; TYPE([.A3])=8); [.A3]+1; 0))" office:value-type="float" office:value="3" calcext:value-type="float">
            <text:p>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witch</text:p>
          </table:table-cell>
          <table:table-cell table:style-name="ce11" table:formula="of:=IF([.H5]&lt;&gt;&quot;&quot;; UPPER(ORG.LIBREOFFICE.REGEX([.H5];&quot;([a-z0-9])([A-Z])&quot;;&quot;$1_$2&quot;;&quot;g&quot;)); &quot;&quot;)" office:value-type="string" office:string-value="CUP1_SWITCH" calcext:value-type="string">
            <text:p>CUP1_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1Control</text:p>
          </table:table-cell>
          <table:table-cell table:number-columns-repeated="16372"/>
        </table:table-row>
        <table:table-row table:style-name="ro1">
          <table:table-cell table:style-name="ce3" table:formula="of:=IF( OR([.A5]=1; TYPE([.A5])=8); [.A5]+1; IF( OR([.A4]=1; TYPE([.A4])=8); [.A4]+1; 0))" office:value-type="float" office:value="4" calcext:value-type="float">
            <text:p>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11" table:formula="of:=IF([.H6]&lt;&gt;&quot;&quot;; UPPER(ORG.LIBREOFFICE.REGEX([.H6];&quot;([a-z0-9])([A-Z])&quot;;&quot;$1_$2&quot;;&quot;g&quot;)); &quot;&quot;)">
            <text:p/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table:style-name="ce11" table:formula="of:=IF([.H7]&lt;&gt;&quot;&quot;; UPPER(ORG.LIBREOFFICE.REGEX([.H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7]=1; TYPE([.A7])=8); [.A7]+1; IF( OR([.A6]=1; TYPE([.A6])=8); [.A6]+1; 0))" office:value-type="float" office:value="5" calcext:value-type="float">
            <text:p>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2Control</text:p>
          </table:table-cell>
          <table:table-cell table:style-name="ce11" table:formula="of:=IF([.H8]&lt;&gt;&quot;&quot;; UPPER(ORG.LIBREOFFICE.REGEX([.H8];&quot;([a-z0-9])([A-Z])&quot;;&quot;$1_$2&quot;;&quot;g&quot;)); &quot;&quot;)" office:value-type="string" office:string-value="CUP2_CONTROL" calcext:value-type="string">
            <text:p>CUP2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2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8]=1; TYPE([.A8])=8); [.A8]+1; IF( OR([.A7]=1; TYPE([.A7])=8); [.A7]+1; 0))" office:value-type="float" office:value="6" calcext:value-type="float">
            <text:p>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ternalInhibition2</text:p>
          </table:table-cell>
          <table:table-cell table:style-name="ce11" table:formula="of:=IF([.H9]&lt;&gt;&quot;&quot;; UPPER(ORG.LIBREOFFICE.REGEX([.H9];&quot;([a-z0-9])([A-Z])&quot;;&quot;$1_$2&quot;;&quot;g&quot;)); &quot;&quot;)" office:value-type="string" office:string-value="EXTERNAL_INHIBITION2" calcext:value-type="string">
            <text:p>EXTERNAL_INHIBITION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the external inhibit logic signal; true = inhibition enabled; false = inhibition disabled</text:p>
          </table:table-cell>
          <table:table-cell table:number-columns-repeated="16372"/>
        </table:table-row>
        <table:table-row table:style-name="ro1">
          <table:table-cell table:style-name="ce3" table:formula="of:=IF( OR([.A9]=1; TYPE([.A9])=8); [.A9]+1; IF( OR([.A8]=1; TYPE([.A8])=8); [.A8]+1; 0))" office:value-type="float" office:value="7" calcext:value-type="float">
            <text:p>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witch</text:p>
          </table:table-cell>
          <table:table-cell table:style-name="ce11" table:formula="of:=IF([.H10]&lt;&gt;&quot;&quot;; UPPER(ORG.LIBREOFFICE.REGEX([.H10];&quot;([a-z0-9])([A-Z])&quot;;&quot;$1_$2&quot;;&quot;g&quot;)); &quot;&quot;)" office:value-type="string" office:string-value="CUP2_SWITCH" calcext:value-type="string">
            <text:p>CUP2_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2Control</text:p>
          </table:table-cell>
          <table:table-cell table:number-columns-repeated="16372"/>
        </table:table-row>
        <table:table-row table:style-name="ro1">
          <table:table-cell table:style-name="ce3" table:formula="of:=IF( OR([.A10]=1; TYPE([.A10])=8); [.A10]+1; IF( OR([.A9]=1; TYPE([.A9])=8); [.A9]+1; 0))" office:value-type="float" office:value="8" calcext:value-type="float">
            <text:p>8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11" table:formula="of:=IF([.H11]&lt;&gt;&quot;&quot;; UPPER(ORG.LIBREOFFICE.REGEX([.H11];&quot;([a-z0-9])([A-Z])&quot;;&quot;$1_$2&quot;;&quot;g&quot;)); &quot;&quot;)">
            <text:p/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table:style-name="ce11" table:formula="of:=IF([.H12]&lt;&gt;&quot;&quot;; UPPER(ORG.LIBREOFFICE.REGEX([.H1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2]=1; TYPE([.A12])=8); [.A12]+1; IF( OR([.A11]=1; TYPE([.A11])=8); [.A11]+1; 0))" office:value-type="float" office:value="9" calcext:value-type="float">
            <text:p>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3Control</text:p>
          </table:table-cell>
          <table:table-cell table:style-name="ce11" table:formula="of:=IF([.H13]&lt;&gt;&quot;&quot;; UPPER(ORG.LIBREOFFICE.REGEX([.H13];&quot;([a-z0-9])([A-Z])&quot;;&quot;$1_$2&quot;;&quot;g&quot;)); &quot;&quot;)" office:value-type="string" office:string-value="CUP3_CONTROL" calcext:value-type="string">
            <text:p>CUP3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3 using a motor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13]=1; TYPE([.A13])=8); [.A13]+1; IF( OR([.A12]=1; TYPE([.A12])=8); [.A12]+1; 0))" office:value-type="float" office:value="10" calcext:value-type="float">
            <text:p>10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3</text:p>
          </table:table-cell>
          <table:table-cell table:style-name="ce11" table:formula="of:=IF([.H14]&lt;&gt;&quot;&quot;; UPPER(ORG.LIBREOFFICE.REGEX([.H14];&quot;([a-z0-9])([A-Z])&quot;;&quot;$1_$2&quot;;&quot;g&quot;)); &quot;&quot;)" office:value-type="string" office:string-value="EXTERNAL_INHIBITION3" calcext:value-type="string">
            <text:p>EXTERNAL_INHIBITION3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not installed; always equals 'false'</text:p>
          </table:table-cell>
          <table:table-cell table:number-columns-repeated="16372"/>
        </table:table-row>
        <table:table-row table:style-name="ro1">
          <table:table-cell table:style-name="ce3" table:formula="of:=IF( OR([.A14]=1; TYPE([.A14])=8); [.A14]+1; IF( OR([.A13]=1; TYPE([.A13])=8); [.A13]+1; 0))" office:value-type="float" office:value="11" calcext:value-type="float">
            <text:p>1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1</text:p>
          </table:table-cell>
          <table:table-cell table:style-name="ce11" table:formula="of:=IF([.H15]&lt;&gt;&quot;&quot;; UPPER(ORG.LIBREOFFICE.REGEX([.H15];&quot;([a-z0-9])([A-Z])&quot;;&quot;$1_$2&quot;;&quot;g&quot;)); &quot;&quot;)" office:value-type="string" office:string-value="CUP3_SWITCH1" calcext:value-type="string">
            <text:p>CUP3_SWITCH1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be equal to the negation of register Cup3Control</text:p>
          </table:table-cell>
          <table:table-cell table:number-columns-repeated="16372"/>
        </table:table-row>
        <table:table-row table:style-name="ro1">
          <table:table-cell table:style-name="ce3" table:formula="of:=IF( OR([.A15]=1; TYPE([.A15])=8); [.A15]+1; IF( OR([.A14]=1; TYPE([.A14])=8); [.A14]+1; 0))" office:value-type="float" office:value="12" calcext:value-type="float">
            <text:p>1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2</text:p>
          </table:table-cell>
          <table:table-cell table:style-name="ce11" table:formula="of:=IF([.H16]&lt;&gt;&quot;&quot;; UPPER(ORG.LIBREOFFICE.REGEX([.H16];&quot;([a-z0-9])([A-Z])&quot;;&quot;$1_$2&quot;;&quot;g&quot;)); &quot;&quot;)" office:value-type="string" office:string-value="CUP3_SWITCH2" calcext:value-type="string">
            <text:p>CUP3_SWITCH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3Control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17]&lt;&gt;&quot;&quot;; UPPER(ORG.LIBREOFFICE.REGEX([.H1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7]=1; TYPE([.A17])=8); [.A17]+1; IF( OR([.A16]=1; TYPE([.A16])=8); [.A16]+1; 0))" office:value-type="float" office:value="13" calcext:value-type="float">
            <text:p>1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RequestedState</text:p>
          </table:table-cell>
          <table:table-cell table:style-name="ce11" table:formula="of:=IF([.H18]&lt;&gt;&quot;&quot;; UPPER(ORG.LIBREOFFICE.REGEX([.H18];&quot;([a-z0-9])([A-Z])&quot;;&quot;$1_$2&quot;;&quot;g&quot;)); &quot;&quot;)" office:value-type="string" office:string-value="CUP1_REQUESTED_STATE" calcext:value-type="string">
            <text:p>CUP1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mmand for the AuxiliaryFSM; true = insert the cup; false = withdraw the cup</text:p>
          </table:table-cell>
          <table:table-cell table:number-columns-repeated="16372"/>
        </table:table-row>
        <table:table-row table:style-name="ro1">
          <table:table-cell table:style-name="ce3" table:formula="of:=IF( OR([.A18]=1; TYPE([.A18])=8); [.A18]+1; IF( OR([.A17]=1; TYPE([.A17])=8); [.A17]+1; 0))" office:value-type="float" office:value="14" calcext:value-type="float">
            <text:p>1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RequestedState</text:p>
          </table:table-cell>
          <table:table-cell table:style-name="ce11" table:formula="of:=IF([.H19]&lt;&gt;&quot;&quot;; UPPER(ORG.LIBREOFFICE.REGEX([.H19];&quot;([a-z0-9])([A-Z])&quot;;&quot;$1_$2&quot;;&quot;g&quot;)); &quot;&quot;)" office:value-type="string" office:string-value="CUP2_REQUESTED_STATE" calcext:value-type="string">
            <text:p>CUP2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]=1; TYPE([.A19])=8); [.A19]+1; IF( OR([.A18]=1; TYPE([.A18])=8); [.A18]+1; 0))" office:value-type="float" office:value="15" calcext:value-type="float">
            <text:p>1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RequestedState</text:p>
          </table:table-cell>
          <table:table-cell table:style-name="ce11" table:formula="of:=IF([.H20]&lt;&gt;&quot;&quot;; UPPER(ORG.LIBREOFFICE.REGEX([.H20];&quot;([a-z0-9])([A-Z])&quot;;&quot;$1_$2&quot;;&quot;g&quot;)); &quot;&quot;)" office:value-type="string" office:string-value="CUP3_REQUESTED_STATE" calcext:value-type="string">
            <text:p>CUP3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1]&lt;&gt;&quot;&quot;; UPPER(ORG.LIBREOFFICE.REGEX([.H21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21]=1; TYPE([.A21])=8); [.A21]+1; IF( OR([.A20]=1; TYPE([.A20])=8); [.A20]+1; 0))" office:value-type="float" office:value="16" calcext:value-type="float">
            <text:p>1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teady</text:p>
          </table:table-cell>
          <table:table-cell table:style-name="ce11" table:formula="of:=IF([.H22]&lt;&gt;&quot;&quot;; UPPER(ORG.LIBREOFFICE.REGEX([.H22];&quot;([a-z0-9])([A-Z])&quot;;&quot;$1_$2&quot;;&quot;g&quot;)); &quot;&quot;)" office:value-type="string" office:string-value="CUP1_STEADY" calcext:value-type="string">
            <text:p>CUP1_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heck whether the mechanism of the cup is in a transient state; true = steady state; false = transient state</text:p>
          </table:table-cell>
          <table:table-cell table:number-columns-repeated="16372"/>
        </table:table-row>
        <table:table-row table:style-name="ro1">
          <table:table-cell table:style-name="ce3" table:formula="of:=IF( OR([.A22]=1; TYPE([.A22])=8); [.A22]+1; IF( OR([.A21]=1; TYPE([.A21])=8); [.A21]+1; 0))" office:value-type="float" office:value="17" calcext:value-type="float">
            <text:p>1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teady</text:p>
          </table:table-cell>
          <table:table-cell table:style-name="ce11" table:formula="of:=IF([.H23]&lt;&gt;&quot;&quot;; UPPER(ORG.LIBREOFFICE.REGEX([.H23];&quot;([a-z0-9])([A-Z])&quot;;&quot;$1_$2&quot;;&quot;g&quot;)); &quot;&quot;)" office:value-type="string" office:string-value="CUP2_STEADY" calcext:value-type="string">
            <text:p>CUP2_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3]=1; TYPE([.A23])=8); [.A23]+1; IF( OR([.A22]=1; TYPE([.A22])=8); [.A22]+1; 0))" office:value-type="float" office:value="18" calcext:value-type="float">
            <text:p>18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teady</text:p>
          </table:table-cell>
          <table:table-cell table:style-name="ce11" table:formula="of:=IF([.H24]&lt;&gt;&quot;&quot;; UPPER(ORG.LIBREOFFICE.REGEX([.H24];&quot;([a-z0-9])([A-Z])&quot;;&quot;$1_$2&quot;;&quot;g&quot;)); &quot;&quot;)" office:value-type="string" office:string-value="CUP3_STEADY" calcext:value-type="string">
            <text:p>CUP3_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4]=1; TYPE([.A24])=8); [.A24]+1; IF( OR([.A23]=1; TYPE([.A23])=8); [.A23]+1; 0))" office:value-type="float" office:value="19" calcext:value-type="float">
            <text:p>1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Inserted</text:p>
          </table:table-cell>
          <table:table-cell table:style-name="ce11" table:formula="of:=IF([.H25]&lt;&gt;&quot;&quot;; UPPER(ORG.LIBREOFFICE.REGEX([.H25];&quot;([a-z0-9])([A-Z])&quot;;&quot;$1_$2&quot;;&quot;g&quot;)); &quot;&quot;)" office:value-type="string" office:string-value="CUP1_INSERTED" calcext:value-type="string">
            <text:p>CUP1_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tatus of the cup; true = inserted; false = withdrawn</text:p>
          </table:table-cell>
          <table:table-cell table:number-columns-repeated="16372"/>
        </table:table-row>
        <table:table-row table:style-name="ro1">
          <table:table-cell table:style-name="ce3" table:formula="of:=IF( OR([.A25]=1; TYPE([.A25])=8); [.A25]+1; IF( OR([.A24]=1; TYPE([.A24])=8); [.A24]+1; 0))" office:value-type="float" office:value="20" calcext:value-type="float">
            <text:p>20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Inserted</text:p>
          </table:table-cell>
          <table:table-cell table:style-name="ce11" table:formula="of:=IF([.H26]&lt;&gt;&quot;&quot;; UPPER(ORG.LIBREOFFICE.REGEX([.H26];&quot;([a-z0-9])([A-Z])&quot;;&quot;$1_$2&quot;;&quot;g&quot;)); &quot;&quot;)" office:value-type="string" office:string-value="CUP2_INSERTED" calcext:value-type="string">
            <text:p>CUP2_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6]=1; TYPE([.A26])=8); [.A26]+1; IF( OR([.A25]=1; TYPE([.A25])=8); [.A25]+1; 0))" office:value-type="float" office:value="21" calcext:value-type="float">
            <text:p>2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Inserted</text:p>
          </table:table-cell>
          <table:table-cell table:style-name="ce11" table:formula="of:=IF([.H27]&lt;&gt;&quot;&quot;; UPPER(ORG.LIBREOFFICE.REGEX([.H27];&quot;([a-z0-9])([A-Z])&quot;;&quot;$1_$2&quot;;&quot;g&quot;)); &quot;&quot;)" office:value-type="string" office:string-value="CUP3_INSERTED" calcext:value-type="string">
            <text:p>CUP3_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7]=1; TYPE([.A27])=8); [.A27]+1; IF( OR([.A26]=1; TYPE([.A26])=8); [.A26]+1; 0))" office:value-type="float" office:value="22" calcext:value-type="float">
            <text:p>2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1Control</text:p>
          </table:table-cell>
          <table:table-cell table:style-name="ce11" table:formula="of:=IF([.H28]&lt;&gt;&quot;&quot;; UPPER(ORG.LIBREOFFICE.REGEX([.H28];&quot;([a-z0-9])([A-Z])&quot;;&quot;$1_$2&quot;;&quot;g&quot;)); &quot;&quot;)" office:value-type="string" office:string-value="ACTUATOR1_CONTROL" calcext:value-type="string">
            <text:p>ACTUATOR1_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he logic state of the output controlling Faraday cup actuator</text:p>
          </table:table-cell>
          <table:table-cell table:number-columns-repeated="16372"/>
        </table:table-row>
        <table:table-row table:style-name="ro1">
          <table:table-cell table:style-name="ce3" table:formula="of:=IF( OR([.A28]=1; TYPE([.A28])=8); [.A28]+1; IF( OR([.A27]=1; TYPE([.A27])=8); [.A27]+1; 0))" office:value-type="float" office:value="23" calcext:value-type="float">
            <text:p>2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2Control</text:p>
          </table:table-cell>
          <table:table-cell table:style-name="ce11" table:formula="of:=IF([.H29]&lt;&gt;&quot;&quot;; UPPER(ORG.LIBREOFFICE.REGEX([.H29];&quot;([a-z0-9])([A-Z])&quot;;&quot;$1_$2&quot;;&quot;g&quot;)); &quot;&quot;)" office:value-type="string" office:string-value="ACTUATOR2_CONTROL" calcext:value-type="string">
            <text:p>ACTUATOR2_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9]=1; TYPE([.A29])=8); [.A29]+1; IF( OR([.A28]=1; TYPE([.A28])=8); [.A28]+1; 0))" office:value-type="float" office:value="24" calcext:value-type="float">
            <text:p>2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In</text:p>
          </table:table-cell>
          <table:table-cell table:style-name="ce11" table:formula="of:=IF([.H30]&lt;&gt;&quot;&quot;; UPPER(ORG.LIBREOFFICE.REGEX([.H30];&quot;([a-z0-9])([A-Z])&quot;;&quot;$1_$2&quot;;&quot;g&quot;)); &quot;&quot;)" office:value-type="string" office:string-value="ACTUATOR3_CONTROL_IN" calcext:value-type="string">
            <text:p>ACTUATOR3_CONTROL_IN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0]=1; TYPE([.A30])=8); [.A30]+1; IF( OR([.A29]=1; TYPE([.A29])=8); [.A29]+1; 0))" office:value-type="float" office:value="25" calcext:value-type="float">
            <text:p>2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Out</text:p>
          </table:table-cell>
          <table:table-cell table:style-name="ce11" table:formula="of:=IF([.H31]&lt;&gt;&quot;&quot;; UPPER(ORG.LIBREOFFICE.REGEX([.H31];&quot;([a-z0-9])([A-Z])&quot;;&quot;$1_$2&quot;;&quot;g&quot;)); &quot;&quot;)" office:value-type="string" office:string-value="ACTUATOR3_CONTROL_OUT" calcext:value-type="string">
            <text:p>ACTUATOR3_CONTROL_OUT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1]=1; TYPE([.A31])=8); [.A31]+1; IF( OR([.A30]=1; TYPE([.A30])=8); [.A30]+1; 0))" office:value-type="float" office:value="26" calcext:value-type="float">
            <text:p>2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Brake</text:p>
          </table:table-cell>
          <table:table-cell table:style-name="ce11" table:formula="of:=IF([.H32]&lt;&gt;&quot;&quot;; UPPER(ORG.LIBREOFFICE.REGEX([.H32];&quot;([a-z0-9])([A-Z])&quot;;&quot;$1_$2&quot;;&quot;g&quot;)); &quot;&quot;)" office:value-type="string" office:string-value="ACTUATOR3_CONTROL_BRAKE" calcext:value-type="string">
            <text:p>ACTUATOR3_CONTROL_BRAK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33]&lt;&gt;&quot;&quot;; UPPER(ORG.LIBREOFFICE.REGEX([.H33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/>
          <table:table-cell/>
          <table:table-cell table:style-name="ce10"/>
          <table:table-cell table:number-columns-repeated="5"/>
          <table:table-cell table:style-name="ce11" table:formula="of:=IF([.H34]&lt;&gt;&quot;&quot;; UPPER(ORG.LIBREOFFICE.REGEX([.H34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Code</text:p>
          </table:table-cell>
          <table:table-cell table:style-name="ce11" table:formula="of:=IF([.H35]&lt;&gt;&quot;&quot;; UPPER(ORG.LIBREOFFICE.REGEX([.H35];&quot;([a-z0-9])([A-Z])&quot;;&quot;$1_$2&quot;;&quot;g&quot;)); &quot;&quot;)" office:value-type="string" office:string-value="ERROR_CODE" calcext:value-type="string">
            <text:p>ERROR_CODE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Error code for the entire device (bitmap)</text:p>
          </table:table-cell>
          <table:table-cell table:number-columns-repeated="16372"/>
        </table:table-row>
        <table:table-row table:style-name="ro1">
          <table:table-cell table:style-name="ce3" table:formula="of:=[.A35]+1" office:value-type="float" office:value="1001" calcext:value-type="float">
            <text:p>100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tError</text:p>
          </table:table-cell>
          <table:table-cell table:style-name="ce11" table:formula="of:=IF([.H36]&lt;&gt;&quot;&quot;; UPPER(ORG.LIBREOFFICE.REGEX([.H36];&quot;([a-z0-9])([A-Z])&quot;;&quot;$1_$2&quot;;&quot;g&quot;)); &quot;&quot;)" office:value-type="string" office:string-value="LAST_ERROR" calcext:value-type="string">
            <text:p>LAST_ERROR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de of the last error</text:p>
          </table:table-cell>
          <table:table-cell table:number-columns-repeated="16372"/>
        </table:table-row>
        <table:table-row table:style-name="ro1">
          <table:table-cell table:style-name="ce3" table:formula="of:=IF( OR([.A36]=1; TYPE([.A36])=8); [.A36]+1; IF( OR([.A35]=1; TYPE([.A35])=8); [.A35]+1; 0))" office:value-type="float" office:value="1002" calcext:value-type="float">
            <text:p>100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Storage</text:p>
          </table:table-cell>
          <table:table-cell table:style-name="ce11" table:formula="of:=IF([.H37]&lt;&gt;&quot;&quot;; UPPER(ORG.LIBREOFFICE.REGEX([.H37];&quot;([a-z0-9])([A-Z])&quot;;&quot;$1_$2&quot;;&quot;g&quot;)); &quot;&quot;)" office:value-type="string" office:string-value="ERROR_STORAGE" calcext:value-type="string">
            <text:p>ERROR_STORAGE</text:p>
          </table:table-cell>
          <table:table-cell office:value-type="string" calcext:value-type="string">
            <text:p>MainFSM,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; can be reset via Modbus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38]&lt;&gt;&quot;&quot;; UPPER(ORG.LIBREOFFICE.REGEX([.H38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38]=1; TYPE([.A38])=8); [.A38]+1; IF( OR([.A37]=1; TYPE([.A37])=8); [.A37]+1; 0))" office:value-type="float" office:value="1003" calcext:value-type="float">
            <text:p>100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1</text:p>
          </table:table-cell>
          <table:table-cell table:style-name="ce11" table:formula="of:=IF([.H39]&lt;&gt;&quot;&quot;; UPPER(ORG.LIBREOFFICE.REGEX([.H39];&quot;([a-z0-9])([A-Z])&quot;;&quot;$1_$2&quot;;&quot;g&quot;)); &quot;&quot;)" office:value-type="string" office:string-value="TIME_LIMIT_INSERTING1" calcext:value-type="string">
            <text:p>TIME_LIMIT_INSERT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insert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39]=1; TYPE([.A39])=8); [.A39]+1; IF( OR([.A38]=1; TYPE([.A38])=8); [.A38]+1; 0))" office:value-type="float" office:value="1004" calcext:value-type="float">
            <text:p>100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2</text:p>
          </table:table-cell>
          <table:table-cell table:style-name="ce11" table:formula="of:=IF([.H40]&lt;&gt;&quot;&quot;; UPPER(ORG.LIBREOFFICE.REGEX([.H40];&quot;([a-z0-9])([A-Z])&quot;;&quot;$1_$2&quot;;&quot;g&quot;)); &quot;&quot;)" office:value-type="string" office:string-value="TIME_LIMIT_INSERTING2" calcext:value-type="string">
            <text:p>TIME_LIMIT_INSERT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0]=1; TYPE([.A40])=8); [.A40]+1; IF( OR([.A39]=1; TYPE([.A39])=8); [.A39]+1; 0))" office:value-type="float" office:value="1005" calcext:value-type="float">
            <text:p>100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imeLimitInserting3</text:p>
          </table:table-cell>
          <table:table-cell table:style-name="ce11" table:formula="of:=IF([.H41]&lt;&gt;&quot;&quot;; UPPER(ORG.LIBREOFFICE.REGEX([.H41];&quot;([a-z0-9])([A-Z])&quot;;&quot;$1_$2&quot;;&quot;g&quot;)); &quot;&quot;)" office:value-type="string" office:string-value="TIME_LIMIT_INSERTING3" calcext:value-type="string">
            <text:p>TIME_LIMIT_INSERT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1]=1; TYPE([.A41])=8); [.A41]+1; IF( OR([.A40]=1; TYPE([.A40])=8); [.A40]+1; 0))" office:value-type="float" office:value="1006" calcext:value-type="float">
            <text:p>100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LimitWithdrawing1</text:p>
          </table:table-cell>
          <table:table-cell table:style-name="ce11" table:formula="of:=IF([.H42]&lt;&gt;&quot;&quot;; UPPER(ORG.LIBREOFFICE.REGEX([.H42];&quot;([a-z0-9])([A-Z])&quot;;&quot;$1_$2&quot;;&quot;g&quot;)); &quot;&quot;)" office:value-type="string" office:string-value="TIME_LIMIT_WITHDRAWING1" calcext:value-type="string">
            <text:p>TIME_LIMIT_WITHDRAW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withdraw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42]=1; TYPE([.A42])=8); [.A42]+1; IF( OR([.A41]=1; TYPE([.A41])=8); [.A41]+1; 0))" office:value-type="float" office:value="1007" calcext:value-type="float">
            <text:p>100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LimitWithdrawing2</text:p>
          </table:table-cell>
          <table:table-cell table:style-name="ce11" table:formula="of:=IF([.H43]&lt;&gt;&quot;&quot;; UPPER(ORG.LIBREOFFICE.REGEX([.H43];&quot;([a-z0-9])([A-Z])&quot;;&quot;$1_$2&quot;;&quot;g&quot;)); &quot;&quot;)" office:value-type="string" office:string-value="TIME_LIMIT_WITHDRAWING2" calcext:value-type="string">
            <text:p>TIME_LIMIT_WITHDRAW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3]=1; TYPE([.A43])=8); [.A43]+1; IF( OR([.A42]=1; TYPE([.A42])=8); [.A42]+1; 0))" office:value-type="float" office:value="1008" calcext:value-type="float">
            <text:p>100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TimeLimitWithdrawing3</text:p>
          </table:table-cell>
          <table:table-cell table:style-name="ce11" table:formula="of:=IF([.H44]&lt;&gt;&quot;&quot;; UPPER(ORG.LIBREOFFICE.REGEX([.H44];&quot;([a-z0-9])([A-Z])&quot;;&quot;$1_$2&quot;;&quot;g&quot;)); &quot;&quot;)" office:value-type="string" office:string-value="TIME_LIMIT_WITHDRAWING3" calcext:value-type="string">
            <text:p>TIME_LIMIT_WITHDRAW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45]&lt;&gt;&quot;&quot;; UPPER(ORG.LIBREOFFICE.REGEX([.H45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45]=1; TYPE([.A45])=8); [.A45]+1; IF( OR([.A44]=1; TYPE([.A44])=8); [.A44]+1; 0))" office:value-type="float" office:value="1009" calcext:value-type="float">
            <text:p>100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Cup</text:p>
          </table:table-cell>
          <table:table-cell table:style-name="ce11" table:formula="of:=IF([.H46]&lt;&gt;&quot;&quot;; UPPER(ORG.LIBREOFFICE.REGEX([.H46];&quot;([a-z0-9])([A-Z])&quot;;&quot;$1_$2&quot;;&quot;g&quot;)); &quot;&quot;)" office:value-type="string" office:string-value="ACTIVE_CUP" calcext:value-type="string">
            <text:p>ACTIVE_CUP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The first inserted Faraday cup as seen from the ion source side; if none is inserted, the previous value should be retained; 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47]&lt;&gt;&quot;&quot;; UPPER(ORG.LIBREOFFICE.REGEX([.H4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47]=1; TYPE([.A47])=8); [.A47]+1; IF( OR([.A46]=1; TYPE([.A46])=8); [.A46]+1; 0))" office:value-type="float" office:value="1010" calcext:value-type="float">
            <text:p>101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</text:p>
          </table:table-cell>
          <table:table-cell table:style-name="ce11" table:formula="of:=IF([.H48]&lt;&gt;&quot;&quot;; UPPER(ORG.LIBREOFFICE.REGEX([.H48];&quot;([a-z0-9])([A-Z])&quot;;&quot;$1_$2&quot;;&quot;g&quot;)); &quot;&quot;)" office:value-type="string" office:string-value="CUP1_ERROR" calcext:value-type="string">
            <text:p>CUP1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Error code for the cup mechanism (bitmap)</text:p>
          </table:table-cell>
          <table:table-cell table:number-columns-repeated="16372"/>
        </table:table-row>
        <table:table-row table:style-name="ro1">
          <table:table-cell table:style-name="ce3" table:formula="of:=IF( OR([.A48]=1; TYPE([.A48])=8); [.A48]+1; IF( OR([.A47]=1; TYPE([.A47])=8); [.A47]+1; 0))" office:value-type="float" office:value="1011" calcext:value-type="float">
            <text:p>101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</text:p>
          </table:table-cell>
          <table:table-cell table:style-name="ce11" table:formula="of:=IF([.H49]&lt;&gt;&quot;&quot;; UPPER(ORG.LIBREOFFICE.REGEX([.H49];&quot;([a-z0-9])([A-Z])&quot;;&quot;$1_$2&quot;;&quot;g&quot;)); &quot;&quot;)" office:value-type="string" office:string-value="CUP2_ERROR" calcext:value-type="string">
            <text:p>CUP2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9]=1; TYPE([.A49])=8); [.A49]+1; IF( OR([.A48]=1; TYPE([.A48])=8); [.A48]+1; 0))" office:value-type="float" office:value="1012" calcext:value-type="float">
            <text:p>101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</text:p>
          </table:table-cell>
          <table:table-cell table:style-name="ce11" table:formula="of:=IF([.H50]&lt;&gt;&quot;&quot;; UPPER(ORG.LIBREOFFICE.REGEX([.H50];&quot;([a-z0-9])([A-Z])&quot;;&quot;$1_$2&quot;;&quot;g&quot;)); &quot;&quot;)" office:value-type="string" office:string-value="CUP3_ERROR" calcext:value-type="string">
            <text:p>CUP3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0]=1; TYPE([.A50])=8); [.A50]+1; IF( OR([.A49]=1; TYPE([.A49])=8); [.A49]+1; 0))" office:value-type="float" office:value="1013" calcext:value-type="float">
            <text:p>101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LastError</text:p>
          </table:table-cell>
          <table:table-cell table:style-name="ce11" table:formula="of:=IF([.H51]&lt;&gt;&quot;&quot;; UPPER(ORG.LIBREOFFICE.REGEX([.H51];&quot;([a-z0-9])([A-Z])&quot;;&quot;$1_$2&quot;;&quot;g&quot;)); &quot;&quot;)" office:value-type="string" office:string-value="CUP1_LAST_ERROR" calcext:value-type="string">
            <text:p>CUP1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de of the last error for the cup mechanism</text:p>
          </table:table-cell>
          <table:table-cell table:number-columns-repeated="16372"/>
        </table:table-row>
        <table:table-row table:style-name="ro1">
          <table:table-cell table:style-name="ce3" table:formula="of:=IF( OR([.A51]=1; TYPE([.A51])=8); [.A51]+1; IF( OR([.A50]=1; TYPE([.A50])=8); [.A50]+1; 0))" office:value-type="float" office:value="1014" calcext:value-type="float">
            <text:p>101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LastError</text:p>
          </table:table-cell>
          <table:table-cell table:style-name="ce11" table:formula="of:=IF([.H52]&lt;&gt;&quot;&quot;; UPPER(ORG.LIBREOFFICE.REGEX([.H52];&quot;([a-z0-9])([A-Z])&quot;;&quot;$1_$2&quot;;&quot;g&quot;)); &quot;&quot;)" office:value-type="string" office:string-value="CUP2_LAST_ERROR" calcext:value-type="string">
            <text:p>CUP2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2]=1; TYPE([.A52])=8); [.A52]+1; IF( OR([.A51]=1; TYPE([.A51])=8); [.A51]+1; 0))" office:value-type="float" office:value="1015" calcext:value-type="float">
            <text:p>101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LastError</text:p>
          </table:table-cell>
          <table:table-cell table:style-name="ce11" table:formula="of:=IF([.H53]&lt;&gt;&quot;&quot;; UPPER(ORG.LIBREOFFICE.REGEX([.H53];&quot;([a-z0-9])([A-Z])&quot;;&quot;$1_$2&quot;;&quot;g&quot;)); &quot;&quot;)" office:value-type="string" office:string-value="CUP3_LAST_ERROR" calcext:value-type="string">
            <text:p>CUP3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3]=1; TYPE([.A53])=8); [.A53]+1; IF( OR([.A52]=1; TYPE([.A52])=8); [.A52]+1; 0))" office:value-type="float" office:value="1016" calcext:value-type="float">
            <text:p>101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Storage</text:p>
          </table:table-cell>
          <table:table-cell table:style-name="ce11" table:formula="of:=IF([.H54]&lt;&gt;&quot;&quot;; UPPER(ORG.LIBREOFFICE.REGEX([.H54];&quot;([a-z0-9])([A-Z])&quot;;&quot;$1_$2&quot;;&quot;g&quot;)); &quot;&quot;)" office:value-type="string" office:string-value="CUP1_ERROR_STORAGE" calcext:value-type="string">
            <text:p>CUP1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 for the cup mechanism; can be reset via Modbus</text:p>
          </table:table-cell>
          <table:table-cell table:number-columns-repeated="16372"/>
        </table:table-row>
        <table:table-row table:style-name="ro1">
          <table:table-cell table:style-name="ce3" table:formula="of:=IF( OR([.A54]=1; TYPE([.A54])=8); [.A54]+1; IF( OR([.A53]=1; TYPE([.A53])=8); [.A53]+1; 0))" office:value-type="float" office:value="1017" calcext:value-type="float">
            <text:p>101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Storage</text:p>
          </table:table-cell>
          <table:table-cell table:style-name="ce11" table:formula="of:=IF([.H55]&lt;&gt;&quot;&quot;; UPPER(ORG.LIBREOFFICE.REGEX([.H55];&quot;([a-z0-9])([A-Z])&quot;;&quot;$1_$2&quot;;&quot;g&quot;)); &quot;&quot;)" office:value-type="string" office:string-value="CUP2_ERROR_STORAGE" calcext:value-type="string">
            <text:p>CUP2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5]=1; TYPE([.A55])=8); [.A55]+1; IF( OR([.A54]=1; TYPE([.A54])=8); [.A54]+1; 0))" office:value-type="float" office:value="1018" calcext:value-type="float">
            <text:p>101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Storage</text:p>
          </table:table-cell>
          <table:table-cell table:style-name="ce11" table:formula="of:=IF([.H56]&lt;&gt;&quot;&quot;; UPPER(ORG.LIBREOFFICE.REGEX([.H56];&quot;([a-z0-9])([A-Z])&quot;;&quot;$1_$2&quot;;&quot;g&quot;)); &quot;&quot;)" office:value-type="string" office:string-value="CUP3_ERROR_STORAGE" calcext:value-type="string">
            <text:p>CUP3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57]&lt;&gt;&quot;&quot;; UPPER(ORG.LIBREOFFICE.REGEX([.H5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57]=1; TYPE([.A57])=8); [.A57]+1; IF( OR([.A56]=1; TYPE([.A56])=8); [.A56]+1; 0))" office:value-type="float" office:value="1019" calcext:value-type="float">
            <text:p>101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Cups</text:p>
          </table:table-cell>
          <table:table-cell table:style-name="ce11" table:formula="of:=IF([.H58]&lt;&gt;&quot;&quot;; UPPER(ORG.LIBREOFFICE.REGEX([.H58];&quot;([a-z0-9])([A-Z])&quot;;&quot;$1_$2&quot;;&quot;g&quot;)); &quot;&quot;)" office:value-type="string" office:string-value="INSTALLED_CUPS" calcext:value-type="string">
            <text:p>INSTALLED_CUP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Faraday cups to be used</text:p>
          </table:table-cell>
          <table:table-cell table:number-columns-repeated="16372"/>
        </table:table-row>
        <table:table-row table:style-name="ro1">
          <table:table-cell table:style-name="ce3" table:formula="of:=IF( OR([.A58]=1; TYPE([.A58])=8); [.A58]+1; IF( OR([.A57]=1; TYPE([.A57])=8); [.A57]+1; 0))" office:value-type="float" office:value="1020" calcext:value-type="float">
            <text:p>102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1</text:p>
          </table:table-cell>
          <table:table-cell table:style-name="ce11" table:formula="of:=IF([.H59]&lt;&gt;&quot;&quot;; UPPER(ORG.LIBREOFFICE.REGEX([.H59];&quot;([a-z0-9])([A-Z])&quot;;&quot;$1_$2&quot;;&quot;g&quot;)); &quot;&quot;)" office:value-type="string" office:string-value="ELECTRODES_CUP1" calcext:value-type="string">
            <text:p>ELECTRODES_CUP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electrodes installed in the Faraday cup</text:p>
          </table:table-cell>
          <table:table-cell table:number-columns-repeated="16372"/>
        </table:table-row>
        <table:table-row table:style-name="ro1">
          <table:table-cell table:style-name="ce3" table:formula="of:=IF( OR([.A59]=1; TYPE([.A59])=8); [.A59]+1; IF( OR([.A58]=1; TYPE([.A58])=8); [.A58]+1; 0))" office:value-type="float" office:value="1021" calcext:value-type="float">
            <text:p>102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2</text:p>
          </table:table-cell>
          <table:table-cell table:style-name="ce11" table:formula="of:=IF([.H60]&lt;&gt;&quot;&quot;; UPPER(ORG.LIBREOFFICE.REGEX([.H60];&quot;([a-z0-9])([A-Z])&quot;;&quot;$1_$2&quot;;&quot;g&quot;)); &quot;&quot;)" office:value-type="string" office:string-value="ELECTRODES_CUP2" calcext:value-type="string">
            <text:p>ELECTRODES_CUP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0]=1; TYPE([.A60])=8); [.A60]+1; IF( OR([.A59]=1; TYPE([.A59])=8); [.A59]+1; 0))" office:value-type="float" office:value="1022" calcext:value-type="float">
            <text:p>102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3</text:p>
          </table:table-cell>
          <table:table-cell table:style-name="ce11" table:formula="of:=IF([.H61]&lt;&gt;&quot;&quot;; UPPER(ORG.LIBREOFFICE.REGEX([.H61];&quot;([a-z0-9])([A-Z])&quot;;&quot;$1_$2&quot;;&quot;g&quot;)); &quot;&quot;)" office:value-type="string" office:string-value="ELECTRODES_CUP3" calcext:value-type="string">
            <text:p>ELECTRODES_CUP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1]=1; TYPE([.A61])=8); [.A61]+1; IF( OR([.A60]=1; TYPE([.A60])=8); [.A60]+1; 0))" office:value-type="float" office:value="1023" calcext:value-type="float">
            <text:p>102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Type</text:p>
          </table:table-cell>
          <table:table-cell table:style-name="ce11" table:formula="of:=IF([.H62]&lt;&gt;&quot;&quot;; UPPER(ORG.LIBREOFFICE.REGEX([.H62];&quot;([a-z0-9])([A-Z])&quot;;&quot;$1_$2&quot;;&quot;g&quot;)); &quot;&quot;)" office:value-type="string" office:string-value="CUP1_TYPE" calcext:value-type="string">
            <text:p>CUP1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ype of the Faraday cup; 0 = pneumatic mechanism with 1 limit switch; 1 = motor mechnism with 2 limit switches</text:p>
          </table:table-cell>
          <table:table-cell table:number-columns-repeated="16372"/>
        </table:table-row>
        <table:table-row table:style-name="ro1">
          <table:table-cell table:style-name="ce3" table:formula="of:=IF( OR([.A62]=1; TYPE([.A62])=8); [.A62]+1; IF( OR([.A61]=1; TYPE([.A61])=8); [.A61]+1; 0))" office:value-type="float" office:value="1024" calcext:value-type="float">
            <text:p>102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Type</text:p>
          </table:table-cell>
          <table:table-cell table:style-name="ce11" table:formula="of:=IF([.H63]&lt;&gt;&quot;&quot;; UPPER(ORG.LIBREOFFICE.REGEX([.H63];&quot;([a-z0-9])([A-Z])&quot;;&quot;$1_$2&quot;;&quot;g&quot;)); &quot;&quot;)" office:value-type="string" office:string-value="CUP2_TYPE" calcext:value-type="string">
            <text:p>CUP2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3]=1; TYPE([.A63])=8); [.A63]+1; IF( OR([.A62]=1; TYPE([.A62])=8); [.A62]+1; 0))" office:value-type="float" office:value="1025" calcext:value-type="float">
            <text:p>102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p3Type</text:p>
          </table:table-cell>
          <table:table-cell table:style-name="ce11" table:formula="of:=IF([.H64]&lt;&gt;&quot;&quot;; UPPER(ORG.LIBREOFFICE.REGEX([.H64];&quot;([a-z0-9])([A-Z])&quot;;&quot;$1_$2&quot;;&quot;g&quot;)); &quot;&quot;)" office:value-type="string" office:string-value="CUP3_TYPE" calcext:value-type="string">
            <text:p>CUP3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65]&lt;&gt;&quot;&quot;; UPPER(ORG.LIBREOFFICE.REGEX([.H65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65]=1; TYPE([.A65])=8); [.A65]+1; IF( OR([.A64]=1; TYPE([.A64])=8); [.A64]+1; 0))" office:value-type="float" office:value="1026" calcext:value-type="float">
            <text:p>102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Gain1Offset</text:p>
          </table:table-cell>
          <table:table-cell table:style-name="ce11" table:formula="of:=IF([.H66]&lt;&gt;&quot;&quot;; UPPER(ORG.LIBREOFFICE.REGEX([.H66];&quot;([a-z0-9])([A-Z])&quot;;&quot;$1_$2&quot;;&quot;g&quot;)); &quot;&quot;)" office:value-type="string" office:string-value="CUP1_CHANNEL1_GAIN1_OFFSET" calcext:value-type="string">
            <text:p>CUP1_CHANNEL1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; Gain1 applies to ADC0 (high-gain signal); unit: 10nA</text:p>
          </table:table-cell>
          <table:table-cell table:number-columns-repeated="16372"/>
        </table:table-row>
        <table:table-row table:style-name="ro1">
          <table:table-cell table:style-name="ce3" table:formula="of:=IF( OR([.A66]=1; TYPE([.A66])=8); [.A66]+1; IF( OR([.A65]=1; TYPE([.A65])=8); [.A65]+1; 0))" office:value-type="float" office:value="1027" calcext:value-type="float">
            <text:p>102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Gain1Offset</text:p>
          </table:table-cell>
          <table:table-cell table:style-name="ce11" table:formula="of:=IF([.H67]&lt;&gt;&quot;&quot;; UPPER(ORG.LIBREOFFICE.REGEX([.H67];&quot;([a-z0-9])([A-Z])&quot;;&quot;$1_$2&quot;;&quot;g&quot;)); &quot;&quot;)" office:value-type="string" office:string-value="CUP1_CHANNEL2_GAIN1_OFFSET" calcext:value-type="string">
            <text:p>CUP1_CHANNEL2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7]=1; TYPE([.A67])=8); [.A67]+1; IF( OR([.A66]=1; TYPE([.A66])=8); [.A66]+1; 0))" office:value-type="float" office:value="1028" calcext:value-type="float">
            <text:p>102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Gain1Offset</text:p>
          </table:table-cell>
          <table:table-cell table:style-name="ce11" table:formula="of:=IF([.H68]&lt;&gt;&quot;&quot;; UPPER(ORG.LIBREOFFICE.REGEX([.H68];&quot;([a-z0-9])([A-Z])&quot;;&quot;$1_$2&quot;;&quot;g&quot;)); &quot;&quot;)" office:value-type="string" office:string-value="CUP1_CHANNEL3_GAIN1_OFFSET" calcext:value-type="string">
            <text:p>CUP1_CHANNEL3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8]=1; TYPE([.A68])=8); [.A68]+1; IF( OR([.A67]=1; TYPE([.A67])=8); [.A67]+1; 0))" office:value-type="float" office:value="1029" calcext:value-type="float">
            <text:p>102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Gain1Offset</text:p>
          </table:table-cell>
          <table:table-cell table:style-name="ce11" table:formula="of:=IF([.H69]&lt;&gt;&quot;&quot;; UPPER(ORG.LIBREOFFICE.REGEX([.H69];&quot;([a-z0-9])([A-Z])&quot;;&quot;$1_$2&quot;;&quot;g&quot;)); &quot;&quot;)" office:value-type="string" office:string-value="CUP1_CHANNEL4_GAIN1_OFFSET" calcext:value-type="string">
            <text:p>CUP1_CHANNEL4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9]=1; TYPE([.A69])=8); [.A69]+1; IF( OR([.A68]=1; TYPE([.A68])=8); [.A68]+1; 0))" office:value-type="float" office:value="1030" calcext:value-type="float">
            <text:p>103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Gain1Offset</text:p>
          </table:table-cell>
          <table:table-cell table:style-name="ce11" table:formula="of:=IF([.H70]&lt;&gt;&quot;&quot;; UPPER(ORG.LIBREOFFICE.REGEX([.H70];&quot;([a-z0-9])([A-Z])&quot;;&quot;$1_$2&quot;;&quot;g&quot;)); &quot;&quot;)" office:value-type="string" office:string-value="CUP2_CHANNEL1_GAIN1_OFFSET" calcext:value-type="string">
            <text:p>CUP2_CHANNEL1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0]=1; TYPE([.A70])=8); [.A70]+1; IF( OR([.A69]=1; TYPE([.A69])=8); [.A69]+1; 0))" office:value-type="float" office:value="1031" calcext:value-type="float">
            <text:p>103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Gain1Offset</text:p>
          </table:table-cell>
          <table:table-cell table:style-name="ce11" table:formula="of:=IF([.H71]&lt;&gt;&quot;&quot;; UPPER(ORG.LIBREOFFICE.REGEX([.H71];&quot;([a-z0-9])([A-Z])&quot;;&quot;$1_$2&quot;;&quot;g&quot;)); &quot;&quot;)" office:value-type="string" office:string-value="CUP2_CHANNEL2_GAIN1_OFFSET" calcext:value-type="string">
            <text:p>CUP2_CHANNEL2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1]=1; TYPE([.A71])=8); [.A71]+1; IF( OR([.A70]=1; TYPE([.A70])=8); [.A70]+1; 0))" office:value-type="float" office:value="1032" calcext:value-type="float">
            <text:p>103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Gain1Offset</text:p>
          </table:table-cell>
          <table:table-cell table:style-name="ce11" table:formula="of:=IF([.H72]&lt;&gt;&quot;&quot;; UPPER(ORG.LIBREOFFICE.REGEX([.H72];&quot;([a-z0-9])([A-Z])&quot;;&quot;$1_$2&quot;;&quot;g&quot;)); &quot;&quot;)" office:value-type="string" office:string-value="CUP2_CHANNEL3_GAIN1_OFFSET" calcext:value-type="string">
            <text:p>CUP2_CHANNEL3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2]=1; TYPE([.A72])=8); [.A72]+1; IF( OR([.A71]=1; TYPE([.A71])=8); [.A71]+1; 0))" office:value-type="float" office:value="1033" calcext:value-type="float">
            <text:p>103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Gain1Offset</text:p>
          </table:table-cell>
          <table:table-cell table:style-name="ce11" table:formula="of:=IF([.H73]&lt;&gt;&quot;&quot;; UPPER(ORG.LIBREOFFICE.REGEX([.H73];&quot;([a-z0-9])([A-Z])&quot;;&quot;$1_$2&quot;;&quot;g&quot;)); &quot;&quot;)" office:value-type="string" office:string-value="CUP2_CHANNEL4_GAIN1_OFFSET" calcext:value-type="string">
            <text:p>CUP2_CHANNEL4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3]=1; TYPE([.A73])=8); [.A73]+1; IF( OR([.A72]=1; TYPE([.A72])=8); [.A72]+1; 0))" office:value-type="float" office:value="1034" calcext:value-type="float">
            <text:p>103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Gain1Offset</text:p>
          </table:table-cell>
          <table:table-cell table:style-name="ce11" table:formula="of:=IF([.H74]&lt;&gt;&quot;&quot;; UPPER(ORG.LIBREOFFICE.REGEX([.H74];&quot;([a-z0-9])([A-Z])&quot;;&quot;$1_$2&quot;;&quot;g&quot;)); &quot;&quot;)" office:value-type="string" office:string-value="CUP3_CHANNEL1_GAIN1_OFFSET" calcext:value-type="string">
            <text:p>CUP3_CHANNEL1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4]=1; TYPE([.A74])=8); [.A74]+1; IF( OR([.A73]=1; TYPE([.A73])=8); [.A73]+1; 0))" office:value-type="float" office:value="1035" calcext:value-type="float">
            <text:p>103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Gain1Offset</text:p>
          </table:table-cell>
          <table:table-cell table:style-name="ce11" table:formula="of:=IF([.H75]&lt;&gt;&quot;&quot;; UPPER(ORG.LIBREOFFICE.REGEX([.H75];&quot;([a-z0-9])([A-Z])&quot;;&quot;$1_$2&quot;;&quot;g&quot;)); &quot;&quot;)" office:value-type="string" office:string-value="CUP3_CHANNEL2_GAIN1_OFFSET" calcext:value-type="string">
            <text:p>CUP3_CHANNEL2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5]=1; TYPE([.A75])=8); [.A75]+1; IF( OR([.A74]=1; TYPE([.A74])=8); [.A74]+1; 0))" office:value-type="float" office:value="1036" calcext:value-type="float">
            <text:p>103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Gain1Offset</text:p>
          </table:table-cell>
          <table:table-cell table:style-name="ce11" table:formula="of:=IF([.H76]&lt;&gt;&quot;&quot;; UPPER(ORG.LIBREOFFICE.REGEX([.H76];&quot;([a-z0-9])([A-Z])&quot;;&quot;$1_$2&quot;;&quot;g&quot;)); &quot;&quot;)" office:value-type="string" office:string-value="CUP3_CHANNEL3_GAIN1_OFFSET" calcext:value-type="string">
            <text:p>CUP3_CHANNEL3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6]=1; TYPE([.A76])=8); [.A76]+1; IF( OR([.A75]=1; TYPE([.A75])=8); [.A75]+1; 0))" office:value-type="float" office:value="1037" calcext:value-type="float">
            <text:p>103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Gain1Offset</text:p>
          </table:table-cell>
          <table:table-cell table:style-name="ce11" table:formula="of:=IF([.H77]&lt;&gt;&quot;&quot;; UPPER(ORG.LIBREOFFICE.REGEX([.H77];&quot;([a-z0-9])([A-Z])&quot;;&quot;$1_$2&quot;;&quot;g&quot;)); &quot;&quot;)" office:value-type="string" office:string-value="CUP3_CHANNEL4_GAIN1_OFFSET" calcext:value-type="string">
            <text:p>CUP3_CHANNEL4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7]=1; TYPE([.A77])=8); [.A77]+1; IF( OR([.A76]=1; TYPE([.A76])=8); [.A76]+1; 0))" office:value-type="float" office:value="1038" calcext:value-type="float">
            <text:p>103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Gain2Offset</text:p>
          </table:table-cell>
          <table:table-cell table:style-name="ce11" table:formula="of:=IF([.H78]&lt;&gt;&quot;&quot;; UPPER(ORG.LIBREOFFICE.REGEX([.H78];&quot;([a-z0-9])([A-Z])&quot;;&quot;$1_$2&quot;;&quot;g&quot;)); &quot;&quot;)" office:value-type="string" office:string-value="CUP1_CHANNEL1_GAIN2_OFFSET" calcext:value-type="string">
            <text:p>CUP1_CHANNEL1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 Gain2 applies to ADC1 (low-gain signal); unit: 10nA</text:p>
          </table:table-cell>
          <table:table-cell table:number-columns-repeated="16372"/>
        </table:table-row>
        <table:table-row table:style-name="ro1">
          <table:table-cell table:style-name="ce3" table:formula="of:=IF( OR([.A78]=1; TYPE([.A78])=8); [.A78]+1; IF( OR([.A77]=1; TYPE([.A77])=8); [.A77]+1; 0))" office:value-type="float" office:value="1039" calcext:value-type="float">
            <text:p>103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Gain2Offset</text:p>
          </table:table-cell>
          <table:table-cell table:style-name="ce11" table:formula="of:=IF([.H79]&lt;&gt;&quot;&quot;; UPPER(ORG.LIBREOFFICE.REGEX([.H79];&quot;([a-z0-9])([A-Z])&quot;;&quot;$1_$2&quot;;&quot;g&quot;)); &quot;&quot;)" office:value-type="string" office:string-value="CUP1_CHANNEL2_GAIN2_OFFSET" calcext:value-type="string">
            <text:p>CUP1_CHANNEL2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9]=1; TYPE([.A79])=8); [.A79]+1; IF( OR([.A78]=1; TYPE([.A78])=8); [.A78]+1; 0))" office:value-type="float" office:value="1040" calcext:value-type="float">
            <text:p>104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Gain2Offset</text:p>
          </table:table-cell>
          <table:table-cell table:style-name="ce11" table:formula="of:=IF([.H80]&lt;&gt;&quot;&quot;; UPPER(ORG.LIBREOFFICE.REGEX([.H80];&quot;([a-z0-9])([A-Z])&quot;;&quot;$1_$2&quot;;&quot;g&quot;)); &quot;&quot;)" office:value-type="string" office:string-value="CUP1_CHANNEL3_GAIN2_OFFSET" calcext:value-type="string">
            <text:p>CUP1_CHANNEL3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0]=1; TYPE([.A80])=8); [.A80]+1; IF( OR([.A79]=1; TYPE([.A79])=8); [.A79]+1; 0))" office:value-type="float" office:value="1041" calcext:value-type="float">
            <text:p>104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Gain2Offset</text:p>
          </table:table-cell>
          <table:table-cell table:style-name="ce11" table:formula="of:=IF([.H81]&lt;&gt;&quot;&quot;; UPPER(ORG.LIBREOFFICE.REGEX([.H81];&quot;([a-z0-9])([A-Z])&quot;;&quot;$1_$2&quot;;&quot;g&quot;)); &quot;&quot;)" office:value-type="string" office:string-value="CUP1_CHANNEL4_GAIN2_OFFSET" calcext:value-type="string">
            <text:p>CUP1_CHANNEL4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1]=1; TYPE([.A81])=8); [.A81]+1; IF( OR([.A80]=1; TYPE([.A80])=8); [.A80]+1; 0))" office:value-type="float" office:value="1042" calcext:value-type="float">
            <text:p>104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Gain2Offset</text:p>
          </table:table-cell>
          <table:table-cell table:style-name="ce11" table:formula="of:=IF([.H82]&lt;&gt;&quot;&quot;; UPPER(ORG.LIBREOFFICE.REGEX([.H82];&quot;([a-z0-9])([A-Z])&quot;;&quot;$1_$2&quot;;&quot;g&quot;)); &quot;&quot;)" office:value-type="string" office:string-value="CUP2_CHANNEL1_GAIN2_OFFSET" calcext:value-type="string">
            <text:p>CUP2_CHANNEL1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2]=1; TYPE([.A82])=8); [.A82]+1; IF( OR([.A81]=1; TYPE([.A81])=8); [.A81]+1; 0))" office:value-type="float" office:value="1043" calcext:value-type="float">
            <text:p>104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Gain2Offset</text:p>
          </table:table-cell>
          <table:table-cell table:style-name="ce11" table:formula="of:=IF([.H83]&lt;&gt;&quot;&quot;; UPPER(ORG.LIBREOFFICE.REGEX([.H83];&quot;([a-z0-9])([A-Z])&quot;;&quot;$1_$2&quot;;&quot;g&quot;)); &quot;&quot;)" office:value-type="string" office:string-value="CUP2_CHANNEL2_GAIN2_OFFSET" calcext:value-type="string">
            <text:p>CUP2_CHANNEL2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3]=1; TYPE([.A83])=8); [.A83]+1; IF( OR([.A82]=1; TYPE([.A82])=8); [.A82]+1; 0))" office:value-type="float" office:value="1044" calcext:value-type="float">
            <text:p>104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Gain2Offset</text:p>
          </table:table-cell>
          <table:table-cell table:style-name="ce11" table:formula="of:=IF([.H84]&lt;&gt;&quot;&quot;; UPPER(ORG.LIBREOFFICE.REGEX([.H84];&quot;([a-z0-9])([A-Z])&quot;;&quot;$1_$2&quot;;&quot;g&quot;)); &quot;&quot;)" office:value-type="string" office:string-value="CUP2_CHANNEL3_GAIN2_OFFSET" calcext:value-type="string">
            <text:p>CUP2_CHANNEL3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4]=1; TYPE([.A84])=8); [.A84]+1; IF( OR([.A83]=1; TYPE([.A83])=8); [.A83]+1; 0))" office:value-type="float" office:value="1045" calcext:value-type="float">
            <text:p>104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Gain2Offset</text:p>
          </table:table-cell>
          <table:table-cell table:style-name="ce11" table:formula="of:=IF([.H85]&lt;&gt;&quot;&quot;; UPPER(ORG.LIBREOFFICE.REGEX([.H85];&quot;([a-z0-9])([A-Z])&quot;;&quot;$1_$2&quot;;&quot;g&quot;)); &quot;&quot;)" office:value-type="string" office:string-value="CUP2_CHANNEL4_GAIN2_OFFSET" calcext:value-type="string">
            <text:p>CUP2_CHANNEL4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5]=1; TYPE([.A85])=8); [.A85]+1; IF( OR([.A84]=1; TYPE([.A84])=8); [.A84]+1; 0))" office:value-type="float" office:value="1046" calcext:value-type="float">
            <text:p>104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Gain2Offset</text:p>
          </table:table-cell>
          <table:table-cell table:style-name="ce11" table:formula="of:=IF([.H86]&lt;&gt;&quot;&quot;; UPPER(ORG.LIBREOFFICE.REGEX([.H86];&quot;([a-z0-9])([A-Z])&quot;;&quot;$1_$2&quot;;&quot;g&quot;)); &quot;&quot;)" office:value-type="string" office:string-value="CUP3_CHANNEL1_GAIN2_OFFSET" calcext:value-type="string">
            <text:p>CUP3_CHANNEL1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6]=1; TYPE([.A86])=8); [.A86]+1; IF( OR([.A85]=1; TYPE([.A85])=8); [.A85]+1; 0))" office:value-type="float" office:value="1047" calcext:value-type="float">
            <text:p>104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Gain2Offset</text:p>
          </table:table-cell>
          <table:table-cell table:style-name="ce11" table:formula="of:=IF([.H87]&lt;&gt;&quot;&quot;; UPPER(ORG.LIBREOFFICE.REGEX([.H87];&quot;([a-z0-9])([A-Z])&quot;;&quot;$1_$2&quot;;&quot;g&quot;)); &quot;&quot;)" office:value-type="string" office:string-value="CUP3_CHANNEL2_GAIN2_OFFSET" calcext:value-type="string">
            <text:p>CUP3_CHANNEL2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7]=1; TYPE([.A87])=8); [.A87]+1; IF( OR([.A86]=1; TYPE([.A86])=8); [.A86]+1; 0))" office:value-type="float" office:value="1048" calcext:value-type="float">
            <text:p>104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Gain2Offset</text:p>
          </table:table-cell>
          <table:table-cell table:style-name="ce11" table:formula="of:=IF([.H88]&lt;&gt;&quot;&quot;; UPPER(ORG.LIBREOFFICE.REGEX([.H88];&quot;([a-z0-9])([A-Z])&quot;;&quot;$1_$2&quot;;&quot;g&quot;)); &quot;&quot;)" office:value-type="string" office:string-value="CUP3_CHANNEL3_GAIN2_OFFSET" calcext:value-type="string">
            <text:p>CUP3_CHANNEL3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8]=1; TYPE([.A88])=8); [.A88]+1; IF( OR([.A87]=1; TYPE([.A87])=8); [.A87]+1; 0))" office:value-type="float" office:value="1049" calcext:value-type="float">
            <text:p>104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Gain2Offset</text:p>
          </table:table-cell>
          <table:table-cell table:style-name="ce11" table:formula="of:=IF([.H89]&lt;&gt;&quot;&quot;; UPPER(ORG.LIBREOFFICE.REGEX([.H89];&quot;([a-z0-9])([A-Z])&quot;;&quot;$1_$2&quot;;&quot;g&quot;)); &quot;&quot;)" office:value-type="string" office:string-value="CUP3_CHANNEL4_GAIN2_OFFSET" calcext:value-type="string">
            <text:p>CUP3_CHANNEL4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90]&lt;&gt;&quot;&quot;; UPPER(ORG.LIBREOFFICE.REGEX([.H90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90]=1; TYPE([.A90])=8); [.A90]+1; IF( OR([.A89]=1; TYPE([.A89])=8); [.A89]+1; 0))" office:value-type="float" office:value="1050" calcext:value-type="float">
            <text:p>105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1Gain1Factor</text:p>
          </table:table-cell>
          <table:table-cell table:style-name="ce11" table:formula="of:=IF([.H91]&lt;&gt;&quot;&quot;; UPPER(ORG.LIBREOFFICE.REGEX([.H91];&quot;([a-z0-9])([A-Z])&quot;;&quot;$1_$2&quot;;&quot;g&quot;)); &quot;&quot;)" office:value-type="string" office:string-value="CUP1_CHANNEL1_GAIN1_FACTOR" calcext:value-type="string">
            <text:p>CUP1_CHANNEL1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; Gain1 applies to ADC0; unit: pA/jedn.ADC</text:p>
          </table:table-cell>
          <table:table-cell table:number-columns-repeated="16372"/>
        </table:table-row>
        <table:table-row table:style-name="ro1">
          <table:table-cell table:style-name="ce3" table:formula="of:=IF( OR([.A91]=1; TYPE([.A91])=8); [.A91]+1; IF( OR([.A90]=1; TYPE([.A90])=8); [.A90]+1; 0))" office:value-type="float" office:value="1051" calcext:value-type="float">
            <text:p>105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2Gain1Factor</text:p>
          </table:table-cell>
          <table:table-cell table:style-name="ce11" table:formula="of:=IF([.H92]&lt;&gt;&quot;&quot;; UPPER(ORG.LIBREOFFICE.REGEX([.H92];&quot;([a-z0-9])([A-Z])&quot;;&quot;$1_$2&quot;;&quot;g&quot;)); &quot;&quot;)" office:value-type="string" office:string-value="CUP1_CHANNEL2_GAIN1_FACTOR" calcext:value-type="string">
            <text:p>CUP1_CHANNEL2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2]=1; TYPE([.A92])=8); [.A92]+1; IF( OR([.A91]=1; TYPE([.A91])=8); [.A91]+1; 0))" office:value-type="float" office:value="1052" calcext:value-type="float">
            <text:p>105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3Gain1Factor</text:p>
          </table:table-cell>
          <table:table-cell table:style-name="ce11" table:formula="of:=IF([.H93]&lt;&gt;&quot;&quot;; UPPER(ORG.LIBREOFFICE.REGEX([.H93];&quot;([a-z0-9])([A-Z])&quot;;&quot;$1_$2&quot;;&quot;g&quot;)); &quot;&quot;)" office:value-type="string" office:string-value="CUP1_CHANNEL3_GAIN1_FACTOR" calcext:value-type="string">
            <text:p>CUP1_CHANNEL3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3]=1; TYPE([.A93])=8); [.A93]+1; IF( OR([.A92]=1; TYPE([.A92])=8); [.A92]+1; 0))" office:value-type="float" office:value="1053" calcext:value-type="float">
            <text:p>105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4Gain1Factor</text:p>
          </table:table-cell>
          <table:table-cell table:style-name="ce11" table:formula="of:=IF([.H94]&lt;&gt;&quot;&quot;; UPPER(ORG.LIBREOFFICE.REGEX([.H94];&quot;([a-z0-9])([A-Z])&quot;;&quot;$1_$2&quot;;&quot;g&quot;)); &quot;&quot;)" office:value-type="string" office:string-value="CUP1_CHANNEL4_GAIN1_FACTOR" calcext:value-type="string">
            <text:p>CUP1_CHANNEL4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4]=1; TYPE([.A94])=8); [.A94]+1; IF( OR([.A93]=1; TYPE([.A93])=8); [.A93]+1; 0))" office:value-type="float" office:value="1054" calcext:value-type="float">
            <text:p>105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1Gain1Factor</text:p>
          </table:table-cell>
          <table:table-cell table:style-name="ce11" table:formula="of:=IF([.H95]&lt;&gt;&quot;&quot;; UPPER(ORG.LIBREOFFICE.REGEX([.H95];&quot;([a-z0-9])([A-Z])&quot;;&quot;$1_$2&quot;;&quot;g&quot;)); &quot;&quot;)" office:value-type="string" office:string-value="CUP2_CHANNEL1_GAIN1_FACTOR" calcext:value-type="string">
            <text:p>CUP2_CHANNEL1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5]=1; TYPE([.A95])=8); [.A95]+1; IF( OR([.A94]=1; TYPE([.A94])=8); [.A94]+1; 0))" office:value-type="float" office:value="1055" calcext:value-type="float">
            <text:p>105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2Gain1Factor</text:p>
          </table:table-cell>
          <table:table-cell table:style-name="ce11" table:formula="of:=IF([.H96]&lt;&gt;&quot;&quot;; UPPER(ORG.LIBREOFFICE.REGEX([.H96];&quot;([a-z0-9])([A-Z])&quot;;&quot;$1_$2&quot;;&quot;g&quot;)); &quot;&quot;)" office:value-type="string" office:string-value="CUP2_CHANNEL2_GAIN1_FACTOR" calcext:value-type="string">
            <text:p>CUP2_CHANNEL2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6]=1; TYPE([.A96])=8); [.A96]+1; IF( OR([.A95]=1; TYPE([.A95])=8); [.A95]+1; 0))" office:value-type="float" office:value="1056" calcext:value-type="float">
            <text:p>105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3Gain1Factor</text:p>
          </table:table-cell>
          <table:table-cell table:style-name="ce11" table:formula="of:=IF([.H97]&lt;&gt;&quot;&quot;; UPPER(ORG.LIBREOFFICE.REGEX([.H97];&quot;([a-z0-9])([A-Z])&quot;;&quot;$1_$2&quot;;&quot;g&quot;)); &quot;&quot;)" office:value-type="string" office:string-value="CUP2_CHANNEL3_GAIN1_FACTOR" calcext:value-type="string">
            <text:p>CUP2_CHANNEL3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7]=1; TYPE([.A97])=8); [.A97]+1; IF( OR([.A96]=1; TYPE([.A96])=8); [.A96]+1; 0))" office:value-type="float" office:value="1057" calcext:value-type="float">
            <text:p>105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4Gain1Factor</text:p>
          </table:table-cell>
          <table:table-cell table:style-name="ce11" table:formula="of:=IF([.H98]&lt;&gt;&quot;&quot;; UPPER(ORG.LIBREOFFICE.REGEX([.H98];&quot;([a-z0-9])([A-Z])&quot;;&quot;$1_$2&quot;;&quot;g&quot;)); &quot;&quot;)" office:value-type="string" office:string-value="CUP2_CHANNEL4_GAIN1_FACTOR" calcext:value-type="string">
            <text:p>CUP2_CHANNEL4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8]=1; TYPE([.A98])=8); [.A98]+1; IF( OR([.A97]=1; TYPE([.A97])=8); [.A97]+1; 0))" office:value-type="float" office:value="1058" calcext:value-type="float">
            <text:p>105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1Gain1Factor</text:p>
          </table:table-cell>
          <table:table-cell table:style-name="ce11" table:formula="of:=IF([.H99]&lt;&gt;&quot;&quot;; UPPER(ORG.LIBREOFFICE.REGEX([.H99];&quot;([a-z0-9])([A-Z])&quot;;&quot;$1_$2&quot;;&quot;g&quot;)); &quot;&quot;)" office:value-type="string" office:string-value="CUP3_CHANNEL1_GAIN1_FACTOR" calcext:value-type="string">
            <text:p>CUP3_CHANNEL1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9]=1; TYPE([.A99])=8); [.A99]+1; IF( OR([.A98]=1; TYPE([.A98])=8); [.A98]+1; 0))" office:value-type="float" office:value="1059" calcext:value-type="float">
            <text:p>105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2Gain1Factor</text:p>
          </table:table-cell>
          <table:table-cell table:style-name="ce11" table:formula="of:=IF([.H100]&lt;&gt;&quot;&quot;; UPPER(ORG.LIBREOFFICE.REGEX([.H100];&quot;([a-z0-9])([A-Z])&quot;;&quot;$1_$2&quot;;&quot;g&quot;)); &quot;&quot;)" office:value-type="string" office:string-value="CUP3_CHANNEL2_GAIN1_FACTOR" calcext:value-type="string">
            <text:p>CUP3_CHANNEL2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0]=1; TYPE([.A100])=8); [.A100]+1; IF( OR([.A99]=1; TYPE([.A99])=8); [.A99]+1; 0))" office:value-type="float" office:value="1060" calcext:value-type="float">
            <text:p>106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3Gain1Factor</text:p>
          </table:table-cell>
          <table:table-cell table:style-name="ce11" table:formula="of:=IF([.H101]&lt;&gt;&quot;&quot;; UPPER(ORG.LIBREOFFICE.REGEX([.H101];&quot;([a-z0-9])([A-Z])&quot;;&quot;$1_$2&quot;;&quot;g&quot;)); &quot;&quot;)" office:value-type="string" office:string-value="CUP3_CHANNEL3_GAIN1_FACTOR" calcext:value-type="string">
            <text:p>CUP3_CHANNEL3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1]=1; TYPE([.A101])=8); [.A101]+1; IF( OR([.A100]=1; TYPE([.A100])=8); [.A100]+1; 0))" office:value-type="float" office:value="1061" calcext:value-type="float">
            <text:p>106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4Gain1Factor</text:p>
          </table:table-cell>
          <table:table-cell table:style-name="ce11" table:formula="of:=IF([.H102]&lt;&gt;&quot;&quot;; UPPER(ORG.LIBREOFFICE.REGEX([.H102];&quot;([a-z0-9])([A-Z])&quot;;&quot;$1_$2&quot;;&quot;g&quot;)); &quot;&quot;)" office:value-type="string" office:string-value="CUP3_CHANNEL4_GAIN1_FACTOR" calcext:value-type="string">
            <text:p>CUP3_CHANNEL4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2]=1; TYPE([.A102])=8); [.A102]+1; IF( OR([.A101]=1; TYPE([.A101])=8); [.A101]+1; 0))" office:value-type="float" office:value="1062" calcext:value-type="float">
            <text:p>106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1Gain2Factor</text:p>
          </table:table-cell>
          <table:table-cell table:style-name="ce11" table:formula="of:=IF([.H103]&lt;&gt;&quot;&quot;; UPPER(ORG.LIBREOFFICE.REGEX([.H103];&quot;([a-z0-9])([A-Z])&quot;;&quot;$1_$2&quot;;&quot;g&quot;)); &quot;&quot;)" office:value-type="string" office:string-value="CUP1_CHANNEL1_GAIN2_FACTOR" calcext:value-type="string">
            <text:p>CUP1_CHANNEL1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; Gain2 applies to ADC1; unit: 10pA/jedn.ADC</text:p>
          </table:table-cell>
          <table:table-cell table:number-columns-repeated="16372"/>
        </table:table-row>
        <table:table-row table:style-name="ro1">
          <table:table-cell table:style-name="ce3" table:formula="of:=IF( OR([.A103]=1; TYPE([.A103])=8); [.A103]+1; IF( OR([.A102]=1; TYPE([.A102])=8); [.A102]+1; 0))" office:value-type="float" office:value="1063" calcext:value-type="float">
            <text:p>106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2Gain2Factor</text:p>
          </table:table-cell>
          <table:table-cell table:style-name="ce11" table:formula="of:=IF([.H104]&lt;&gt;&quot;&quot;; UPPER(ORG.LIBREOFFICE.REGEX([.H104];&quot;([a-z0-9])([A-Z])&quot;;&quot;$1_$2&quot;;&quot;g&quot;)); &quot;&quot;)" office:value-type="string" office:string-value="CUP1_CHANNEL2_GAIN2_FACTOR" calcext:value-type="string">
            <text:p>CUP1_CHANNEL2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4]=1; TYPE([.A104])=8); [.A104]+1; IF( OR([.A103]=1; TYPE([.A103])=8); [.A103]+1; 0))" office:value-type="float" office:value="1064" calcext:value-type="float">
            <text:p>106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3Gain2Factor</text:p>
          </table:table-cell>
          <table:table-cell table:style-name="ce11" table:formula="of:=IF([.H105]&lt;&gt;&quot;&quot;; UPPER(ORG.LIBREOFFICE.REGEX([.H105];&quot;([a-z0-9])([A-Z])&quot;;&quot;$1_$2&quot;;&quot;g&quot;)); &quot;&quot;)" office:value-type="string" office:string-value="CUP1_CHANNEL3_GAIN2_FACTOR" calcext:value-type="string">
            <text:p>CUP1_CHANNEL3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5]=1; TYPE([.A105])=8); [.A105]+1; IF( OR([.A104]=1; TYPE([.A104])=8); [.A104]+1; 0))" office:value-type="float" office:value="1065" calcext:value-type="float">
            <text:p>106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4Gain2Factor</text:p>
          </table:table-cell>
          <table:table-cell table:style-name="ce11" table:formula="of:=IF([.H106]&lt;&gt;&quot;&quot;; UPPER(ORG.LIBREOFFICE.REGEX([.H106];&quot;([a-z0-9])([A-Z])&quot;;&quot;$1_$2&quot;;&quot;g&quot;)); &quot;&quot;)" office:value-type="string" office:string-value="CUP1_CHANNEL4_GAIN2_FACTOR" calcext:value-type="string">
            <text:p>CUP1_CHANNEL4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6]=1; TYPE([.A106])=8); [.A106]+1; IF( OR([.A105]=1; TYPE([.A105])=8); [.A105]+1; 0))" office:value-type="float" office:value="1066" calcext:value-type="float">
            <text:p>106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1Gain2Factor</text:p>
          </table:table-cell>
          <table:table-cell table:style-name="ce11" table:formula="of:=IF([.H107]&lt;&gt;&quot;&quot;; UPPER(ORG.LIBREOFFICE.REGEX([.H107];&quot;([a-z0-9])([A-Z])&quot;;&quot;$1_$2&quot;;&quot;g&quot;)); &quot;&quot;)" office:value-type="string" office:string-value="CUP2_CHANNEL1_GAIN2_FACTOR" calcext:value-type="string">
            <text:p>CUP2_CHANNEL1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7]=1; TYPE([.A107])=8); [.A107]+1; IF( OR([.A106]=1; TYPE([.A106])=8); [.A106]+1; 0))" office:value-type="float" office:value="1067" calcext:value-type="float">
            <text:p>106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2Gain2Factor</text:p>
          </table:table-cell>
          <table:table-cell table:style-name="ce11" table:formula="of:=IF([.H108]&lt;&gt;&quot;&quot;; UPPER(ORG.LIBREOFFICE.REGEX([.H108];&quot;([a-z0-9])([A-Z])&quot;;&quot;$1_$2&quot;;&quot;g&quot;)); &quot;&quot;)" office:value-type="string" office:string-value="CUP2_CHANNEL2_GAIN2_FACTOR" calcext:value-type="string">
            <text:p>CUP2_CHANNEL2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8]=1; TYPE([.A108])=8); [.A108]+1; IF( OR([.A107]=1; TYPE([.A107])=8); [.A107]+1; 0))" office:value-type="float" office:value="1068" calcext:value-type="float">
            <text:p>106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3Gain2Factor</text:p>
          </table:table-cell>
          <table:table-cell table:style-name="ce11" table:formula="of:=IF([.H109]&lt;&gt;&quot;&quot;; UPPER(ORG.LIBREOFFICE.REGEX([.H109];&quot;([a-z0-9])([A-Z])&quot;;&quot;$1_$2&quot;;&quot;g&quot;)); &quot;&quot;)" office:value-type="string" office:string-value="CUP2_CHANNEL3_GAIN2_FACTOR" calcext:value-type="string">
            <text:p>CUP2_CHANNEL3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9]=1; TYPE([.A109])=8); [.A109]+1; IF( OR([.A108]=1; TYPE([.A108])=8); [.A108]+1; 0))" office:value-type="float" office:value="1069" calcext:value-type="float">
            <text:p>106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4Gain2Factor</text:p>
          </table:table-cell>
          <table:table-cell table:style-name="ce11" table:formula="of:=IF([.H110]&lt;&gt;&quot;&quot;; UPPER(ORG.LIBREOFFICE.REGEX([.H110];&quot;([a-z0-9])([A-Z])&quot;;&quot;$1_$2&quot;;&quot;g&quot;)); &quot;&quot;)" office:value-type="string" office:string-value="CUP2_CHANNEL4_GAIN2_FACTOR" calcext:value-type="string">
            <text:p>CUP2_CHANNEL4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0]=1; TYPE([.A110])=8); [.A110]+1; IF( OR([.A109]=1; TYPE([.A109])=8); [.A109]+1; 0))" office:value-type="float" office:value="1070" calcext:value-type="float">
            <text:p>107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1Gain2Factor</text:p>
          </table:table-cell>
          <table:table-cell table:style-name="ce11" table:formula="of:=IF([.H111]&lt;&gt;&quot;&quot;; UPPER(ORG.LIBREOFFICE.REGEX([.H111];&quot;([a-z0-9])([A-Z])&quot;;&quot;$1_$2&quot;;&quot;g&quot;)); &quot;&quot;)" office:value-type="string" office:string-value="CUP3_CHANNEL1_GAIN2_FACTOR" calcext:value-type="string">
            <text:p>CUP3_CHANNEL1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1]=1; TYPE([.A111])=8); [.A111]+1; IF( OR([.A110]=1; TYPE([.A110])=8); [.A110]+1; 0))" office:value-type="float" office:value="1071" calcext:value-type="float">
            <text:p>107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2Gain2Factor</text:p>
          </table:table-cell>
          <table:table-cell table:style-name="ce11" table:formula="of:=IF([.H112]&lt;&gt;&quot;&quot;; UPPER(ORG.LIBREOFFICE.REGEX([.H112];&quot;([a-z0-9])([A-Z])&quot;;&quot;$1_$2&quot;;&quot;g&quot;)); &quot;&quot;)" office:value-type="string" office:string-value="CUP3_CHANNEL2_GAIN2_FACTOR" calcext:value-type="string">
            <text:p>CUP3_CHANNEL2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2]=1; TYPE([.A112])=8); [.A112]+1; IF( OR([.A111]=1; TYPE([.A111])=8); [.A111]+1; 0))" office:value-type="float" office:value="1072" calcext:value-type="float">
            <text:p>107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3Gain2Factor</text:p>
          </table:table-cell>
          <table:table-cell table:style-name="ce11" table:formula="of:=IF([.H113]&lt;&gt;&quot;&quot;; UPPER(ORG.LIBREOFFICE.REGEX([.H113];&quot;([a-z0-9])([A-Z])&quot;;&quot;$1_$2&quot;;&quot;g&quot;)); &quot;&quot;)" office:value-type="string" office:string-value="CUP3_CHANNEL3_GAIN2_FACTOR" calcext:value-type="string">
            <text:p>CUP3_CHANNEL3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3]=1; TYPE([.A113])=8); [.A113]+1; IF( OR([.A112]=1; TYPE([.A112])=8); [.A112]+1; 0))" office:value-type="float" office:value="1073" calcext:value-type="float">
            <text:p>107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4Gain2Factor</text:p>
          </table:table-cell>
          <table:table-cell table:style-name="ce11" table:formula="of:=IF([.H114]&lt;&gt;&quot;&quot;; UPPER(ORG.LIBREOFFICE.REGEX([.H114];&quot;([a-z0-9])([A-Z])&quot;;&quot;$1_$2&quot;;&quot;g&quot;)); &quot;&quot;)" office:value-type="string" office:string-value="CUP3_CHANNEL4_GAIN2_FACTOR" calcext:value-type="string">
            <text:p>CUP3_CHANNEL4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15]&lt;&gt;&quot;&quot;; UPPER(ORG.LIBREOFFICE.REGEX([.H115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15]=1; TYPE([.A115])=8); [.A115]+1; IF( OR([.A114]=1; TYPE([.A114])=8); [.A114]+1; 0))" office:value-type="float" office:value="1074" calcext:value-type="float">
            <text:p>107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angeChangeThreshold</text:p>
          </table:table-cell>
          <table:table-cell table:style-name="ce11" table:formula="of:=IF([.H116]&lt;&gt;&quot;&quot;; UPPER(ORG.LIBREOFFICE.REGEX([.H116];&quot;([a-z0-9])([A-Z])&quot;;&quot;$1_$2&quot;;&quot;g&quot;)); &quot;&quot;)" office:value-type="string" office:string-value="RANGE_CHANGE_THRESHOLD" calcext:value-type="string">
            <text:p>RANGE_CHANGE_THRESHOL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threshold value for the signal with higher gain (ADC1); if ADC1 is less than RangeChangeThreshold, use ADC1 in the calculation; otherwise, use ADC0 (i.e., the signal with lower gain).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17]&lt;&gt;&quot;&quot;; UPPER(ORG.LIBREOFFICE.REGEX([.H117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17]=1; TYPE([.A117])=8); [.A117]+1; IF( OR([.A116]=1; TYPE([.A116])=8); [.A116]+1; 0))" office:value-type="float" office:value="1075" calcext:value-type="float">
            <text:p>107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LowerLimit</text:p>
          </table:table-cell>
          <table:table-cell table:style-name="ce11" table:formula="of:=IF([.H118]&lt;&gt;&quot;&quot;; UPPER(ORG.LIBREOFFICE.REGEX([.H118];&quot;([a-z0-9])([A-Z])&quot;;&quot;$1_$2&quot;;&quot;g&quot;)); &quot;&quot;)" office:value-type="string" office:string-value="CUP1_CHANNEL1_LOWER_LIMIT" calcext:value-type="string">
            <text:p>CUP1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8]=1; TYPE([.A118])=8); [.A118]+1; IF( OR([.A117]=1; TYPE([.A117])=8); [.A117]+1; 0))" office:value-type="float" office:value="1076" calcext:value-type="float">
            <text:p>107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LowerLimit</text:p>
          </table:table-cell>
          <table:table-cell table:style-name="ce11" table:formula="of:=IF([.H119]&lt;&gt;&quot;&quot;; UPPER(ORG.LIBREOFFICE.REGEX([.H119];&quot;([a-z0-9])([A-Z])&quot;;&quot;$1_$2&quot;;&quot;g&quot;)); &quot;&quot;)" office:value-type="string" office:string-value="CUP1_CHANNEL2_LOWER_LIMIT" calcext:value-type="string">
            <text:p>CUP1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9]=1; TYPE([.A119])=8); [.A119]+1; IF( OR([.A118]=1; TYPE([.A118])=8); [.A118]+1; 0))" office:value-type="float" office:value="1077" calcext:value-type="float">
            <text:p>107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LowerLimit</text:p>
          </table:table-cell>
          <table:table-cell table:style-name="ce11" table:formula="of:=IF([.H120]&lt;&gt;&quot;&quot;; UPPER(ORG.LIBREOFFICE.REGEX([.H120];&quot;([a-z0-9])([A-Z])&quot;;&quot;$1_$2&quot;;&quot;g&quot;)); &quot;&quot;)" office:value-type="string" office:string-value="CUP1_CHANNEL3_LOWER_LIMIT" calcext:value-type="string">
            <text:p>CUP1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0]=1; TYPE([.A120])=8); [.A120]+1; IF( OR([.A119]=1; TYPE([.A119])=8); [.A119]+1; 0))" office:value-type="float" office:value="1078" calcext:value-type="float">
            <text:p>107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LowerLimit</text:p>
          </table:table-cell>
          <table:table-cell table:style-name="ce11" table:formula="of:=IF([.H121]&lt;&gt;&quot;&quot;; UPPER(ORG.LIBREOFFICE.REGEX([.H121];&quot;([a-z0-9])([A-Z])&quot;;&quot;$1_$2&quot;;&quot;g&quot;)); &quot;&quot;)" office:value-type="string" office:string-value="CUP1_CHANNEL4_LOWER_LIMIT" calcext:value-type="string">
            <text:p>CUP1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1]=1; TYPE([.A121])=8); [.A121]+1; IF( OR([.A120]=1; TYPE([.A120])=8); [.A120]+1; 0))" office:value-type="float" office:value="1079" calcext:value-type="float">
            <text:p>107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LowerLimit</text:p>
          </table:table-cell>
          <table:table-cell table:style-name="ce11" table:formula="of:=IF([.H122]&lt;&gt;&quot;&quot;; UPPER(ORG.LIBREOFFICE.REGEX([.H122];&quot;([a-z0-9])([A-Z])&quot;;&quot;$1_$2&quot;;&quot;g&quot;)); &quot;&quot;)" office:value-type="string" office:string-value="CUP2_CHANNEL1_LOWER_LIMIT" calcext:value-type="string">
            <text:p>CUP2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2]=1; TYPE([.A122])=8); [.A122]+1; IF( OR([.A121]=1; TYPE([.A121])=8); [.A121]+1; 0))" office:value-type="float" office:value="1080" calcext:value-type="float">
            <text:p>108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LowerLimit</text:p>
          </table:table-cell>
          <table:table-cell table:style-name="ce11" table:formula="of:=IF([.H123]&lt;&gt;&quot;&quot;; UPPER(ORG.LIBREOFFICE.REGEX([.H123];&quot;([a-z0-9])([A-Z])&quot;;&quot;$1_$2&quot;;&quot;g&quot;)); &quot;&quot;)" office:value-type="string" office:string-value="CUP2_CHANNEL2_LOWER_LIMIT" calcext:value-type="string">
            <text:p>CUP2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3]=1; TYPE([.A123])=8); [.A123]+1; IF( OR([.A122]=1; TYPE([.A122])=8); [.A122]+1; 0))" office:value-type="float" office:value="1081" calcext:value-type="float">
            <text:p>108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LowerLimit</text:p>
          </table:table-cell>
          <table:table-cell table:style-name="ce11" table:formula="of:=IF([.H124]&lt;&gt;&quot;&quot;; UPPER(ORG.LIBREOFFICE.REGEX([.H124];&quot;([a-z0-9])([A-Z])&quot;;&quot;$1_$2&quot;;&quot;g&quot;)); &quot;&quot;)" office:value-type="string" office:string-value="CUP2_CHANNEL3_LOWER_LIMIT" calcext:value-type="string">
            <text:p>CUP2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4]=1; TYPE([.A124])=8); [.A124]+1; IF( OR([.A123]=1; TYPE([.A123])=8); [.A123]+1; 0))" office:value-type="float" office:value="1082" calcext:value-type="float">
            <text:p>108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LowerLimit</text:p>
          </table:table-cell>
          <table:table-cell table:style-name="ce11" table:formula="of:=IF([.H125]&lt;&gt;&quot;&quot;; UPPER(ORG.LIBREOFFICE.REGEX([.H125];&quot;([a-z0-9])([A-Z])&quot;;&quot;$1_$2&quot;;&quot;g&quot;)); &quot;&quot;)" office:value-type="string" office:string-value="CUP2_CHANNEL4_LOWER_LIMIT" calcext:value-type="string">
            <text:p>CUP2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5]=1; TYPE([.A125])=8); [.A125]+1; IF( OR([.A124]=1; TYPE([.A124])=8); [.A124]+1; 0))" office:value-type="float" office:value="1083" calcext:value-type="float">
            <text:p>108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LowerLimit</text:p>
          </table:table-cell>
          <table:table-cell table:style-name="ce11" table:formula="of:=IF([.H126]&lt;&gt;&quot;&quot;; UPPER(ORG.LIBREOFFICE.REGEX([.H126];&quot;([a-z0-9])([A-Z])&quot;;&quot;$1_$2&quot;;&quot;g&quot;)); &quot;&quot;)" office:value-type="string" office:string-value="CUP3_CHANNEL1_LOWER_LIMIT" calcext:value-type="string">
            <text:p>CUP3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6]=1; TYPE([.A126])=8); [.A126]+1; IF( OR([.A125]=1; TYPE([.A125])=8); [.A125]+1; 0))" office:value-type="float" office:value="1084" calcext:value-type="float">
            <text:p>108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LowerLimit</text:p>
          </table:table-cell>
          <table:table-cell table:style-name="ce11" table:formula="of:=IF([.H127]&lt;&gt;&quot;&quot;; UPPER(ORG.LIBREOFFICE.REGEX([.H127];&quot;([a-z0-9])([A-Z])&quot;;&quot;$1_$2&quot;;&quot;g&quot;)); &quot;&quot;)" office:value-type="string" office:string-value="CUP3_CHANNEL2_LOWER_LIMIT" calcext:value-type="string">
            <text:p>CUP3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7]=1; TYPE([.A127])=8); [.A127]+1; IF( OR([.A126]=1; TYPE([.A126])=8); [.A126]+1; 0))" office:value-type="float" office:value="1085" calcext:value-type="float">
            <text:p>108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LowerLimit</text:p>
          </table:table-cell>
          <table:table-cell table:style-name="ce11" table:formula="of:=IF([.H128]&lt;&gt;&quot;&quot;; UPPER(ORG.LIBREOFFICE.REGEX([.H128];&quot;([a-z0-9])([A-Z])&quot;;&quot;$1_$2&quot;;&quot;g&quot;)); &quot;&quot;)" office:value-type="string" office:string-value="CUP3_CHANNEL3_LOWER_LIMIT" calcext:value-type="string">
            <text:p>CUP3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8]=1; TYPE([.A128])=8); [.A128]+1; IF( OR([.A127]=1; TYPE([.A127])=8); [.A127]+1; 0))" office:value-type="float" office:value="1086" calcext:value-type="float">
            <text:p>108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LowerLimit</text:p>
          </table:table-cell>
          <table:table-cell table:style-name="ce11" table:formula="of:=IF([.H129]&lt;&gt;&quot;&quot;; UPPER(ORG.LIBREOFFICE.REGEX([.H129];&quot;([a-z0-9])([A-Z])&quot;;&quot;$1_$2&quot;;&quot;g&quot;)); &quot;&quot;)" office:value-type="string" office:string-value="CUP3_CHANNEL4_LOWER_LIMIT" calcext:value-type="string">
            <text:p>CUP3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30]&lt;&gt;&quot;&quot;; UPPER(ORG.LIBREOFFICE.REGEX([.H130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30]=1; TYPE([.A130])=8); [.A130]+1; IF( OR([.A129]=1; TYPE([.A129])=8); [.A129]+1; 0))" office:value-type="float" office:value="1087" calcext:value-type="float">
            <text:p>108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1UpperLimit</text:p>
          </table:table-cell>
          <table:table-cell table:style-name="ce11" table:formula="of:=IF([.H131]&lt;&gt;&quot;&quot;; UPPER(ORG.LIBREOFFICE.REGEX([.H131];&quot;([a-z0-9])([A-Z])&quot;;&quot;$1_$2&quot;;&quot;g&quot;)); &quot;&quot;)" office:value-type="string" office:string-value="CUP1_CHANNEL1_UPPER_LIMIT" calcext:value-type="string">
            <text:p>CUP1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1]=1; TYPE([.A131])=8); [.A131]+1; IF( OR([.A130]=1; TYPE([.A130])=8); [.A130]+1; 0))" office:value-type="float" office:value="1088" calcext:value-type="float">
            <text:p>108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2UpperLimit</text:p>
          </table:table-cell>
          <table:table-cell table:style-name="ce11" table:formula="of:=IF([.H132]&lt;&gt;&quot;&quot;; UPPER(ORG.LIBREOFFICE.REGEX([.H132];&quot;([a-z0-9])([A-Z])&quot;;&quot;$1_$2&quot;;&quot;g&quot;)); &quot;&quot;)" office:value-type="string" office:string-value="CUP1_CHANNEL2_UPPER_LIMIT" calcext:value-type="string">
            <text:p>CUP1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2]=1; TYPE([.A132])=8); [.A132]+1; IF( OR([.A131]=1; TYPE([.A131])=8); [.A131]+1; 0))" office:value-type="float" office:value="1089" calcext:value-type="float">
            <text:p>108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3UpperLimit</text:p>
          </table:table-cell>
          <table:table-cell table:style-name="ce11" table:formula="of:=IF([.H133]&lt;&gt;&quot;&quot;; UPPER(ORG.LIBREOFFICE.REGEX([.H133];&quot;([a-z0-9])([A-Z])&quot;;&quot;$1_$2&quot;;&quot;g&quot;)); &quot;&quot;)" office:value-type="string" office:string-value="CUP1_CHANNEL3_UPPER_LIMIT" calcext:value-type="string">
            <text:p>CUP1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3]=1; TYPE([.A133])=8); [.A133]+1; IF( OR([.A132]=1; TYPE([.A132])=8); [.A132]+1; 0))" office:value-type="float" office:value="1090" calcext:value-type="float">
            <text:p>109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4UpperLimit</text:p>
          </table:table-cell>
          <table:table-cell table:style-name="ce11" table:formula="of:=IF([.H134]&lt;&gt;&quot;&quot;; UPPER(ORG.LIBREOFFICE.REGEX([.H134];&quot;([a-z0-9])([A-Z])&quot;;&quot;$1_$2&quot;;&quot;g&quot;)); &quot;&quot;)" office:value-type="string" office:string-value="CUP1_CHANNEL4_UPPER_LIMIT" calcext:value-type="string">
            <text:p>CUP1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4]=1; TYPE([.A134])=8); [.A134]+1; IF( OR([.A133]=1; TYPE([.A133])=8); [.A133]+1; 0))" office:value-type="float" office:value="1091" calcext:value-type="float">
            <text:p>109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1UpperLimit</text:p>
          </table:table-cell>
          <table:table-cell table:style-name="ce11" table:formula="of:=IF([.H135]&lt;&gt;&quot;&quot;; UPPER(ORG.LIBREOFFICE.REGEX([.H135];&quot;([a-z0-9])([A-Z])&quot;;&quot;$1_$2&quot;;&quot;g&quot;)); &quot;&quot;)" office:value-type="string" office:string-value="CUP2_CHANNEL1_UPPER_LIMIT" calcext:value-type="string">
            <text:p>CUP2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5]=1; TYPE([.A135])=8); [.A135]+1; IF( OR([.A134]=1; TYPE([.A134])=8); [.A134]+1; 0))" office:value-type="float" office:value="1092" calcext:value-type="float">
            <text:p>109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2UpperLimit</text:p>
          </table:table-cell>
          <table:table-cell table:style-name="ce11" table:formula="of:=IF([.H136]&lt;&gt;&quot;&quot;; UPPER(ORG.LIBREOFFICE.REGEX([.H136];&quot;([a-z0-9])([A-Z])&quot;;&quot;$1_$2&quot;;&quot;g&quot;)); &quot;&quot;)" office:value-type="string" office:string-value="CUP2_CHANNEL2_UPPER_LIMIT" calcext:value-type="string">
            <text:p>CUP2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6]=1; TYPE([.A136])=8); [.A136]+1; IF( OR([.A135]=1; TYPE([.A135])=8); [.A135]+1; 0))" office:value-type="float" office:value="1093" calcext:value-type="float">
            <text:p>109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3UpperLimit</text:p>
          </table:table-cell>
          <table:table-cell table:style-name="ce11" table:formula="of:=IF([.H137]&lt;&gt;&quot;&quot;; UPPER(ORG.LIBREOFFICE.REGEX([.H137];&quot;([a-z0-9])([A-Z])&quot;;&quot;$1_$2&quot;;&quot;g&quot;)); &quot;&quot;)" office:value-type="string" office:string-value="CUP2_CHANNEL3_UPPER_LIMIT" calcext:value-type="string">
            <text:p>CUP2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7]=1; TYPE([.A137])=8); [.A137]+1; IF( OR([.A136]=1; TYPE([.A136])=8); [.A136]+1; 0))" office:value-type="float" office:value="1094" calcext:value-type="float">
            <text:p>109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4UpperLimit</text:p>
          </table:table-cell>
          <table:table-cell table:style-name="ce11" table:formula="of:=IF([.H138]&lt;&gt;&quot;&quot;; UPPER(ORG.LIBREOFFICE.REGEX([.H138];&quot;([a-z0-9])([A-Z])&quot;;&quot;$1_$2&quot;;&quot;g&quot;)); &quot;&quot;)" office:value-type="string" office:string-value="CUP2_CHANNEL4_UPPER_LIMIT" calcext:value-type="string">
            <text:p>CUP2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8]=1; TYPE([.A138])=8); [.A138]+1; IF( OR([.A137]=1; TYPE([.A137])=8); [.A137]+1; 0))" office:value-type="float" office:value="1095" calcext:value-type="float">
            <text:p>109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1UpperLimit</text:p>
          </table:table-cell>
          <table:table-cell table:style-name="ce11" table:formula="of:=IF([.H139]&lt;&gt;&quot;&quot;; UPPER(ORG.LIBREOFFICE.REGEX([.H139];&quot;([a-z0-9])([A-Z])&quot;;&quot;$1_$2&quot;;&quot;g&quot;)); &quot;&quot;)" office:value-type="string" office:string-value="CUP3_CHANNEL1_UPPER_LIMIT" calcext:value-type="string">
            <text:p>CUP3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9]=1; TYPE([.A139])=8); [.A139]+1; IF( OR([.A138]=1; TYPE([.A138])=8); [.A138]+1; 0))" office:value-type="float" office:value="1096" calcext:value-type="float">
            <text:p>109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2UpperLimit</text:p>
          </table:table-cell>
          <table:table-cell table:style-name="ce11" table:formula="of:=IF([.H140]&lt;&gt;&quot;&quot;; UPPER(ORG.LIBREOFFICE.REGEX([.H140];&quot;([a-z0-9])([A-Z])&quot;;&quot;$1_$2&quot;;&quot;g&quot;)); &quot;&quot;)" office:value-type="string" office:string-value="CUP3_CHANNEL2_UPPER_LIMIT" calcext:value-type="string">
            <text:p>CUP3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40]=1; TYPE([.A140])=8); [.A140]+1; IF( OR([.A139]=1; TYPE([.A139])=8); [.A139]+1; 0))" office:value-type="float" office:value="1097" calcext:value-type="float">
            <text:p>109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3UpperLimit</text:p>
          </table:table-cell>
          <table:table-cell table:style-name="ce11" table:formula="of:=IF([.H141]&lt;&gt;&quot;&quot;; UPPER(ORG.LIBREOFFICE.REGEX([.H141];&quot;([a-z0-9])([A-Z])&quot;;&quot;$1_$2&quot;;&quot;g&quot;)); &quot;&quot;)" office:value-type="string" office:string-value="CUP3_CHANNEL3_UPPER_LIMIT" calcext:value-type="string">
            <text:p>CUP3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41]=1; TYPE([.A141])=8); [.A141]+1; IF( OR([.A140]=1; TYPE([.A140])=8); [.A140]+1; 0))" office:value-type="float" office:value="1098" calcext:value-type="float">
            <text:p>109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4UpperLimit</text:p>
          </table:table-cell>
          <table:table-cell table:style-name="ce11" table:formula="of:=IF([.H142]&lt;&gt;&quot;&quot;; UPPER(ORG.LIBREOFFICE.REGEX([.H142];&quot;([a-z0-9])([A-Z])&quot;;&quot;$1_$2&quot;;&quot;g&quot;)); &quot;&quot;)" office:value-type="string" office:string-value="CUP3_CHANNEL4_UPPER_LIMIT" calcext:value-type="string">
            <text:p>CUP3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43]&lt;&gt;&quot;&quot;; UPPER(ORG.LIBREOFFICE.REGEX([.H143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43]=1; TYPE([.A143])=8); [.A143]+1; IF( OR([.A142]=1; TYPE([.A142])=8); [.A142]+1; 0))" office:value-type="float" office:value="1099" calcext:value-type="float">
            <text:p>109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1In</text:p>
          </table:table-cell>
          <table:table-cell table:style-name="ce11" table:formula="of:=IF([.H144]&lt;&gt;&quot;&quot;; UPPER(ORG.LIBREOFFICE.REGEX([.H144];&quot;([a-z0-9])([A-Z])&quot;;&quot;$1_$2&quot;;&quot;g&quot;)); &quot;&quot;)" office:value-type="string" office:string-value="SIM_MECHANISM_PROPAGATION1_IN" calcext:value-type="string">
            <text:p>SIM_MECHANISM_PROPAGATION1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4]=1; TYPE([.A144])=8); [.A144]+1; IF( OR([.A143]=1; TYPE([.A143])=8); [.A143]+1; 0))" office:value-type="float" office:value="1100" calcext:value-type="float">
            <text:p>110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1InRand</text:p>
          </table:table-cell>
          <table:table-cell table:style-name="ce11" table:formula="of:=IF([.H145]&lt;&gt;&quot;&quot;; UPPER(ORG.LIBREOFFICE.REGEX([.H145];&quot;([a-z0-9])([A-Z])&quot;;&quot;$1_$2&quot;;&quot;g&quot;)); &quot;&quot;)" office:value-type="string" office:string-value="SIM_MECHANISM_PROPAGATION1_IN_RAND" calcext:value-type="string">
            <text:p>SIM_MECHANISM_PROPAGATION1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45]=1; TYPE([.A145])=8); [.A145]+1; IF( OR([.A144]=1; TYPE([.A144])=8); [.A144]+1; 0))" office:value-type="float" office:value="1101" calcext:value-type="float">
            <text:p>110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1Out</text:p>
          </table:table-cell>
          <table:table-cell table:style-name="ce11" table:formula="of:=IF([.H146]&lt;&gt;&quot;&quot;; UPPER(ORG.LIBREOFFICE.REGEX([.H146];&quot;([a-z0-9])([A-Z])&quot;;&quot;$1_$2&quot;;&quot;g&quot;)); &quot;&quot;)" office:value-type="string" office:string-value="SIM_MECHANISM_PROPAGATION1_OUT" calcext:value-type="string">
            <text:p>SIM_MECHANISM_PROPAGATION1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6]=1; TYPE([.A146])=8); [.A146]+1; IF( OR([.A145]=1; TYPE([.A145])=8); [.A145]+1; 0))" office:value-type="float" office:value="1102" calcext:value-type="float">
            <text:p>110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1OutRand</text:p>
          </table:table-cell>
          <table:table-cell table:style-name="ce11" table:formula="of:=IF([.H147]&lt;&gt;&quot;&quot;; UPPER(ORG.LIBREOFFICE.REGEX([.H147];&quot;([a-z0-9])([A-Z])&quot;;&quot;$1_$2&quot;;&quot;g&quot;)); &quot;&quot;)" office:value-type="string" office:string-value="SIM_MECHANISM_PROPAGATION1_OUT_RAND" calcext:value-type="string">
            <text:p>SIM_MECHANISM_PROPAGATION1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 table:formula="of:=IF([.H148]&lt;&gt;&quot;&quot;; UPPER(ORG.LIBREOFFICE.REGEX([.H148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48]=1; TYPE([.A148])=8); [.A148]+1; IF( OR([.A147]=1; TYPE([.A147])=8); [.A147]+1; 0))" office:value-type="float" office:value="1103" calcext:value-type="float">
            <text:p>110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2In</text:p>
          </table:table-cell>
          <table:table-cell table:style-name="ce11" table:formula="of:=IF([.H149]&lt;&gt;&quot;&quot;; UPPER(ORG.LIBREOFFICE.REGEX([.H149];&quot;([a-z0-9])([A-Z])&quot;;&quot;$1_$2&quot;;&quot;g&quot;)); &quot;&quot;)" office:value-type="string" office:string-value="SIM_MECHANISM_PROPAGATION2_IN" calcext:value-type="string">
            <text:p>SIM_MECHANISM_PROPAGATION2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9]=1; TYPE([.A149])=8); [.A149]+1; IF( OR([.A148]=1; TYPE([.A148])=8); [.A148]+1; 0))" office:value-type="float" office:value="1104" calcext:value-type="float">
            <text:p>110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2InRand</text:p>
          </table:table-cell>
          <table:table-cell table:style-name="ce11" table:formula="of:=IF([.H150]&lt;&gt;&quot;&quot;; UPPER(ORG.LIBREOFFICE.REGEX([.H150];&quot;([a-z0-9])([A-Z])&quot;;&quot;$1_$2&quot;;&quot;g&quot;)); &quot;&quot;)" office:value-type="string" office:string-value="SIM_MECHANISM_PROPAGATION2_IN_RAND" calcext:value-type="string">
            <text:p>SIM_MECHANISM_PROPAGATION2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0]=1; TYPE([.A150])=8); [.A150]+1; IF( OR([.A149]=1; TYPE([.A149])=8); [.A149]+1; 0))" office:value-type="float" office:value="1105" calcext:value-type="float">
            <text:p>110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2Out</text:p>
          </table:table-cell>
          <table:table-cell table:style-name="ce11" table:formula="of:=IF([.H151]&lt;&gt;&quot;&quot;; UPPER(ORG.LIBREOFFICE.REGEX([.H151];&quot;([a-z0-9])([A-Z])&quot;;&quot;$1_$2&quot;;&quot;g&quot;)); &quot;&quot;)" office:value-type="string" office:string-value="SIM_MECHANISM_PROPAGATION2_OUT" calcext:value-type="string">
            <text:p>SIM_MECHANISM_PROPAGATION2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1]=1; TYPE([.A151])=8); [.A151]+1; IF( OR([.A150]=1; TYPE([.A150])=8); [.A150]+1; 0))" office:value-type="float" office:value="1106" calcext:value-type="float">
            <text:p>110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2OutRand</text:p>
          </table:table-cell>
          <table:table-cell table:style-name="ce11" table:formula="of:=IF([.H152]&lt;&gt;&quot;&quot;; UPPER(ORG.LIBREOFFICE.REGEX([.H152];&quot;([a-z0-9])([A-Z])&quot;;&quot;$1_$2&quot;;&quot;g&quot;)); &quot;&quot;)" office:value-type="string" office:string-value="SIM_MECHANISM_PROPAGATION2_OUT_RAND" calcext:value-type="string">
            <text:p>SIM_MECHANISM_PROPAGATION2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 table:formula="of:=IF([.H153]&lt;&gt;&quot;&quot;; UPPER(ORG.LIBREOFFICE.REGEX([.H153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53]=1; TYPE([.A153])=8); [.A153]+1; IF( OR([.A152]=1; TYPE([.A152])=8); [.A152]+1; 0))" office:value-type="float" office:value="1107" calcext:value-type="float">
            <text:p>110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3In</text:p>
          </table:table-cell>
          <table:table-cell table:style-name="ce11" table:formula="of:=IF([.H154]&lt;&gt;&quot;&quot;; UPPER(ORG.LIBREOFFICE.REGEX([.H154];&quot;([a-z0-9])([A-Z])&quot;;&quot;$1_$2&quot;;&quot;g&quot;)); &quot;&quot;)" office:value-type="string" office:string-value="SIM_MECHANISM_PROPAGATION3_IN" calcext:value-type="string">
            <text:p>SIM_MECHANISM_PROPAGATION3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4]=1; TYPE([.A154])=8); [.A154]+1; IF( OR([.A153]=1; TYPE([.A153])=8); [.A153]+1; 0))" office:value-type="float" office:value="1108" calcext:value-type="float">
            <text:p>110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3InRand</text:p>
          </table:table-cell>
          <table:table-cell table:style-name="ce11" table:formula="of:=IF([.H155]&lt;&gt;&quot;&quot;; UPPER(ORG.LIBREOFFICE.REGEX([.H155];&quot;([a-z0-9])([A-Z])&quot;;&quot;$1_$2&quot;;&quot;g&quot;)); &quot;&quot;)" office:value-type="string" office:string-value="SIM_MECHANISM_PROPAGATION3_IN_RAND" calcext:value-type="string">
            <text:p>SIM_MECHANISM_PROPAGATION3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5]=1; TYPE([.A155])=8); [.A155]+1; IF( OR([.A154]=1; TYPE([.A154])=8); [.A154]+1; 0))" office:value-type="float" office:value="1109" calcext:value-type="float">
            <text:p>110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3Out</text:p>
          </table:table-cell>
          <table:table-cell table:style-name="ce11" table:formula="of:=IF([.H156]&lt;&gt;&quot;&quot;; UPPER(ORG.LIBREOFFICE.REGEX([.H156];&quot;([a-z0-9])([A-Z])&quot;;&quot;$1_$2&quot;;&quot;g&quot;)); &quot;&quot;)" office:value-type="string" office:string-value="SIM_MECHANISM_PROPAGATION3_OUT" calcext:value-type="string">
            <text:p>SIM_MECHANISM_PROPAGATION3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6]=1; TYPE([.A156])=8); [.A156]+1; IF( OR([.A155]=1; TYPE([.A155])=8); [.A155]+1; 0))" office:value-type="float" office:value="1110" calcext:value-type="float">
            <text:p>111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3OutRand</text:p>
          </table:table-cell>
          <table:table-cell table:style-name="ce11" table:formula="of:=IF([.H157]&lt;&gt;&quot;&quot;; UPPER(ORG.LIBREOFFICE.REGEX([.H157];&quot;([a-z0-9])([A-Z])&quot;;&quot;$1_$2&quot;;&quot;g&quot;)); &quot;&quot;)" office:value-type="string" office:string-value="SIM_MECHANISM_PROPAGATION3_OUT_RAND" calcext:value-type="string">
            <text:p>SIM_MECHANISM_PROPAGATION3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7]=1; TYPE([.A157])=8); [.A157]+1; IF( OR([.A156]=1; TYPE([.A156])=8); [.A156]+1; 0))" office:value-type="float" office:value="1111" calcext:value-type="float">
            <text:p>111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3InertialMotion</text:p>
          </table:table-cell>
          <table:table-cell table:style-name="ce11" table:formula="of:=IF([.H158]&lt;&gt;&quot;&quot;; UPPER(ORG.LIBREOFFICE.REGEX([.H158];&quot;([a-z0-9])([A-Z])&quot;;&quot;$1_$2&quot;;&quot;g&quot;)); &quot;&quot;)" office:value-type="string" office:string-value="SIM_MECHANISM3_INERTIAL_MOTION" calcext:value-type="string">
            <text:p>SIM_MECHANISM3_INERTIAL_MO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time it takes for the engine to come to a stop without braking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8]=1; TYPE([.A158])=8); [.A158]+1; IF( OR([.A157]=1; TYPE([.A157])=8); [.A157]+1; 0))" office:value-type="float" office:value="1112" calcext:value-type="float">
            <text:p>111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3BrakedMotion</text:p>
          </table:table-cell>
          <table:table-cell table:style-name="ce11" table:formula="of:=IF([.H159]&lt;&gt;&quot;&quot;; UPPER(ORG.LIBREOFFICE.REGEX([.H159];&quot;([a-z0-9])([A-Z])&quot;;&quot;$1_$2&quot;;&quot;g&quot;)); &quot;&quot;)" office:value-type="string" office:string-value="SIM_MECHANISM3_BRAKED_MOTION" calcext:value-type="string">
            <text:p>SIM_MECHANISM3_BRAKED_MO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time it takes for the engine to come to a stop with braking (in clock tick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60]=1; TYPE([.A160])=8); [.A160]+1; IF( OR([.A159]=1; TYPE([.A159])=8); [.A159]+1; 0))" office:value-type="float" office:value="1113" calcext:value-type="float">
            <text:p>111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1Electrode1</text:p>
          </table:table-cell>
          <table:table-cell table:style-name="ce11" table:formula="of:=IF([.H161]&lt;&gt;&quot;&quot;; UPPER(ORG.LIBREOFFICE.REGEX([.H161];&quot;([a-z0-9])([A-Z])&quot;;&quot;$1_$2&quot;;&quot;g&quot;)); &quot;&quot;)" office:value-type="string" office:string-value="SIM_AMPLIFIER_CUP1_ELECTRODE1" calcext:value-type="string">
            <text:p>SIM_AMPLIFIER_CUP1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output value of the analog-to-digital converter (for the high-gain range) in converter units × 8</text:p>
          </table:table-cell>
          <table:table-cell table:number-columns-repeated="16372"/>
        </table:table-row>
        <table:table-row table:style-name="ro1">
          <table:table-cell table:style-name="ce3" table:formula="of:=IF( OR([.A161]=1; TYPE([.A161])=8); [.A161]+1; IF( OR([.A158]=1; TYPE([.A158])=8); [.A158]+1; 0))" office:value-type="float" office:value="1114" calcext:value-type="float">
            <text:p>111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1Electrode2</text:p>
          </table:table-cell>
          <table:table-cell table:style-name="ce11" table:formula="of:=IF([.H162]&lt;&gt;&quot;&quot;; UPPER(ORG.LIBREOFFICE.REGEX([.H162];&quot;([a-z0-9])([A-Z])&quot;;&quot;$1_$2&quot;;&quot;g&quot;)); &quot;&quot;)" office:value-type="string" office:string-value="SIM_AMPLIFIER_CUP1_ELECTRODE2" calcext:value-type="string">
            <text:p>SIM_AMPLIFIER_CUP1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2]=1; TYPE([.A162])=8); [.A162]+1; IF( OR([.A161]=1; TYPE([.A161])=8); [.A161]+1; 0))" office:value-type="float" office:value="1115" calcext:value-type="float">
            <text:p>111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1Electrode3</text:p>
          </table:table-cell>
          <table:table-cell table:style-name="ce11" table:formula="of:=IF([.H163]&lt;&gt;&quot;&quot;; UPPER(ORG.LIBREOFFICE.REGEX([.H163];&quot;([a-z0-9])([A-Z])&quot;;&quot;$1_$2&quot;;&quot;g&quot;)); &quot;&quot;)" office:value-type="string" office:string-value="SIM_AMPLIFIER_CUP1_ELECTRODE3" calcext:value-type="string">
            <text:p>SIM_AMPLIFIER_CUP1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3]=1; TYPE([.A163])=8); [.A163]+1; IF( OR([.A162]=1; TYPE([.A162])=8); [.A162]+1; 0))" office:value-type="float" office:value="1116" calcext:value-type="float">
            <text:p>111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1Electrode4</text:p>
          </table:table-cell>
          <table:table-cell table:style-name="ce11" table:formula="of:=IF([.H164]&lt;&gt;&quot;&quot;; UPPER(ORG.LIBREOFFICE.REGEX([.H164];&quot;([a-z0-9])([A-Z])&quot;;&quot;$1_$2&quot;;&quot;g&quot;)); &quot;&quot;)" office:value-type="string" office:string-value="SIM_AMPLIFIER_CUP1_ELECTRODE4" calcext:value-type="string">
            <text:p>SIM_AMPLIFIER_CUP1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4]=1; TYPE([.A164])=8); [.A164]+1; IF( OR([.A163]=1; TYPE([.A163])=8); [.A163]+1; 0))" office:value-type="float" office:value="1117" calcext:value-type="float">
            <text:p>111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2Electrode1</text:p>
          </table:table-cell>
          <table:table-cell table:style-name="ce11" table:formula="of:=IF([.H165]&lt;&gt;&quot;&quot;; UPPER(ORG.LIBREOFFICE.REGEX([.H165];&quot;([a-z0-9])([A-Z])&quot;;&quot;$1_$2&quot;;&quot;g&quot;)); &quot;&quot;)" office:value-type="string" office:string-value="SIM_AMPLIFIER_CUP2_ELECTRODE1" calcext:value-type="string">
            <text:p>SIM_AMPLIFIER_CUP2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5]=1; TYPE([.A165])=8); [.A165]+1; IF( OR([.A164]=1; TYPE([.A164])=8); [.A164]+1; 0))" office:value-type="float" office:value="1118" calcext:value-type="float">
            <text:p>111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2Electrode2</text:p>
          </table:table-cell>
          <table:table-cell table:style-name="ce11" table:formula="of:=IF([.H166]&lt;&gt;&quot;&quot;; UPPER(ORG.LIBREOFFICE.REGEX([.H166];&quot;([a-z0-9])([A-Z])&quot;;&quot;$1_$2&quot;;&quot;g&quot;)); &quot;&quot;)" office:value-type="string" office:string-value="SIM_AMPLIFIER_CUP2_ELECTRODE2" calcext:value-type="string">
            <text:p>SIM_AMPLIFIER_CUP2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6]=1; TYPE([.A166])=8); [.A166]+1; IF( OR([.A165]=1; TYPE([.A165])=8); [.A165]+1; 0))" office:value-type="float" office:value="1119" calcext:value-type="float">
            <text:p>111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2Electrode3</text:p>
          </table:table-cell>
          <table:table-cell table:style-name="ce11" table:formula="of:=IF([.H167]&lt;&gt;&quot;&quot;; UPPER(ORG.LIBREOFFICE.REGEX([.H167];&quot;([a-z0-9])([A-Z])&quot;;&quot;$1_$2&quot;;&quot;g&quot;)); &quot;&quot;)" office:value-type="string" office:string-value="SIM_AMPLIFIER_CUP2_ELECTRODE3" calcext:value-type="string">
            <text:p>SIM_AMPLIFIER_CUP2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7]=1; TYPE([.A167])=8); [.A167]+1; IF( OR([.A166]=1; TYPE([.A166])=8); [.A166]+1; 0))" office:value-type="float" office:value="1120" calcext:value-type="float">
            <text:p>112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2Electrode4</text:p>
          </table:table-cell>
          <table:table-cell table:style-name="ce11" table:formula="of:=IF([.H168]&lt;&gt;&quot;&quot;; UPPER(ORG.LIBREOFFICE.REGEX([.H168];&quot;([a-z0-9])([A-Z])&quot;;&quot;$1_$2&quot;;&quot;g&quot;)); &quot;&quot;)" office:value-type="string" office:string-value="SIM_AMPLIFIER_CUP2_ELECTRODE4" calcext:value-type="string">
            <text:p>SIM_AMPLIFIER_CUP2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8]=1; TYPE([.A168])=8); [.A168]+1; IF( OR([.A167]=1; TYPE([.A167])=8); [.A167]+1; 0))" office:value-type="float" office:value="1121" calcext:value-type="float">
            <text:p>112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3Electrode1</text:p>
          </table:table-cell>
          <table:table-cell table:style-name="ce11" table:formula="of:=IF([.H169]&lt;&gt;&quot;&quot;; UPPER(ORG.LIBREOFFICE.REGEX([.H169];&quot;([a-z0-9])([A-Z])&quot;;&quot;$1_$2&quot;;&quot;g&quot;)); &quot;&quot;)" office:value-type="string" office:string-value="SIM_AMPLIFIER_CUP3_ELECTRODE1" calcext:value-type="string">
            <text:p>SIM_AMPLIFIER_CUP3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9]=1; TYPE([.A169])=8); [.A169]+1; IF( OR([.A168]=1; TYPE([.A168])=8); [.A168]+1; 0))" office:value-type="float" office:value="1122" calcext:value-type="float">
            <text:p>112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3Electrode2</text:p>
          </table:table-cell>
          <table:table-cell table:style-name="ce11" table:formula="of:=IF([.H170]&lt;&gt;&quot;&quot;; UPPER(ORG.LIBREOFFICE.REGEX([.H170];&quot;([a-z0-9])([A-Z])&quot;;&quot;$1_$2&quot;;&quot;g&quot;)); &quot;&quot;)" office:value-type="string" office:string-value="SIM_AMPLIFIER_CUP3_ELECTRODE2" calcext:value-type="string">
            <text:p>SIM_AMPLIFIER_CUP3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70]=1; TYPE([.A170])=8); [.A170]+1; IF( OR([.A169]=1; TYPE([.A169])=8); [.A169]+1; 0))" office:value-type="float" office:value="1123" calcext:value-type="float">
            <text:p>112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3Electrode3</text:p>
          </table:table-cell>
          <table:table-cell table:style-name="ce11" table:formula="of:=IF([.H171]&lt;&gt;&quot;&quot;; UPPER(ORG.LIBREOFFICE.REGEX([.H171];&quot;([a-z0-9])([A-Z])&quot;;&quot;$1_$2&quot;;&quot;g&quot;)); &quot;&quot;)" office:value-type="string" office:string-value="SIM_AMPLIFIER_CUP3_ELECTRODE3" calcext:value-type="string">
            <text:p>SIM_AMPLIFIER_CUP3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71]=1; TYPE([.A171])=8); [.A171]+1; IF( OR([.A170]=1; TYPE([.A170])=8); [.A170]+1; 0))" office:value-type="float" office:value="1124" calcext:value-type="float">
            <text:p>112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3Electrode4</text:p>
          </table:table-cell>
          <table:table-cell table:style-name="ce11" table:formula="of:=IF([.H172]&lt;&gt;&quot;&quot;; UPPER(ORG.LIBREOFFICE.REGEX([.H172];&quot;([a-z0-9])([A-Z])&quot;;&quot;$1_$2&quot;;&quot;g&quot;)); &quot;&quot;)" office:value-type="string" office:string-value="SIM_AMPLIFIER_CUP3_ELECTRODE4" calcext:value-type="string">
            <text:p>SIM_AMPLIFIER_CUP3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73]&lt;&gt;&quot;&quot;; UPPER(ORG.LIBREOFFICE.REGEX([.H173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3]=1; TYPE([.A173])=8); [.A173]+1; IF( OR([.A172]=1; TYPE([.A172])=8); [.A172]+1; 0))" office:value-type="float" office:value="1125" calcext:value-type="float">
            <text:p>112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RandomRate</text:p>
          </table:table-cell>
          <table:table-cell table:style-name="ce11" table:formula="of:=IF([.H174]&lt;&gt;&quot;&quot;; UPPER(ORG.LIBREOFFICE.REGEX([.H174];&quot;([a-z0-9])([A-Z])&quot;;&quot;$1_$2&quot;;&quot;g&quot;)); &quot;&quot;)" office:value-type="string" office:string-value="SIM_AMPLIFIER_RANDOM_RATE" calcext:value-type="string">
            <text:p>SIM_AMPLIFIER_RANDOM_RAT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ratio coefficient</text:p>
          </table:table-cell>
          <table:table-cell table:number-columns-repeated="16372"/>
        </table:table-row>
        <table:table-row table:style-name="ro1">
          <table:table-cell table:style-name="ce3" table:formula="of:=IF( OR([.A174]=1; TYPE([.A174])=8); [.A174]+1; IF( OR([.A173]=1; TYPE([.A173])=8); [.A173]+1; 0))" office:value-type="float" office:value="1126" calcext:value-type="float">
            <text:p>112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RandomOffset</text:p>
          </table:table-cell>
          <table:table-cell table:style-name="ce11" table:formula="of:=IF([.H175]&lt;&gt;&quot;&quot;; UPPER(ORG.LIBREOFFICE.REGEX([.H175];&quot;([a-z0-9])([A-Z])&quot;;&quot;$1_$2&quot;;&quot;g&quot;)); &quot;&quot;)" office:value-type="string" office:string-value="SIM_AMPLIFIER_RANDOM_OFFSET" calcext:value-type="string">
            <text:p>SIM_AMPLIFIER_RANDOM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offset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76]&lt;&gt;&quot;&quot;; UPPER(ORG.LIBREOFFICE.REGEX([.H176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6]=1; TYPE([.A176])=8); [.A176]+1; IF( OR([.A175]=1; TYPE([.A175])=8); [.A175]+1; 0))" office:value-type="float" office:value="1127" calcext:value-type="float">
            <text:p>112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xternalLockPeriod</text:p>
          </table:table-cell>
          <table:table-cell table:style-name="ce11" table:formula="of:=IF([.H177]&lt;&gt;&quot;&quot;; UPPER(ORG.LIBREOFFICE.REGEX([.H177];&quot;([a-z0-9])([A-Z])&quot;;&quot;$1_$2&quot;;&quot;g&quot;)); &quot;&quot;)" office:value-type="string" office:string-value="SIM_EXTERNAL_LOCK_PERIOD" calcext:value-type="string">
            <text:p>SIM_EXTERNAL_LOCK_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177]=1; TYPE([.A177])=8); [.A177]+1; IF( OR([.A176]=1; TYPE([.A176])=8); [.A176]+1; 0))" office:value-type="float" office:value="1128" calcext:value-type="float">
            <text:p>112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xternalLockDuration</text:p>
          </table:table-cell>
          <table:table-cell table:style-name="ce11" table:formula="of:=IF([.H178]&lt;&gt;&quot;&quot;; UPPER(ORG.LIBREOFFICE.REGEX([.H178];&quot;([a-z0-9])([A-Z])&quot;;&quot;$1_$2&quot;;&quot;g&quot;)); &quot;&quot;)" office:value-type="string" office:string-value="SIM_EXTERNAL_LOCK_DURATION" calcext:value-type="string">
            <text:p>SIM_EXTERNAL_LOCK_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uration (in tics); If the duration is 0xFFFF, the signal is set indefinitely; if the duration is zero, the signal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178]=1; TYPE([.A178])=8); [.A178]+1; IF( OR([.A177]=1; TYPE([.A177])=8); [.A177]+1; 0))" office:value-type="float" office:value="1129" calcext:value-type="float">
            <text:p>112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xternalLockDelay</text:p>
          </table:table-cell>
          <table:table-cell table:style-name="ce11" table:formula="of:=IF([.H179]&lt;&gt;&quot;&quot;; UPPER(ORG.LIBREOFFICE.REGEX([.H179];&quot;([a-z0-9])([A-Z])&quot;;&quot;$1_$2&quot;;&quot;g&quot;)); &quot;&quot;)" office:value-type="string" office:string-value="SIM_EXTERNAL_LOCK_DELAY" calcext:value-type="string">
            <text:p>SIM_EXTERNAL_LOCK_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elay (in tic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80]&lt;&gt;&quot;&quot;; UPPER(ORG.LIBREOFFICE.REGEX([.H180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80]=1; TYPE([.A180])=8); [.A180]+1; IF( OR([.A179]=1; TYPE([.A179])=8); [.A179]+1; 0))" office:value-type="float" office:value="1130" calcext:value-type="float">
            <text:p>113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ventCode</text:p>
          </table:table-cell>
          <table:table-cell table:style-name="ce11" table:formula="of:=IF([.H181]&lt;&gt;&quot;&quot;; UPPER(ORG.LIBREOFFICE.REGEX([.H181];&quot;([a-z0-9])([A-Z])&quot;;&quot;$1_$2&quot;;&quot;g&quot;)); &quot;&quot;)" office:value-type="string" office:string-value="SIM_EVENT_CODE" calcext:value-type="string">
            <text:p>SIM_EVENT_COD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event type</text:p>
          </table:table-cell>
          <table:table-cell table:number-columns-repeated="16372"/>
        </table:table-row>
        <table:table-row table:style-name="ro1">
          <table:table-cell table:style-name="ce3" table:formula="of:=IF( OR([.A181]=1; TYPE([.A181])=8); [.A181]+1; IF( OR([.A180]=1; TYPE([.A180])=8); [.A180]+1; 0))" office:value-type="float" office:value="1131" calcext:value-type="float">
            <text:p>113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ventPeriod</text:p>
          </table:table-cell>
          <table:table-cell table:style-name="ce11" table:formula="of:=IF([.H182]&lt;&gt;&quot;&quot;; UPPER(ORG.LIBREOFFICE.REGEX([.H182];&quot;([a-z0-9])([A-Z])&quot;;&quot;$1_$2&quot;;&quot;g&quot;)); &quot;&quot;)" office:value-type="string" office:string-value="SIM_EVENT_PERIOD" calcext:value-type="string">
            <text:p>SIM_EVENT_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182]=1; TYPE([.A182])=8); [.A182]+1; IF( OR([.A181]=1; TYPE([.A181])=8); [.A181]+1; 0))" office:value-type="float" office:value="1132" calcext:value-type="float">
            <text:p>113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ventDuration</text:p>
          </table:table-cell>
          <table:table-cell table:style-name="ce11" table:formula="of:=IF([.H183]&lt;&gt;&quot;&quot;; UPPER(ORG.LIBREOFFICE.REGEX([.H183];&quot;([a-z0-9])([A-Z])&quot;;&quot;$1_$2&quot;;&quot;g&quot;)); &quot;&quot;)" office:value-type="string" office:string-value="SIM_EVENT_DURATION" calcext:value-type="string">
            <text:p>SIM_EVENT_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uration (in tics); If the duration is 0xFFFF, the event lasts indefinitely; if the duration is zero, the event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183]=1; TYPE([.A183])=8); [.A183]+1; IF( OR([.A182]=1; TYPE([.A182])=8); [.A182]+1; 0))" office:value-type="float" office:value="1133" calcext:value-type="float">
            <text:p>113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ventDelay</text:p>
          </table:table-cell>
          <table:table-cell table:style-name="ce11" table:formula="of:=IF([.H184]&lt;&gt;&quot;&quot;; UPPER(ORG.LIBREOFFICE.REGEX([.H184];&quot;([a-z0-9])([A-Z])&quot;;&quot;$1_$2&quot;;&quot;g&quot;)); &quot;&quot;)" office:value-type="string" office:string-value="SIM_EVENT_DELAY" calcext:value-type="string">
            <text:p>SIM_EVENT_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elay (in tic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85]&lt;&gt;&quot;&quot;; UPPER(ORG.LIBREOFFICE.REGEX([.H185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85]=1; TYPE([.A185])=8); [.A185]+1; IF( OR([.A184]=1; TYPE([.A184])=8); [.A184]+1; 0))" office:value-type="float" office:value="1134" calcext:value-type="float">
            <text:p>113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bugPrintouts</text:p>
          </table:table-cell>
          <table:table-cell table:style-name="ce11" table:formula="of:=IF([.H186]&lt;&gt;&quot;&quot;; UPPER(ORG.LIBREOFFICE.REGEX([.H186];&quot;([a-z0-9])([A-Z])&quot;;&quot;$1_$2&quot;;&quot;g&quot;)); &quot;&quot;)" office:value-type="string" office:string-value="DEBUG_PRINTOUTS" calcext:value-type="string">
            <text:p>DEBUG_PRINTOUT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Testing</text:p>
          </table:table-cell>
          <table:table-cell table:number-columns-repeated="16373"/>
        </table:table-row>
        <table:table-row table:style-name="ro1">
          <table:table-cell table:style-name="ce3" table:formula="of:=IF( OR([.A186]=1; TYPE([.A186])=8); [.A186]+1; IF( OR([.A185]=1; TYPE([.A185])=8); [.A185]+1; 0))" office:value-type="float" office:value="1135" calcext:value-type="float">
            <text:p>113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bugArgument1</text:p>
          </table:table-cell>
          <table:table-cell table:style-name="ce11" table:formula="of:=IF([.H187]&lt;&gt;&quot;&quot;; UPPER(ORG.LIBREOFFICE.REGEX([.H187];&quot;([a-z0-9])([A-Z])&quot;;&quot;$1_$2&quot;;&quot;g&quot;)); &quot;&quot;)" office:value-type="string" office:string-value="DEBUG_ARGUMENT1" calcext:value-type="string">
            <text:p>DEBUG_ARGUME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Testing</text:p>
          </table:table-cell>
          <table:table-cell table:number-columns-repeated="16373"/>
        </table:table-row>
        <table:table-row table:style-name="ro1">
          <table:table-cell table:style-name="ce3"/>
          <table:table-cell table:number-columns-repeated="7"/>
          <table:table-cell table:style-name="ce11" table:formula="of:=IF([.H188]&lt;&gt;&quot;&quot;; UPPER(ORG.LIBREOFFICE.REGEX([.H188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/>
          <table:table-cell table:number-columns-repeated="7"/>
          <table:table-cell table:style-name="ce11" table:formula="of:=IF([.H189]&lt;&gt;&quot;&quot;; UPPER(ORG.LIBREOFFICE.REGEX([.H189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office:value-type="float" office:value="3001" calcext:value-type="float">
            <text:p>3001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Sample</text:p>
          </table:table-cell>
          <table:table-cell table:style-name="ce11" table:formula="of:=IF([.H190]&lt;&gt;&quot;&quot;; UPPER(ORG.LIBREOFFICE.REGEX([.H190];&quot;([a-z0-9])([A-Z])&quot;;&quot;$1_$2&quot;;&quot;g&quot;)); &quot;&quot;)" office:value-type="string" office:string-value="CUP1_CHANNEL1_SAMPLE" calcext:value-type="string">
            <text:p>CUP1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[.A190]+1" office:value-type="float" office:value="3002" calcext:value-type="float">
            <text:p>3002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Sample</text:p>
          </table:table-cell>
          <table:table-cell table:style-name="ce11" table:formula="of:=IF([.H191]&lt;&gt;&quot;&quot;; UPPER(ORG.LIBREOFFICE.REGEX([.H191];&quot;([a-z0-9])([A-Z])&quot;;&quot;$1_$2&quot;;&quot;g&quot;)); &quot;&quot;)" office:value-type="string" office:string-value="CUP1_CHANNEL2_SAMPLE" calcext:value-type="string">
            <text:p>CUP1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1]=1; TYPE([.A191])=8); [.A191]+1; IF( OR([.A190]=1; TYPE([.A190])=8); [.A190]+1; 0))" office:value-type="float" office:value="3003" calcext:value-type="float">
            <text:p>3003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Sample</text:p>
          </table:table-cell>
          <table:table-cell table:style-name="ce11" table:formula="of:=IF([.H192]&lt;&gt;&quot;&quot;; UPPER(ORG.LIBREOFFICE.REGEX([.H192];&quot;([a-z0-9])([A-Z])&quot;;&quot;$1_$2&quot;;&quot;g&quot;)); &quot;&quot;)" office:value-type="string" office:string-value="CUP1_CHANNEL3_SAMPLE" calcext:value-type="string">
            <text:p>CUP1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2]=1; TYPE([.A192])=8); [.A192]+1; IF( OR([.A191]=1; TYPE([.A191])=8); [.A191]+1; 0))" office:value-type="float" office:value="3004" calcext:value-type="float">
            <text:p>3004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Sample</text:p>
          </table:table-cell>
          <table:table-cell table:style-name="ce11" table:formula="of:=IF([.H193]&lt;&gt;&quot;&quot;; UPPER(ORG.LIBREOFFICE.REGEX([.H193];&quot;([a-z0-9])([A-Z])&quot;;&quot;$1_$2&quot;;&quot;g&quot;)); &quot;&quot;)" office:value-type="string" office:string-value="CUP1_CHANNEL4_SAMPLE" calcext:value-type="string">
            <text:p>CUP1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3]=1; TYPE([.A193])=8); [.A193]+1; IF( OR([.A192]=1; TYPE([.A192])=8); [.A192]+1; 0))" office:value-type="float" office:value="3005" calcext:value-type="float">
            <text:p>3005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Error</text:p>
          </table:table-cell>
          <table:table-cell table:style-name="ce11" table:formula="of:=IF([.H194]&lt;&gt;&quot;&quot;; UPPER(ORG.LIBREOFFICE.REGEX([.H194];&quot;([a-z0-9])([A-Z])&quot;;&quot;$1_$2&quot;;&quot;g&quot;)); &quot;&quot;)" office:value-type="string" office:string-value="CUP1_CHANNEL_ERROR" calcext:value-type="string">
            <text:p>CUP1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If the measured value exceeds the limit (Cup1Channel1LowerLimit ..., or Cup1Channel1UpperLimit ...), the corresponding bit is set: bit 0 for channel 1, bit 1 for channel 2, and so on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95]&lt;&gt;&quot;&quot;; UPPER(ORG.LIBREOFFICE.REGEX([.H195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95]=1; TYPE([.A195])=8); [.A195]+1; IF( OR([.A194]=1; TYPE([.A194])=8); [.A194]+1; 0))" office:value-type="float" office:value="3006" calcext:value-type="float">
            <text:p>3006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Sample</text:p>
          </table:table-cell>
          <table:table-cell table:style-name="ce11" table:formula="of:=IF([.H196]&lt;&gt;&quot;&quot;; UPPER(ORG.LIBREOFFICE.REGEX([.H196];&quot;([a-z0-9])([A-Z])&quot;;&quot;$1_$2&quot;;&quot;g&quot;)); &quot;&quot;)" office:value-type="string" office:string-value="CUP2_CHANNEL1_SAMPLE" calcext:value-type="string">
            <text:p>CUP2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6]=1; TYPE([.A196])=8); [.A196]+1; IF( OR([.A195]=1; TYPE([.A195])=8); [.A195]+1; 0))" office:value-type="float" office:value="3007" calcext:value-type="float">
            <text:p>3007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Sample</text:p>
          </table:table-cell>
          <table:table-cell table:style-name="ce11" table:formula="of:=IF([.H197]&lt;&gt;&quot;&quot;; UPPER(ORG.LIBREOFFICE.REGEX([.H197];&quot;([a-z0-9])([A-Z])&quot;;&quot;$1_$2&quot;;&quot;g&quot;)); &quot;&quot;)" office:value-type="string" office:string-value="CUP2_CHANNEL2_SAMPLE" calcext:value-type="string">
            <text:p>CUP2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7]=1; TYPE([.A197])=8); [.A197]+1; IF( OR([.A196]=1; TYPE([.A196])=8); [.A196]+1; 0))" office:value-type="float" office:value="3008" calcext:value-type="float">
            <text:p>3008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Sample</text:p>
          </table:table-cell>
          <table:table-cell table:style-name="ce11" table:formula="of:=IF([.H198]&lt;&gt;&quot;&quot;; UPPER(ORG.LIBREOFFICE.REGEX([.H198];&quot;([a-z0-9])([A-Z])&quot;;&quot;$1_$2&quot;;&quot;g&quot;)); &quot;&quot;)" office:value-type="string" office:string-value="CUP2_CHANNEL3_SAMPLE" calcext:value-type="string">
            <text:p>CUP2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8]=1; TYPE([.A198])=8); [.A198]+1; IF( OR([.A197]=1; TYPE([.A197])=8); [.A197]+1; 0))" office:value-type="float" office:value="3009" calcext:value-type="float">
            <text:p>3009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Sample</text:p>
          </table:table-cell>
          <table:table-cell table:style-name="ce11" table:formula="of:=IF([.H199]&lt;&gt;&quot;&quot;; UPPER(ORG.LIBREOFFICE.REGEX([.H199];&quot;([a-z0-9])([A-Z])&quot;;&quot;$1_$2&quot;;&quot;g&quot;)); &quot;&quot;)" office:value-type="string" office:string-value="CUP2_CHANNEL4_SAMPLE" calcext:value-type="string">
            <text:p>CUP2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9]=1; TYPE([.A199])=8); [.A199]+1; IF( OR([.A198]=1; TYPE([.A198])=8); [.A198]+1; 0))" office:value-type="float" office:value="3010" calcext:value-type="float">
            <text:p>3010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Error</text:p>
          </table:table-cell>
          <table:table-cell table:style-name="ce11" table:formula="of:=IF([.H200]&lt;&gt;&quot;&quot;; UPPER(ORG.LIBREOFFICE.REGEX([.H200];&quot;([a-z0-9])([A-Z])&quot;;&quot;$1_$2&quot;;&quot;g&quot;)); &quot;&quot;)" office:value-type="string" office:string-value="CUP2_CHANNEL_ERROR" calcext:value-type="string">
            <text:p>CUP2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01]&lt;&gt;&quot;&quot;; UPPER(ORG.LIBREOFFICE.REGEX([.H201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201]=1; TYPE([.A201])=8); [.A201]+1; IF( OR([.A200]=1; TYPE([.A200])=8); [.A200]+1; 0))" office:value-type="float" office:value="3011" calcext:value-type="float">
            <text:p>3011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Sample</text:p>
          </table:table-cell>
          <table:table-cell table:style-name="ce11" table:formula="of:=IF([.H202]&lt;&gt;&quot;&quot;; UPPER(ORG.LIBREOFFICE.REGEX([.H202];&quot;([a-z0-9])([A-Z])&quot;;&quot;$1_$2&quot;;&quot;g&quot;)); &quot;&quot;)" office:value-type="string" office:string-value="CUP3_CHANNEL1_SAMPLE" calcext:value-type="string">
            <text:p>CUP3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2]=1; TYPE([.A202])=8); [.A202]+1; IF( OR([.A201]=1; TYPE([.A201])=8); [.A201]+1; 0))" office:value-type="float" office:value="3012" calcext:value-type="float">
            <text:p>3012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Sample</text:p>
          </table:table-cell>
          <table:table-cell table:style-name="ce11" table:formula="of:=IF([.H203]&lt;&gt;&quot;&quot;; UPPER(ORG.LIBREOFFICE.REGEX([.H203];&quot;([a-z0-9])([A-Z])&quot;;&quot;$1_$2&quot;;&quot;g&quot;)); &quot;&quot;)" office:value-type="string" office:string-value="CUP3_CHANNEL2_SAMPLE" calcext:value-type="string">
            <text:p>CUP3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3]=1; TYPE([.A203])=8); [.A203]+1; IF( OR([.A202]=1; TYPE([.A202])=8); [.A202]+1; 0))" office:value-type="float" office:value="3013" calcext:value-type="float">
            <text:p>3013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Sample</text:p>
          </table:table-cell>
          <table:table-cell table:style-name="ce11" table:formula="of:=IF([.H204]&lt;&gt;&quot;&quot;; UPPER(ORG.LIBREOFFICE.REGEX([.H204];&quot;([a-z0-9])([A-Z])&quot;;&quot;$1_$2&quot;;&quot;g&quot;)); &quot;&quot;)" office:value-type="string" office:string-value="CUP3_CHANNEL3_SAMPLE" calcext:value-type="string">
            <text:p>CUP3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4]=1; TYPE([.A204])=8); [.A204]+1; IF( OR([.A203]=1; TYPE([.A203])=8); [.A203]+1; 0))" office:value-type="float" office:value="3014" calcext:value-type="float">
            <text:p>3014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Sample</text:p>
          </table:table-cell>
          <table:table-cell table:style-name="ce11" table:formula="of:=IF([.H205]&lt;&gt;&quot;&quot;; UPPER(ORG.LIBREOFFICE.REGEX([.H205];&quot;([a-z0-9])([A-Z])&quot;;&quot;$1_$2&quot;;&quot;g&quot;)); &quot;&quot;)" office:value-type="string" office:string-value="CUP3_CHANNEL4_SAMPLE" calcext:value-type="string">
            <text:p>CUP3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5]=1; TYPE([.A205])=8); [.A205]+1; IF( OR([.A204]=1; TYPE([.A204])=8); [.A204]+1; 0))" office:value-type="float" office:value="3015" calcext:value-type="float">
            <text:p>3015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Error</text:p>
          </table:table-cell>
          <table:table-cell table:style-name="ce11" table:formula="of:=IF([.H206]&lt;&gt;&quot;&quot;; UPPER(ORG.LIBREOFFICE.REGEX([.H206];&quot;([a-z0-9])([A-Z])&quot;;&quot;$1_$2&quot;;&quot;g&quot;)); &quot;&quot;)" office:value-type="string" office:string-value="CUP3_CHANNEL_ERROR" calcext:value-type="string">
            <text:p>CUP3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5"/>
          <table:table-cell table:style-name="ce7"/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formula="of:=ROUNDUP(SUM([.C2:.C211])/16)*2" office:value-type="float" office:value="0" calcext:value-type="float">
            <text:p>0</text:p>
          </table:table-cell>
          <table:table-cell office:value-type="string" calcext:value-type="string">
            <text:p>B <text:s/>=</text:p>
          </table:table-cell>
          <table:table-cell table:formula="of:=DEC2HEX([.C212]; 4)" office:value-type="string" office:string-value="0000" calcext:value-type="string">
            <text:p>0000</text:p>
          </table:table-cell>
          <table:table-cell table:style-name="ce7" office:value-type="string" calcext:value-type="string">
            <text:p>hex</text:p>
          </table:table-cell>
          <table:table-cell table:number-columns-repeated="16378"/>
        </table:table-row>
        <table:table-row table:style-name="ro1" table:number-rows-repeated="10483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2" table:number-columns-repeated="16381" table:default-cell-style-name="ce13"/>
        <table:table-row table:style-name="ro1" table:number-rows-repeated="2">
          <table:table-cell table:number-columns-repeated="16384"/>
        </table:table-row>
        <table:table-row table:style-name="ro1">
          <table:table-cell table:formula="of:=IF([$Sheet1.A3] &lt;&gt;&quot;&quot;; &quot;#define &quot;; &quot;&quot;)" office:value-type="string" office:string-value="#define " calcext:value-type="string">
            <text:p>#define </text:p>
          </table:table-cell>
          <table:table-cell table:formula="of:=IF([$Sheet1.A3] &lt;&gt;&quot;&quot;; [$Sheet1.I3]; &quot;&quot;)" office:value-type="string" office:string-value="CUP1_CONTROL" calcext:value-type="string">
            <text:p>CUP1_CONTROL</text:p>
          </table:table-cell>
          <table:table-cell table:formula="of:=IF([$Sheet1.A3] &lt;&gt;&quot;&quot;; &quot; &quot;; &quot;&quot;)" office:value-type="string" office:string-value=" " calcext:value-type="string">
            <text:p><text:s/></text:p>
          </table:table-cell>
          <table:table-cell table:formula="of:=IF([$Sheet1.A3] &lt;&gt;&quot;&quot;; [$Sheet1.A3]; &quot;&quot;)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formula="of:=IF([$Sheet1.A4] &lt;&gt;&quot;&quot;; &quot;#define &quot;; &quot;&quot;)" office:value-type="string" office:string-value="#define " calcext:value-type="string">
            <text:p>#define </text:p>
          </table:table-cell>
          <table:table-cell table:formula="of:=IF([$Sheet1.A4] &lt;&gt;&quot;&quot;; [$Sheet1.I4]; &quot;&quot;)" office:value-type="string" office:string-value="EXTERNAL_INHIBITION1" calcext:value-type="string">
            <text:p>EXTERNAL_INHIBITION1</text:p>
          </table:table-cell>
          <table:table-cell table:formula="of:=IF([$Sheet1.A4] &lt;&gt;&quot;&quot;; &quot; &quot;; &quot;&quot;)" office:value-type="string" office:string-value=" " calcext:value-type="string">
            <text:p><text:s/></text:p>
          </table:table-cell>
          <table:table-cell table:formula="of:=IF([$Sheet1.A4] &lt;&gt;&quot;&quot;; [$Sheet1.A4]; &quot;&quot;)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formula="of:=IF([$Sheet1.A5] &lt;&gt;&quot;&quot;; &quot;#define &quot;; &quot;&quot;)" office:value-type="string" office:string-value="#define " calcext:value-type="string">
            <text:p>#define </text:p>
          </table:table-cell>
          <table:table-cell table:formula="of:=IF([$Sheet1.A5] &lt;&gt;&quot;&quot;; [$Sheet1.I5]; &quot;&quot;)" office:value-type="string" office:string-value="CUP1_SWITCH" calcext:value-type="string">
            <text:p>CUP1_SWITCH</text:p>
          </table:table-cell>
          <table:table-cell table:formula="of:=IF([$Sheet1.A5] &lt;&gt;&quot;&quot;; &quot; &quot;; &quot;&quot;)" office:value-type="string" office:string-value=" " calcext:value-type="string">
            <text:p><text:s/></text:p>
          </table:table-cell>
          <table:table-cell table:formula="of:=IF([$Sheet1.A5] &lt;&gt;&quot;&quot;; [$Sheet1.A5]; &quot;&quot;)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formula="of:=IF([$Sheet1.A6] &lt;&gt;&quot;&quot;; &quot;#define &quot;; &quot;&quot;)" office:value-type="string" office:string-value="#define " calcext:value-type="string">
            <text:p>#define </text:p>
          </table:table-cell>
          <table:table-cell table:formula="of:=IF([$Sheet1.A6] &lt;&gt;&quot;&quot;; [$Sheet1.I6]; &quot;&quot;)">
            <text:p/>
          </table:table-cell>
          <table:table-cell table:formula="of:=IF([$Sheet1.A6] &lt;&gt;&quot;&quot;; &quot; &quot;; &quot;&quot;)" office:value-type="string" office:string-value=" " calcext:value-type="string">
            <text:p><text:s/></text:p>
          </table:table-cell>
          <table:table-cell table:formula="of:=IF([$Sheet1.A6] &lt;&gt;&quot;&quot;; [$Sheet1.A6]; &quot;&quot;)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formula="of:=IF([$Sheet1.A7] &lt;&gt;&quot;&quot;; &quot;#define &quot;; &quot;&quot;)">
            <text:p/>
          </table:table-cell>
          <table:table-cell table:formula="of:=IF([$Sheet1.A7] &lt;&gt;&quot;&quot;; [$Sheet1.I7]; &quot;&quot;)">
            <text:p/>
          </table:table-cell>
          <table:table-cell table:formula="of:=IF([$Sheet1.A7] &lt;&gt;&quot;&quot;; &quot; &quot;; &quot;&quot;)">
            <text:p/>
          </table:table-cell>
          <table:table-cell table:formula="of:=IF([$Sheet1.A7] &lt;&gt;&quot;&quot;; [$Sheet1.A7]; &quot;&quot;)">
            <text:p/>
          </table:table-cell>
          <table:table-cell table:number-columns-repeated="16380"/>
        </table:table-row>
        <table:table-row table:style-name="ro1">
          <table:table-cell table:formula="of:=IF([$Sheet1.A8] &lt;&gt;&quot;&quot;; &quot;#define &quot;; &quot;&quot;)" office:value-type="string" office:string-value="#define " calcext:value-type="string">
            <text:p>#define </text:p>
          </table:table-cell>
          <table:table-cell table:formula="of:=IF([$Sheet1.A8] &lt;&gt;&quot;&quot;; [$Sheet1.I8]; &quot;&quot;)" office:value-type="string" office:string-value="CUP2_CONTROL" calcext:value-type="string">
            <text:p>CUP2_CONTROL</text:p>
          </table:table-cell>
          <table:table-cell table:formula="of:=IF([$Sheet1.A8] &lt;&gt;&quot;&quot;; &quot; &quot;; &quot;&quot;)" office:value-type="string" office:string-value=" " calcext:value-type="string">
            <text:p><text:s/></text:p>
          </table:table-cell>
          <table:table-cell table:formula="of:=IF([$Sheet1.A8] &lt;&gt;&quot;&quot;; [$Sheet1.A8]; &quot;&quot;)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formula="of:=IF([$Sheet1.A9] &lt;&gt;&quot;&quot;; &quot;#define &quot;; &quot;&quot;)" office:value-type="string" office:string-value="#define " calcext:value-type="string">
            <text:p>#define </text:p>
          </table:table-cell>
          <table:table-cell table:formula="of:=IF([$Sheet1.A9] &lt;&gt;&quot;&quot;; [$Sheet1.I9]; &quot;&quot;)" office:value-type="string" office:string-value="EXTERNAL_INHIBITION2" calcext:value-type="string">
            <text:p>EXTERNAL_INHIBITION2</text:p>
          </table:table-cell>
          <table:table-cell table:formula="of:=IF([$Sheet1.A9] &lt;&gt;&quot;&quot;; &quot; &quot;; &quot;&quot;)" office:value-type="string" office:string-value=" " calcext:value-type="string">
            <text:p><text:s/></text:p>
          </table:table-cell>
          <table:table-cell table:formula="of:=IF([$Sheet1.A9] &lt;&gt;&quot;&quot;; [$Sheet1.A9]; &quot;&quot;)"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table:formula="of:=IF([$Sheet1.A10] &lt;&gt;&quot;&quot;; &quot;#define &quot;; &quot;&quot;)" office:value-type="string" office:string-value="#define " calcext:value-type="string">
            <text:p>#define </text:p>
          </table:table-cell>
          <table:table-cell table:formula="of:=IF([$Sheet1.A10] &lt;&gt;&quot;&quot;; [$Sheet1.I10]; &quot;&quot;)" office:value-type="string" office:string-value="CUP2_SWITCH" calcext:value-type="string">
            <text:p>CUP2_SWITCH</text:p>
          </table:table-cell>
          <table:table-cell table:formula="of:=IF([$Sheet1.A10] &lt;&gt;&quot;&quot;; &quot; &quot;; &quot;&quot;)" office:value-type="string" office:string-value=" " calcext:value-type="string">
            <text:p><text:s/></text:p>
          </table:table-cell>
          <table:table-cell table:formula="of:=IF([$Sheet1.A10] &lt;&gt;&quot;&quot;; [$Sheet1.A10]; &quot;&quot;)"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table:formula="of:=IF([$Sheet1.A11] &lt;&gt;&quot;&quot;; &quot;#define &quot;; &quot;&quot;)" office:value-type="string" office:string-value="#define " calcext:value-type="string">
            <text:p>#define </text:p>
          </table:table-cell>
          <table:table-cell table:formula="of:=IF([$Sheet1.A11] &lt;&gt;&quot;&quot;; [$Sheet1.I11]; &quot;&quot;)">
            <text:p/>
          </table:table-cell>
          <table:table-cell table:formula="of:=IF([$Sheet1.A11] &lt;&gt;&quot;&quot;; &quot; &quot;; &quot;&quot;)" office:value-type="string" office:string-value=" " calcext:value-type="string">
            <text:p><text:s/></text:p>
          </table:table-cell>
          <table:table-cell table:formula="of:=IF([$Sheet1.A11] &lt;&gt;&quot;&quot;; [$Sheet1.A11]; &quot;&quot;)"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formula="of:=IF([$Sheet1.A12] &lt;&gt;&quot;&quot;; &quot;#define &quot;; &quot;&quot;)">
            <text:p/>
          </table:table-cell>
          <table:table-cell table:formula="of:=IF([$Sheet1.A12] &lt;&gt;&quot;&quot;; [$Sheet1.I12]; &quot;&quot;)">
            <text:p/>
          </table:table-cell>
          <table:table-cell table:formula="of:=IF([$Sheet1.A12] &lt;&gt;&quot;&quot;; &quot; &quot;; &quot;&quot;)">
            <text:p/>
          </table:table-cell>
          <table:table-cell table:formula="of:=IF([$Sheet1.A12] &lt;&gt;&quot;&quot;; [$Sheet1.A12]; &quot;&quot;)">
            <text:p/>
          </table:table-cell>
          <table:table-cell table:number-columns-repeated="16380"/>
        </table:table-row>
        <table:table-row table:style-name="ro1">
          <table:table-cell table:formula="of:=IF([$Sheet1.A13] &lt;&gt;&quot;&quot;; &quot;#define &quot;; &quot;&quot;)" office:value-type="string" office:string-value="#define " calcext:value-type="string">
            <text:p>#define </text:p>
          </table:table-cell>
          <table:table-cell table:formula="of:=IF([$Sheet1.A13] &lt;&gt;&quot;&quot;; [$Sheet1.I13]; &quot;&quot;)" office:value-type="string" office:string-value="CUP3_CONTROL" calcext:value-type="string">
            <text:p>CUP3_CONTROL</text:p>
          </table:table-cell>
          <table:table-cell table:formula="of:=IF([$Sheet1.A13] &lt;&gt;&quot;&quot;; &quot; &quot;; &quot;&quot;)" office:value-type="string" office:string-value=" " calcext:value-type="string">
            <text:p><text:s/></text:p>
          </table:table-cell>
          <table:table-cell table:formula="of:=IF([$Sheet1.A13] &lt;&gt;&quot;&quot;; [$Sheet1.A13]; &quot;&quot;)"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table:formula="of:=IF([$Sheet1.A14] &lt;&gt;&quot;&quot;; &quot;#define &quot;; &quot;&quot;)" office:value-type="string" office:string-value="#define " calcext:value-type="string">
            <text:p>#define </text:p>
          </table:table-cell>
          <table:table-cell table:formula="of:=IF([$Sheet1.A14] &lt;&gt;&quot;&quot;; [$Sheet1.I14]; &quot;&quot;)" office:value-type="string" office:string-value="EXTERNAL_INHIBITION3" calcext:value-type="string">
            <text:p>EXTERNAL_INHIBITION3</text:p>
          </table:table-cell>
          <table:table-cell table:formula="of:=IF([$Sheet1.A14] &lt;&gt;&quot;&quot;; &quot; &quot;; &quot;&quot;)" office:value-type="string" office:string-value=" " calcext:value-type="string">
            <text:p><text:s/></text:p>
          </table:table-cell>
          <table:table-cell table:formula="of:=IF([$Sheet1.A14] &lt;&gt;&quot;&quot;; [$Sheet1.A14]; &quot;&quot;)"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formula="of:=IF([$Sheet1.A15] &lt;&gt;&quot;&quot;; &quot;#define &quot;; &quot;&quot;)" office:value-type="string" office:string-value="#define " calcext:value-type="string">
            <text:p>#define </text:p>
          </table:table-cell>
          <table:table-cell table:formula="of:=IF([$Sheet1.A15] &lt;&gt;&quot;&quot;; [$Sheet1.I15]; &quot;&quot;)" office:value-type="string" office:string-value="CUP3_SWITCH1" calcext:value-type="string">
            <text:p>CUP3_SWITCH1</text:p>
          </table:table-cell>
          <table:table-cell table:formula="of:=IF([$Sheet1.A15] &lt;&gt;&quot;&quot;; &quot; &quot;; &quot;&quot;)" office:value-type="string" office:string-value=" " calcext:value-type="string">
            <text:p><text:s/></text:p>
          </table:table-cell>
          <table:table-cell table:formula="of:=IF([$Sheet1.A15] &lt;&gt;&quot;&quot;; [$Sheet1.A15]; &quot;&quot;)"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table:formula="of:=IF([$Sheet1.A16] &lt;&gt;&quot;&quot;; &quot;#define &quot;; &quot;&quot;)" office:value-type="string" office:string-value="#define " calcext:value-type="string">
            <text:p>#define </text:p>
          </table:table-cell>
          <table:table-cell table:formula="of:=IF([$Sheet1.A16] &lt;&gt;&quot;&quot;; [$Sheet1.I16]; &quot;&quot;)" office:value-type="string" office:string-value="CUP3_SWITCH2" calcext:value-type="string">
            <text:p>CUP3_SWITCH2</text:p>
          </table:table-cell>
          <table:table-cell table:formula="of:=IF([$Sheet1.A16] &lt;&gt;&quot;&quot;; &quot; &quot;; &quot;&quot;)" office:value-type="string" office:string-value=" " calcext:value-type="string">
            <text:p><text:s/></text:p>
          </table:table-cell>
          <table:table-cell table:formula="of:=IF([$Sheet1.A16] &lt;&gt;&quot;&quot;; [$Sheet1.A16]; &quot;&quot;)"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table:formula="of:=IF([$Sheet1.A17] &lt;&gt;&quot;&quot;; &quot;#define &quot;; &quot;&quot;)">
            <text:p/>
          </table:table-cell>
          <table:table-cell table:formula="of:=IF([$Sheet1.A17] &lt;&gt;&quot;&quot;; [$Sheet1.I17]; &quot;&quot;)">
            <text:p/>
          </table:table-cell>
          <table:table-cell table:formula="of:=IF([$Sheet1.A17] &lt;&gt;&quot;&quot;; &quot; &quot;; &quot;&quot;)">
            <text:p/>
          </table:table-cell>
          <table:table-cell table:formula="of:=IF([$Sheet1.A17] &lt;&gt;&quot;&quot;; [$Sheet1.A17]; &quot;&quot;)">
            <text:p/>
          </table:table-cell>
          <table:table-cell table:number-columns-repeated="16380"/>
        </table:table-row>
        <table:table-row table:style-name="ro1">
          <table:table-cell table:formula="of:=IF([$Sheet1.A18] &lt;&gt;&quot;&quot;; &quot;#define &quot;; &quot;&quot;)" office:value-type="string" office:string-value="#define " calcext:value-type="string">
            <text:p>#define </text:p>
          </table:table-cell>
          <table:table-cell table:formula="of:=IF([$Sheet1.A18] &lt;&gt;&quot;&quot;; [$Sheet1.I18]; &quot;&quot;)" office:value-type="string" office:string-value="CUP1_REQUESTED_STATE" calcext:value-type="string">
            <text:p>CUP1_REQUESTED_STATE</text:p>
          </table:table-cell>
          <table:table-cell table:formula="of:=IF([$Sheet1.A18] &lt;&gt;&quot;&quot;; &quot; &quot;; &quot;&quot;)" office:value-type="string" office:string-value=" " calcext:value-type="string">
            <text:p><text:s/></text:p>
          </table:table-cell>
          <table:table-cell table:formula="of:=IF([$Sheet1.A18] &lt;&gt;&quot;&quot;; [$Sheet1.A18]; &quot;&quot;)"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table:formula="of:=IF([$Sheet1.A19] &lt;&gt;&quot;&quot;; &quot;#define &quot;; &quot;&quot;)" office:value-type="string" office:string-value="#define " calcext:value-type="string">
            <text:p>#define </text:p>
          </table:table-cell>
          <table:table-cell table:formula="of:=IF([$Sheet1.A19] &lt;&gt;&quot;&quot;; [$Sheet1.I19]; &quot;&quot;)" office:value-type="string" office:string-value="CUP2_REQUESTED_STATE" calcext:value-type="string">
            <text:p>CUP2_REQUESTED_STATE</text:p>
          </table:table-cell>
          <table:table-cell table:formula="of:=IF([$Sheet1.A19] &lt;&gt;&quot;&quot;; &quot; &quot;; &quot;&quot;)" office:value-type="string" office:string-value=" " calcext:value-type="string">
            <text:p><text:s/></text:p>
          </table:table-cell>
          <table:table-cell table:formula="of:=IF([$Sheet1.A19] &lt;&gt;&quot;&quot;; [$Sheet1.A19]; &quot;&quot;)"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 table:formula="of:=IF([$Sheet1.A20] &lt;&gt;&quot;&quot;; &quot;#define &quot;; &quot;&quot;)" office:value-type="string" office:string-value="#define " calcext:value-type="string">
            <text:p>#define </text:p>
          </table:table-cell>
          <table:table-cell table:formula="of:=IF([$Sheet1.A20] &lt;&gt;&quot;&quot;; [$Sheet1.I20]; &quot;&quot;)" office:value-type="string" office:string-value="CUP3_REQUESTED_STATE" calcext:value-type="string">
            <text:p>CUP3_REQUESTED_STATE</text:p>
          </table:table-cell>
          <table:table-cell table:formula="of:=IF([$Sheet1.A20] &lt;&gt;&quot;&quot;; &quot; &quot;; &quot;&quot;)" office:value-type="string" office:string-value=" " calcext:value-type="string">
            <text:p><text:s/></text:p>
          </table:table-cell>
          <table:table-cell table:formula="of:=IF([$Sheet1.A20] &lt;&gt;&quot;&quot;; [$Sheet1.A20]; &quot;&quot;)"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formula="of:=IF([$Sheet1.A21] &lt;&gt;&quot;&quot;; &quot;#define &quot;; &quot;&quot;)">
            <text:p/>
          </table:table-cell>
          <table:table-cell table:formula="of:=IF([$Sheet1.A21] &lt;&gt;&quot;&quot;; [$Sheet1.I21]; &quot;&quot;)">
            <text:p/>
          </table:table-cell>
          <table:table-cell table:formula="of:=IF([$Sheet1.A21] &lt;&gt;&quot;&quot;; &quot; &quot;; &quot;&quot;)">
            <text:p/>
          </table:table-cell>
          <table:table-cell table:formula="of:=IF([$Sheet1.A21] &lt;&gt;&quot;&quot;; [$Sheet1.A21]; &quot;&quot;)">
            <text:p/>
          </table:table-cell>
          <table:table-cell table:number-columns-repeated="16380"/>
        </table:table-row>
        <table:table-row table:style-name="ro1">
          <table:table-cell table:formula="of:=IF([$Sheet1.A22] &lt;&gt;&quot;&quot;; &quot;#define &quot;; &quot;&quot;)" office:value-type="string" office:string-value="#define " calcext:value-type="string">
            <text:p>#define </text:p>
          </table:table-cell>
          <table:table-cell table:formula="of:=IF([$Sheet1.A22] &lt;&gt;&quot;&quot;; [$Sheet1.I22]; &quot;&quot;)" office:value-type="string" office:string-value="CUP1_STEADY" calcext:value-type="string">
            <text:p>CUP1_STEADY</text:p>
          </table:table-cell>
          <table:table-cell table:formula="of:=IF([$Sheet1.A22] &lt;&gt;&quot;&quot;; &quot; &quot;; &quot;&quot;)" office:value-type="string" office:string-value=" " calcext:value-type="string">
            <text:p><text:s/></text:p>
          </table:table-cell>
          <table:table-cell table:formula="of:=IF([$Sheet1.A22] &lt;&gt;&quot;&quot;; [$Sheet1.A22]; &quot;&quot;)"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table:formula="of:=IF([$Sheet1.A23] &lt;&gt;&quot;&quot;; &quot;#define &quot;; &quot;&quot;)" office:value-type="string" office:string-value="#define " calcext:value-type="string">
            <text:p>#define </text:p>
          </table:table-cell>
          <table:table-cell table:formula="of:=IF([$Sheet1.A23] &lt;&gt;&quot;&quot;; [$Sheet1.I23]; &quot;&quot;)" office:value-type="string" office:string-value="CUP2_STEADY" calcext:value-type="string">
            <text:p>CUP2_STEADY</text:p>
          </table:table-cell>
          <table:table-cell table:formula="of:=IF([$Sheet1.A23] &lt;&gt;&quot;&quot;; &quot; &quot;; &quot;&quot;)" office:value-type="string" office:string-value=" " calcext:value-type="string">
            <text:p><text:s/></text:p>
          </table:table-cell>
          <table:table-cell table:formula="of:=IF([$Sheet1.A23] &lt;&gt;&quot;&quot;; [$Sheet1.A23]; &quot;&quot;)" office:value-type="float" office:value="17" calcext:value-type="float">
            <text:p>17</text:p>
          </table:table-cell>
          <table:table-cell table:number-columns-repeated="16380"/>
        </table:table-row>
        <table:table-row table:style-name="ro1">
          <table:table-cell table:formula="of:=IF([$Sheet1.A24] &lt;&gt;&quot;&quot;; &quot;#define &quot;; &quot;&quot;)" office:value-type="string" office:string-value="#define " calcext:value-type="string">
            <text:p>#define </text:p>
          </table:table-cell>
          <table:table-cell table:formula="of:=IF([$Sheet1.A24] &lt;&gt;&quot;&quot;; [$Sheet1.I24]; &quot;&quot;)" office:value-type="string" office:string-value="CUP3_STEADY" calcext:value-type="string">
            <text:p>CUP3_STEADY</text:p>
          </table:table-cell>
          <table:table-cell table:formula="of:=IF([$Sheet1.A24] &lt;&gt;&quot;&quot;; &quot; &quot;; &quot;&quot;)" office:value-type="string" office:string-value=" " calcext:value-type="string">
            <text:p><text:s/></text:p>
          </table:table-cell>
          <table:table-cell table:formula="of:=IF([$Sheet1.A24] &lt;&gt;&quot;&quot;; [$Sheet1.A24]; &quot;&quot;)" office:value-type="float" office:value="18" calcext:value-type="float">
            <text:p>18</text:p>
          </table:table-cell>
          <table:table-cell table:number-columns-repeated="16380"/>
        </table:table-row>
        <table:table-row table:style-name="ro1">
          <table:table-cell table:formula="of:=IF([$Sheet1.A25] &lt;&gt;&quot;&quot;; &quot;#define &quot;; &quot;&quot;)" office:value-type="string" office:string-value="#define " calcext:value-type="string">
            <text:p>#define </text:p>
          </table:table-cell>
          <table:table-cell table:formula="of:=IF([$Sheet1.A25] &lt;&gt;&quot;&quot;; [$Sheet1.I25]; &quot;&quot;)" office:value-type="string" office:string-value="CUP1_INSERTED" calcext:value-type="string">
            <text:p>CUP1_INSERTED</text:p>
          </table:table-cell>
          <table:table-cell table:formula="of:=IF([$Sheet1.A25] &lt;&gt;&quot;&quot;; &quot; &quot;; &quot;&quot;)" office:value-type="string" office:string-value=" " calcext:value-type="string">
            <text:p><text:s/></text:p>
          </table:table-cell>
          <table:table-cell table:formula="of:=IF([$Sheet1.A25] &lt;&gt;&quot;&quot;; [$Sheet1.A25]; &quot;&quot;)" office:value-type="float" office:value="19" calcext:value-type="float">
            <text:p>19</text:p>
          </table:table-cell>
          <table:table-cell table:number-columns-repeated="16380"/>
        </table:table-row>
        <table:table-row table:style-name="ro1">
          <table:table-cell table:formula="of:=IF([$Sheet1.A26] &lt;&gt;&quot;&quot;; &quot;#define &quot;; &quot;&quot;)" office:value-type="string" office:string-value="#define " calcext:value-type="string">
            <text:p>#define </text:p>
          </table:table-cell>
          <table:table-cell table:formula="of:=IF([$Sheet1.A26] &lt;&gt;&quot;&quot;; [$Sheet1.I26]; &quot;&quot;)" office:value-type="string" office:string-value="CUP2_INSERTED" calcext:value-type="string">
            <text:p>CUP2_INSERTED</text:p>
          </table:table-cell>
          <table:table-cell table:formula="of:=IF([$Sheet1.A26] &lt;&gt;&quot;&quot;; &quot; &quot;; &quot;&quot;)" office:value-type="string" office:string-value=" " calcext:value-type="string">
            <text:p><text:s/></text:p>
          </table:table-cell>
          <table:table-cell table:formula="of:=IF([$Sheet1.A26] &lt;&gt;&quot;&quot;; [$Sheet1.A26]; &quot;&quot;)"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table:formula="of:=IF([$Sheet1.A27] &lt;&gt;&quot;&quot;; &quot;#define &quot;; &quot;&quot;)" office:value-type="string" office:string-value="#define " calcext:value-type="string">
            <text:p>#define </text:p>
          </table:table-cell>
          <table:table-cell table:formula="of:=IF([$Sheet1.A27] &lt;&gt;&quot;&quot;; [$Sheet1.I27]; &quot;&quot;)" office:value-type="string" office:string-value="CUP3_INSERTED" calcext:value-type="string">
            <text:p>CUP3_INSERTED</text:p>
          </table:table-cell>
          <table:table-cell table:formula="of:=IF([$Sheet1.A27] &lt;&gt;&quot;&quot;; &quot; &quot;; &quot;&quot;)" office:value-type="string" office:string-value=" " calcext:value-type="string">
            <text:p><text:s/></text:p>
          </table:table-cell>
          <table:table-cell table:formula="of:=IF([$Sheet1.A27] &lt;&gt;&quot;&quot;; [$Sheet1.A27]; &quot;&quot;)" office:value-type="float" office:value="21" calcext:value-type="float">
            <text:p>21</text:p>
          </table:table-cell>
          <table:table-cell table:number-columns-repeated="16380"/>
        </table:table-row>
        <table:table-row table:style-name="ro1">
          <table:table-cell table:formula="of:=IF([$Sheet1.A28] &lt;&gt;&quot;&quot;; &quot;#define &quot;; &quot;&quot;)" office:value-type="string" office:string-value="#define " calcext:value-type="string">
            <text:p>#define </text:p>
          </table:table-cell>
          <table:table-cell table:formula="of:=IF([$Sheet1.A28] &lt;&gt;&quot;&quot;; [$Sheet1.I28]; &quot;&quot;)" office:value-type="string" office:string-value="ACTUATOR1_CONTROL" calcext:value-type="string">
            <text:p>ACTUATOR1_CONTROL</text:p>
          </table:table-cell>
          <table:table-cell table:formula="of:=IF([$Sheet1.A28] &lt;&gt;&quot;&quot;; &quot; &quot;; &quot;&quot;)" office:value-type="string" office:string-value=" " calcext:value-type="string">
            <text:p><text:s/></text:p>
          </table:table-cell>
          <table:table-cell table:formula="of:=IF([$Sheet1.A28] &lt;&gt;&quot;&quot;; [$Sheet1.A28]; &quot;&quot;)" office:value-type="float" office:value="22" calcext:value-type="float">
            <text:p>22</text:p>
          </table:table-cell>
          <table:table-cell table:number-columns-repeated="16380"/>
        </table:table-row>
        <table:table-row table:style-name="ro1">
          <table:table-cell table:formula="of:=IF([$Sheet1.A29] &lt;&gt;&quot;&quot;; &quot;#define &quot;; &quot;&quot;)" office:value-type="string" office:string-value="#define " calcext:value-type="string">
            <text:p>#define </text:p>
          </table:table-cell>
          <table:table-cell table:formula="of:=IF([$Sheet1.A29] &lt;&gt;&quot;&quot;; [$Sheet1.I29]; &quot;&quot;)" office:value-type="string" office:string-value="ACTUATOR2_CONTROL" calcext:value-type="string">
            <text:p>ACTUATOR2_CONTROL</text:p>
          </table:table-cell>
          <table:table-cell table:formula="of:=IF([$Sheet1.A29] &lt;&gt;&quot;&quot;; &quot; &quot;; &quot;&quot;)" office:value-type="string" office:string-value=" " calcext:value-type="string">
            <text:p><text:s/></text:p>
          </table:table-cell>
          <table:table-cell table:formula="of:=IF([$Sheet1.A29] &lt;&gt;&quot;&quot;; [$Sheet1.A29]; &quot;&quot;)" office:value-type="float" office:value="23" calcext:value-type="float">
            <text:p>23</text:p>
          </table:table-cell>
          <table:table-cell table:number-columns-repeated="16380"/>
        </table:table-row>
        <table:table-row table:style-name="ro1">
          <table:table-cell table:formula="of:=IF([$Sheet1.A30] &lt;&gt;&quot;&quot;; &quot;#define &quot;; &quot;&quot;)" office:value-type="string" office:string-value="#define " calcext:value-type="string">
            <text:p>#define </text:p>
          </table:table-cell>
          <table:table-cell table:formula="of:=IF([$Sheet1.A30] &lt;&gt;&quot;&quot;; [$Sheet1.I30]; &quot;&quot;)" office:value-type="string" office:string-value="ACTUATOR3_CONTROL_IN" calcext:value-type="string">
            <text:p>ACTUATOR3_CONTROL_IN</text:p>
          </table:table-cell>
          <table:table-cell table:formula="of:=IF([$Sheet1.A30] &lt;&gt;&quot;&quot;; &quot; &quot;; &quot;&quot;)" office:value-type="string" office:string-value=" " calcext:value-type="string">
            <text:p><text:s/></text:p>
          </table:table-cell>
          <table:table-cell table:formula="of:=IF([$Sheet1.A30] &lt;&gt;&quot;&quot;; [$Sheet1.A30]; &quot;&quot;)" office:value-type="float" office:value="24" calcext:value-type="float">
            <text:p>24</text:p>
          </table:table-cell>
          <table:table-cell table:number-columns-repeated="16380"/>
        </table:table-row>
        <table:table-row table:style-name="ro1">
          <table:table-cell table:formula="of:=IF([$Sheet1.A31] &lt;&gt;&quot;&quot;; &quot;#define &quot;; &quot;&quot;)" office:value-type="string" office:string-value="#define " calcext:value-type="string">
            <text:p>#define </text:p>
          </table:table-cell>
          <table:table-cell table:formula="of:=IF([$Sheet1.A31] &lt;&gt;&quot;&quot;; [$Sheet1.I31]; &quot;&quot;)" office:value-type="string" office:string-value="ACTUATOR3_CONTROL_OUT" calcext:value-type="string">
            <text:p>ACTUATOR3_CONTROL_OUT</text:p>
          </table:table-cell>
          <table:table-cell table:formula="of:=IF([$Sheet1.A31] &lt;&gt;&quot;&quot;; &quot; &quot;; &quot;&quot;)" office:value-type="string" office:string-value=" " calcext:value-type="string">
            <text:p><text:s/></text:p>
          </table:table-cell>
          <table:table-cell table:formula="of:=IF([$Sheet1.A31] &lt;&gt;&quot;&quot;; [$Sheet1.A31]; &quot;&quot;)" office:value-type="float" office:value="25" calcext:value-type="float">
            <text:p>25</text:p>
          </table:table-cell>
          <table:table-cell table:number-columns-repeated="16380"/>
        </table:table-row>
        <table:table-row table:style-name="ro1">
          <table:table-cell table:formula="of:=IF([$Sheet1.A32] &lt;&gt;&quot;&quot;; &quot;#define &quot;; &quot;&quot;)" office:value-type="string" office:string-value="#define " calcext:value-type="string">
            <text:p>#define </text:p>
          </table:table-cell>
          <table:table-cell table:formula="of:=IF([$Sheet1.A32] &lt;&gt;&quot;&quot;; [$Sheet1.I32]; &quot;&quot;)" office:value-type="string" office:string-value="ACTUATOR3_CONTROL_BRAKE" calcext:value-type="string">
            <text:p>ACTUATOR3_CONTROL_BRAKE</text:p>
          </table:table-cell>
          <table:table-cell table:formula="of:=IF([$Sheet1.A32] &lt;&gt;&quot;&quot;; &quot; &quot;; &quot;&quot;)" office:value-type="string" office:string-value=" " calcext:value-type="string">
            <text:p><text:s/></text:p>
          </table:table-cell>
          <table:table-cell table:formula="of:=IF([$Sheet1.A32] &lt;&gt;&quot;&quot;; [$Sheet1.A32]; &quot;&quot;)" office:value-type="float" office:value="26" calcext:value-type="float">
            <text:p>26</text:p>
          </table:table-cell>
          <table:table-cell table:number-columns-repeated="16380"/>
        </table:table-row>
        <table:table-row table:style-name="ro1">
          <table:table-cell table:formula="of:=IF([$Sheet1.A33] &lt;&gt;&quot;&quot;; &quot;#define &quot;; &quot;&quot;)">
            <text:p/>
          </table:table-cell>
          <table:table-cell table:formula="of:=IF([$Sheet1.A33] &lt;&gt;&quot;&quot;; [$Sheet1.I33]; &quot;&quot;)">
            <text:p/>
          </table:table-cell>
          <table:table-cell table:formula="of:=IF([$Sheet1.A33] &lt;&gt;&quot;&quot;; &quot; &quot;; &quot;&quot;)">
            <text:p/>
          </table:table-cell>
          <table:table-cell table:formula="of:=IF([$Sheet1.A33] &lt;&gt;&quot;&quot;; [$Sheet1.A33]; &quot;&quot;)">
            <text:p/>
          </table:table-cell>
          <table:table-cell table:number-columns-repeated="16380"/>
        </table:table-row>
        <table:table-row table:style-name="ro1">
          <table:table-cell table:formula="of:=IF([$Sheet1.A34] &lt;&gt;&quot;&quot;; &quot;#define &quot;; &quot;&quot;)">
            <text:p/>
          </table:table-cell>
          <table:table-cell table:formula="of:=IF([$Sheet1.A34] &lt;&gt;&quot;&quot;; [$Sheet1.I34]; &quot;&quot;)">
            <text:p/>
          </table:table-cell>
          <table:table-cell table:formula="of:=IF([$Sheet1.A34] &lt;&gt;&quot;&quot;; &quot; &quot;; &quot;&quot;)">
            <text:p/>
          </table:table-cell>
          <table:table-cell table:formula="of:=IF([$Sheet1.A34] &lt;&gt;&quot;&quot;; [$Sheet1.A34]; &quot;&quot;)">
            <text:p/>
          </table:table-cell>
          <table:table-cell table:number-columns-repeated="16380"/>
        </table:table-row>
        <table:table-row table:style-name="ro1">
          <table:table-cell table:formula="of:=IF([$Sheet1.A35] &lt;&gt;&quot;&quot;; &quot;#define &quot;; &quot;&quot;)" office:value-type="string" office:string-value="#define " calcext:value-type="string">
            <text:p>#define </text:p>
          </table:table-cell>
          <table:table-cell table:formula="of:=IF([$Sheet1.A35] &lt;&gt;&quot;&quot;; [$Sheet1.I35]; &quot;&quot;)" office:value-type="string" office:string-value="ERROR_CODE" calcext:value-type="string">
            <text:p>ERROR_CODE</text:p>
          </table:table-cell>
          <table:table-cell table:formula="of:=IF([$Sheet1.A35] &lt;&gt;&quot;&quot;; &quot; &quot;; &quot;&quot;)" office:value-type="string" office:string-value=" " calcext:value-type="string">
            <text:p><text:s/></text:p>
          </table:table-cell>
          <table:table-cell table:formula="of:=IF([$Sheet1.A35] &lt;&gt;&quot;&quot;; [$Sheet1.A35]; &quot;&quot;)" office:value-type="float" office:value="1000" calcext:value-type="float">
            <text:p>1000</text:p>
          </table:table-cell>
          <table:table-cell table:number-columns-repeated="16380"/>
        </table:table-row>
        <table:table-row table:style-name="ro1">
          <table:table-cell table:formula="of:=IF([$Sheet1.A36] &lt;&gt;&quot;&quot;; &quot;#define &quot;; &quot;&quot;)" office:value-type="string" office:string-value="#define " calcext:value-type="string">
            <text:p>#define </text:p>
          </table:table-cell>
          <table:table-cell table:formula="of:=IF([$Sheet1.A36] &lt;&gt;&quot;&quot;; [$Sheet1.I36]; &quot;&quot;)" office:value-type="string" office:string-value="LAST_ERROR" calcext:value-type="string">
            <text:p>LAST_ERROR</text:p>
          </table:table-cell>
          <table:table-cell table:formula="of:=IF([$Sheet1.A36] &lt;&gt;&quot;&quot;; &quot; &quot;; &quot;&quot;)" office:value-type="string" office:string-value=" " calcext:value-type="string">
            <text:p><text:s/></text:p>
          </table:table-cell>
          <table:table-cell table:formula="of:=IF([$Sheet1.A36] &lt;&gt;&quot;&quot;; [$Sheet1.A36]; &quot;&quot;)" office:value-type="float" office:value="1001" calcext:value-type="float">
            <text:p>1001</text:p>
          </table:table-cell>
          <table:table-cell table:number-columns-repeated="16380"/>
        </table:table-row>
        <table:table-row table:style-name="ro1">
          <table:table-cell table:formula="of:=IF([$Sheet1.A37] &lt;&gt;&quot;&quot;; &quot;#define &quot;; &quot;&quot;)" office:value-type="string" office:string-value="#define " calcext:value-type="string">
            <text:p>#define </text:p>
          </table:table-cell>
          <table:table-cell table:formula="of:=IF([$Sheet1.A37] &lt;&gt;&quot;&quot;; [$Sheet1.I37]; &quot;&quot;)" office:value-type="string" office:string-value="ERROR_STORAGE" calcext:value-type="string">
            <text:p>ERROR_STORAGE</text:p>
          </table:table-cell>
          <table:table-cell table:formula="of:=IF([$Sheet1.A37] &lt;&gt;&quot;&quot;; &quot; &quot;; &quot;&quot;)" office:value-type="string" office:string-value=" " calcext:value-type="string">
            <text:p><text:s/></text:p>
          </table:table-cell>
          <table:table-cell table:formula="of:=IF([$Sheet1.A37] &lt;&gt;&quot;&quot;; [$Sheet1.A37]; &quot;&quot;)" office:value-type="float" office:value="1002" calcext:value-type="float">
            <text:p>1002</text:p>
          </table:table-cell>
          <table:table-cell table:number-columns-repeated="16380"/>
        </table:table-row>
        <table:table-row table:style-name="ro1">
          <table:table-cell table:formula="of:=IF([$Sheet1.A38] &lt;&gt;&quot;&quot;; &quot;#define &quot;; &quot;&quot;)">
            <text:p/>
          </table:table-cell>
          <table:table-cell table:formula="of:=IF([$Sheet1.A38] &lt;&gt;&quot;&quot;; [$Sheet1.I38]; &quot;&quot;)">
            <text:p/>
          </table:table-cell>
          <table:table-cell table:formula="of:=IF([$Sheet1.A38] &lt;&gt;&quot;&quot;; &quot; &quot;; &quot;&quot;)">
            <text:p/>
          </table:table-cell>
          <table:table-cell table:formula="of:=IF([$Sheet1.A38] &lt;&gt;&quot;&quot;; [$Sheet1.A38]; &quot;&quot;)">
            <text:p/>
          </table:table-cell>
          <table:table-cell table:number-columns-repeated="16380"/>
        </table:table-row>
        <table:table-row table:style-name="ro1">
          <table:table-cell table:formula="of:=IF([$Sheet1.A39] &lt;&gt;&quot;&quot;; &quot;#define &quot;; &quot;&quot;)" office:value-type="string" office:string-value="#define " calcext:value-type="string">
            <text:p>#define </text:p>
          </table:table-cell>
          <table:table-cell table:formula="of:=IF([$Sheet1.A39] &lt;&gt;&quot;&quot;; [$Sheet1.I39]; &quot;&quot;)" office:value-type="string" office:string-value="TIME_LIMIT_INSERTING1" calcext:value-type="string">
            <text:p>TIME_LIMIT_INSERTING1</text:p>
          </table:table-cell>
          <table:table-cell table:formula="of:=IF([$Sheet1.A39] &lt;&gt;&quot;&quot;; &quot; &quot;; &quot;&quot;)" office:value-type="string" office:string-value=" " calcext:value-type="string">
            <text:p><text:s/></text:p>
          </table:table-cell>
          <table:table-cell table:formula="of:=IF([$Sheet1.A39] &lt;&gt;&quot;&quot;; [$Sheet1.A39]; &quot;&quot;)" office:value-type="float" office:value="1003" calcext:value-type="float">
            <text:p>1003</text:p>
          </table:table-cell>
          <table:table-cell table:number-columns-repeated="16380"/>
        </table:table-row>
        <table:table-row table:style-name="ro1">
          <table:table-cell table:formula="of:=IF([$Sheet1.A40] &lt;&gt;&quot;&quot;; &quot;#define &quot;; &quot;&quot;)" office:value-type="string" office:string-value="#define " calcext:value-type="string">
            <text:p>#define </text:p>
          </table:table-cell>
          <table:table-cell table:formula="of:=IF([$Sheet1.A40] &lt;&gt;&quot;&quot;; [$Sheet1.I40]; &quot;&quot;)" office:value-type="string" office:string-value="TIME_LIMIT_INSERTING2" calcext:value-type="string">
            <text:p>TIME_LIMIT_INSERTING2</text:p>
          </table:table-cell>
          <table:table-cell table:formula="of:=IF([$Sheet1.A40] &lt;&gt;&quot;&quot;; &quot; &quot;; &quot;&quot;)" office:value-type="string" office:string-value=" " calcext:value-type="string">
            <text:p><text:s/></text:p>
          </table:table-cell>
          <table:table-cell table:formula="of:=IF([$Sheet1.A40] &lt;&gt;&quot;&quot;; [$Sheet1.A40]; &quot;&quot;)" office:value-type="float" office:value="1004" calcext:value-type="float">
            <text:p>1004</text:p>
          </table:table-cell>
          <table:table-cell table:number-columns-repeated="16380"/>
        </table:table-row>
        <table:table-row table:style-name="ro1">
          <table:table-cell table:formula="of:=IF([$Sheet1.A41] &lt;&gt;&quot;&quot;; &quot;#define &quot;; &quot;&quot;)" office:value-type="string" office:string-value="#define " calcext:value-type="string">
            <text:p>#define </text:p>
          </table:table-cell>
          <table:table-cell table:formula="of:=IF([$Sheet1.A41] &lt;&gt;&quot;&quot;; [$Sheet1.I41]; &quot;&quot;)" office:value-type="string" office:string-value="TIME_LIMIT_INSERTING3" calcext:value-type="string">
            <text:p>TIME_LIMIT_INSERTING3</text:p>
          </table:table-cell>
          <table:table-cell table:formula="of:=IF([$Sheet1.A41] &lt;&gt;&quot;&quot;; &quot; &quot;; &quot;&quot;)" office:value-type="string" office:string-value=" " calcext:value-type="string">
            <text:p><text:s/></text:p>
          </table:table-cell>
          <table:table-cell table:formula="of:=IF([$Sheet1.A41] &lt;&gt;&quot;&quot;; [$Sheet1.A41]; &quot;&quot;)" office:value-type="float" office:value="1005" calcext:value-type="float">
            <text:p>1005</text:p>
          </table:table-cell>
          <table:table-cell table:number-columns-repeated="16380"/>
        </table:table-row>
        <table:table-row table:style-name="ro1">
          <table:table-cell table:formula="of:=IF([$Sheet1.A42] &lt;&gt;&quot;&quot;; &quot;#define &quot;; &quot;&quot;)" office:value-type="string" office:string-value="#define " calcext:value-type="string">
            <text:p>#define </text:p>
          </table:table-cell>
          <table:table-cell table:formula="of:=IF([$Sheet1.A42] &lt;&gt;&quot;&quot;; [$Sheet1.I42]; &quot;&quot;)" office:value-type="string" office:string-value="TIME_LIMIT_WITHDRAWING1" calcext:value-type="string">
            <text:p>TIME_LIMIT_WITHDRAWING1</text:p>
          </table:table-cell>
          <table:table-cell table:formula="of:=IF([$Sheet1.A42] &lt;&gt;&quot;&quot;; &quot; &quot;; &quot;&quot;)" office:value-type="string" office:string-value=" " calcext:value-type="string">
            <text:p><text:s/></text:p>
          </table:table-cell>
          <table:table-cell table:formula="of:=IF([$Sheet1.A42] &lt;&gt;&quot;&quot;; [$Sheet1.A42]; &quot;&quot;)" office:value-type="float" office:value="1006" calcext:value-type="float">
            <text:p>1006</text:p>
          </table:table-cell>
          <table:table-cell table:number-columns-repeated="16380"/>
        </table:table-row>
        <table:table-row table:style-name="ro1">
          <table:table-cell table:formula="of:=IF([$Sheet1.A43] &lt;&gt;&quot;&quot;; &quot;#define &quot;; &quot;&quot;)" office:value-type="string" office:string-value="#define " calcext:value-type="string">
            <text:p>#define </text:p>
          </table:table-cell>
          <table:table-cell table:formula="of:=IF([$Sheet1.A43] &lt;&gt;&quot;&quot;; [$Sheet1.I43]; &quot;&quot;)" office:value-type="string" office:string-value="TIME_LIMIT_WITHDRAWING2" calcext:value-type="string">
            <text:p>TIME_LIMIT_WITHDRAWING2</text:p>
          </table:table-cell>
          <table:table-cell table:formula="of:=IF([$Sheet1.A43] &lt;&gt;&quot;&quot;; &quot; &quot;; &quot;&quot;)" office:value-type="string" office:string-value=" " calcext:value-type="string">
            <text:p><text:s/></text:p>
          </table:table-cell>
          <table:table-cell table:formula="of:=IF([$Sheet1.A43] &lt;&gt;&quot;&quot;; [$Sheet1.A43]; &quot;&quot;)" office:value-type="float" office:value="1007" calcext:value-type="float">
            <text:p>1007</text:p>
          </table:table-cell>
          <table:table-cell table:number-columns-repeated="16380"/>
        </table:table-row>
        <table:table-row table:style-name="ro1">
          <table:table-cell table:formula="of:=IF([$Sheet1.A44] &lt;&gt;&quot;&quot;; &quot;#define &quot;; &quot;&quot;)" office:value-type="string" office:string-value="#define " calcext:value-type="string">
            <text:p>#define </text:p>
          </table:table-cell>
          <table:table-cell table:formula="of:=IF([$Sheet1.A44] &lt;&gt;&quot;&quot;; [$Sheet1.I44]; &quot;&quot;)" office:value-type="string" office:string-value="TIME_LIMIT_WITHDRAWING3" calcext:value-type="string">
            <text:p>TIME_LIMIT_WITHDRAWING3</text:p>
          </table:table-cell>
          <table:table-cell table:formula="of:=IF([$Sheet1.A44] &lt;&gt;&quot;&quot;; &quot; &quot;; &quot;&quot;)" office:value-type="string" office:string-value=" " calcext:value-type="string">
            <text:p><text:s/></text:p>
          </table:table-cell>
          <table:table-cell table:formula="of:=IF([$Sheet1.A44] &lt;&gt;&quot;&quot;; [$Sheet1.A44]; &quot;&quot;)" office:value-type="float" office:value="1008" calcext:value-type="float">
            <text:p>1008</text:p>
          </table:table-cell>
          <table:table-cell table:number-columns-repeated="16380"/>
        </table:table-row>
        <table:table-row table:style-name="ro1">
          <table:table-cell table:formula="of:=IF([$Sheet1.A45] &lt;&gt;&quot;&quot;; &quot;#define &quot;; &quot;&quot;)">
            <text:p/>
          </table:table-cell>
          <table:table-cell table:formula="of:=IF([$Sheet1.A45] &lt;&gt;&quot;&quot;; [$Sheet1.I45]; &quot;&quot;)">
            <text:p/>
          </table:table-cell>
          <table:table-cell table:formula="of:=IF([$Sheet1.A45] &lt;&gt;&quot;&quot;; &quot; &quot;; &quot;&quot;)">
            <text:p/>
          </table:table-cell>
          <table:table-cell table:formula="of:=IF([$Sheet1.A45] &lt;&gt;&quot;&quot;; [$Sheet1.A45]; &quot;&quot;)">
            <text:p/>
          </table:table-cell>
          <table:table-cell table:number-columns-repeated="16380"/>
        </table:table-row>
        <table:table-row table:style-name="ro1">
          <table:table-cell table:formula="of:=IF([$Sheet1.A46] &lt;&gt;&quot;&quot;; &quot;#define &quot;; &quot;&quot;)" office:value-type="string" office:string-value="#define " calcext:value-type="string">
            <text:p>#define </text:p>
          </table:table-cell>
          <table:table-cell table:formula="of:=IF([$Sheet1.A46] &lt;&gt;&quot;&quot;; [$Sheet1.I46]; &quot;&quot;)" office:value-type="string" office:string-value="ACTIVE_CUP" calcext:value-type="string">
            <text:p>ACTIVE_CUP</text:p>
          </table:table-cell>
          <table:table-cell table:formula="of:=IF([$Sheet1.A46] &lt;&gt;&quot;&quot;; &quot; &quot;; &quot;&quot;)" office:value-type="string" office:string-value=" " calcext:value-type="string">
            <text:p><text:s/></text:p>
          </table:table-cell>
          <table:table-cell table:formula="of:=IF([$Sheet1.A46] &lt;&gt;&quot;&quot;; [$Sheet1.A46]; &quot;&quot;)" office:value-type="float" office:value="1009" calcext:value-type="float">
            <text:p>1009</text:p>
          </table:table-cell>
          <table:table-cell table:number-columns-repeated="16380"/>
        </table:table-row>
        <table:table-row table:style-name="ro1">
          <table:table-cell table:formula="of:=IF([$Sheet1.A47] &lt;&gt;&quot;&quot;; &quot;#define &quot;; &quot;&quot;)">
            <text:p/>
          </table:table-cell>
          <table:table-cell table:formula="of:=IF([$Sheet1.A47] &lt;&gt;&quot;&quot;; [$Sheet1.I47]; &quot;&quot;)">
            <text:p/>
          </table:table-cell>
          <table:table-cell table:formula="of:=IF([$Sheet1.A47] &lt;&gt;&quot;&quot;; &quot; &quot;; &quot;&quot;)">
            <text:p/>
          </table:table-cell>
          <table:table-cell table:formula="of:=IF([$Sheet1.A47] &lt;&gt;&quot;&quot;; [$Sheet1.A47]; &quot;&quot;)">
            <text:p/>
          </table:table-cell>
          <table:table-cell table:number-columns-repeated="16380"/>
        </table:table-row>
        <table:table-row table:style-name="ro1">
          <table:table-cell table:formula="of:=IF([$Sheet1.A48] &lt;&gt;&quot;&quot;; &quot;#define &quot;; &quot;&quot;)" office:value-type="string" office:string-value="#define " calcext:value-type="string">
            <text:p>#define </text:p>
          </table:table-cell>
          <table:table-cell table:formula="of:=IF([$Sheet1.A48] &lt;&gt;&quot;&quot;; [$Sheet1.I48]; &quot;&quot;)" office:value-type="string" office:string-value="CUP1_ERROR" calcext:value-type="string">
            <text:p>CUP1_ERROR</text:p>
          </table:table-cell>
          <table:table-cell table:formula="of:=IF([$Sheet1.A48] &lt;&gt;&quot;&quot;; &quot; &quot;; &quot;&quot;)" office:value-type="string" office:string-value=" " calcext:value-type="string">
            <text:p><text:s/></text:p>
          </table:table-cell>
          <table:table-cell table:formula="of:=IF([$Sheet1.A48] &lt;&gt;&quot;&quot;; [$Sheet1.A48]; &quot;&quot;)" office:value-type="float" office:value="1010" calcext:value-type="float">
            <text:p>1010</text:p>
          </table:table-cell>
          <table:table-cell table:number-columns-repeated="16380"/>
        </table:table-row>
        <table:table-row table:style-name="ro1">
          <table:table-cell table:formula="of:=IF([$Sheet1.A49] &lt;&gt;&quot;&quot;; &quot;#define &quot;; &quot;&quot;)" office:value-type="string" office:string-value="#define " calcext:value-type="string">
            <text:p>#define </text:p>
          </table:table-cell>
          <table:table-cell table:formula="of:=IF([$Sheet1.A49] &lt;&gt;&quot;&quot;; [$Sheet1.I49]; &quot;&quot;)" office:value-type="string" office:string-value="CUP2_ERROR" calcext:value-type="string">
            <text:p>CUP2_ERROR</text:p>
          </table:table-cell>
          <table:table-cell table:formula="of:=IF([$Sheet1.A49] &lt;&gt;&quot;&quot;; &quot; &quot;; &quot;&quot;)" office:value-type="string" office:string-value=" " calcext:value-type="string">
            <text:p><text:s/></text:p>
          </table:table-cell>
          <table:table-cell table:formula="of:=IF([$Sheet1.A49] &lt;&gt;&quot;&quot;; [$Sheet1.A49]; &quot;&quot;)" office:value-type="float" office:value="1011" calcext:value-type="float">
            <text:p>1011</text:p>
          </table:table-cell>
          <table:table-cell table:number-columns-repeated="16380"/>
        </table:table-row>
        <table:table-row table:style-name="ro1">
          <table:table-cell table:formula="of:=IF([$Sheet1.A50] &lt;&gt;&quot;&quot;; &quot;#define &quot;; &quot;&quot;)" office:value-type="string" office:string-value="#define " calcext:value-type="string">
            <text:p>#define </text:p>
          </table:table-cell>
          <table:table-cell table:formula="of:=IF([$Sheet1.A50] &lt;&gt;&quot;&quot;; [$Sheet1.I50]; &quot;&quot;)" office:value-type="string" office:string-value="CUP3_ERROR" calcext:value-type="string">
            <text:p>CUP3_ERROR</text:p>
          </table:table-cell>
          <table:table-cell table:formula="of:=IF([$Sheet1.A50] &lt;&gt;&quot;&quot;; &quot; &quot;; &quot;&quot;)" office:value-type="string" office:string-value=" " calcext:value-type="string">
            <text:p><text:s/></text:p>
          </table:table-cell>
          <table:table-cell table:formula="of:=IF([$Sheet1.A50] &lt;&gt;&quot;&quot;; [$Sheet1.A50]; &quot;&quot;)" office:value-type="float" office:value="1012" calcext:value-type="float">
            <text:p>1012</text:p>
          </table:table-cell>
          <table:table-cell table:number-columns-repeated="16380"/>
        </table:table-row>
        <table:table-row table:style-name="ro1">
          <table:table-cell table:formula="of:=IF([$Sheet1.A51] &lt;&gt;&quot;&quot;; &quot;#define &quot;; &quot;&quot;)" office:value-type="string" office:string-value="#define " calcext:value-type="string">
            <text:p>#define </text:p>
          </table:table-cell>
          <table:table-cell table:formula="of:=IF([$Sheet1.A51] &lt;&gt;&quot;&quot;; [$Sheet1.I51]; &quot;&quot;)" office:value-type="string" office:string-value="CUP1_LAST_ERROR" calcext:value-type="string">
            <text:p>CUP1_LAST_ERROR</text:p>
          </table:table-cell>
          <table:table-cell table:formula="of:=IF([$Sheet1.A51] &lt;&gt;&quot;&quot;; &quot; &quot;; &quot;&quot;)" office:value-type="string" office:string-value=" " calcext:value-type="string">
            <text:p><text:s/></text:p>
          </table:table-cell>
          <table:table-cell table:formula="of:=IF([$Sheet1.A51] &lt;&gt;&quot;&quot;; [$Sheet1.A51]; &quot;&quot;)" office:value-type="float" office:value="1013" calcext:value-type="float">
            <text:p>1013</text:p>
          </table:table-cell>
          <table:table-cell table:number-columns-repeated="16380"/>
        </table:table-row>
        <table:table-row table:style-name="ro1">
          <table:table-cell table:formula="of:=IF([$Sheet1.A52] &lt;&gt;&quot;&quot;; &quot;#define &quot;; &quot;&quot;)" office:value-type="string" office:string-value="#define " calcext:value-type="string">
            <text:p>#define </text:p>
          </table:table-cell>
          <table:table-cell table:formula="of:=IF([$Sheet1.A52] &lt;&gt;&quot;&quot;; [$Sheet1.I52]; &quot;&quot;)" office:value-type="string" office:string-value="CUP2_LAST_ERROR" calcext:value-type="string">
            <text:p>CUP2_LAST_ERROR</text:p>
          </table:table-cell>
          <table:table-cell table:formula="of:=IF([$Sheet1.A52] &lt;&gt;&quot;&quot;; &quot; &quot;; &quot;&quot;)" office:value-type="string" office:string-value=" " calcext:value-type="string">
            <text:p><text:s/></text:p>
          </table:table-cell>
          <table:table-cell table:formula="of:=IF([$Sheet1.A52] &lt;&gt;&quot;&quot;; [$Sheet1.A52]; &quot;&quot;)" office:value-type="float" office:value="1014" calcext:value-type="float">
            <text:p>1014</text:p>
          </table:table-cell>
          <table:table-cell table:number-columns-repeated="16380"/>
        </table:table-row>
        <table:table-row table:style-name="ro1">
          <table:table-cell table:formula="of:=IF([$Sheet1.A53] &lt;&gt;&quot;&quot;; &quot;#define &quot;; &quot;&quot;)" office:value-type="string" office:string-value="#define " calcext:value-type="string">
            <text:p>#define </text:p>
          </table:table-cell>
          <table:table-cell table:formula="of:=IF([$Sheet1.A53] &lt;&gt;&quot;&quot;; [$Sheet1.I53]; &quot;&quot;)" office:value-type="string" office:string-value="CUP3_LAST_ERROR" calcext:value-type="string">
            <text:p>CUP3_LAST_ERROR</text:p>
          </table:table-cell>
          <table:table-cell table:formula="of:=IF([$Sheet1.A53] &lt;&gt;&quot;&quot;; &quot; &quot;; &quot;&quot;)" office:value-type="string" office:string-value=" " calcext:value-type="string">
            <text:p><text:s/></text:p>
          </table:table-cell>
          <table:table-cell table:formula="of:=IF([$Sheet1.A53] &lt;&gt;&quot;&quot;; [$Sheet1.A53]; &quot;&quot;)" office:value-type="float" office:value="1015" calcext:value-type="float">
            <text:p>1015</text:p>
          </table:table-cell>
          <table:table-cell table:number-columns-repeated="16380"/>
        </table:table-row>
        <table:table-row table:style-name="ro1">
          <table:table-cell table:formula="of:=IF([$Sheet1.A54] &lt;&gt;&quot;&quot;; &quot;#define &quot;; &quot;&quot;)" office:value-type="string" office:string-value="#define " calcext:value-type="string">
            <text:p>#define </text:p>
          </table:table-cell>
          <table:table-cell table:formula="of:=IF([$Sheet1.A54] &lt;&gt;&quot;&quot;; [$Sheet1.I54]; &quot;&quot;)" office:value-type="string" office:string-value="CUP1_ERROR_STORAGE" calcext:value-type="string">
            <text:p>CUP1_ERROR_STORAGE</text:p>
          </table:table-cell>
          <table:table-cell table:formula="of:=IF([$Sheet1.A54] &lt;&gt;&quot;&quot;; &quot; &quot;; &quot;&quot;)" office:value-type="string" office:string-value=" " calcext:value-type="string">
            <text:p><text:s/></text:p>
          </table:table-cell>
          <table:table-cell table:formula="of:=IF([$Sheet1.A54] &lt;&gt;&quot;&quot;; [$Sheet1.A54]; &quot;&quot;)" office:value-type="float" office:value="1016" calcext:value-type="float">
            <text:p>1016</text:p>
          </table:table-cell>
          <table:table-cell table:number-columns-repeated="16380"/>
        </table:table-row>
        <table:table-row table:style-name="ro1">
          <table:table-cell table:formula="of:=IF([$Sheet1.A55] &lt;&gt;&quot;&quot;; &quot;#define &quot;; &quot;&quot;)" office:value-type="string" office:string-value="#define " calcext:value-type="string">
            <text:p>#define </text:p>
          </table:table-cell>
          <table:table-cell table:formula="of:=IF([$Sheet1.A55] &lt;&gt;&quot;&quot;; [$Sheet1.I55]; &quot;&quot;)" office:value-type="string" office:string-value="CUP2_ERROR_STORAGE" calcext:value-type="string">
            <text:p>CUP2_ERROR_STORAGE</text:p>
          </table:table-cell>
          <table:table-cell table:formula="of:=IF([$Sheet1.A55] &lt;&gt;&quot;&quot;; &quot; &quot;; &quot;&quot;)" office:value-type="string" office:string-value=" " calcext:value-type="string">
            <text:p><text:s/></text:p>
          </table:table-cell>
          <table:table-cell table:formula="of:=IF([$Sheet1.A55] &lt;&gt;&quot;&quot;; [$Sheet1.A55]; &quot;&quot;)" office:value-type="float" office:value="1017" calcext:value-type="float">
            <text:p>1017</text:p>
          </table:table-cell>
          <table:table-cell table:number-columns-repeated="16380"/>
        </table:table-row>
        <table:table-row table:style-name="ro1">
          <table:table-cell table:formula="of:=IF([$Sheet1.A56] &lt;&gt;&quot;&quot;; &quot;#define &quot;; &quot;&quot;)" office:value-type="string" office:string-value="#define " calcext:value-type="string">
            <text:p>#define </text:p>
          </table:table-cell>
          <table:table-cell table:formula="of:=IF([$Sheet1.A56] &lt;&gt;&quot;&quot;; [$Sheet1.I56]; &quot;&quot;)" office:value-type="string" office:string-value="CUP3_ERROR_STORAGE" calcext:value-type="string">
            <text:p>CUP3_ERROR_STORAGE</text:p>
          </table:table-cell>
          <table:table-cell table:formula="of:=IF([$Sheet1.A56] &lt;&gt;&quot;&quot;; &quot; &quot;; &quot;&quot;)" office:value-type="string" office:string-value=" " calcext:value-type="string">
            <text:p><text:s/></text:p>
          </table:table-cell>
          <table:table-cell table:formula="of:=IF([$Sheet1.A56] &lt;&gt;&quot;&quot;; [$Sheet1.A56]; &quot;&quot;)" office:value-type="float" office:value="1018" calcext:value-type="float">
            <text:p>1018</text:p>
          </table:table-cell>
          <table:table-cell table:number-columns-repeated="16380"/>
        </table:table-row>
        <table:table-row table:style-name="ro1">
          <table:table-cell table:formula="of:=IF([$Sheet1.A57] &lt;&gt;&quot;&quot;; &quot;#define &quot;; &quot;&quot;)">
            <text:p/>
          </table:table-cell>
          <table:table-cell table:formula="of:=IF([$Sheet1.A57] &lt;&gt;&quot;&quot;; [$Sheet1.I57]; &quot;&quot;)">
            <text:p/>
          </table:table-cell>
          <table:table-cell table:formula="of:=IF([$Sheet1.A57] &lt;&gt;&quot;&quot;; &quot; &quot;; &quot;&quot;)">
            <text:p/>
          </table:table-cell>
          <table:table-cell table:formula="of:=IF([$Sheet1.A57] &lt;&gt;&quot;&quot;; [$Sheet1.A57]; &quot;&quot;)">
            <text:p/>
          </table:table-cell>
          <table:table-cell table:number-columns-repeated="16380"/>
        </table:table-row>
        <table:table-row table:style-name="ro1">
          <table:table-cell table:formula="of:=IF([$Sheet1.A58] &lt;&gt;&quot;&quot;; &quot;#define &quot;; &quot;&quot;)" office:value-type="string" office:string-value="#define " calcext:value-type="string">
            <text:p>#define </text:p>
          </table:table-cell>
          <table:table-cell table:formula="of:=IF([$Sheet1.A58] &lt;&gt;&quot;&quot;; [$Sheet1.I58]; &quot;&quot;)" office:value-type="string" office:string-value="INSTALLED_CUPS" calcext:value-type="string">
            <text:p>INSTALLED_CUPS</text:p>
          </table:table-cell>
          <table:table-cell table:formula="of:=IF([$Sheet1.A58] &lt;&gt;&quot;&quot;; &quot; &quot;; &quot;&quot;)" office:value-type="string" office:string-value=" " calcext:value-type="string">
            <text:p><text:s/></text:p>
          </table:table-cell>
          <table:table-cell table:formula="of:=IF([$Sheet1.A58] &lt;&gt;&quot;&quot;; [$Sheet1.A58]; &quot;&quot;)" office:value-type="float" office:value="1019" calcext:value-type="float">
            <text:p>1019</text:p>
          </table:table-cell>
          <table:table-cell table:number-columns-repeated="16380"/>
        </table:table-row>
        <table:table-row table:style-name="ro1">
          <table:table-cell table:formula="of:=IF([$Sheet1.A59] &lt;&gt;&quot;&quot;; &quot;#define &quot;; &quot;&quot;)" office:value-type="string" office:string-value="#define " calcext:value-type="string">
            <text:p>#define </text:p>
          </table:table-cell>
          <table:table-cell table:formula="of:=IF([$Sheet1.A59] &lt;&gt;&quot;&quot;; [$Sheet1.I59]; &quot;&quot;)" office:value-type="string" office:string-value="ELECTRODES_CUP1" calcext:value-type="string">
            <text:p>ELECTRODES_CUP1</text:p>
          </table:table-cell>
          <table:table-cell table:formula="of:=IF([$Sheet1.A59] &lt;&gt;&quot;&quot;; &quot; &quot;; &quot;&quot;)" office:value-type="string" office:string-value=" " calcext:value-type="string">
            <text:p><text:s/></text:p>
          </table:table-cell>
          <table:table-cell table:formula="of:=IF([$Sheet1.A59] &lt;&gt;&quot;&quot;; [$Sheet1.A59]; &quot;&quot;)" office:value-type="float" office:value="1020" calcext:value-type="float">
            <text:p>1020</text:p>
          </table:table-cell>
          <table:table-cell table:number-columns-repeated="16380"/>
        </table:table-row>
        <table:table-row table:style-name="ro1">
          <table:table-cell table:formula="of:=IF([$Sheet1.A60] &lt;&gt;&quot;&quot;; &quot;#define &quot;; &quot;&quot;)" office:value-type="string" office:string-value="#define " calcext:value-type="string">
            <text:p>#define </text:p>
          </table:table-cell>
          <table:table-cell table:formula="of:=IF([$Sheet1.A60] &lt;&gt;&quot;&quot;; [$Sheet1.I60]; &quot;&quot;)" office:value-type="string" office:string-value="ELECTRODES_CUP2" calcext:value-type="string">
            <text:p>ELECTRODES_CUP2</text:p>
          </table:table-cell>
          <table:table-cell table:formula="of:=IF([$Sheet1.A60] &lt;&gt;&quot;&quot;; &quot; &quot;; &quot;&quot;)" office:value-type="string" office:string-value=" " calcext:value-type="string">
            <text:p><text:s/></text:p>
          </table:table-cell>
          <table:table-cell table:formula="of:=IF([$Sheet1.A60] &lt;&gt;&quot;&quot;; [$Sheet1.A60]; &quot;&quot;)" office:value-type="float" office:value="1021" calcext:value-type="float">
            <text:p>1021</text:p>
          </table:table-cell>
          <table:table-cell table:number-columns-repeated="16380"/>
        </table:table-row>
        <table:table-row table:style-name="ro1">
          <table:table-cell table:formula="of:=IF([$Sheet1.A61] &lt;&gt;&quot;&quot;; &quot;#define &quot;; &quot;&quot;)" office:value-type="string" office:string-value="#define " calcext:value-type="string">
            <text:p>#define </text:p>
          </table:table-cell>
          <table:table-cell table:formula="of:=IF([$Sheet1.A61] &lt;&gt;&quot;&quot;; [$Sheet1.I61]; &quot;&quot;)" office:value-type="string" office:string-value="ELECTRODES_CUP3" calcext:value-type="string">
            <text:p>ELECTRODES_CUP3</text:p>
          </table:table-cell>
          <table:table-cell table:formula="of:=IF([$Sheet1.A61] &lt;&gt;&quot;&quot;; &quot; &quot;; &quot;&quot;)" office:value-type="string" office:string-value=" " calcext:value-type="string">
            <text:p><text:s/></text:p>
          </table:table-cell>
          <table:table-cell table:formula="of:=IF([$Sheet1.A61] &lt;&gt;&quot;&quot;; [$Sheet1.A61]; &quot;&quot;)" office:value-type="float" office:value="1022" calcext:value-type="float">
            <text:p>1022</text:p>
          </table:table-cell>
          <table:table-cell table:number-columns-repeated="16380"/>
        </table:table-row>
        <table:table-row table:style-name="ro1">
          <table:table-cell table:formula="of:=IF([$Sheet1.A62] &lt;&gt;&quot;&quot;; &quot;#define &quot;; &quot;&quot;)" office:value-type="string" office:string-value="#define " calcext:value-type="string">
            <text:p>#define </text:p>
          </table:table-cell>
          <table:table-cell table:formula="of:=IF([$Sheet1.A62] &lt;&gt;&quot;&quot;; [$Sheet1.I62]; &quot;&quot;)" office:value-type="string" office:string-value="CUP1_TYPE" calcext:value-type="string">
            <text:p>CUP1_TYPE</text:p>
          </table:table-cell>
          <table:table-cell table:formula="of:=IF([$Sheet1.A62] &lt;&gt;&quot;&quot;; &quot; &quot;; &quot;&quot;)" office:value-type="string" office:string-value=" " calcext:value-type="string">
            <text:p><text:s/></text:p>
          </table:table-cell>
          <table:table-cell table:formula="of:=IF([$Sheet1.A62] &lt;&gt;&quot;&quot;; [$Sheet1.A62]; &quot;&quot;)" office:value-type="float" office:value="1023" calcext:value-type="float">
            <text:p>1023</text:p>
          </table:table-cell>
          <table:table-cell table:number-columns-repeated="16380"/>
        </table:table-row>
        <table:table-row table:style-name="ro1">
          <table:table-cell table:formula="of:=IF([$Sheet1.A63] &lt;&gt;&quot;&quot;; &quot;#define &quot;; &quot;&quot;)" office:value-type="string" office:string-value="#define " calcext:value-type="string">
            <text:p>#define </text:p>
          </table:table-cell>
          <table:table-cell table:formula="of:=IF([$Sheet1.A63] &lt;&gt;&quot;&quot;; [$Sheet1.I63]; &quot;&quot;)" office:value-type="string" office:string-value="CUP2_TYPE" calcext:value-type="string">
            <text:p>CUP2_TYPE</text:p>
          </table:table-cell>
          <table:table-cell table:formula="of:=IF([$Sheet1.A63] &lt;&gt;&quot;&quot;; &quot; &quot;; &quot;&quot;)" office:value-type="string" office:string-value=" " calcext:value-type="string">
            <text:p><text:s/></text:p>
          </table:table-cell>
          <table:table-cell table:formula="of:=IF([$Sheet1.A63] &lt;&gt;&quot;&quot;; [$Sheet1.A63]; &quot;&quot;)" office:value-type="float" office:value="1024" calcext:value-type="float">
            <text:p>1024</text:p>
          </table:table-cell>
          <table:table-cell table:number-columns-repeated="16380"/>
        </table:table-row>
        <table:table-row table:style-name="ro1">
          <table:table-cell table:formula="of:=IF([$Sheet1.A64] &lt;&gt;&quot;&quot;; &quot;#define &quot;; &quot;&quot;)" office:value-type="string" office:string-value="#define " calcext:value-type="string">
            <text:p>#define </text:p>
          </table:table-cell>
          <table:table-cell table:formula="of:=IF([$Sheet1.A64] &lt;&gt;&quot;&quot;; [$Sheet1.I64]; &quot;&quot;)" office:value-type="string" office:string-value="CUP3_TYPE" calcext:value-type="string">
            <text:p>CUP3_TYPE</text:p>
          </table:table-cell>
          <table:table-cell table:formula="of:=IF([$Sheet1.A64] &lt;&gt;&quot;&quot;; &quot; &quot;; &quot;&quot;)" office:value-type="string" office:string-value=" " calcext:value-type="string">
            <text:p><text:s/></text:p>
          </table:table-cell>
          <table:table-cell table:formula="of:=IF([$Sheet1.A64] &lt;&gt;&quot;&quot;; [$Sheet1.A64]; &quot;&quot;)" office:value-type="float" office:value="1025" calcext:value-type="float">
            <text:p>1025</text:p>
          </table:table-cell>
          <table:table-cell table:number-columns-repeated="16380"/>
        </table:table-row>
        <table:table-row table:style-name="ro1">
          <table:table-cell table:formula="of:=IF([$Sheet1.A65] &lt;&gt;&quot;&quot;; &quot;#define &quot;; &quot;&quot;)">
            <text:p/>
          </table:table-cell>
          <table:table-cell table:formula="of:=IF([$Sheet1.A65] &lt;&gt;&quot;&quot;; [$Sheet1.I65]; &quot;&quot;)">
            <text:p/>
          </table:table-cell>
          <table:table-cell table:formula="of:=IF([$Sheet1.A65] &lt;&gt;&quot;&quot;; &quot; &quot;; &quot;&quot;)">
            <text:p/>
          </table:table-cell>
          <table:table-cell table:formula="of:=IF([$Sheet1.A65] &lt;&gt;&quot;&quot;; [$Sheet1.A65]; &quot;&quot;)">
            <text:p/>
          </table:table-cell>
          <table:table-cell table:number-columns-repeated="16380"/>
        </table:table-row>
        <table:table-row table:style-name="ro1">
          <table:table-cell table:formula="of:=IF([$Sheet1.A66] &lt;&gt;&quot;&quot;; &quot;#define &quot;; &quot;&quot;)" office:value-type="string" office:string-value="#define " calcext:value-type="string">
            <text:p>#define </text:p>
          </table:table-cell>
          <table:table-cell table:formula="of:=IF([$Sheet1.A66] &lt;&gt;&quot;&quot;; [$Sheet1.I66]; &quot;&quot;)" office:value-type="string" office:string-value="CUP1_CHANNEL1_GAIN1_OFFSET" calcext:value-type="string">
            <text:p>CUP1_CHANNEL1_GAIN1_OFFSET</text:p>
          </table:table-cell>
          <table:table-cell table:formula="of:=IF([$Sheet1.A66] &lt;&gt;&quot;&quot;; &quot; &quot;; &quot;&quot;)" office:value-type="string" office:string-value=" " calcext:value-type="string">
            <text:p><text:s/></text:p>
          </table:table-cell>
          <table:table-cell table:formula="of:=IF([$Sheet1.A66] &lt;&gt;&quot;&quot;; [$Sheet1.A66]; &quot;&quot;)" office:value-type="float" office:value="1026" calcext:value-type="float">
            <text:p>1026</text:p>
          </table:table-cell>
          <table:table-cell table:number-columns-repeated="16380"/>
        </table:table-row>
        <table:table-row table:style-name="ro1">
          <table:table-cell table:formula="of:=IF([$Sheet1.A67] &lt;&gt;&quot;&quot;; &quot;#define &quot;; &quot;&quot;)" office:value-type="string" office:string-value="#define " calcext:value-type="string">
            <text:p>#define </text:p>
          </table:table-cell>
          <table:table-cell table:formula="of:=IF([$Sheet1.A67] &lt;&gt;&quot;&quot;; [$Sheet1.I67]; &quot;&quot;)" office:value-type="string" office:string-value="CUP1_CHANNEL2_GAIN1_OFFSET" calcext:value-type="string">
            <text:p>CUP1_CHANNEL2_GAIN1_OFFSET</text:p>
          </table:table-cell>
          <table:table-cell table:formula="of:=IF([$Sheet1.A67] &lt;&gt;&quot;&quot;; &quot; &quot;; &quot;&quot;)" office:value-type="string" office:string-value=" " calcext:value-type="string">
            <text:p><text:s/></text:p>
          </table:table-cell>
          <table:table-cell table:formula="of:=IF([$Sheet1.A67] &lt;&gt;&quot;&quot;; [$Sheet1.A67]; &quot;&quot;)" office:value-type="float" office:value="1027" calcext:value-type="float">
            <text:p>1027</text:p>
          </table:table-cell>
          <table:table-cell table:number-columns-repeated="16380"/>
        </table:table-row>
        <table:table-row table:style-name="ro1">
          <table:table-cell table:formula="of:=IF([$Sheet1.A68] &lt;&gt;&quot;&quot;; &quot;#define &quot;; &quot;&quot;)" office:value-type="string" office:string-value="#define " calcext:value-type="string">
            <text:p>#define </text:p>
          </table:table-cell>
          <table:table-cell table:formula="of:=IF([$Sheet1.A68] &lt;&gt;&quot;&quot;; [$Sheet1.I68]; &quot;&quot;)" office:value-type="string" office:string-value="CUP1_CHANNEL3_GAIN1_OFFSET" calcext:value-type="string">
            <text:p>CUP1_CHANNEL3_GAIN1_OFFSET</text:p>
          </table:table-cell>
          <table:table-cell table:formula="of:=IF([$Sheet1.A68] &lt;&gt;&quot;&quot;; &quot; &quot;; &quot;&quot;)" office:value-type="string" office:string-value=" " calcext:value-type="string">
            <text:p><text:s/></text:p>
          </table:table-cell>
          <table:table-cell table:formula="of:=IF([$Sheet1.A68] &lt;&gt;&quot;&quot;; [$Sheet1.A68]; &quot;&quot;)" office:value-type="float" office:value="1028" calcext:value-type="float">
            <text:p>1028</text:p>
          </table:table-cell>
          <table:table-cell table:number-columns-repeated="16380"/>
        </table:table-row>
        <table:table-row table:style-name="ro1">
          <table:table-cell table:formula="of:=IF([$Sheet1.A69] &lt;&gt;&quot;&quot;; &quot;#define &quot;; &quot;&quot;)" office:value-type="string" office:string-value="#define " calcext:value-type="string">
            <text:p>#define </text:p>
          </table:table-cell>
          <table:table-cell table:formula="of:=IF([$Sheet1.A69] &lt;&gt;&quot;&quot;; [$Sheet1.I69]; &quot;&quot;)" office:value-type="string" office:string-value="CUP1_CHANNEL4_GAIN1_OFFSET" calcext:value-type="string">
            <text:p>CUP1_CHANNEL4_GAIN1_OFFSET</text:p>
          </table:table-cell>
          <table:table-cell table:formula="of:=IF([$Sheet1.A69] &lt;&gt;&quot;&quot;; &quot; &quot;; &quot;&quot;)" office:value-type="string" office:string-value=" " calcext:value-type="string">
            <text:p><text:s/></text:p>
          </table:table-cell>
          <table:table-cell table:formula="of:=IF([$Sheet1.A69] &lt;&gt;&quot;&quot;; [$Sheet1.A69]; &quot;&quot;)" office:value-type="float" office:value="1029" calcext:value-type="float">
            <text:p>1029</text:p>
          </table:table-cell>
          <table:table-cell table:number-columns-repeated="16380"/>
        </table:table-row>
        <table:table-row table:style-name="ro1">
          <table:table-cell table:formula="of:=IF([$Sheet1.A70] &lt;&gt;&quot;&quot;; &quot;#define &quot;; &quot;&quot;)" office:value-type="string" office:string-value="#define " calcext:value-type="string">
            <text:p>#define </text:p>
          </table:table-cell>
          <table:table-cell table:formula="of:=IF([$Sheet1.A70] &lt;&gt;&quot;&quot;; [$Sheet1.I70]; &quot;&quot;)" office:value-type="string" office:string-value="CUP2_CHANNEL1_GAIN1_OFFSET" calcext:value-type="string">
            <text:p>CUP2_CHANNEL1_GAIN1_OFFSET</text:p>
          </table:table-cell>
          <table:table-cell table:formula="of:=IF([$Sheet1.A70] &lt;&gt;&quot;&quot;; &quot; &quot;; &quot;&quot;)" office:value-type="string" office:string-value=" " calcext:value-type="string">
            <text:p><text:s/></text:p>
          </table:table-cell>
          <table:table-cell table:formula="of:=IF([$Sheet1.A70] &lt;&gt;&quot;&quot;; [$Sheet1.A70]; &quot;&quot;)" office:value-type="float" office:value="1030" calcext:value-type="float">
            <text:p>1030</text:p>
          </table:table-cell>
          <table:table-cell table:number-columns-repeated="16380"/>
        </table:table-row>
        <table:table-row table:style-name="ro1">
          <table:table-cell table:formula="of:=IF([$Sheet1.A71] &lt;&gt;&quot;&quot;; &quot;#define &quot;; &quot;&quot;)" office:value-type="string" office:string-value="#define " calcext:value-type="string">
            <text:p>#define </text:p>
          </table:table-cell>
          <table:table-cell table:formula="of:=IF([$Sheet1.A71] &lt;&gt;&quot;&quot;; [$Sheet1.I71]; &quot;&quot;)" office:value-type="string" office:string-value="CUP2_CHANNEL2_GAIN1_OFFSET" calcext:value-type="string">
            <text:p>CUP2_CHANNEL2_GAIN1_OFFSET</text:p>
          </table:table-cell>
          <table:table-cell table:formula="of:=IF([$Sheet1.A71] &lt;&gt;&quot;&quot;; &quot; &quot;; &quot;&quot;)" office:value-type="string" office:string-value=" " calcext:value-type="string">
            <text:p><text:s/></text:p>
          </table:table-cell>
          <table:table-cell table:formula="of:=IF([$Sheet1.A71] &lt;&gt;&quot;&quot;; [$Sheet1.A71]; &quot;&quot;)" office:value-type="float" office:value="1031" calcext:value-type="float">
            <text:p>1031</text:p>
          </table:table-cell>
          <table:table-cell table:number-columns-repeated="16380"/>
        </table:table-row>
        <table:table-row table:style-name="ro1">
          <table:table-cell table:formula="of:=IF([$Sheet1.A72] &lt;&gt;&quot;&quot;; &quot;#define &quot;; &quot;&quot;)" office:value-type="string" office:string-value="#define " calcext:value-type="string">
            <text:p>#define </text:p>
          </table:table-cell>
          <table:table-cell table:formula="of:=IF([$Sheet1.A72] &lt;&gt;&quot;&quot;; [$Sheet1.I72]; &quot;&quot;)" office:value-type="string" office:string-value="CUP2_CHANNEL3_GAIN1_OFFSET" calcext:value-type="string">
            <text:p>CUP2_CHANNEL3_GAIN1_OFFSET</text:p>
          </table:table-cell>
          <table:table-cell table:formula="of:=IF([$Sheet1.A72] &lt;&gt;&quot;&quot;; &quot; &quot;; &quot;&quot;)" office:value-type="string" office:string-value=" " calcext:value-type="string">
            <text:p><text:s/></text:p>
          </table:table-cell>
          <table:table-cell table:formula="of:=IF([$Sheet1.A72] &lt;&gt;&quot;&quot;; [$Sheet1.A72]; &quot;&quot;)" office:value-type="float" office:value="1032" calcext:value-type="float">
            <text:p>1032</text:p>
          </table:table-cell>
          <table:table-cell table:number-columns-repeated="16380"/>
        </table:table-row>
        <table:table-row table:style-name="ro1">
          <table:table-cell table:formula="of:=IF([$Sheet1.A73] &lt;&gt;&quot;&quot;; &quot;#define &quot;; &quot;&quot;)" office:value-type="string" office:string-value="#define " calcext:value-type="string">
            <text:p>#define </text:p>
          </table:table-cell>
          <table:table-cell table:formula="of:=IF([$Sheet1.A73] &lt;&gt;&quot;&quot;; [$Sheet1.I73]; &quot;&quot;)" office:value-type="string" office:string-value="CUP2_CHANNEL4_GAIN1_OFFSET" calcext:value-type="string">
            <text:p>CUP2_CHANNEL4_GAIN1_OFFSET</text:p>
          </table:table-cell>
          <table:table-cell table:formula="of:=IF([$Sheet1.A73] &lt;&gt;&quot;&quot;; &quot; &quot;; &quot;&quot;)" office:value-type="string" office:string-value=" " calcext:value-type="string">
            <text:p><text:s/></text:p>
          </table:table-cell>
          <table:table-cell table:formula="of:=IF([$Sheet1.A73] &lt;&gt;&quot;&quot;; [$Sheet1.A73]; &quot;&quot;)" office:value-type="float" office:value="1033" calcext:value-type="float">
            <text:p>1033</text:p>
          </table:table-cell>
          <table:table-cell table:number-columns-repeated="16380"/>
        </table:table-row>
        <table:table-row table:style-name="ro1">
          <table:table-cell table:formula="of:=IF([$Sheet1.A74] &lt;&gt;&quot;&quot;; &quot;#define &quot;; &quot;&quot;)" office:value-type="string" office:string-value="#define " calcext:value-type="string">
            <text:p>#define </text:p>
          </table:table-cell>
          <table:table-cell table:formula="of:=IF([$Sheet1.A74] &lt;&gt;&quot;&quot;; [$Sheet1.I74]; &quot;&quot;)" office:value-type="string" office:string-value="CUP3_CHANNEL1_GAIN1_OFFSET" calcext:value-type="string">
            <text:p>CUP3_CHANNEL1_GAIN1_OFFSET</text:p>
          </table:table-cell>
          <table:table-cell table:formula="of:=IF([$Sheet1.A74] &lt;&gt;&quot;&quot;; &quot; &quot;; &quot;&quot;)" office:value-type="string" office:string-value=" " calcext:value-type="string">
            <text:p><text:s/></text:p>
          </table:table-cell>
          <table:table-cell table:formula="of:=IF([$Sheet1.A74] &lt;&gt;&quot;&quot;; [$Sheet1.A74]; &quot;&quot;)" office:value-type="float" office:value="1034" calcext:value-type="float">
            <text:p>1034</text:p>
          </table:table-cell>
          <table:table-cell table:number-columns-repeated="16380"/>
        </table:table-row>
        <table:table-row table:style-name="ro1">
          <table:table-cell table:formula="of:=IF([$Sheet1.A75] &lt;&gt;&quot;&quot;; &quot;#define &quot;; &quot;&quot;)" office:value-type="string" office:string-value="#define " calcext:value-type="string">
            <text:p>#define </text:p>
          </table:table-cell>
          <table:table-cell table:formula="of:=IF([$Sheet1.A75] &lt;&gt;&quot;&quot;; [$Sheet1.I75]; &quot;&quot;)" office:value-type="string" office:string-value="CUP3_CHANNEL2_GAIN1_OFFSET" calcext:value-type="string">
            <text:p>CUP3_CHANNEL2_GAIN1_OFFSET</text:p>
          </table:table-cell>
          <table:table-cell table:formula="of:=IF([$Sheet1.A75] &lt;&gt;&quot;&quot;; &quot; &quot;; &quot;&quot;)" office:value-type="string" office:string-value=" " calcext:value-type="string">
            <text:p><text:s/></text:p>
          </table:table-cell>
          <table:table-cell table:formula="of:=IF([$Sheet1.A75] &lt;&gt;&quot;&quot;; [$Sheet1.A75]; &quot;&quot;)" office:value-type="float" office:value="1035" calcext:value-type="float">
            <text:p>1035</text:p>
          </table:table-cell>
          <table:table-cell table:number-columns-repeated="16380"/>
        </table:table-row>
        <table:table-row table:style-name="ro1">
          <table:table-cell table:formula="of:=IF([$Sheet1.A76] &lt;&gt;&quot;&quot;; &quot;#define &quot;; &quot;&quot;)" office:value-type="string" office:string-value="#define " calcext:value-type="string">
            <text:p>#define </text:p>
          </table:table-cell>
          <table:table-cell table:formula="of:=IF([$Sheet1.A76] &lt;&gt;&quot;&quot;; [$Sheet1.I76]; &quot;&quot;)" office:value-type="string" office:string-value="CUP3_CHANNEL3_GAIN1_OFFSET" calcext:value-type="string">
            <text:p>CUP3_CHANNEL3_GAIN1_OFFSET</text:p>
          </table:table-cell>
          <table:table-cell table:formula="of:=IF([$Sheet1.A76] &lt;&gt;&quot;&quot;; &quot; &quot;; &quot;&quot;)" office:value-type="string" office:string-value=" " calcext:value-type="string">
            <text:p><text:s/></text:p>
          </table:table-cell>
          <table:table-cell table:formula="of:=IF([$Sheet1.A76] &lt;&gt;&quot;&quot;; [$Sheet1.A76]; &quot;&quot;)" office:value-type="float" office:value="1036" calcext:value-type="float">
            <text:p>1036</text:p>
          </table:table-cell>
          <table:table-cell table:number-columns-repeated="16380"/>
        </table:table-row>
        <table:table-row table:style-name="ro1">
          <table:table-cell table:formula="of:=IF([$Sheet1.A77] &lt;&gt;&quot;&quot;; &quot;#define &quot;; &quot;&quot;)" office:value-type="string" office:string-value="#define " calcext:value-type="string">
            <text:p>#define </text:p>
          </table:table-cell>
          <table:table-cell table:formula="of:=IF([$Sheet1.A77] &lt;&gt;&quot;&quot;; [$Sheet1.I77]; &quot;&quot;)" office:value-type="string" office:string-value="CUP3_CHANNEL4_GAIN1_OFFSET" calcext:value-type="string">
            <text:p>CUP3_CHANNEL4_GAIN1_OFFSET</text:p>
          </table:table-cell>
          <table:table-cell table:formula="of:=IF([$Sheet1.A77] &lt;&gt;&quot;&quot;; &quot; &quot;; &quot;&quot;)" office:value-type="string" office:string-value=" " calcext:value-type="string">
            <text:p><text:s/></text:p>
          </table:table-cell>
          <table:table-cell table:formula="of:=IF([$Sheet1.A77] &lt;&gt;&quot;&quot;; [$Sheet1.A77]; &quot;&quot;)" office:value-type="float" office:value="1037" calcext:value-type="float">
            <text:p>1037</text:p>
          </table:table-cell>
          <table:table-cell table:number-columns-repeated="16380"/>
        </table:table-row>
        <table:table-row table:style-name="ro1">
          <table:table-cell table:formula="of:=IF([$Sheet1.A78] &lt;&gt;&quot;&quot;; &quot;#define &quot;; &quot;&quot;)" office:value-type="string" office:string-value="#define " calcext:value-type="string">
            <text:p>#define </text:p>
          </table:table-cell>
          <table:table-cell table:formula="of:=IF([$Sheet1.A78] &lt;&gt;&quot;&quot;; [$Sheet1.I78]; &quot;&quot;)" office:value-type="string" office:string-value="CUP1_CHANNEL1_GAIN2_OFFSET" calcext:value-type="string">
            <text:p>CUP1_CHANNEL1_GAIN2_OFFSET</text:p>
          </table:table-cell>
          <table:table-cell table:formula="of:=IF([$Sheet1.A78] &lt;&gt;&quot;&quot;; &quot; &quot;; &quot;&quot;)" office:value-type="string" office:string-value=" " calcext:value-type="string">
            <text:p><text:s/></text:p>
          </table:table-cell>
          <table:table-cell table:formula="of:=IF([$Sheet1.A78] &lt;&gt;&quot;&quot;; [$Sheet1.A78]; &quot;&quot;)" office:value-type="float" office:value="1038" calcext:value-type="float">
            <text:p>1038</text:p>
          </table:table-cell>
          <table:table-cell table:number-columns-repeated="16380"/>
        </table:table-row>
        <table:table-row table:style-name="ro1">
          <table:table-cell table:formula="of:=IF([$Sheet1.A79] &lt;&gt;&quot;&quot;; &quot;#define &quot;; &quot;&quot;)" office:value-type="string" office:string-value="#define " calcext:value-type="string">
            <text:p>#define </text:p>
          </table:table-cell>
          <table:table-cell table:formula="of:=IF([$Sheet1.A79] &lt;&gt;&quot;&quot;; [$Sheet1.I79]; &quot;&quot;)" office:value-type="string" office:string-value="CUP1_CHANNEL2_GAIN2_OFFSET" calcext:value-type="string">
            <text:p>CUP1_CHANNEL2_GAIN2_OFFSET</text:p>
          </table:table-cell>
          <table:table-cell table:formula="of:=IF([$Sheet1.A79] &lt;&gt;&quot;&quot;; &quot; &quot;; &quot;&quot;)" office:value-type="string" office:string-value=" " calcext:value-type="string">
            <text:p><text:s/></text:p>
          </table:table-cell>
          <table:table-cell table:formula="of:=IF([$Sheet1.A79] &lt;&gt;&quot;&quot;; [$Sheet1.A79]; &quot;&quot;)" office:value-type="float" office:value="1039" calcext:value-type="float">
            <text:p>1039</text:p>
          </table:table-cell>
          <table:table-cell table:number-columns-repeated="16380"/>
        </table:table-row>
        <table:table-row table:style-name="ro1">
          <table:table-cell table:formula="of:=IF([$Sheet1.A80] &lt;&gt;&quot;&quot;; &quot;#define &quot;; &quot;&quot;)" office:value-type="string" office:string-value="#define " calcext:value-type="string">
            <text:p>#define </text:p>
          </table:table-cell>
          <table:table-cell table:formula="of:=IF([$Sheet1.A80] &lt;&gt;&quot;&quot;; [$Sheet1.I80]; &quot;&quot;)" office:value-type="string" office:string-value="CUP1_CHANNEL3_GAIN2_OFFSET" calcext:value-type="string">
            <text:p>CUP1_CHANNEL3_GAIN2_OFFSET</text:p>
          </table:table-cell>
          <table:table-cell table:formula="of:=IF([$Sheet1.A80] &lt;&gt;&quot;&quot;; &quot; &quot;; &quot;&quot;)" office:value-type="string" office:string-value=" " calcext:value-type="string">
            <text:p><text:s/></text:p>
          </table:table-cell>
          <table:table-cell table:formula="of:=IF([$Sheet1.A80] &lt;&gt;&quot;&quot;; [$Sheet1.A80]; &quot;&quot;)" office:value-type="float" office:value="1040" calcext:value-type="float">
            <text:p>1040</text:p>
          </table:table-cell>
          <table:table-cell table:number-columns-repeated="16380"/>
        </table:table-row>
        <table:table-row table:style-name="ro1">
          <table:table-cell table:formula="of:=IF([$Sheet1.A81] &lt;&gt;&quot;&quot;; &quot;#define &quot;; &quot;&quot;)" office:value-type="string" office:string-value="#define " calcext:value-type="string">
            <text:p>#define </text:p>
          </table:table-cell>
          <table:table-cell table:formula="of:=IF([$Sheet1.A81] &lt;&gt;&quot;&quot;; [$Sheet1.I81]; &quot;&quot;)" office:value-type="string" office:string-value="CUP1_CHANNEL4_GAIN2_OFFSET" calcext:value-type="string">
            <text:p>CUP1_CHANNEL4_GAIN2_OFFSET</text:p>
          </table:table-cell>
          <table:table-cell table:formula="of:=IF([$Sheet1.A81] &lt;&gt;&quot;&quot;; &quot; &quot;; &quot;&quot;)" office:value-type="string" office:string-value=" " calcext:value-type="string">
            <text:p><text:s/></text:p>
          </table:table-cell>
          <table:table-cell table:formula="of:=IF([$Sheet1.A81] &lt;&gt;&quot;&quot;; [$Sheet1.A81]; &quot;&quot;)" office:value-type="float" office:value="1041" calcext:value-type="float">
            <text:p>1041</text:p>
          </table:table-cell>
          <table:table-cell table:number-columns-repeated="16380"/>
        </table:table-row>
        <table:table-row table:style-name="ro1">
          <table:table-cell table:formula="of:=IF([$Sheet1.A82] &lt;&gt;&quot;&quot;; &quot;#define &quot;; &quot;&quot;)" office:value-type="string" office:string-value="#define " calcext:value-type="string">
            <text:p>#define </text:p>
          </table:table-cell>
          <table:table-cell table:formula="of:=IF([$Sheet1.A82] &lt;&gt;&quot;&quot;; [$Sheet1.I82]; &quot;&quot;)" office:value-type="string" office:string-value="CUP2_CHANNEL1_GAIN2_OFFSET" calcext:value-type="string">
            <text:p>CUP2_CHANNEL1_GAIN2_OFFSET</text:p>
          </table:table-cell>
          <table:table-cell table:formula="of:=IF([$Sheet1.A82] &lt;&gt;&quot;&quot;; &quot; &quot;; &quot;&quot;)" office:value-type="string" office:string-value=" " calcext:value-type="string">
            <text:p><text:s/></text:p>
          </table:table-cell>
          <table:table-cell table:formula="of:=IF([$Sheet1.A82] &lt;&gt;&quot;&quot;; [$Sheet1.A82]; &quot;&quot;)" office:value-type="float" office:value="1042" calcext:value-type="float">
            <text:p>1042</text:p>
          </table:table-cell>
          <table:table-cell table:number-columns-repeated="16380"/>
        </table:table-row>
        <table:table-row table:style-name="ro1">
          <table:table-cell table:formula="of:=IF([$Sheet1.A83] &lt;&gt;&quot;&quot;; &quot;#define &quot;; &quot;&quot;)" office:value-type="string" office:string-value="#define " calcext:value-type="string">
            <text:p>#define </text:p>
          </table:table-cell>
          <table:table-cell table:formula="of:=IF([$Sheet1.A83] &lt;&gt;&quot;&quot;; [$Sheet1.I83]; &quot;&quot;)" office:value-type="string" office:string-value="CUP2_CHANNEL2_GAIN2_OFFSET" calcext:value-type="string">
            <text:p>CUP2_CHANNEL2_GAIN2_OFFSET</text:p>
          </table:table-cell>
          <table:table-cell table:formula="of:=IF([$Sheet1.A83] &lt;&gt;&quot;&quot;; &quot; &quot;; &quot;&quot;)" office:value-type="string" office:string-value=" " calcext:value-type="string">
            <text:p><text:s/></text:p>
          </table:table-cell>
          <table:table-cell table:formula="of:=IF([$Sheet1.A83] &lt;&gt;&quot;&quot;; [$Sheet1.A83]; &quot;&quot;)" office:value-type="float" office:value="1043" calcext:value-type="float">
            <text:p>1043</text:p>
          </table:table-cell>
          <table:table-cell table:number-columns-repeated="16380"/>
        </table:table-row>
        <table:table-row table:style-name="ro1">
          <table:table-cell table:formula="of:=IF([$Sheet1.A84] &lt;&gt;&quot;&quot;; &quot;#define &quot;; &quot;&quot;)" office:value-type="string" office:string-value="#define " calcext:value-type="string">
            <text:p>#define </text:p>
          </table:table-cell>
          <table:table-cell table:formula="of:=IF([$Sheet1.A84] &lt;&gt;&quot;&quot;; [$Sheet1.I84]; &quot;&quot;)" office:value-type="string" office:string-value="CUP2_CHANNEL3_GAIN2_OFFSET" calcext:value-type="string">
            <text:p>CUP2_CHANNEL3_GAIN2_OFFSET</text:p>
          </table:table-cell>
          <table:table-cell table:formula="of:=IF([$Sheet1.A84] &lt;&gt;&quot;&quot;; &quot; &quot;; &quot;&quot;)" office:value-type="string" office:string-value=" " calcext:value-type="string">
            <text:p><text:s/></text:p>
          </table:table-cell>
          <table:table-cell table:formula="of:=IF([$Sheet1.A84] &lt;&gt;&quot;&quot;; [$Sheet1.A84]; &quot;&quot;)" office:value-type="float" office:value="1044" calcext:value-type="float">
            <text:p>1044</text:p>
          </table:table-cell>
          <table:table-cell table:number-columns-repeated="16380"/>
        </table:table-row>
        <table:table-row table:style-name="ro1">
          <table:table-cell table:formula="of:=IF([$Sheet1.A85] &lt;&gt;&quot;&quot;; &quot;#define &quot;; &quot;&quot;)" office:value-type="string" office:string-value="#define " calcext:value-type="string">
            <text:p>#define </text:p>
          </table:table-cell>
          <table:table-cell table:formula="of:=IF([$Sheet1.A85] &lt;&gt;&quot;&quot;; [$Sheet1.I85]; &quot;&quot;)" office:value-type="string" office:string-value="CUP2_CHANNEL4_GAIN2_OFFSET" calcext:value-type="string">
            <text:p>CUP2_CHANNEL4_GAIN2_OFFSET</text:p>
          </table:table-cell>
          <table:table-cell table:formula="of:=IF([$Sheet1.A85] &lt;&gt;&quot;&quot;; &quot; &quot;; &quot;&quot;)" office:value-type="string" office:string-value=" " calcext:value-type="string">
            <text:p><text:s/></text:p>
          </table:table-cell>
          <table:table-cell table:formula="of:=IF([$Sheet1.A85] &lt;&gt;&quot;&quot;; [$Sheet1.A85]; &quot;&quot;)" office:value-type="float" office:value="1045" calcext:value-type="float">
            <text:p>1045</text:p>
          </table:table-cell>
          <table:table-cell table:number-columns-repeated="16380"/>
        </table:table-row>
        <table:table-row table:style-name="ro1">
          <table:table-cell table:formula="of:=IF([$Sheet1.A86] &lt;&gt;&quot;&quot;; &quot;#define &quot;; &quot;&quot;)" office:value-type="string" office:string-value="#define " calcext:value-type="string">
            <text:p>#define </text:p>
          </table:table-cell>
          <table:table-cell table:formula="of:=IF([$Sheet1.A86] &lt;&gt;&quot;&quot;; [$Sheet1.I86]; &quot;&quot;)" office:value-type="string" office:string-value="CUP3_CHANNEL1_GAIN2_OFFSET" calcext:value-type="string">
            <text:p>CUP3_CHANNEL1_GAIN2_OFFSET</text:p>
          </table:table-cell>
          <table:table-cell table:formula="of:=IF([$Sheet1.A86] &lt;&gt;&quot;&quot;; &quot; &quot;; &quot;&quot;)" office:value-type="string" office:string-value=" " calcext:value-type="string">
            <text:p><text:s/></text:p>
          </table:table-cell>
          <table:table-cell table:formula="of:=IF([$Sheet1.A86] &lt;&gt;&quot;&quot;; [$Sheet1.A86]; &quot;&quot;)" office:value-type="float" office:value="1046" calcext:value-type="float">
            <text:p>1046</text:p>
          </table:table-cell>
          <table:table-cell table:number-columns-repeated="16380"/>
        </table:table-row>
        <table:table-row table:style-name="ro1">
          <table:table-cell table:formula="of:=IF([$Sheet1.A87] &lt;&gt;&quot;&quot;; &quot;#define &quot;; &quot;&quot;)" office:value-type="string" office:string-value="#define " calcext:value-type="string">
            <text:p>#define </text:p>
          </table:table-cell>
          <table:table-cell table:formula="of:=IF([$Sheet1.A87] &lt;&gt;&quot;&quot;; [$Sheet1.I87]; &quot;&quot;)" office:value-type="string" office:string-value="CUP3_CHANNEL2_GAIN2_OFFSET" calcext:value-type="string">
            <text:p>CUP3_CHANNEL2_GAIN2_OFFSET</text:p>
          </table:table-cell>
          <table:table-cell table:formula="of:=IF([$Sheet1.A87] &lt;&gt;&quot;&quot;; &quot; &quot;; &quot;&quot;)" office:value-type="string" office:string-value=" " calcext:value-type="string">
            <text:p><text:s/></text:p>
          </table:table-cell>
          <table:table-cell table:formula="of:=IF([$Sheet1.A87] &lt;&gt;&quot;&quot;; [$Sheet1.A87]; &quot;&quot;)" office:value-type="float" office:value="1047" calcext:value-type="float">
            <text:p>1047</text:p>
          </table:table-cell>
          <table:table-cell table:number-columns-repeated="16380"/>
        </table:table-row>
        <table:table-row table:style-name="ro1">
          <table:table-cell table:formula="of:=IF([$Sheet1.A88] &lt;&gt;&quot;&quot;; &quot;#define &quot;; &quot;&quot;)" office:value-type="string" office:string-value="#define " calcext:value-type="string">
            <text:p>#define </text:p>
          </table:table-cell>
          <table:table-cell table:formula="of:=IF([$Sheet1.A88] &lt;&gt;&quot;&quot;; [$Sheet1.I88]; &quot;&quot;)" office:value-type="string" office:string-value="CUP3_CHANNEL3_GAIN2_OFFSET" calcext:value-type="string">
            <text:p>CUP3_CHANNEL3_GAIN2_OFFSET</text:p>
          </table:table-cell>
          <table:table-cell table:formula="of:=IF([$Sheet1.A88] &lt;&gt;&quot;&quot;; &quot; &quot;; &quot;&quot;)" office:value-type="string" office:string-value=" " calcext:value-type="string">
            <text:p><text:s/></text:p>
          </table:table-cell>
          <table:table-cell table:formula="of:=IF([$Sheet1.A88] &lt;&gt;&quot;&quot;; [$Sheet1.A88]; &quot;&quot;)" office:value-type="float" office:value="1048" calcext:value-type="float">
            <text:p>1048</text:p>
          </table:table-cell>
          <table:table-cell table:number-columns-repeated="16380"/>
        </table:table-row>
        <table:table-row table:style-name="ro1">
          <table:table-cell table:formula="of:=IF([$Sheet1.A89] &lt;&gt;&quot;&quot;; &quot;#define &quot;; &quot;&quot;)" office:value-type="string" office:string-value="#define " calcext:value-type="string">
            <text:p>#define </text:p>
          </table:table-cell>
          <table:table-cell table:formula="of:=IF([$Sheet1.A89] &lt;&gt;&quot;&quot;; [$Sheet1.I89]; &quot;&quot;)" office:value-type="string" office:string-value="CUP3_CHANNEL4_GAIN2_OFFSET" calcext:value-type="string">
            <text:p>CUP3_CHANNEL4_GAIN2_OFFSET</text:p>
          </table:table-cell>
          <table:table-cell table:formula="of:=IF([$Sheet1.A89] &lt;&gt;&quot;&quot;; &quot; &quot;; &quot;&quot;)" office:value-type="string" office:string-value=" " calcext:value-type="string">
            <text:p><text:s/></text:p>
          </table:table-cell>
          <table:table-cell table:formula="of:=IF([$Sheet1.A89] &lt;&gt;&quot;&quot;; [$Sheet1.A89]; &quot;&quot;)" office:value-type="float" office:value="1049" calcext:value-type="float">
            <text:p>1049</text:p>
          </table:table-cell>
          <table:table-cell table:number-columns-repeated="16380"/>
        </table:table-row>
        <table:table-row table:style-name="ro1">
          <table:table-cell table:formula="of:=IF([$Sheet1.A90] &lt;&gt;&quot;&quot;; &quot;#define &quot;; &quot;&quot;)">
            <text:p/>
          </table:table-cell>
          <table:table-cell table:formula="of:=IF([$Sheet1.A90] &lt;&gt;&quot;&quot;; [$Sheet1.I90]; &quot;&quot;)">
            <text:p/>
          </table:table-cell>
          <table:table-cell table:formula="of:=IF([$Sheet1.A90] &lt;&gt;&quot;&quot;; &quot; &quot;; &quot;&quot;)">
            <text:p/>
          </table:table-cell>
          <table:table-cell table:formula="of:=IF([$Sheet1.A90] &lt;&gt;&quot;&quot;; [$Sheet1.A90]; &quot;&quot;)">
            <text:p/>
          </table:table-cell>
          <table:table-cell table:number-columns-repeated="16380"/>
        </table:table-row>
        <table:table-row table:style-name="ro1">
          <table:table-cell table:formula="of:=IF([$Sheet1.A91] &lt;&gt;&quot;&quot;; &quot;#define &quot;; &quot;&quot;)" office:value-type="string" office:string-value="#define " calcext:value-type="string">
            <text:p>#define </text:p>
          </table:table-cell>
          <table:table-cell table:formula="of:=IF([$Sheet1.A91] &lt;&gt;&quot;&quot;; [$Sheet1.I91]; &quot;&quot;)" office:value-type="string" office:string-value="CUP1_CHANNEL1_GAIN1_FACTOR" calcext:value-type="string">
            <text:p>CUP1_CHANNEL1_GAIN1_FACTOR</text:p>
          </table:table-cell>
          <table:table-cell table:formula="of:=IF([$Sheet1.A91] &lt;&gt;&quot;&quot;; &quot; &quot;; &quot;&quot;)" office:value-type="string" office:string-value=" " calcext:value-type="string">
            <text:p><text:s/></text:p>
          </table:table-cell>
          <table:table-cell table:formula="of:=IF([$Sheet1.A91] &lt;&gt;&quot;&quot;; [$Sheet1.A91]; &quot;&quot;)" office:value-type="float" office:value="1050" calcext:value-type="float">
            <text:p>1050</text:p>
          </table:table-cell>
          <table:table-cell table:number-columns-repeated="16380"/>
        </table:table-row>
        <table:table-row table:style-name="ro1">
          <table:table-cell table:formula="of:=IF([$Sheet1.A92] &lt;&gt;&quot;&quot;; &quot;#define &quot;; &quot;&quot;)" office:value-type="string" office:string-value="#define " calcext:value-type="string">
            <text:p>#define </text:p>
          </table:table-cell>
          <table:table-cell table:formula="of:=IF([$Sheet1.A92] &lt;&gt;&quot;&quot;; [$Sheet1.I92]; &quot;&quot;)" office:value-type="string" office:string-value="CUP1_CHANNEL2_GAIN1_FACTOR" calcext:value-type="string">
            <text:p>CUP1_CHANNEL2_GAIN1_FACTOR</text:p>
          </table:table-cell>
          <table:table-cell table:formula="of:=IF([$Sheet1.A92] &lt;&gt;&quot;&quot;; &quot; &quot;; &quot;&quot;)" office:value-type="string" office:string-value=" " calcext:value-type="string">
            <text:p><text:s/></text:p>
          </table:table-cell>
          <table:table-cell table:formula="of:=IF([$Sheet1.A92] &lt;&gt;&quot;&quot;; [$Sheet1.A92]; &quot;&quot;)" office:value-type="float" office:value="1051" calcext:value-type="float">
            <text:p>1051</text:p>
          </table:table-cell>
          <table:table-cell table:number-columns-repeated="16380"/>
        </table:table-row>
        <table:table-row table:style-name="ro1">
          <table:table-cell table:formula="of:=IF([$Sheet1.A93] &lt;&gt;&quot;&quot;; &quot;#define &quot;; &quot;&quot;)" office:value-type="string" office:string-value="#define " calcext:value-type="string">
            <text:p>#define </text:p>
          </table:table-cell>
          <table:table-cell table:formula="of:=IF([$Sheet1.A93] &lt;&gt;&quot;&quot;; [$Sheet1.I93]; &quot;&quot;)" office:value-type="string" office:string-value="CUP1_CHANNEL3_GAIN1_FACTOR" calcext:value-type="string">
            <text:p>CUP1_CHANNEL3_GAIN1_FACTOR</text:p>
          </table:table-cell>
          <table:table-cell table:formula="of:=IF([$Sheet1.A93] &lt;&gt;&quot;&quot;; &quot; &quot;; &quot;&quot;)" office:value-type="string" office:string-value=" " calcext:value-type="string">
            <text:p><text:s/></text:p>
          </table:table-cell>
          <table:table-cell table:formula="of:=IF([$Sheet1.A93] &lt;&gt;&quot;&quot;; [$Sheet1.A93]; &quot;&quot;)" office:value-type="float" office:value="1052" calcext:value-type="float">
            <text:p>1052</text:p>
          </table:table-cell>
          <table:table-cell table:number-columns-repeated="16380"/>
        </table:table-row>
        <table:table-row table:style-name="ro1">
          <table:table-cell table:formula="of:=IF([$Sheet1.A94] &lt;&gt;&quot;&quot;; &quot;#define &quot;; &quot;&quot;)" office:value-type="string" office:string-value="#define " calcext:value-type="string">
            <text:p>#define </text:p>
          </table:table-cell>
          <table:table-cell table:formula="of:=IF([$Sheet1.A94] &lt;&gt;&quot;&quot;; [$Sheet1.I94]; &quot;&quot;)" office:value-type="string" office:string-value="CUP1_CHANNEL4_GAIN1_FACTOR" calcext:value-type="string">
            <text:p>CUP1_CHANNEL4_GAIN1_FACTOR</text:p>
          </table:table-cell>
          <table:table-cell table:formula="of:=IF([$Sheet1.A94] &lt;&gt;&quot;&quot;; &quot; &quot;; &quot;&quot;)" office:value-type="string" office:string-value=" " calcext:value-type="string">
            <text:p><text:s/></text:p>
          </table:table-cell>
          <table:table-cell table:formula="of:=IF([$Sheet1.A94] &lt;&gt;&quot;&quot;; [$Sheet1.A94]; &quot;&quot;)" office:value-type="float" office:value="1053" calcext:value-type="float">
            <text:p>1053</text:p>
          </table:table-cell>
          <table:table-cell table:number-columns-repeated="16380"/>
        </table:table-row>
        <table:table-row table:style-name="ro1">
          <table:table-cell table:formula="of:=IF([$Sheet1.A95] &lt;&gt;&quot;&quot;; &quot;#define &quot;; &quot;&quot;)" office:value-type="string" office:string-value="#define " calcext:value-type="string">
            <text:p>#define </text:p>
          </table:table-cell>
          <table:table-cell table:formula="of:=IF([$Sheet1.A95] &lt;&gt;&quot;&quot;; [$Sheet1.I95]; &quot;&quot;)" office:value-type="string" office:string-value="CUP2_CHANNEL1_GAIN1_FACTOR" calcext:value-type="string">
            <text:p>CUP2_CHANNEL1_GAIN1_FACTOR</text:p>
          </table:table-cell>
          <table:table-cell table:formula="of:=IF([$Sheet1.A95] &lt;&gt;&quot;&quot;; &quot; &quot;; &quot;&quot;)" office:value-type="string" office:string-value=" " calcext:value-type="string">
            <text:p><text:s/></text:p>
          </table:table-cell>
          <table:table-cell table:formula="of:=IF([$Sheet1.A95] &lt;&gt;&quot;&quot;; [$Sheet1.A95]; &quot;&quot;)" office:value-type="float" office:value="1054" calcext:value-type="float">
            <text:p>1054</text:p>
          </table:table-cell>
          <table:table-cell table:number-columns-repeated="16380"/>
        </table:table-row>
        <table:table-row table:style-name="ro1">
          <table:table-cell table:formula="of:=IF([$Sheet1.A96] &lt;&gt;&quot;&quot;; &quot;#define &quot;; &quot;&quot;)" office:value-type="string" office:string-value="#define " calcext:value-type="string">
            <text:p>#define </text:p>
          </table:table-cell>
          <table:table-cell table:formula="of:=IF([$Sheet1.A96] &lt;&gt;&quot;&quot;; [$Sheet1.I96]; &quot;&quot;)" office:value-type="string" office:string-value="CUP2_CHANNEL2_GAIN1_FACTOR" calcext:value-type="string">
            <text:p>CUP2_CHANNEL2_GAIN1_FACTOR</text:p>
          </table:table-cell>
          <table:table-cell table:formula="of:=IF([$Sheet1.A96] &lt;&gt;&quot;&quot;; &quot; &quot;; &quot;&quot;)" office:value-type="string" office:string-value=" " calcext:value-type="string">
            <text:p><text:s/></text:p>
          </table:table-cell>
          <table:table-cell table:formula="of:=IF([$Sheet1.A96] &lt;&gt;&quot;&quot;; [$Sheet1.A96]; &quot;&quot;)" office:value-type="float" office:value="1055" calcext:value-type="float">
            <text:p>1055</text:p>
          </table:table-cell>
          <table:table-cell table:number-columns-repeated="16380"/>
        </table:table-row>
        <table:table-row table:style-name="ro1">
          <table:table-cell table:formula="of:=IF([$Sheet1.A97] &lt;&gt;&quot;&quot;; &quot;#define &quot;; &quot;&quot;)" office:value-type="string" office:string-value="#define " calcext:value-type="string">
            <text:p>#define </text:p>
          </table:table-cell>
          <table:table-cell table:formula="of:=IF([$Sheet1.A97] &lt;&gt;&quot;&quot;; [$Sheet1.I97]; &quot;&quot;)" office:value-type="string" office:string-value="CUP2_CHANNEL3_GAIN1_FACTOR" calcext:value-type="string">
            <text:p>CUP2_CHANNEL3_GAIN1_FACTOR</text:p>
          </table:table-cell>
          <table:table-cell table:formula="of:=IF([$Sheet1.A97] &lt;&gt;&quot;&quot;; &quot; &quot;; &quot;&quot;)" office:value-type="string" office:string-value=" " calcext:value-type="string">
            <text:p><text:s/></text:p>
          </table:table-cell>
          <table:table-cell table:formula="of:=IF([$Sheet1.A97] &lt;&gt;&quot;&quot;; [$Sheet1.A97]; &quot;&quot;)" office:value-type="float" office:value="1056" calcext:value-type="float">
            <text:p>1056</text:p>
          </table:table-cell>
          <table:table-cell table:number-columns-repeated="16380"/>
        </table:table-row>
        <table:table-row table:style-name="ro1">
          <table:table-cell table:formula="of:=IF([$Sheet1.A98] &lt;&gt;&quot;&quot;; &quot;#define &quot;; &quot;&quot;)" office:value-type="string" office:string-value="#define " calcext:value-type="string">
            <text:p>#define </text:p>
          </table:table-cell>
          <table:table-cell table:formula="of:=IF([$Sheet1.A98] &lt;&gt;&quot;&quot;; [$Sheet1.I98]; &quot;&quot;)" office:value-type="string" office:string-value="CUP2_CHANNEL4_GAIN1_FACTOR" calcext:value-type="string">
            <text:p>CUP2_CHANNEL4_GAIN1_FACTOR</text:p>
          </table:table-cell>
          <table:table-cell table:formula="of:=IF([$Sheet1.A98] &lt;&gt;&quot;&quot;; &quot; &quot;; &quot;&quot;)" office:value-type="string" office:string-value=" " calcext:value-type="string">
            <text:p><text:s/></text:p>
          </table:table-cell>
          <table:table-cell table:formula="of:=IF([$Sheet1.A98] &lt;&gt;&quot;&quot;; [$Sheet1.A98]; &quot;&quot;)" office:value-type="float" office:value="1057" calcext:value-type="float">
            <text:p>1057</text:p>
          </table:table-cell>
          <table:table-cell table:number-columns-repeated="16380"/>
        </table:table-row>
        <table:table-row table:style-name="ro1">
          <table:table-cell table:formula="of:=IF([$Sheet1.A99] &lt;&gt;&quot;&quot;; &quot;#define &quot;; &quot;&quot;)" office:value-type="string" office:string-value="#define " calcext:value-type="string">
            <text:p>#define </text:p>
          </table:table-cell>
          <table:table-cell table:formula="of:=IF([$Sheet1.A99] &lt;&gt;&quot;&quot;; [$Sheet1.I99]; &quot;&quot;)" office:value-type="string" office:string-value="CUP3_CHANNEL1_GAIN1_FACTOR" calcext:value-type="string">
            <text:p>CUP3_CHANNEL1_GAIN1_FACTOR</text:p>
          </table:table-cell>
          <table:table-cell table:formula="of:=IF([$Sheet1.A99] &lt;&gt;&quot;&quot;; &quot; &quot;; &quot;&quot;)" office:value-type="string" office:string-value=" " calcext:value-type="string">
            <text:p><text:s/></text:p>
          </table:table-cell>
          <table:table-cell table:formula="of:=IF([$Sheet1.A99] &lt;&gt;&quot;&quot;; [$Sheet1.A99]; &quot;&quot;)" office:value-type="float" office:value="1058" calcext:value-type="float">
            <text:p>1058</text:p>
          </table:table-cell>
          <table:table-cell table:number-columns-repeated="16380"/>
        </table:table-row>
        <table:table-row table:style-name="ro1">
          <table:table-cell table:formula="of:=IF([$Sheet1.A100] &lt;&gt;&quot;&quot;; &quot;#define &quot;; &quot;&quot;)" office:value-type="string" office:string-value="#define " calcext:value-type="string">
            <text:p>#define </text:p>
          </table:table-cell>
          <table:table-cell table:formula="of:=IF([$Sheet1.A100] &lt;&gt;&quot;&quot;; [$Sheet1.I100]; &quot;&quot;)" office:value-type="string" office:string-value="CUP3_CHANNEL2_GAIN1_FACTOR" calcext:value-type="string">
            <text:p>CUP3_CHANNEL2_GAIN1_FACTOR</text:p>
          </table:table-cell>
          <table:table-cell table:formula="of:=IF([$Sheet1.A100] &lt;&gt;&quot;&quot;; &quot; &quot;; &quot;&quot;)" office:value-type="string" office:string-value=" " calcext:value-type="string">
            <text:p><text:s/></text:p>
          </table:table-cell>
          <table:table-cell table:formula="of:=IF([$Sheet1.A100] &lt;&gt;&quot;&quot;; [$Sheet1.A100]; &quot;&quot;)" office:value-type="float" office:value="1059" calcext:value-type="float">
            <text:p>1059</text:p>
          </table:table-cell>
          <table:table-cell table:number-columns-repeated="16380"/>
        </table:table-row>
        <table:table-row table:style-name="ro1">
          <table:table-cell table:formula="of:=IF([$Sheet1.A101] &lt;&gt;&quot;&quot;; &quot;#define &quot;; &quot;&quot;)" office:value-type="string" office:string-value="#define " calcext:value-type="string">
            <text:p>#define </text:p>
          </table:table-cell>
          <table:table-cell table:formula="of:=IF([$Sheet1.A101] &lt;&gt;&quot;&quot;; [$Sheet1.I101]; &quot;&quot;)" office:value-type="string" office:string-value="CUP3_CHANNEL3_GAIN1_FACTOR" calcext:value-type="string">
            <text:p>CUP3_CHANNEL3_GAIN1_FACTOR</text:p>
          </table:table-cell>
          <table:table-cell table:formula="of:=IF([$Sheet1.A101] &lt;&gt;&quot;&quot;; &quot; &quot;; &quot;&quot;)" office:value-type="string" office:string-value=" " calcext:value-type="string">
            <text:p><text:s/></text:p>
          </table:table-cell>
          <table:table-cell table:formula="of:=IF([$Sheet1.A101] &lt;&gt;&quot;&quot;; [$Sheet1.A101]; &quot;&quot;)" office:value-type="float" office:value="1060" calcext:value-type="float">
            <text:p>1060</text:p>
          </table:table-cell>
          <table:table-cell table:number-columns-repeated="16380"/>
        </table:table-row>
        <table:table-row table:style-name="ro1">
          <table:table-cell table:formula="of:=IF([$Sheet1.A102] &lt;&gt;&quot;&quot;; &quot;#define &quot;; &quot;&quot;)" office:value-type="string" office:string-value="#define " calcext:value-type="string">
            <text:p>#define </text:p>
          </table:table-cell>
          <table:table-cell table:formula="of:=IF([$Sheet1.A102] &lt;&gt;&quot;&quot;; [$Sheet1.I102]; &quot;&quot;)" office:value-type="string" office:string-value="CUP3_CHANNEL4_GAIN1_FACTOR" calcext:value-type="string">
            <text:p>CUP3_CHANNEL4_GAIN1_FACTOR</text:p>
          </table:table-cell>
          <table:table-cell table:formula="of:=IF([$Sheet1.A102] &lt;&gt;&quot;&quot;; &quot; &quot;; &quot;&quot;)" office:value-type="string" office:string-value=" " calcext:value-type="string">
            <text:p><text:s/></text:p>
          </table:table-cell>
          <table:table-cell table:formula="of:=IF([$Sheet1.A102] &lt;&gt;&quot;&quot;; [$Sheet1.A102]; &quot;&quot;)" office:value-type="float" office:value="1061" calcext:value-type="float">
            <text:p>1061</text:p>
          </table:table-cell>
          <table:table-cell table:number-columns-repeated="16380"/>
        </table:table-row>
        <table:table-row table:style-name="ro1">
          <table:table-cell table:formula="of:=IF([$Sheet1.A103] &lt;&gt;&quot;&quot;; &quot;#define &quot;; &quot;&quot;)" office:value-type="string" office:string-value="#define " calcext:value-type="string">
            <text:p>#define </text:p>
          </table:table-cell>
          <table:table-cell table:formula="of:=IF([$Sheet1.A103] &lt;&gt;&quot;&quot;; [$Sheet1.I103]; &quot;&quot;)" office:value-type="string" office:string-value="CUP1_CHANNEL1_GAIN2_FACTOR" calcext:value-type="string">
            <text:p>CUP1_CHANNEL1_GAIN2_FACTOR</text:p>
          </table:table-cell>
          <table:table-cell table:formula="of:=IF([$Sheet1.A103] &lt;&gt;&quot;&quot;; &quot; &quot;; &quot;&quot;)" office:value-type="string" office:string-value=" " calcext:value-type="string">
            <text:p><text:s/></text:p>
          </table:table-cell>
          <table:table-cell table:formula="of:=IF([$Sheet1.A103] &lt;&gt;&quot;&quot;; [$Sheet1.A103]; &quot;&quot;)" office:value-type="float" office:value="1062" calcext:value-type="float">
            <text:p>1062</text:p>
          </table:table-cell>
          <table:table-cell table:number-columns-repeated="16380"/>
        </table:table-row>
        <table:table-row table:style-name="ro1">
          <table:table-cell table:formula="of:=IF([$Sheet1.A104] &lt;&gt;&quot;&quot;; &quot;#define &quot;; &quot;&quot;)" office:value-type="string" office:string-value="#define " calcext:value-type="string">
            <text:p>#define </text:p>
          </table:table-cell>
          <table:table-cell table:formula="of:=IF([$Sheet1.A104] &lt;&gt;&quot;&quot;; [$Sheet1.I104]; &quot;&quot;)" office:value-type="string" office:string-value="CUP1_CHANNEL2_GAIN2_FACTOR" calcext:value-type="string">
            <text:p>CUP1_CHANNEL2_GAIN2_FACTOR</text:p>
          </table:table-cell>
          <table:table-cell table:formula="of:=IF([$Sheet1.A104] &lt;&gt;&quot;&quot;; &quot; &quot;; &quot;&quot;)" office:value-type="string" office:string-value=" " calcext:value-type="string">
            <text:p><text:s/></text:p>
          </table:table-cell>
          <table:table-cell table:formula="of:=IF([$Sheet1.A104] &lt;&gt;&quot;&quot;; [$Sheet1.A104]; &quot;&quot;)" office:value-type="float" office:value="1063" calcext:value-type="float">
            <text:p>1063</text:p>
          </table:table-cell>
          <table:table-cell table:number-columns-repeated="16380"/>
        </table:table-row>
        <table:table-row table:style-name="ro1">
          <table:table-cell table:formula="of:=IF([$Sheet1.A105] &lt;&gt;&quot;&quot;; &quot;#define &quot;; &quot;&quot;)" office:value-type="string" office:string-value="#define " calcext:value-type="string">
            <text:p>#define </text:p>
          </table:table-cell>
          <table:table-cell table:formula="of:=IF([$Sheet1.A105] &lt;&gt;&quot;&quot;; [$Sheet1.I105]; &quot;&quot;)" office:value-type="string" office:string-value="CUP1_CHANNEL3_GAIN2_FACTOR" calcext:value-type="string">
            <text:p>CUP1_CHANNEL3_GAIN2_FACTOR</text:p>
          </table:table-cell>
          <table:table-cell table:formula="of:=IF([$Sheet1.A105] &lt;&gt;&quot;&quot;; &quot; &quot;; &quot;&quot;)" office:value-type="string" office:string-value=" " calcext:value-type="string">
            <text:p><text:s/></text:p>
          </table:table-cell>
          <table:table-cell table:formula="of:=IF([$Sheet1.A105] &lt;&gt;&quot;&quot;; [$Sheet1.A105]; &quot;&quot;)" office:value-type="float" office:value="1064" calcext:value-type="float">
            <text:p>1064</text:p>
          </table:table-cell>
          <table:table-cell table:number-columns-repeated="16380"/>
        </table:table-row>
        <table:table-row table:style-name="ro1">
          <table:table-cell table:formula="of:=IF([$Sheet1.A106] &lt;&gt;&quot;&quot;; &quot;#define &quot;; &quot;&quot;)" office:value-type="string" office:string-value="#define " calcext:value-type="string">
            <text:p>#define </text:p>
          </table:table-cell>
          <table:table-cell table:formula="of:=IF([$Sheet1.A106] &lt;&gt;&quot;&quot;; [$Sheet1.I106]; &quot;&quot;)" office:value-type="string" office:string-value="CUP1_CHANNEL4_GAIN2_FACTOR" calcext:value-type="string">
            <text:p>CUP1_CHANNEL4_GAIN2_FACTOR</text:p>
          </table:table-cell>
          <table:table-cell table:formula="of:=IF([$Sheet1.A106] &lt;&gt;&quot;&quot;; &quot; &quot;; &quot;&quot;)" office:value-type="string" office:string-value=" " calcext:value-type="string">
            <text:p><text:s/></text:p>
          </table:table-cell>
          <table:table-cell table:formula="of:=IF([$Sheet1.A106] &lt;&gt;&quot;&quot;; [$Sheet1.A106]; &quot;&quot;)" office:value-type="float" office:value="1065" calcext:value-type="float">
            <text:p>1065</text:p>
          </table:table-cell>
          <table:table-cell table:number-columns-repeated="16380"/>
        </table:table-row>
        <table:table-row table:style-name="ro1">
          <table:table-cell table:formula="of:=IF([$Sheet1.A107] &lt;&gt;&quot;&quot;; &quot;#define &quot;; &quot;&quot;)" office:value-type="string" office:string-value="#define " calcext:value-type="string">
            <text:p>#define </text:p>
          </table:table-cell>
          <table:table-cell table:formula="of:=IF([$Sheet1.A107] &lt;&gt;&quot;&quot;; [$Sheet1.I107]; &quot;&quot;)" office:value-type="string" office:string-value="CUP2_CHANNEL1_GAIN2_FACTOR" calcext:value-type="string">
            <text:p>CUP2_CHANNEL1_GAIN2_FACTOR</text:p>
          </table:table-cell>
          <table:table-cell table:formula="of:=IF([$Sheet1.A107] &lt;&gt;&quot;&quot;; &quot; &quot;; &quot;&quot;)" office:value-type="string" office:string-value=" " calcext:value-type="string">
            <text:p><text:s/></text:p>
          </table:table-cell>
          <table:table-cell table:formula="of:=IF([$Sheet1.A107] &lt;&gt;&quot;&quot;; [$Sheet1.A107]; &quot;&quot;)" office:value-type="float" office:value="1066" calcext:value-type="float">
            <text:p>1066</text:p>
          </table:table-cell>
          <table:table-cell table:number-columns-repeated="16380"/>
        </table:table-row>
        <table:table-row table:style-name="ro1">
          <table:table-cell table:formula="of:=IF([$Sheet1.A108] &lt;&gt;&quot;&quot;; &quot;#define &quot;; &quot;&quot;)" office:value-type="string" office:string-value="#define " calcext:value-type="string">
            <text:p>#define </text:p>
          </table:table-cell>
          <table:table-cell table:formula="of:=IF([$Sheet1.A108] &lt;&gt;&quot;&quot;; [$Sheet1.I108]; &quot;&quot;)" office:value-type="string" office:string-value="CUP2_CHANNEL2_GAIN2_FACTOR" calcext:value-type="string">
            <text:p>CUP2_CHANNEL2_GAIN2_FACTOR</text:p>
          </table:table-cell>
          <table:table-cell table:formula="of:=IF([$Sheet1.A108] &lt;&gt;&quot;&quot;; &quot; &quot;; &quot;&quot;)" office:value-type="string" office:string-value=" " calcext:value-type="string">
            <text:p><text:s/></text:p>
          </table:table-cell>
          <table:table-cell table:formula="of:=IF([$Sheet1.A108] &lt;&gt;&quot;&quot;; [$Sheet1.A108]; &quot;&quot;)" office:value-type="float" office:value="1067" calcext:value-type="float">
            <text:p>1067</text:p>
          </table:table-cell>
          <table:table-cell table:number-columns-repeated="16380"/>
        </table:table-row>
        <table:table-row table:style-name="ro1">
          <table:table-cell table:formula="of:=IF([$Sheet1.A109] &lt;&gt;&quot;&quot;; &quot;#define &quot;; &quot;&quot;)" office:value-type="string" office:string-value="#define " calcext:value-type="string">
            <text:p>#define </text:p>
          </table:table-cell>
          <table:table-cell table:formula="of:=IF([$Sheet1.A109] &lt;&gt;&quot;&quot;; [$Sheet1.I109]; &quot;&quot;)" office:value-type="string" office:string-value="CUP2_CHANNEL3_GAIN2_FACTOR" calcext:value-type="string">
            <text:p>CUP2_CHANNEL3_GAIN2_FACTOR</text:p>
          </table:table-cell>
          <table:table-cell table:formula="of:=IF([$Sheet1.A109] &lt;&gt;&quot;&quot;; &quot; &quot;; &quot;&quot;)" office:value-type="string" office:string-value=" " calcext:value-type="string">
            <text:p><text:s/></text:p>
          </table:table-cell>
          <table:table-cell table:formula="of:=IF([$Sheet1.A109] &lt;&gt;&quot;&quot;; [$Sheet1.A109]; &quot;&quot;)" office:value-type="float" office:value="1068" calcext:value-type="float">
            <text:p>1068</text:p>
          </table:table-cell>
          <table:table-cell table:number-columns-repeated="16380"/>
        </table:table-row>
        <table:table-row table:style-name="ro1">
          <table:table-cell table:formula="of:=IF([$Sheet1.A110] &lt;&gt;&quot;&quot;; &quot;#define &quot;; &quot;&quot;)" office:value-type="string" office:string-value="#define " calcext:value-type="string">
            <text:p>#define </text:p>
          </table:table-cell>
          <table:table-cell table:formula="of:=IF([$Sheet1.A110] &lt;&gt;&quot;&quot;; [$Sheet1.I110]; &quot;&quot;)" office:value-type="string" office:string-value="CUP2_CHANNEL4_GAIN2_FACTOR" calcext:value-type="string">
            <text:p>CUP2_CHANNEL4_GAIN2_FACTOR</text:p>
          </table:table-cell>
          <table:table-cell table:formula="of:=IF([$Sheet1.A110] &lt;&gt;&quot;&quot;; &quot; &quot;; &quot;&quot;)" office:value-type="string" office:string-value=" " calcext:value-type="string">
            <text:p><text:s/></text:p>
          </table:table-cell>
          <table:table-cell table:formula="of:=IF([$Sheet1.A110] &lt;&gt;&quot;&quot;; [$Sheet1.A110]; &quot;&quot;)" office:value-type="float" office:value="1069" calcext:value-type="float">
            <text:p>1069</text:p>
          </table:table-cell>
          <table:table-cell table:number-columns-repeated="16380"/>
        </table:table-row>
        <table:table-row table:style-name="ro1">
          <table:table-cell table:formula="of:=IF([$Sheet1.A111] &lt;&gt;&quot;&quot;; &quot;#define &quot;; &quot;&quot;)" office:value-type="string" office:string-value="#define " calcext:value-type="string">
            <text:p>#define </text:p>
          </table:table-cell>
          <table:table-cell table:formula="of:=IF([$Sheet1.A111] &lt;&gt;&quot;&quot;; [$Sheet1.I111]; &quot;&quot;)" office:value-type="string" office:string-value="CUP3_CHANNEL1_GAIN2_FACTOR" calcext:value-type="string">
            <text:p>CUP3_CHANNEL1_GAIN2_FACTOR</text:p>
          </table:table-cell>
          <table:table-cell table:formula="of:=IF([$Sheet1.A111] &lt;&gt;&quot;&quot;; &quot; &quot;; &quot;&quot;)" office:value-type="string" office:string-value=" " calcext:value-type="string">
            <text:p><text:s/></text:p>
          </table:table-cell>
          <table:table-cell table:formula="of:=IF([$Sheet1.A111] &lt;&gt;&quot;&quot;; [$Sheet1.A111]; &quot;&quot;)" office:value-type="float" office:value="1070" calcext:value-type="float">
            <text:p>1070</text:p>
          </table:table-cell>
          <table:table-cell table:number-columns-repeated="16380"/>
        </table:table-row>
        <table:table-row table:style-name="ro1">
          <table:table-cell table:formula="of:=IF([$Sheet1.A112] &lt;&gt;&quot;&quot;; &quot;#define &quot;; &quot;&quot;)" office:value-type="string" office:string-value="#define " calcext:value-type="string">
            <text:p>#define </text:p>
          </table:table-cell>
          <table:table-cell table:formula="of:=IF([$Sheet1.A112] &lt;&gt;&quot;&quot;; [$Sheet1.I112]; &quot;&quot;)" office:value-type="string" office:string-value="CUP3_CHANNEL2_GAIN2_FACTOR" calcext:value-type="string">
            <text:p>CUP3_CHANNEL2_GAIN2_FACTOR</text:p>
          </table:table-cell>
          <table:table-cell table:formula="of:=IF([$Sheet1.A112] &lt;&gt;&quot;&quot;; &quot; &quot;; &quot;&quot;)" office:value-type="string" office:string-value=" " calcext:value-type="string">
            <text:p><text:s/></text:p>
          </table:table-cell>
          <table:table-cell table:formula="of:=IF([$Sheet1.A112] &lt;&gt;&quot;&quot;; [$Sheet1.A112]; &quot;&quot;)" office:value-type="float" office:value="1071" calcext:value-type="float">
            <text:p>1071</text:p>
          </table:table-cell>
          <table:table-cell table:number-columns-repeated="16380"/>
        </table:table-row>
        <table:table-row table:style-name="ro1">
          <table:table-cell table:formula="of:=IF([$Sheet1.A113] &lt;&gt;&quot;&quot;; &quot;#define &quot;; &quot;&quot;)" office:value-type="string" office:string-value="#define " calcext:value-type="string">
            <text:p>#define </text:p>
          </table:table-cell>
          <table:table-cell table:formula="of:=IF([$Sheet1.A113] &lt;&gt;&quot;&quot;; [$Sheet1.I113]; &quot;&quot;)" office:value-type="string" office:string-value="CUP3_CHANNEL3_GAIN2_FACTOR" calcext:value-type="string">
            <text:p>CUP3_CHANNEL3_GAIN2_FACTOR</text:p>
          </table:table-cell>
          <table:table-cell table:formula="of:=IF([$Sheet1.A113] &lt;&gt;&quot;&quot;; &quot; &quot;; &quot;&quot;)" office:value-type="string" office:string-value=" " calcext:value-type="string">
            <text:p><text:s/></text:p>
          </table:table-cell>
          <table:table-cell table:formula="of:=IF([$Sheet1.A113] &lt;&gt;&quot;&quot;; [$Sheet1.A113]; &quot;&quot;)" office:value-type="float" office:value="1072" calcext:value-type="float">
            <text:p>1072</text:p>
          </table:table-cell>
          <table:table-cell table:number-columns-repeated="16380"/>
        </table:table-row>
        <table:table-row table:style-name="ro1">
          <table:table-cell table:formula="of:=IF([$Sheet1.A114] &lt;&gt;&quot;&quot;; &quot;#define &quot;; &quot;&quot;)" office:value-type="string" office:string-value="#define " calcext:value-type="string">
            <text:p>#define </text:p>
          </table:table-cell>
          <table:table-cell table:formula="of:=IF([$Sheet1.A114] &lt;&gt;&quot;&quot;; [$Sheet1.I114]; &quot;&quot;)" office:value-type="string" office:string-value="CUP3_CHANNEL4_GAIN2_FACTOR" calcext:value-type="string">
            <text:p>CUP3_CHANNEL4_GAIN2_FACTOR</text:p>
          </table:table-cell>
          <table:table-cell table:formula="of:=IF([$Sheet1.A114] &lt;&gt;&quot;&quot;; &quot; &quot;; &quot;&quot;)" office:value-type="string" office:string-value=" " calcext:value-type="string">
            <text:p><text:s/></text:p>
          </table:table-cell>
          <table:table-cell table:formula="of:=IF([$Sheet1.A114] &lt;&gt;&quot;&quot;; [$Sheet1.A114]; &quot;&quot;)" office:value-type="float" office:value="1073" calcext:value-type="float">
            <text:p>1073</text:p>
          </table:table-cell>
          <table:table-cell table:number-columns-repeated="16380"/>
        </table:table-row>
        <table:table-row table:style-name="ro1">
          <table:table-cell table:formula="of:=IF([$Sheet1.A115] &lt;&gt;&quot;&quot;; &quot;#define &quot;; &quot;&quot;)">
            <text:p/>
          </table:table-cell>
          <table:table-cell table:formula="of:=IF([$Sheet1.A115] &lt;&gt;&quot;&quot;; [$Sheet1.I115]; &quot;&quot;)">
            <text:p/>
          </table:table-cell>
          <table:table-cell table:formula="of:=IF([$Sheet1.A115] &lt;&gt;&quot;&quot;; &quot; &quot;; &quot;&quot;)">
            <text:p/>
          </table:table-cell>
          <table:table-cell table:formula="of:=IF([$Sheet1.A115] &lt;&gt;&quot;&quot;; [$Sheet1.A115]; &quot;&quot;)">
            <text:p/>
          </table:table-cell>
          <table:table-cell table:number-columns-repeated="16380"/>
        </table:table-row>
        <table:table-row table:style-name="ro1">
          <table:table-cell table:formula="of:=IF([$Sheet1.A116] &lt;&gt;&quot;&quot;; &quot;#define &quot;; &quot;&quot;)" office:value-type="string" office:string-value="#define " calcext:value-type="string">
            <text:p>#define </text:p>
          </table:table-cell>
          <table:table-cell table:formula="of:=IF([$Sheet1.A116] &lt;&gt;&quot;&quot;; [$Sheet1.I116]; &quot;&quot;)" office:value-type="string" office:string-value="RANGE_CHANGE_THRESHOLD" calcext:value-type="string">
            <text:p>RANGE_CHANGE_THRESHOLD</text:p>
          </table:table-cell>
          <table:table-cell table:formula="of:=IF([$Sheet1.A116] &lt;&gt;&quot;&quot;; &quot; &quot;; &quot;&quot;)" office:value-type="string" office:string-value=" " calcext:value-type="string">
            <text:p><text:s/></text:p>
          </table:table-cell>
          <table:table-cell table:formula="of:=IF([$Sheet1.A116] &lt;&gt;&quot;&quot;; [$Sheet1.A116]; &quot;&quot;)" office:value-type="float" office:value="1074" calcext:value-type="float">
            <text:p>1074</text:p>
          </table:table-cell>
          <table:table-cell table:number-columns-repeated="16380"/>
        </table:table-row>
        <table:table-row table:style-name="ro1">
          <table:table-cell table:formula="of:=IF([$Sheet1.A117] &lt;&gt;&quot;&quot;; &quot;#define &quot;; &quot;&quot;)">
            <text:p/>
          </table:table-cell>
          <table:table-cell table:formula="of:=IF([$Sheet1.A117] &lt;&gt;&quot;&quot;; [$Sheet1.I117]; &quot;&quot;)">
            <text:p/>
          </table:table-cell>
          <table:table-cell table:formula="of:=IF([$Sheet1.A117] &lt;&gt;&quot;&quot;; &quot; &quot;; &quot;&quot;)">
            <text:p/>
          </table:table-cell>
          <table:table-cell table:formula="of:=IF([$Sheet1.A117] &lt;&gt;&quot;&quot;; [$Sheet1.A117]; &quot;&quot;)">
            <text:p/>
          </table:table-cell>
          <table:table-cell table:number-columns-repeated="16380"/>
        </table:table-row>
        <table:table-row table:style-name="ro1">
          <table:table-cell table:formula="of:=IF([$Sheet1.A118] &lt;&gt;&quot;&quot;; &quot;#define &quot;; &quot;&quot;)" office:value-type="string" office:string-value="#define " calcext:value-type="string">
            <text:p>#define </text:p>
          </table:table-cell>
          <table:table-cell table:formula="of:=IF([$Sheet1.A118] &lt;&gt;&quot;&quot;; [$Sheet1.I118]; &quot;&quot;)" office:value-type="string" office:string-value="CUP1_CHANNEL1_LOWER_LIMIT" calcext:value-type="string">
            <text:p>CUP1_CHANNEL1_LOWER_LIMIT</text:p>
          </table:table-cell>
          <table:table-cell table:formula="of:=IF([$Sheet1.A118] &lt;&gt;&quot;&quot;; &quot; &quot;; &quot;&quot;)" office:value-type="string" office:string-value=" " calcext:value-type="string">
            <text:p><text:s/></text:p>
          </table:table-cell>
          <table:table-cell table:formula="of:=IF([$Sheet1.A118] &lt;&gt;&quot;&quot;; [$Sheet1.A118]; &quot;&quot;)" office:value-type="float" office:value="1075" calcext:value-type="float">
            <text:p>1075</text:p>
          </table:table-cell>
          <table:table-cell table:number-columns-repeated="16380"/>
        </table:table-row>
        <table:table-row table:style-name="ro1">
          <table:table-cell table:formula="of:=IF([$Sheet1.A119] &lt;&gt;&quot;&quot;; &quot;#define &quot;; &quot;&quot;)" office:value-type="string" office:string-value="#define " calcext:value-type="string">
            <text:p>#define </text:p>
          </table:table-cell>
          <table:table-cell table:formula="of:=IF([$Sheet1.A119] &lt;&gt;&quot;&quot;; [$Sheet1.I119]; &quot;&quot;)" office:value-type="string" office:string-value="CUP1_CHANNEL2_LOWER_LIMIT" calcext:value-type="string">
            <text:p>CUP1_CHANNEL2_LOWER_LIMIT</text:p>
          </table:table-cell>
          <table:table-cell table:formula="of:=IF([$Sheet1.A119] &lt;&gt;&quot;&quot;; &quot; &quot;; &quot;&quot;)" office:value-type="string" office:string-value=" " calcext:value-type="string">
            <text:p><text:s/></text:p>
          </table:table-cell>
          <table:table-cell table:formula="of:=IF([$Sheet1.A119] &lt;&gt;&quot;&quot;; [$Sheet1.A119]; &quot;&quot;)" office:value-type="float" office:value="1076" calcext:value-type="float">
            <text:p>1076</text:p>
          </table:table-cell>
          <table:table-cell table:number-columns-repeated="16380"/>
        </table:table-row>
        <table:table-row table:style-name="ro1">
          <table:table-cell table:formula="of:=IF([$Sheet1.A120] &lt;&gt;&quot;&quot;; &quot;#define &quot;; &quot;&quot;)" office:value-type="string" office:string-value="#define " calcext:value-type="string">
            <text:p>#define </text:p>
          </table:table-cell>
          <table:table-cell table:formula="of:=IF([$Sheet1.A120] &lt;&gt;&quot;&quot;; [$Sheet1.I120]; &quot;&quot;)" office:value-type="string" office:string-value="CUP1_CHANNEL3_LOWER_LIMIT" calcext:value-type="string">
            <text:p>CUP1_CHANNEL3_LOWER_LIMIT</text:p>
          </table:table-cell>
          <table:table-cell table:formula="of:=IF([$Sheet1.A120] &lt;&gt;&quot;&quot;; &quot; &quot;; &quot;&quot;)" office:value-type="string" office:string-value=" " calcext:value-type="string">
            <text:p><text:s/></text:p>
          </table:table-cell>
          <table:table-cell table:formula="of:=IF([$Sheet1.A120] &lt;&gt;&quot;&quot;; [$Sheet1.A120]; &quot;&quot;)" office:value-type="float" office:value="1077" calcext:value-type="float">
            <text:p>1077</text:p>
          </table:table-cell>
          <table:table-cell table:number-columns-repeated="16380"/>
        </table:table-row>
        <table:table-row table:style-name="ro1">
          <table:table-cell table:formula="of:=IF([$Sheet1.A121] &lt;&gt;&quot;&quot;; &quot;#define &quot;; &quot;&quot;)" office:value-type="string" office:string-value="#define " calcext:value-type="string">
            <text:p>#define </text:p>
          </table:table-cell>
          <table:table-cell table:formula="of:=IF([$Sheet1.A121] &lt;&gt;&quot;&quot;; [$Sheet1.I121]; &quot;&quot;)" office:value-type="string" office:string-value="CUP1_CHANNEL4_LOWER_LIMIT" calcext:value-type="string">
            <text:p>CUP1_CHANNEL4_LOWER_LIMIT</text:p>
          </table:table-cell>
          <table:table-cell table:formula="of:=IF([$Sheet1.A121] &lt;&gt;&quot;&quot;; &quot; &quot;; &quot;&quot;)" office:value-type="string" office:string-value=" " calcext:value-type="string">
            <text:p><text:s/></text:p>
          </table:table-cell>
          <table:table-cell table:formula="of:=IF([$Sheet1.A121] &lt;&gt;&quot;&quot;; [$Sheet1.A121]; &quot;&quot;)" office:value-type="float" office:value="1078" calcext:value-type="float">
            <text:p>1078</text:p>
          </table:table-cell>
          <table:table-cell table:number-columns-repeated="16380"/>
        </table:table-row>
        <table:table-row table:style-name="ro1">
          <table:table-cell table:formula="of:=IF([$Sheet1.A122] &lt;&gt;&quot;&quot;; &quot;#define &quot;; &quot;&quot;)" office:value-type="string" office:string-value="#define " calcext:value-type="string">
            <text:p>#define </text:p>
          </table:table-cell>
          <table:table-cell table:formula="of:=IF([$Sheet1.A122] &lt;&gt;&quot;&quot;; [$Sheet1.I122]; &quot;&quot;)" office:value-type="string" office:string-value="CUP2_CHANNEL1_LOWER_LIMIT" calcext:value-type="string">
            <text:p>CUP2_CHANNEL1_LOWER_LIMIT</text:p>
          </table:table-cell>
          <table:table-cell table:formula="of:=IF([$Sheet1.A122] &lt;&gt;&quot;&quot;; &quot; &quot;; &quot;&quot;)" office:value-type="string" office:string-value=" " calcext:value-type="string">
            <text:p><text:s/></text:p>
          </table:table-cell>
          <table:table-cell table:formula="of:=IF([$Sheet1.A122] &lt;&gt;&quot;&quot;; [$Sheet1.A122]; &quot;&quot;)" office:value-type="float" office:value="1079" calcext:value-type="float">
            <text:p>1079</text:p>
          </table:table-cell>
          <table:table-cell table:number-columns-repeated="16380"/>
        </table:table-row>
        <table:table-row table:style-name="ro1">
          <table:table-cell table:formula="of:=IF([$Sheet1.A123] &lt;&gt;&quot;&quot;; &quot;#define &quot;; &quot;&quot;)" office:value-type="string" office:string-value="#define " calcext:value-type="string">
            <text:p>#define </text:p>
          </table:table-cell>
          <table:table-cell table:formula="of:=IF([$Sheet1.A123] &lt;&gt;&quot;&quot;; [$Sheet1.I123]; &quot;&quot;)" office:value-type="string" office:string-value="CUP2_CHANNEL2_LOWER_LIMIT" calcext:value-type="string">
            <text:p>CUP2_CHANNEL2_LOWER_LIMIT</text:p>
          </table:table-cell>
          <table:table-cell table:formula="of:=IF([$Sheet1.A123] &lt;&gt;&quot;&quot;; &quot; &quot;; &quot;&quot;)" office:value-type="string" office:string-value=" " calcext:value-type="string">
            <text:p><text:s/></text:p>
          </table:table-cell>
          <table:table-cell table:formula="of:=IF([$Sheet1.A123] &lt;&gt;&quot;&quot;; [$Sheet1.A123]; &quot;&quot;)" office:value-type="float" office:value="1080" calcext:value-type="float">
            <text:p>1080</text:p>
          </table:table-cell>
          <table:table-cell table:number-columns-repeated="16380"/>
        </table:table-row>
        <table:table-row table:style-name="ro1">
          <table:table-cell table:formula="of:=IF([$Sheet1.A124] &lt;&gt;&quot;&quot;; &quot;#define &quot;; &quot;&quot;)" office:value-type="string" office:string-value="#define " calcext:value-type="string">
            <text:p>#define </text:p>
          </table:table-cell>
          <table:table-cell table:formula="of:=IF([$Sheet1.A124] &lt;&gt;&quot;&quot;; [$Sheet1.I124]; &quot;&quot;)" office:value-type="string" office:string-value="CUP2_CHANNEL3_LOWER_LIMIT" calcext:value-type="string">
            <text:p>CUP2_CHANNEL3_LOWER_LIMIT</text:p>
          </table:table-cell>
          <table:table-cell table:formula="of:=IF([$Sheet1.A124] &lt;&gt;&quot;&quot;; &quot; &quot;; &quot;&quot;)" office:value-type="string" office:string-value=" " calcext:value-type="string">
            <text:p><text:s/></text:p>
          </table:table-cell>
          <table:table-cell table:formula="of:=IF([$Sheet1.A124] &lt;&gt;&quot;&quot;; [$Sheet1.A124]; &quot;&quot;)" office:value-type="float" office:value="1081" calcext:value-type="float">
            <text:p>1081</text:p>
          </table:table-cell>
          <table:table-cell table:number-columns-repeated="16380"/>
        </table:table-row>
        <table:table-row table:style-name="ro1">
          <table:table-cell table:formula="of:=IF([$Sheet1.A125] &lt;&gt;&quot;&quot;; &quot;#define &quot;; &quot;&quot;)" office:value-type="string" office:string-value="#define " calcext:value-type="string">
            <text:p>#define </text:p>
          </table:table-cell>
          <table:table-cell table:formula="of:=IF([$Sheet1.A125] &lt;&gt;&quot;&quot;; [$Sheet1.I125]; &quot;&quot;)" office:value-type="string" office:string-value="CUP2_CHANNEL4_LOWER_LIMIT" calcext:value-type="string">
            <text:p>CUP2_CHANNEL4_LOWER_LIMIT</text:p>
          </table:table-cell>
          <table:table-cell table:formula="of:=IF([$Sheet1.A125] &lt;&gt;&quot;&quot;; &quot; &quot;; &quot;&quot;)" office:value-type="string" office:string-value=" " calcext:value-type="string">
            <text:p><text:s/></text:p>
          </table:table-cell>
          <table:table-cell table:formula="of:=IF([$Sheet1.A125] &lt;&gt;&quot;&quot;; [$Sheet1.A125]; &quot;&quot;)" office:value-type="float" office:value="1082" calcext:value-type="float">
            <text:p>1082</text:p>
          </table:table-cell>
          <table:table-cell table:number-columns-repeated="16380"/>
        </table:table-row>
        <table:table-row table:style-name="ro1">
          <table:table-cell table:formula="of:=IF([$Sheet1.A126] &lt;&gt;&quot;&quot;; &quot;#define &quot;; &quot;&quot;)" office:value-type="string" office:string-value="#define " calcext:value-type="string">
            <text:p>#define </text:p>
          </table:table-cell>
          <table:table-cell table:formula="of:=IF([$Sheet1.A126] &lt;&gt;&quot;&quot;; [$Sheet1.I126]; &quot;&quot;)" office:value-type="string" office:string-value="CUP3_CHANNEL1_LOWER_LIMIT" calcext:value-type="string">
            <text:p>CUP3_CHANNEL1_LOWER_LIMIT</text:p>
          </table:table-cell>
          <table:table-cell table:formula="of:=IF([$Sheet1.A126] &lt;&gt;&quot;&quot;; &quot; &quot;; &quot;&quot;)" office:value-type="string" office:string-value=" " calcext:value-type="string">
            <text:p><text:s/></text:p>
          </table:table-cell>
          <table:table-cell table:formula="of:=IF([$Sheet1.A126] &lt;&gt;&quot;&quot;; [$Sheet1.A126]; &quot;&quot;)" office:value-type="float" office:value="1083" calcext:value-type="float">
            <text:p>1083</text:p>
          </table:table-cell>
          <table:table-cell table:number-columns-repeated="16380"/>
        </table:table-row>
        <table:table-row table:style-name="ro1">
          <table:table-cell table:formula="of:=IF([$Sheet1.A127] &lt;&gt;&quot;&quot;; &quot;#define &quot;; &quot;&quot;)" office:value-type="string" office:string-value="#define " calcext:value-type="string">
            <text:p>#define </text:p>
          </table:table-cell>
          <table:table-cell table:formula="of:=IF([$Sheet1.A127] &lt;&gt;&quot;&quot;; [$Sheet1.I127]; &quot;&quot;)" office:value-type="string" office:string-value="CUP3_CHANNEL2_LOWER_LIMIT" calcext:value-type="string">
            <text:p>CUP3_CHANNEL2_LOWER_LIMIT</text:p>
          </table:table-cell>
          <table:table-cell table:formula="of:=IF([$Sheet1.A127] &lt;&gt;&quot;&quot;; &quot; &quot;; &quot;&quot;)" office:value-type="string" office:string-value=" " calcext:value-type="string">
            <text:p><text:s/></text:p>
          </table:table-cell>
          <table:table-cell table:formula="of:=IF([$Sheet1.A127] &lt;&gt;&quot;&quot;; [$Sheet1.A127]; &quot;&quot;)" office:value-type="float" office:value="1084" calcext:value-type="float">
            <text:p>1084</text:p>
          </table:table-cell>
          <table:table-cell table:number-columns-repeated="16380"/>
        </table:table-row>
        <table:table-row table:style-name="ro1">
          <table:table-cell table:formula="of:=IF([$Sheet1.A128] &lt;&gt;&quot;&quot;; &quot;#define &quot;; &quot;&quot;)" office:value-type="string" office:string-value="#define " calcext:value-type="string">
            <text:p>#define </text:p>
          </table:table-cell>
          <table:table-cell table:formula="of:=IF([$Sheet1.A128] &lt;&gt;&quot;&quot;; [$Sheet1.I128]; &quot;&quot;)" office:value-type="string" office:string-value="CUP3_CHANNEL3_LOWER_LIMIT" calcext:value-type="string">
            <text:p>CUP3_CHANNEL3_LOWER_LIMIT</text:p>
          </table:table-cell>
          <table:table-cell table:formula="of:=IF([$Sheet1.A128] &lt;&gt;&quot;&quot;; &quot; &quot;; &quot;&quot;)" office:value-type="string" office:string-value=" " calcext:value-type="string">
            <text:p><text:s/></text:p>
          </table:table-cell>
          <table:table-cell table:formula="of:=IF([$Sheet1.A128] &lt;&gt;&quot;&quot;; [$Sheet1.A128]; &quot;&quot;)" office:value-type="float" office:value="1085" calcext:value-type="float">
            <text:p>1085</text:p>
          </table:table-cell>
          <table:table-cell table:number-columns-repeated="16380"/>
        </table:table-row>
        <table:table-row table:style-name="ro1">
          <table:table-cell table:formula="of:=IF([$Sheet1.A129] &lt;&gt;&quot;&quot;; &quot;#define &quot;; &quot;&quot;)" office:value-type="string" office:string-value="#define " calcext:value-type="string">
            <text:p>#define </text:p>
          </table:table-cell>
          <table:table-cell table:formula="of:=IF([$Sheet1.A129] &lt;&gt;&quot;&quot;; [$Sheet1.I129]; &quot;&quot;)" office:value-type="string" office:string-value="CUP3_CHANNEL4_LOWER_LIMIT" calcext:value-type="string">
            <text:p>CUP3_CHANNEL4_LOWER_LIMIT</text:p>
          </table:table-cell>
          <table:table-cell table:formula="of:=IF([$Sheet1.A129] &lt;&gt;&quot;&quot;; &quot; &quot;; &quot;&quot;)" office:value-type="string" office:string-value=" " calcext:value-type="string">
            <text:p><text:s/></text:p>
          </table:table-cell>
          <table:table-cell table:formula="of:=IF([$Sheet1.A129] &lt;&gt;&quot;&quot;; [$Sheet1.A129]; &quot;&quot;)" office:value-type="float" office:value="1086" calcext:value-type="float">
            <text:p>1086</text:p>
          </table:table-cell>
          <table:table-cell table:number-columns-repeated="16380"/>
        </table:table-row>
        <table:table-row table:style-name="ro1">
          <table:table-cell table:formula="of:=IF([$Sheet1.A130] &lt;&gt;&quot;&quot;; &quot;#define &quot;; &quot;&quot;)">
            <text:p/>
          </table:table-cell>
          <table:table-cell table:formula="of:=IF([$Sheet1.A130] &lt;&gt;&quot;&quot;; [$Sheet1.I130]; &quot;&quot;)">
            <text:p/>
          </table:table-cell>
          <table:table-cell table:formula="of:=IF([$Sheet1.A130] &lt;&gt;&quot;&quot;; &quot; &quot;; &quot;&quot;)">
            <text:p/>
          </table:table-cell>
          <table:table-cell table:formula="of:=IF([$Sheet1.A130] &lt;&gt;&quot;&quot;; [$Sheet1.A130]; &quot;&quot;)">
            <text:p/>
          </table:table-cell>
          <table:table-cell table:number-columns-repeated="16380"/>
        </table:table-row>
        <table:table-row table:style-name="ro1">
          <table:table-cell table:formula="of:=IF([$Sheet1.A131] &lt;&gt;&quot;&quot;; &quot;#define &quot;; &quot;&quot;)" office:value-type="string" office:string-value="#define " calcext:value-type="string">
            <text:p>#define </text:p>
          </table:table-cell>
          <table:table-cell table:formula="of:=IF([$Sheet1.A131] &lt;&gt;&quot;&quot;; [$Sheet1.I131]; &quot;&quot;)" office:value-type="string" office:string-value="CUP1_CHANNEL1_UPPER_LIMIT" calcext:value-type="string">
            <text:p>CUP1_CHANNEL1_UPPER_LIMIT</text:p>
          </table:table-cell>
          <table:table-cell table:formula="of:=IF([$Sheet1.A131] &lt;&gt;&quot;&quot;; &quot; &quot;; &quot;&quot;)" office:value-type="string" office:string-value=" " calcext:value-type="string">
            <text:p><text:s/></text:p>
          </table:table-cell>
          <table:table-cell table:formula="of:=IF([$Sheet1.A131] &lt;&gt;&quot;&quot;; [$Sheet1.A131]; &quot;&quot;)" office:value-type="float" office:value="1087" calcext:value-type="float">
            <text:p>1087</text:p>
          </table:table-cell>
          <table:table-cell table:number-columns-repeated="16380"/>
        </table:table-row>
        <table:table-row table:style-name="ro1">
          <table:table-cell table:formula="of:=IF([$Sheet1.A132] &lt;&gt;&quot;&quot;; &quot;#define &quot;; &quot;&quot;)" office:value-type="string" office:string-value="#define " calcext:value-type="string">
            <text:p>#define </text:p>
          </table:table-cell>
          <table:table-cell table:formula="of:=IF([$Sheet1.A132] &lt;&gt;&quot;&quot;; [$Sheet1.I132]; &quot;&quot;)" office:value-type="string" office:string-value="CUP1_CHANNEL2_UPPER_LIMIT" calcext:value-type="string">
            <text:p>CUP1_CHANNEL2_UPPER_LIMIT</text:p>
          </table:table-cell>
          <table:table-cell table:formula="of:=IF([$Sheet1.A132] &lt;&gt;&quot;&quot;; &quot; &quot;; &quot;&quot;)" office:value-type="string" office:string-value=" " calcext:value-type="string">
            <text:p><text:s/></text:p>
          </table:table-cell>
          <table:table-cell table:formula="of:=IF([$Sheet1.A132] &lt;&gt;&quot;&quot;; [$Sheet1.A132]; &quot;&quot;)" office:value-type="float" office:value="1088" calcext:value-type="float">
            <text:p>1088</text:p>
          </table:table-cell>
          <table:table-cell table:number-columns-repeated="16380"/>
        </table:table-row>
        <table:table-row table:style-name="ro1">
          <table:table-cell table:formula="of:=IF([$Sheet1.A133] &lt;&gt;&quot;&quot;; &quot;#define &quot;; &quot;&quot;)" office:value-type="string" office:string-value="#define " calcext:value-type="string">
            <text:p>#define </text:p>
          </table:table-cell>
          <table:table-cell table:formula="of:=IF([$Sheet1.A133] &lt;&gt;&quot;&quot;; [$Sheet1.I133]; &quot;&quot;)" office:value-type="string" office:string-value="CUP1_CHANNEL3_UPPER_LIMIT" calcext:value-type="string">
            <text:p>CUP1_CHANNEL3_UPPER_LIMIT</text:p>
          </table:table-cell>
          <table:table-cell table:formula="of:=IF([$Sheet1.A133] &lt;&gt;&quot;&quot;; &quot; &quot;; &quot;&quot;)" office:value-type="string" office:string-value=" " calcext:value-type="string">
            <text:p><text:s/></text:p>
          </table:table-cell>
          <table:table-cell table:formula="of:=IF([$Sheet1.A133] &lt;&gt;&quot;&quot;; [$Sheet1.A133]; &quot;&quot;)" office:value-type="float" office:value="1089" calcext:value-type="float">
            <text:p>1089</text:p>
          </table:table-cell>
          <table:table-cell table:number-columns-repeated="16380"/>
        </table:table-row>
        <table:table-row table:style-name="ro1">
          <table:table-cell table:formula="of:=IF([$Sheet1.A134] &lt;&gt;&quot;&quot;; &quot;#define &quot;; &quot;&quot;)" office:value-type="string" office:string-value="#define " calcext:value-type="string">
            <text:p>#define </text:p>
          </table:table-cell>
          <table:table-cell table:formula="of:=IF([$Sheet1.A134] &lt;&gt;&quot;&quot;; [$Sheet1.I134]; &quot;&quot;)" office:value-type="string" office:string-value="CUP1_CHANNEL4_UPPER_LIMIT" calcext:value-type="string">
            <text:p>CUP1_CHANNEL4_UPPER_LIMIT</text:p>
          </table:table-cell>
          <table:table-cell table:formula="of:=IF([$Sheet1.A134] &lt;&gt;&quot;&quot;; &quot; &quot;; &quot;&quot;)" office:value-type="string" office:string-value=" " calcext:value-type="string">
            <text:p><text:s/></text:p>
          </table:table-cell>
          <table:table-cell table:formula="of:=IF([$Sheet1.A134] &lt;&gt;&quot;&quot;; [$Sheet1.A134]; &quot;&quot;)" office:value-type="float" office:value="1090" calcext:value-type="float">
            <text:p>1090</text:p>
          </table:table-cell>
          <table:table-cell table:number-columns-repeated="16380"/>
        </table:table-row>
        <table:table-row table:style-name="ro1">
          <table:table-cell table:formula="of:=IF([$Sheet1.A135] &lt;&gt;&quot;&quot;; &quot;#define &quot;; &quot;&quot;)" office:value-type="string" office:string-value="#define " calcext:value-type="string">
            <text:p>#define </text:p>
          </table:table-cell>
          <table:table-cell table:formula="of:=IF([$Sheet1.A135] &lt;&gt;&quot;&quot;; [$Sheet1.I135]; &quot;&quot;)" office:value-type="string" office:string-value="CUP2_CHANNEL1_UPPER_LIMIT" calcext:value-type="string">
            <text:p>CUP2_CHANNEL1_UPPER_LIMIT</text:p>
          </table:table-cell>
          <table:table-cell table:formula="of:=IF([$Sheet1.A135] &lt;&gt;&quot;&quot;; &quot; &quot;; &quot;&quot;)" office:value-type="string" office:string-value=" " calcext:value-type="string">
            <text:p><text:s/></text:p>
          </table:table-cell>
          <table:table-cell table:formula="of:=IF([$Sheet1.A135] &lt;&gt;&quot;&quot;; [$Sheet1.A135]; &quot;&quot;)" office:value-type="float" office:value="1091" calcext:value-type="float">
            <text:p>1091</text:p>
          </table:table-cell>
          <table:table-cell table:number-columns-repeated="16380"/>
        </table:table-row>
        <table:table-row table:style-name="ro1">
          <table:table-cell table:formula="of:=IF([$Sheet1.A136] &lt;&gt;&quot;&quot;; &quot;#define &quot;; &quot;&quot;)" office:value-type="string" office:string-value="#define " calcext:value-type="string">
            <text:p>#define </text:p>
          </table:table-cell>
          <table:table-cell table:formula="of:=IF([$Sheet1.A136] &lt;&gt;&quot;&quot;; [$Sheet1.I136]; &quot;&quot;)" office:value-type="string" office:string-value="CUP2_CHANNEL2_UPPER_LIMIT" calcext:value-type="string">
            <text:p>CUP2_CHANNEL2_UPPER_LIMIT</text:p>
          </table:table-cell>
          <table:table-cell table:formula="of:=IF([$Sheet1.A136] &lt;&gt;&quot;&quot;; &quot; &quot;; &quot;&quot;)" office:value-type="string" office:string-value=" " calcext:value-type="string">
            <text:p><text:s/></text:p>
          </table:table-cell>
          <table:table-cell table:formula="of:=IF([$Sheet1.A136] &lt;&gt;&quot;&quot;; [$Sheet1.A136]; &quot;&quot;)" office:value-type="float" office:value="1092" calcext:value-type="float">
            <text:p>1092</text:p>
          </table:table-cell>
          <table:table-cell table:number-columns-repeated="16380"/>
        </table:table-row>
        <table:table-row table:style-name="ro1">
          <table:table-cell table:formula="of:=IF([$Sheet1.A137] &lt;&gt;&quot;&quot;; &quot;#define &quot;; &quot;&quot;)" office:value-type="string" office:string-value="#define " calcext:value-type="string">
            <text:p>#define </text:p>
          </table:table-cell>
          <table:table-cell table:formula="of:=IF([$Sheet1.A137] &lt;&gt;&quot;&quot;; [$Sheet1.I137]; &quot;&quot;)" office:value-type="string" office:string-value="CUP2_CHANNEL3_UPPER_LIMIT" calcext:value-type="string">
            <text:p>CUP2_CHANNEL3_UPPER_LIMIT</text:p>
          </table:table-cell>
          <table:table-cell table:formula="of:=IF([$Sheet1.A137] &lt;&gt;&quot;&quot;; &quot; &quot;; &quot;&quot;)" office:value-type="string" office:string-value=" " calcext:value-type="string">
            <text:p><text:s/></text:p>
          </table:table-cell>
          <table:table-cell table:formula="of:=IF([$Sheet1.A137] &lt;&gt;&quot;&quot;; [$Sheet1.A137]; &quot;&quot;)" office:value-type="float" office:value="1093" calcext:value-type="float">
            <text:p>1093</text:p>
          </table:table-cell>
          <table:table-cell table:number-columns-repeated="16380"/>
        </table:table-row>
        <table:table-row table:style-name="ro1">
          <table:table-cell table:formula="of:=IF([$Sheet1.A138] &lt;&gt;&quot;&quot;; &quot;#define &quot;; &quot;&quot;)" office:value-type="string" office:string-value="#define " calcext:value-type="string">
            <text:p>#define </text:p>
          </table:table-cell>
          <table:table-cell table:formula="of:=IF([$Sheet1.A138] &lt;&gt;&quot;&quot;; [$Sheet1.I138]; &quot;&quot;)" office:value-type="string" office:string-value="CUP2_CHANNEL4_UPPER_LIMIT" calcext:value-type="string">
            <text:p>CUP2_CHANNEL4_UPPER_LIMIT</text:p>
          </table:table-cell>
          <table:table-cell table:formula="of:=IF([$Sheet1.A138] &lt;&gt;&quot;&quot;; &quot; &quot;; &quot;&quot;)" office:value-type="string" office:string-value=" " calcext:value-type="string">
            <text:p><text:s/></text:p>
          </table:table-cell>
          <table:table-cell table:formula="of:=IF([$Sheet1.A138] &lt;&gt;&quot;&quot;; [$Sheet1.A138]; &quot;&quot;)" office:value-type="float" office:value="1094" calcext:value-type="float">
            <text:p>1094</text:p>
          </table:table-cell>
          <table:table-cell table:number-columns-repeated="16380"/>
        </table:table-row>
        <table:table-row table:style-name="ro1">
          <table:table-cell table:formula="of:=IF([$Sheet1.A139] &lt;&gt;&quot;&quot;; &quot;#define &quot;; &quot;&quot;)" office:value-type="string" office:string-value="#define " calcext:value-type="string">
            <text:p>#define </text:p>
          </table:table-cell>
          <table:table-cell table:formula="of:=IF([$Sheet1.A139] &lt;&gt;&quot;&quot;; [$Sheet1.I139]; &quot;&quot;)" office:value-type="string" office:string-value="CUP3_CHANNEL1_UPPER_LIMIT" calcext:value-type="string">
            <text:p>CUP3_CHANNEL1_UPPER_LIMIT</text:p>
          </table:table-cell>
          <table:table-cell table:formula="of:=IF([$Sheet1.A139] &lt;&gt;&quot;&quot;; &quot; &quot;; &quot;&quot;)" office:value-type="string" office:string-value=" " calcext:value-type="string">
            <text:p><text:s/></text:p>
          </table:table-cell>
          <table:table-cell table:formula="of:=IF([$Sheet1.A139] &lt;&gt;&quot;&quot;; [$Sheet1.A139]; &quot;&quot;)" office:value-type="float" office:value="1095" calcext:value-type="float">
            <text:p>1095</text:p>
          </table:table-cell>
          <table:table-cell table:number-columns-repeated="16380"/>
        </table:table-row>
        <table:table-row table:style-name="ro1">
          <table:table-cell table:formula="of:=IF([$Sheet1.A140] &lt;&gt;&quot;&quot;; &quot;#define &quot;; &quot;&quot;)" office:value-type="string" office:string-value="#define " calcext:value-type="string">
            <text:p>#define </text:p>
          </table:table-cell>
          <table:table-cell table:formula="of:=IF([$Sheet1.A140] &lt;&gt;&quot;&quot;; [$Sheet1.I140]; &quot;&quot;)" office:value-type="string" office:string-value="CUP3_CHANNEL2_UPPER_LIMIT" calcext:value-type="string">
            <text:p>CUP3_CHANNEL2_UPPER_LIMIT</text:p>
          </table:table-cell>
          <table:table-cell table:formula="of:=IF([$Sheet1.A140] &lt;&gt;&quot;&quot;; &quot; &quot;; &quot;&quot;)" office:value-type="string" office:string-value=" " calcext:value-type="string">
            <text:p><text:s/></text:p>
          </table:table-cell>
          <table:table-cell table:formula="of:=IF([$Sheet1.A140] &lt;&gt;&quot;&quot;; [$Sheet1.A140]; &quot;&quot;)" office:value-type="float" office:value="1096" calcext:value-type="float">
            <text:p>1096</text:p>
          </table:table-cell>
          <table:table-cell table:number-columns-repeated="16380"/>
        </table:table-row>
        <table:table-row table:style-name="ro1">
          <table:table-cell table:formula="of:=IF([$Sheet1.A141] &lt;&gt;&quot;&quot;; &quot;#define &quot;; &quot;&quot;)" office:value-type="string" office:string-value="#define " calcext:value-type="string">
            <text:p>#define </text:p>
          </table:table-cell>
          <table:table-cell table:formula="of:=IF([$Sheet1.A141] &lt;&gt;&quot;&quot;; [$Sheet1.I141]; &quot;&quot;)" office:value-type="string" office:string-value="CUP3_CHANNEL3_UPPER_LIMIT" calcext:value-type="string">
            <text:p>CUP3_CHANNEL3_UPPER_LIMIT</text:p>
          </table:table-cell>
          <table:table-cell table:formula="of:=IF([$Sheet1.A141] &lt;&gt;&quot;&quot;; &quot; &quot;; &quot;&quot;)" office:value-type="string" office:string-value=" " calcext:value-type="string">
            <text:p><text:s/></text:p>
          </table:table-cell>
          <table:table-cell table:formula="of:=IF([$Sheet1.A141] &lt;&gt;&quot;&quot;; [$Sheet1.A141]; &quot;&quot;)" office:value-type="float" office:value="1097" calcext:value-type="float">
            <text:p>1097</text:p>
          </table:table-cell>
          <table:table-cell table:number-columns-repeated="16380"/>
        </table:table-row>
        <table:table-row table:style-name="ro1">
          <table:table-cell table:formula="of:=IF([$Sheet1.A142] &lt;&gt;&quot;&quot;; &quot;#define &quot;; &quot;&quot;)" office:value-type="string" office:string-value="#define " calcext:value-type="string">
            <text:p>#define </text:p>
          </table:table-cell>
          <table:table-cell table:formula="of:=IF([$Sheet1.A142] &lt;&gt;&quot;&quot;; [$Sheet1.I142]; &quot;&quot;)" office:value-type="string" office:string-value="CUP3_CHANNEL4_UPPER_LIMIT" calcext:value-type="string">
            <text:p>CUP3_CHANNEL4_UPPER_LIMIT</text:p>
          </table:table-cell>
          <table:table-cell table:formula="of:=IF([$Sheet1.A142] &lt;&gt;&quot;&quot;; &quot; &quot;; &quot;&quot;)" office:value-type="string" office:string-value=" " calcext:value-type="string">
            <text:p><text:s/></text:p>
          </table:table-cell>
          <table:table-cell table:formula="of:=IF([$Sheet1.A142] &lt;&gt;&quot;&quot;; [$Sheet1.A142]; &quot;&quot;)" office:value-type="float" office:value="1098" calcext:value-type="float">
            <text:p>1098</text:p>
          </table:table-cell>
          <table:table-cell table:number-columns-repeated="16380"/>
        </table:table-row>
        <table:table-row table:style-name="ro1">
          <table:table-cell table:formula="of:=IF([$Sheet1.A143] &lt;&gt;&quot;&quot;; &quot;#define &quot;; &quot;&quot;)">
            <text:p/>
          </table:table-cell>
          <table:table-cell table:formula="of:=IF([$Sheet1.A143] &lt;&gt;&quot;&quot;; [$Sheet1.I143]; &quot;&quot;)">
            <text:p/>
          </table:table-cell>
          <table:table-cell table:formula="of:=IF([$Sheet1.A143] &lt;&gt;&quot;&quot;; &quot; &quot;; &quot;&quot;)">
            <text:p/>
          </table:table-cell>
          <table:table-cell table:formula="of:=IF([$Sheet1.A143] &lt;&gt;&quot;&quot;; [$Sheet1.A143]; &quot;&quot;)">
            <text:p/>
          </table:table-cell>
          <table:table-cell table:number-columns-repeated="16380"/>
        </table:table-row>
        <table:table-row table:style-name="ro1">
          <table:table-cell table:formula="of:=IF([$Sheet1.A144] &lt;&gt;&quot;&quot;; &quot;#define &quot;; &quot;&quot;)" office:value-type="string" office:string-value="#define " calcext:value-type="string">
            <text:p>#define </text:p>
          </table:table-cell>
          <table:table-cell table:formula="of:=IF([$Sheet1.A144] &lt;&gt;&quot;&quot;; [$Sheet1.I144]; &quot;&quot;)" office:value-type="string" office:string-value="SIM_MECHANISM_PROPAGATION1_IN" calcext:value-type="string">
            <text:p>SIM_MECHANISM_PROPAGATION1_IN</text:p>
          </table:table-cell>
          <table:table-cell table:formula="of:=IF([$Sheet1.A144] &lt;&gt;&quot;&quot;; &quot; &quot;; &quot;&quot;)" office:value-type="string" office:string-value=" " calcext:value-type="string">
            <text:p><text:s/></text:p>
          </table:table-cell>
          <table:table-cell table:formula="of:=IF([$Sheet1.A144] &lt;&gt;&quot;&quot;; [$Sheet1.A144]; &quot;&quot;)" office:value-type="float" office:value="1099" calcext:value-type="float">
            <text:p>1099</text:p>
          </table:table-cell>
          <table:table-cell table:number-columns-repeated="16380"/>
        </table:table-row>
        <table:table-row table:style-name="ro1">
          <table:table-cell table:formula="of:=IF([$Sheet1.A145] &lt;&gt;&quot;&quot;; &quot;#define &quot;; &quot;&quot;)" office:value-type="string" office:string-value="#define " calcext:value-type="string">
            <text:p>#define </text:p>
          </table:table-cell>
          <table:table-cell table:formula="of:=IF([$Sheet1.A145] &lt;&gt;&quot;&quot;; [$Sheet1.I145]; &quot;&quot;)" office:value-type="string" office:string-value="SIM_MECHANISM_PROPAGATION1_IN_RAND" calcext:value-type="string">
            <text:p>SIM_MECHANISM_PROPAGATION1_IN_RAND</text:p>
          </table:table-cell>
          <table:table-cell table:formula="of:=IF([$Sheet1.A145] &lt;&gt;&quot;&quot;; &quot; &quot;; &quot;&quot;)" office:value-type="string" office:string-value=" " calcext:value-type="string">
            <text:p><text:s/></text:p>
          </table:table-cell>
          <table:table-cell table:formula="of:=IF([$Sheet1.A145] &lt;&gt;&quot;&quot;; [$Sheet1.A145]; &quot;&quot;)" office:value-type="float" office:value="1100" calcext:value-type="float">
            <text:p>1100</text:p>
          </table:table-cell>
          <table:table-cell table:number-columns-repeated="16380"/>
        </table:table-row>
        <table:table-row table:style-name="ro1">
          <table:table-cell table:formula="of:=IF([$Sheet1.A146] &lt;&gt;&quot;&quot;; &quot;#define &quot;; &quot;&quot;)" office:value-type="string" office:string-value="#define " calcext:value-type="string">
            <text:p>#define </text:p>
          </table:table-cell>
          <table:table-cell table:formula="of:=IF([$Sheet1.A146] &lt;&gt;&quot;&quot;; [$Sheet1.I146]; &quot;&quot;)" office:value-type="string" office:string-value="SIM_MECHANISM_PROPAGATION1_OUT" calcext:value-type="string">
            <text:p>SIM_MECHANISM_PROPAGATION1_OUT</text:p>
          </table:table-cell>
          <table:table-cell table:formula="of:=IF([$Sheet1.A146] &lt;&gt;&quot;&quot;; &quot; &quot;; &quot;&quot;)" office:value-type="string" office:string-value=" " calcext:value-type="string">
            <text:p><text:s/></text:p>
          </table:table-cell>
          <table:table-cell table:formula="of:=IF([$Sheet1.A146] &lt;&gt;&quot;&quot;; [$Sheet1.A146]; &quot;&quot;)" office:value-type="float" office:value="1101" calcext:value-type="float">
            <text:p>1101</text:p>
          </table:table-cell>
          <table:table-cell table:number-columns-repeated="16380"/>
        </table:table-row>
        <table:table-row table:style-name="ro1">
          <table:table-cell table:formula="of:=IF([$Sheet1.A147] &lt;&gt;&quot;&quot;; &quot;#define &quot;; &quot;&quot;)" office:value-type="string" office:string-value="#define " calcext:value-type="string">
            <text:p>#define </text:p>
          </table:table-cell>
          <table:table-cell table:formula="of:=IF([$Sheet1.A147] &lt;&gt;&quot;&quot;; [$Sheet1.I147]; &quot;&quot;)" office:value-type="string" office:string-value="SIM_MECHANISM_PROPAGATION1_OUT_RAND" calcext:value-type="string">
            <text:p>SIM_MECHANISM_PROPAGATION1_OUT_RAND</text:p>
          </table:table-cell>
          <table:table-cell table:formula="of:=IF([$Sheet1.A147] &lt;&gt;&quot;&quot;; &quot; &quot;; &quot;&quot;)" office:value-type="string" office:string-value=" " calcext:value-type="string">
            <text:p><text:s/></text:p>
          </table:table-cell>
          <table:table-cell table:formula="of:=IF([$Sheet1.A147] &lt;&gt;&quot;&quot;; [$Sheet1.A147]; &quot;&quot;)" office:value-type="float" office:value="1102" calcext:value-type="float">
            <text:p>1102</text:p>
          </table:table-cell>
          <table:table-cell table:number-columns-repeated="16380"/>
        </table:table-row>
        <table:table-row table:style-name="ro1">
          <table:table-cell table:formula="of:=IF([$Sheet1.A148] &lt;&gt;&quot;&quot;; &quot;#define &quot;; &quot;&quot;)">
            <text:p/>
          </table:table-cell>
          <table:table-cell table:formula="of:=IF([$Sheet1.A148] &lt;&gt;&quot;&quot;; [$Sheet1.I148]; &quot;&quot;)">
            <text:p/>
          </table:table-cell>
          <table:table-cell table:formula="of:=IF([$Sheet1.A148] &lt;&gt;&quot;&quot;; &quot; &quot;; &quot;&quot;)">
            <text:p/>
          </table:table-cell>
          <table:table-cell table:formula="of:=IF([$Sheet1.A148] &lt;&gt;&quot;&quot;; [$Sheet1.A148]; &quot;&quot;)">
            <text:p/>
          </table:table-cell>
          <table:table-cell table:number-columns-repeated="16380"/>
        </table:table-row>
        <table:table-row table:style-name="ro1">
          <table:table-cell table:formula="of:=IF([$Sheet1.A149] &lt;&gt;&quot;&quot;; &quot;#define &quot;; &quot;&quot;)" office:value-type="string" office:string-value="#define " calcext:value-type="string">
            <text:p>#define </text:p>
          </table:table-cell>
          <table:table-cell table:formula="of:=IF([$Sheet1.A149] &lt;&gt;&quot;&quot;; [$Sheet1.I149]; &quot;&quot;)" office:value-type="string" office:string-value="SIM_MECHANISM_PROPAGATION2_IN" calcext:value-type="string">
            <text:p>SIM_MECHANISM_PROPAGATION2_IN</text:p>
          </table:table-cell>
          <table:table-cell table:formula="of:=IF([$Sheet1.A149] &lt;&gt;&quot;&quot;; &quot; &quot;; &quot;&quot;)" office:value-type="string" office:string-value=" " calcext:value-type="string">
            <text:p><text:s/></text:p>
          </table:table-cell>
          <table:table-cell table:formula="of:=IF([$Sheet1.A149] &lt;&gt;&quot;&quot;; [$Sheet1.A149]; &quot;&quot;)" office:value-type="float" office:value="1103" calcext:value-type="float">
            <text:p>1103</text:p>
          </table:table-cell>
          <table:table-cell table:number-columns-repeated="16380"/>
        </table:table-row>
        <table:table-row table:style-name="ro1">
          <table:table-cell table:formula="of:=IF([$Sheet1.A150] &lt;&gt;&quot;&quot;; &quot;#define &quot;; &quot;&quot;)" office:value-type="string" office:string-value="#define " calcext:value-type="string">
            <text:p>#define </text:p>
          </table:table-cell>
          <table:table-cell table:formula="of:=IF([$Sheet1.A150] &lt;&gt;&quot;&quot;; [$Sheet1.I150]; &quot;&quot;)" office:value-type="string" office:string-value="SIM_MECHANISM_PROPAGATION2_IN_RAND" calcext:value-type="string">
            <text:p>SIM_MECHANISM_PROPAGATION2_IN_RAND</text:p>
          </table:table-cell>
          <table:table-cell table:formula="of:=IF([$Sheet1.A150] &lt;&gt;&quot;&quot;; &quot; &quot;; &quot;&quot;)" office:value-type="string" office:string-value=" " calcext:value-type="string">
            <text:p><text:s/></text:p>
          </table:table-cell>
          <table:table-cell table:formula="of:=IF([$Sheet1.A150] &lt;&gt;&quot;&quot;; [$Sheet1.A150]; &quot;&quot;)" office:value-type="float" office:value="1104" calcext:value-type="float">
            <text:p>1104</text:p>
          </table:table-cell>
          <table:table-cell table:number-columns-repeated="16380"/>
        </table:table-row>
        <table:table-row table:style-name="ro1">
          <table:table-cell table:formula="of:=IF([$Sheet1.A151] &lt;&gt;&quot;&quot;; &quot;#define &quot;; &quot;&quot;)" office:value-type="string" office:string-value="#define " calcext:value-type="string">
            <text:p>#define </text:p>
          </table:table-cell>
          <table:table-cell table:formula="of:=IF([$Sheet1.A151] &lt;&gt;&quot;&quot;; [$Sheet1.I151]; &quot;&quot;)" office:value-type="string" office:string-value="SIM_MECHANISM_PROPAGATION2_OUT" calcext:value-type="string">
            <text:p>SIM_MECHANISM_PROPAGATION2_OUT</text:p>
          </table:table-cell>
          <table:table-cell table:formula="of:=IF([$Sheet1.A151] &lt;&gt;&quot;&quot;; &quot; &quot;; &quot;&quot;)" office:value-type="string" office:string-value=" " calcext:value-type="string">
            <text:p><text:s/></text:p>
          </table:table-cell>
          <table:table-cell table:formula="of:=IF([$Sheet1.A151] &lt;&gt;&quot;&quot;; [$Sheet1.A151]; &quot;&quot;)" office:value-type="float" office:value="1105" calcext:value-type="float">
            <text:p>1105</text:p>
          </table:table-cell>
          <table:table-cell table:number-columns-repeated="16380"/>
        </table:table-row>
        <table:table-row table:style-name="ro1">
          <table:table-cell table:formula="of:=IF([$Sheet1.A152] &lt;&gt;&quot;&quot;; &quot;#define &quot;; &quot;&quot;)" office:value-type="string" office:string-value="#define " calcext:value-type="string">
            <text:p>#define </text:p>
          </table:table-cell>
          <table:table-cell table:formula="of:=IF([$Sheet1.A152] &lt;&gt;&quot;&quot;; [$Sheet1.I152]; &quot;&quot;)" office:value-type="string" office:string-value="SIM_MECHANISM_PROPAGATION2_OUT_RAND" calcext:value-type="string">
            <text:p>SIM_MECHANISM_PROPAGATION2_OUT_RAND</text:p>
          </table:table-cell>
          <table:table-cell table:formula="of:=IF([$Sheet1.A152] &lt;&gt;&quot;&quot;; &quot; &quot;; &quot;&quot;)" office:value-type="string" office:string-value=" " calcext:value-type="string">
            <text:p><text:s/></text:p>
          </table:table-cell>
          <table:table-cell table:formula="of:=IF([$Sheet1.A152] &lt;&gt;&quot;&quot;; [$Sheet1.A152]; &quot;&quot;)" office:value-type="float" office:value="1106" calcext:value-type="float">
            <text:p>1106</text:p>
          </table:table-cell>
          <table:table-cell table:number-columns-repeated="16380"/>
        </table:table-row>
        <table:table-row table:style-name="ro1">
          <table:table-cell table:formula="of:=IF([$Sheet1.A153] &lt;&gt;&quot;&quot;; &quot;#define &quot;; &quot;&quot;)">
            <text:p/>
          </table:table-cell>
          <table:table-cell table:formula="of:=IF([$Sheet1.A153] &lt;&gt;&quot;&quot;; [$Sheet1.I153]; &quot;&quot;)">
            <text:p/>
          </table:table-cell>
          <table:table-cell table:formula="of:=IF([$Sheet1.A153] &lt;&gt;&quot;&quot;; &quot; &quot;; &quot;&quot;)">
            <text:p/>
          </table:table-cell>
          <table:table-cell table:formula="of:=IF([$Sheet1.A153] &lt;&gt;&quot;&quot;; [$Sheet1.A153]; &quot;&quot;)">
            <text:p/>
          </table:table-cell>
          <table:table-cell table:number-columns-repeated="16380"/>
        </table:table-row>
        <table:table-row table:style-name="ro1">
          <table:table-cell table:formula="of:=IF([$Sheet1.A154] &lt;&gt;&quot;&quot;; &quot;#define &quot;; &quot;&quot;)" office:value-type="string" office:string-value="#define " calcext:value-type="string">
            <text:p>#define </text:p>
          </table:table-cell>
          <table:table-cell table:formula="of:=IF([$Sheet1.A154] &lt;&gt;&quot;&quot;; [$Sheet1.I154]; &quot;&quot;)" office:value-type="string" office:string-value="SIM_MECHANISM_PROPAGATION3_IN" calcext:value-type="string">
            <text:p>SIM_MECHANISM_PROPAGATION3_IN</text:p>
          </table:table-cell>
          <table:table-cell table:formula="of:=IF([$Sheet1.A154] &lt;&gt;&quot;&quot;; &quot; &quot;; &quot;&quot;)" office:value-type="string" office:string-value=" " calcext:value-type="string">
            <text:p><text:s/></text:p>
          </table:table-cell>
          <table:table-cell table:formula="of:=IF([$Sheet1.A154] &lt;&gt;&quot;&quot;; [$Sheet1.A154]; &quot;&quot;)" office:value-type="float" office:value="1107" calcext:value-type="float">
            <text:p>1107</text:p>
          </table:table-cell>
          <table:table-cell table:number-columns-repeated="16380"/>
        </table:table-row>
        <table:table-row table:style-name="ro1">
          <table:table-cell table:formula="of:=IF([$Sheet1.A155] &lt;&gt;&quot;&quot;; &quot;#define &quot;; &quot;&quot;)" office:value-type="string" office:string-value="#define " calcext:value-type="string">
            <text:p>#define </text:p>
          </table:table-cell>
          <table:table-cell table:formula="of:=IF([$Sheet1.A155] &lt;&gt;&quot;&quot;; [$Sheet1.I155]; &quot;&quot;)" office:value-type="string" office:string-value="SIM_MECHANISM_PROPAGATION3_IN_RAND" calcext:value-type="string">
            <text:p>SIM_MECHANISM_PROPAGATION3_IN_RAND</text:p>
          </table:table-cell>
          <table:table-cell table:formula="of:=IF([$Sheet1.A155] &lt;&gt;&quot;&quot;; &quot; &quot;; &quot;&quot;)" office:value-type="string" office:string-value=" " calcext:value-type="string">
            <text:p><text:s/></text:p>
          </table:table-cell>
          <table:table-cell table:formula="of:=IF([$Sheet1.A155] &lt;&gt;&quot;&quot;; [$Sheet1.A155]; &quot;&quot;)" office:value-type="float" office:value="1108" calcext:value-type="float">
            <text:p>1108</text:p>
          </table:table-cell>
          <table:table-cell table:number-columns-repeated="16380"/>
        </table:table-row>
        <table:table-row table:style-name="ro1">
          <table:table-cell table:formula="of:=IF([$Sheet1.A156] &lt;&gt;&quot;&quot;; &quot;#define &quot;; &quot;&quot;)" office:value-type="string" office:string-value="#define " calcext:value-type="string">
            <text:p>#define </text:p>
          </table:table-cell>
          <table:table-cell table:formula="of:=IF([$Sheet1.A156] &lt;&gt;&quot;&quot;; [$Sheet1.I156]; &quot;&quot;)" office:value-type="string" office:string-value="SIM_MECHANISM_PROPAGATION3_OUT" calcext:value-type="string">
            <text:p>SIM_MECHANISM_PROPAGATION3_OUT</text:p>
          </table:table-cell>
          <table:table-cell table:formula="of:=IF([$Sheet1.A156] &lt;&gt;&quot;&quot;; &quot; &quot;; &quot;&quot;)" office:value-type="string" office:string-value=" " calcext:value-type="string">
            <text:p><text:s/></text:p>
          </table:table-cell>
          <table:table-cell table:formula="of:=IF([$Sheet1.A156] &lt;&gt;&quot;&quot;; [$Sheet1.A156]; &quot;&quot;)" office:value-type="float" office:value="1109" calcext:value-type="float">
            <text:p>1109</text:p>
          </table:table-cell>
          <table:table-cell table:number-columns-repeated="16380"/>
        </table:table-row>
        <table:table-row table:style-name="ro1">
          <table:table-cell table:formula="of:=IF([$Sheet1.A157] &lt;&gt;&quot;&quot;; &quot;#define &quot;; &quot;&quot;)" office:value-type="string" office:string-value="#define " calcext:value-type="string">
            <text:p>#define </text:p>
          </table:table-cell>
          <table:table-cell table:formula="of:=IF([$Sheet1.A157] &lt;&gt;&quot;&quot;; [$Sheet1.I157]; &quot;&quot;)" office:value-type="string" office:string-value="SIM_MECHANISM_PROPAGATION3_OUT_RAND" calcext:value-type="string">
            <text:p>SIM_MECHANISM_PROPAGATION3_OUT_RAND</text:p>
          </table:table-cell>
          <table:table-cell table:formula="of:=IF([$Sheet1.A157] &lt;&gt;&quot;&quot;; &quot; &quot;; &quot;&quot;)" office:value-type="string" office:string-value=" " calcext:value-type="string">
            <text:p><text:s/></text:p>
          </table:table-cell>
          <table:table-cell table:formula="of:=IF([$Sheet1.A157] &lt;&gt;&quot;&quot;; [$Sheet1.A157]; &quot;&quot;)" office:value-type="float" office:value="1110" calcext:value-type="float">
            <text:p>1110</text:p>
          </table:table-cell>
          <table:table-cell table:number-columns-repeated="16380"/>
        </table:table-row>
        <table:table-row table:style-name="ro1">
          <table:table-cell table:formula="of:=IF([$Sheet1.A158] &lt;&gt;&quot;&quot;; &quot;#define &quot;; &quot;&quot;)" office:value-type="string" office:string-value="#define " calcext:value-type="string">
            <text:p>#define </text:p>
          </table:table-cell>
          <table:table-cell table:formula="of:=IF([$Sheet1.A158] &lt;&gt;&quot;&quot;; [$Sheet1.I158]; &quot;&quot;)" office:value-type="string" office:string-value="SIM_MECHANISM3_INERTIAL_MOTION" calcext:value-type="string">
            <text:p>SIM_MECHANISM3_INERTIAL_MOTION</text:p>
          </table:table-cell>
          <table:table-cell table:formula="of:=IF([$Sheet1.A158] &lt;&gt;&quot;&quot;; &quot; &quot;; &quot;&quot;)" office:value-type="string" office:string-value=" " calcext:value-type="string">
            <text:p><text:s/></text:p>
          </table:table-cell>
          <table:table-cell table:style-name="ce15" table:formula="of:=IF([$Sheet1.A158] &lt;&gt;&quot;&quot;; [$Sheet1.A158]; &quot;&quot;)" office:value-type="float" office:value="1111" calcext:value-type="float">
            <text:p>1111</text:p>
          </table:table-cell>
          <table:table-cell table:number-columns-repeated="16380"/>
        </table:table-row>
        <table:table-row table:style-name="ro1">
          <table:table-cell table:formula="of:=IF([$Sheet1.A161] &lt;&gt;&quot;&quot;; &quot;#define &quot;; &quot;&quot;)" office:value-type="string" office:string-value="#define " calcext:value-type="string">
            <text:p>#define </text:p>
          </table:table-cell>
          <table:table-cell table:formula="of:=IF([$Sheet1.A161] &lt;&gt;&quot;&quot;; [$Sheet1.I161]; &quot;&quot;)" office:value-type="string" office:string-value="SIM_AMPLIFIER_CUP1_ELECTRODE1" calcext:value-type="string">
            <text:p>SIM_AMPLIFIER_CUP1_ELECTRODE1</text:p>
          </table:table-cell>
          <table:table-cell table:formula="of:=IF([$Sheet1.A161] &lt;&gt;&quot;&quot;; &quot; &quot;; &quot;&quot;)" office:value-type="string" office:string-value=" " calcext:value-type="string">
            <text:p><text:s/></text:p>
          </table:table-cell>
          <table:table-cell table:formula="of:=IF([$Sheet1.A161] &lt;&gt;&quot;&quot;; [$Sheet1.A161]; &quot;&quot;)" office:value-type="float" office:value="1113" calcext:value-type="float">
            <text:p>1113</text:p>
          </table:table-cell>
          <table:table-cell table:number-columns-repeated="16380"/>
        </table:table-row>
        <table:table-row table:style-name="ro1">
          <table:table-cell table:formula="of:=IF([$Sheet1.A162] &lt;&gt;&quot;&quot;; &quot;#define &quot;; &quot;&quot;)" office:value-type="string" office:string-value="#define " calcext:value-type="string">
            <text:p>#define </text:p>
          </table:table-cell>
          <table:table-cell table:formula="of:=IF([$Sheet1.A162] &lt;&gt;&quot;&quot;; [$Sheet1.I162]; &quot;&quot;)" office:value-type="string" office:string-value="SIM_AMPLIFIER_CUP1_ELECTRODE2" calcext:value-type="string">
            <text:p>SIM_AMPLIFIER_CUP1_ELECTRODE2</text:p>
          </table:table-cell>
          <table:table-cell table:formula="of:=IF([$Sheet1.A162] &lt;&gt;&quot;&quot;; &quot; &quot;; &quot;&quot;)" office:value-type="string" office:string-value=" " calcext:value-type="string">
            <text:p><text:s/></text:p>
          </table:table-cell>
          <table:table-cell table:formula="of:=IF([$Sheet1.A162] &lt;&gt;&quot;&quot;; [$Sheet1.A162]; &quot;&quot;)" office:value-type="float" office:value="1114" calcext:value-type="float">
            <text:p>1114</text:p>
          </table:table-cell>
          <table:table-cell table:number-columns-repeated="16380"/>
        </table:table-row>
        <table:table-row table:style-name="ro1">
          <table:table-cell table:formula="of:=IF([$Sheet1.A163] &lt;&gt;&quot;&quot;; &quot;#define &quot;; &quot;&quot;)" office:value-type="string" office:string-value="#define " calcext:value-type="string">
            <text:p>#define </text:p>
          </table:table-cell>
          <table:table-cell table:formula="of:=IF([$Sheet1.A163] &lt;&gt;&quot;&quot;; [$Sheet1.I163]; &quot;&quot;)" office:value-type="string" office:string-value="SIM_AMPLIFIER_CUP1_ELECTRODE3" calcext:value-type="string">
            <text:p>SIM_AMPLIFIER_CUP1_ELECTRODE3</text:p>
          </table:table-cell>
          <table:table-cell table:formula="of:=IF([$Sheet1.A163] &lt;&gt;&quot;&quot;; &quot; &quot;; &quot;&quot;)" office:value-type="string" office:string-value=" " calcext:value-type="string">
            <text:p><text:s/></text:p>
          </table:table-cell>
          <table:table-cell table:formula="of:=IF([$Sheet1.A163] &lt;&gt;&quot;&quot;; [$Sheet1.A163]; &quot;&quot;)" office:value-type="float" office:value="1115" calcext:value-type="float">
            <text:p>1115</text:p>
          </table:table-cell>
          <table:table-cell table:number-columns-repeated="16380"/>
        </table:table-row>
        <table:table-row table:style-name="ro1">
          <table:table-cell table:formula="of:=IF([$Sheet1.A164] &lt;&gt;&quot;&quot;; &quot;#define &quot;; &quot;&quot;)" office:value-type="string" office:string-value="#define " calcext:value-type="string">
            <text:p>#define </text:p>
          </table:table-cell>
          <table:table-cell table:formula="of:=IF([$Sheet1.A164] &lt;&gt;&quot;&quot;; [$Sheet1.I164]; &quot;&quot;)" office:value-type="string" office:string-value="SIM_AMPLIFIER_CUP1_ELECTRODE4" calcext:value-type="string">
            <text:p>SIM_AMPLIFIER_CUP1_ELECTRODE4</text:p>
          </table:table-cell>
          <table:table-cell table:formula="of:=IF([$Sheet1.A164] &lt;&gt;&quot;&quot;; &quot; &quot;; &quot;&quot;)" office:value-type="string" office:string-value=" " calcext:value-type="string">
            <text:p><text:s/></text:p>
          </table:table-cell>
          <table:table-cell table:formula="of:=IF([$Sheet1.A164] &lt;&gt;&quot;&quot;; [$Sheet1.A164]; &quot;&quot;)" office:value-type="float" office:value="1116" calcext:value-type="float">
            <text:p>1116</text:p>
          </table:table-cell>
          <table:table-cell table:number-columns-repeated="16380"/>
        </table:table-row>
        <table:table-row table:style-name="ro1">
          <table:table-cell table:formula="of:=IF([$Sheet1.A165] &lt;&gt;&quot;&quot;; &quot;#define &quot;; &quot;&quot;)" office:value-type="string" office:string-value="#define " calcext:value-type="string">
            <text:p>#define </text:p>
          </table:table-cell>
          <table:table-cell table:formula="of:=IF([$Sheet1.A165] &lt;&gt;&quot;&quot;; [$Sheet1.I165]; &quot;&quot;)" office:value-type="string" office:string-value="SIM_AMPLIFIER_CUP2_ELECTRODE1" calcext:value-type="string">
            <text:p>SIM_AMPLIFIER_CUP2_ELECTRODE1</text:p>
          </table:table-cell>
          <table:table-cell table:formula="of:=IF([$Sheet1.A165] &lt;&gt;&quot;&quot;; &quot; &quot;; &quot;&quot;)" office:value-type="string" office:string-value=" " calcext:value-type="string">
            <text:p><text:s/></text:p>
          </table:table-cell>
          <table:table-cell table:formula="of:=IF([$Sheet1.A165] &lt;&gt;&quot;&quot;; [$Sheet1.A165]; &quot;&quot;)" office:value-type="float" office:value="1117" calcext:value-type="float">
            <text:p>1117</text:p>
          </table:table-cell>
          <table:table-cell table:number-columns-repeated="16380"/>
        </table:table-row>
        <table:table-row table:style-name="ro1">
          <table:table-cell table:formula="of:=IF([$Sheet1.A166] &lt;&gt;&quot;&quot;; &quot;#define &quot;; &quot;&quot;)" office:value-type="string" office:string-value="#define " calcext:value-type="string">
            <text:p>#define </text:p>
          </table:table-cell>
          <table:table-cell table:formula="of:=IF([$Sheet1.A166] &lt;&gt;&quot;&quot;; [$Sheet1.I166]; &quot;&quot;)" office:value-type="string" office:string-value="SIM_AMPLIFIER_CUP2_ELECTRODE2" calcext:value-type="string">
            <text:p>SIM_AMPLIFIER_CUP2_ELECTRODE2</text:p>
          </table:table-cell>
          <table:table-cell table:formula="of:=IF([$Sheet1.A166] &lt;&gt;&quot;&quot;; &quot; &quot;; &quot;&quot;)" office:value-type="string" office:string-value=" " calcext:value-type="string">
            <text:p><text:s/></text:p>
          </table:table-cell>
          <table:table-cell table:formula="of:=IF([$Sheet1.A166] &lt;&gt;&quot;&quot;; [$Sheet1.A166]; &quot;&quot;)" office:value-type="float" office:value="1118" calcext:value-type="float">
            <text:p>1118</text:p>
          </table:table-cell>
          <table:table-cell table:number-columns-repeated="16380"/>
        </table:table-row>
        <table:table-row table:style-name="ro1">
          <table:table-cell table:formula="of:=IF([$Sheet1.A167] &lt;&gt;&quot;&quot;; &quot;#define &quot;; &quot;&quot;)" office:value-type="string" office:string-value="#define " calcext:value-type="string">
            <text:p>#define </text:p>
          </table:table-cell>
          <table:table-cell table:formula="of:=IF([$Sheet1.A167] &lt;&gt;&quot;&quot;; [$Sheet1.I167]; &quot;&quot;)" office:value-type="string" office:string-value="SIM_AMPLIFIER_CUP2_ELECTRODE3" calcext:value-type="string">
            <text:p>SIM_AMPLIFIER_CUP2_ELECTRODE3</text:p>
          </table:table-cell>
          <table:table-cell table:formula="of:=IF([$Sheet1.A167] &lt;&gt;&quot;&quot;; &quot; &quot;; &quot;&quot;)" office:value-type="string" office:string-value=" " calcext:value-type="string">
            <text:p><text:s/></text:p>
          </table:table-cell>
          <table:table-cell table:formula="of:=IF([$Sheet1.A167] &lt;&gt;&quot;&quot;; [$Sheet1.A167]; &quot;&quot;)" office:value-type="float" office:value="1119" calcext:value-type="float">
            <text:p>1119</text:p>
          </table:table-cell>
          <table:table-cell table:number-columns-repeated="16380"/>
        </table:table-row>
        <table:table-row table:style-name="ro1">
          <table:table-cell table:formula="of:=IF([$Sheet1.A168] &lt;&gt;&quot;&quot;; &quot;#define &quot;; &quot;&quot;)" office:value-type="string" office:string-value="#define " calcext:value-type="string">
            <text:p>#define </text:p>
          </table:table-cell>
          <table:table-cell table:formula="of:=IF([$Sheet1.A168] &lt;&gt;&quot;&quot;; [$Sheet1.I168]; &quot;&quot;)" office:value-type="string" office:string-value="SIM_AMPLIFIER_CUP2_ELECTRODE4" calcext:value-type="string">
            <text:p>SIM_AMPLIFIER_CUP2_ELECTRODE4</text:p>
          </table:table-cell>
          <table:table-cell table:formula="of:=IF([$Sheet1.A168] &lt;&gt;&quot;&quot;; &quot; &quot;; &quot;&quot;)" office:value-type="string" office:string-value=" " calcext:value-type="string">
            <text:p><text:s/></text:p>
          </table:table-cell>
          <table:table-cell table:formula="of:=IF([$Sheet1.A168] &lt;&gt;&quot;&quot;; [$Sheet1.A168]; &quot;&quot;)" office:value-type="float" office:value="1120" calcext:value-type="float">
            <text:p>1120</text:p>
          </table:table-cell>
          <table:table-cell table:number-columns-repeated="16380"/>
        </table:table-row>
        <table:table-row table:style-name="ro1">
          <table:table-cell table:formula="of:=IF([$Sheet1.A169] &lt;&gt;&quot;&quot;; &quot;#define &quot;; &quot;&quot;)" office:value-type="string" office:string-value="#define " calcext:value-type="string">
            <text:p>#define </text:p>
          </table:table-cell>
          <table:table-cell table:formula="of:=IF([$Sheet1.A169] &lt;&gt;&quot;&quot;; [$Sheet1.I169]; &quot;&quot;)" office:value-type="string" office:string-value="SIM_AMPLIFIER_CUP3_ELECTRODE1" calcext:value-type="string">
            <text:p>SIM_AMPLIFIER_CUP3_ELECTRODE1</text:p>
          </table:table-cell>
          <table:table-cell table:formula="of:=IF([$Sheet1.A169] &lt;&gt;&quot;&quot;; &quot; &quot;; &quot;&quot;)" office:value-type="string" office:string-value=" " calcext:value-type="string">
            <text:p><text:s/></text:p>
          </table:table-cell>
          <table:table-cell table:formula="of:=IF([$Sheet1.A169] &lt;&gt;&quot;&quot;; [$Sheet1.A169]; &quot;&quot;)" office:value-type="float" office:value="1121" calcext:value-type="float">
            <text:p>1121</text:p>
          </table:table-cell>
          <table:table-cell table:number-columns-repeated="16380"/>
        </table:table-row>
        <table:table-row table:style-name="ro1">
          <table:table-cell table:formula="of:=IF([$Sheet1.A170] &lt;&gt;&quot;&quot;; &quot;#define &quot;; &quot;&quot;)" office:value-type="string" office:string-value="#define " calcext:value-type="string">
            <text:p>#define </text:p>
          </table:table-cell>
          <table:table-cell table:formula="of:=IF([$Sheet1.A170] &lt;&gt;&quot;&quot;; [$Sheet1.I170]; &quot;&quot;)" office:value-type="string" office:string-value="SIM_AMPLIFIER_CUP3_ELECTRODE2" calcext:value-type="string">
            <text:p>SIM_AMPLIFIER_CUP3_ELECTRODE2</text:p>
          </table:table-cell>
          <table:table-cell table:formula="of:=IF([$Sheet1.A170] &lt;&gt;&quot;&quot;; &quot; &quot;; &quot;&quot;)" office:value-type="string" office:string-value=" " calcext:value-type="string">
            <text:p><text:s/></text:p>
          </table:table-cell>
          <table:table-cell table:formula="of:=IF([$Sheet1.A170] &lt;&gt;&quot;&quot;; [$Sheet1.A170]; &quot;&quot;)" office:value-type="float" office:value="1122" calcext:value-type="float">
            <text:p>1122</text:p>
          </table:table-cell>
          <table:table-cell table:number-columns-repeated="16380"/>
        </table:table-row>
        <table:table-row table:style-name="ro1">
          <table:table-cell table:formula="of:=IF([$Sheet1.A171] &lt;&gt;&quot;&quot;; &quot;#define &quot;; &quot;&quot;)" office:value-type="string" office:string-value="#define " calcext:value-type="string">
            <text:p>#define </text:p>
          </table:table-cell>
          <table:table-cell table:formula="of:=IF([$Sheet1.A171] &lt;&gt;&quot;&quot;; [$Sheet1.I171]; &quot;&quot;)" office:value-type="string" office:string-value="SIM_AMPLIFIER_CUP3_ELECTRODE3" calcext:value-type="string">
            <text:p>SIM_AMPLIFIER_CUP3_ELECTRODE3</text:p>
          </table:table-cell>
          <table:table-cell table:formula="of:=IF([$Sheet1.A171] &lt;&gt;&quot;&quot;; &quot; &quot;; &quot;&quot;)" office:value-type="string" office:string-value=" " calcext:value-type="string">
            <text:p><text:s/></text:p>
          </table:table-cell>
          <table:table-cell table:formula="of:=IF([$Sheet1.A171] &lt;&gt;&quot;&quot;; [$Sheet1.A171]; &quot;&quot;)" office:value-type="float" office:value="1123" calcext:value-type="float">
            <text:p>1123</text:p>
          </table:table-cell>
          <table:table-cell table:number-columns-repeated="16380"/>
        </table:table-row>
        <table:table-row table:style-name="ro1">
          <table:table-cell table:formula="of:=IF([$Sheet1.A172] &lt;&gt;&quot;&quot;; &quot;#define &quot;; &quot;&quot;)" office:value-type="string" office:string-value="#define " calcext:value-type="string">
            <text:p>#define </text:p>
          </table:table-cell>
          <table:table-cell table:formula="of:=IF([$Sheet1.A172] &lt;&gt;&quot;&quot;; [$Sheet1.I172]; &quot;&quot;)" office:value-type="string" office:string-value="SIM_AMPLIFIER_CUP3_ELECTRODE4" calcext:value-type="string">
            <text:p>SIM_AMPLIFIER_CUP3_ELECTRODE4</text:p>
          </table:table-cell>
          <table:table-cell table:formula="of:=IF([$Sheet1.A172] &lt;&gt;&quot;&quot;; &quot; &quot;; &quot;&quot;)" office:value-type="string" office:string-value=" " calcext:value-type="string">
            <text:p><text:s/></text:p>
          </table:table-cell>
          <table:table-cell table:formula="of:=IF([$Sheet1.A172] &lt;&gt;&quot;&quot;; [$Sheet1.A172]; &quot;&quot;)" office:value-type="float" office:value="1124" calcext:value-type="float">
            <text:p>1124</text:p>
          </table:table-cell>
          <table:table-cell table:number-columns-repeated="16380"/>
        </table:table-row>
        <table:table-row table:style-name="ro1">
          <table:table-cell table:formula="of:=IF([$Sheet1.A173] &lt;&gt;&quot;&quot;; &quot;#define &quot;; &quot;&quot;)">
            <text:p/>
          </table:table-cell>
          <table:table-cell table:formula="of:=IF([$Sheet1.A173] &lt;&gt;&quot;&quot;; [$Sheet1.I173]; &quot;&quot;)">
            <text:p/>
          </table:table-cell>
          <table:table-cell table:formula="of:=IF([$Sheet1.A173] &lt;&gt;&quot;&quot;; &quot; &quot;; &quot;&quot;)">
            <text:p/>
          </table:table-cell>
          <table:table-cell table:formula="of:=IF([$Sheet1.A173] &lt;&gt;&quot;&quot;; [$Sheet1.A173]; &quot;&quot;)">
            <text:p/>
          </table:table-cell>
          <table:table-cell table:number-columns-repeated="16380"/>
        </table:table-row>
        <table:table-row table:style-name="ro1">
          <table:table-cell table:formula="of:=IF([$Sheet1.A174] &lt;&gt;&quot;&quot;; &quot;#define &quot;; &quot;&quot;)" office:value-type="string" office:string-value="#define " calcext:value-type="string">
            <text:p>#define </text:p>
          </table:table-cell>
          <table:table-cell table:formula="of:=IF([$Sheet1.A174] &lt;&gt;&quot;&quot;; [$Sheet1.I174]; &quot;&quot;)" office:value-type="string" office:string-value="SIM_AMPLIFIER_RANDOM_RATE" calcext:value-type="string">
            <text:p>SIM_AMPLIFIER_RANDOM_RATE</text:p>
          </table:table-cell>
          <table:table-cell table:formula="of:=IF([$Sheet1.A174] &lt;&gt;&quot;&quot;; &quot; &quot;; &quot;&quot;)" office:value-type="string" office:string-value=" " calcext:value-type="string">
            <text:p><text:s/></text:p>
          </table:table-cell>
          <table:table-cell table:formula="of:=IF([$Sheet1.A174] &lt;&gt;&quot;&quot;; [$Sheet1.A174]; &quot;&quot;)" office:value-type="float" office:value="1125" calcext:value-type="float">
            <text:p>1125</text:p>
          </table:table-cell>
          <table:table-cell table:number-columns-repeated="16380"/>
        </table:table-row>
        <table:table-row table:style-name="ro1">
          <table:table-cell table:formula="of:=IF([$Sheet1.A175] &lt;&gt;&quot;&quot;; &quot;#define &quot;; &quot;&quot;)" office:value-type="string" office:string-value="#define " calcext:value-type="string">
            <text:p>#define </text:p>
          </table:table-cell>
          <table:table-cell table:formula="of:=IF([$Sheet1.A175] &lt;&gt;&quot;&quot;; [$Sheet1.I175]; &quot;&quot;)" office:value-type="string" office:string-value="SIM_AMPLIFIER_RANDOM_OFFSET" calcext:value-type="string">
            <text:p>SIM_AMPLIFIER_RANDOM_OFFSET</text:p>
          </table:table-cell>
          <table:table-cell table:formula="of:=IF([$Sheet1.A175] &lt;&gt;&quot;&quot;; &quot; &quot;; &quot;&quot;)" office:value-type="string" office:string-value=" " calcext:value-type="string">
            <text:p><text:s/></text:p>
          </table:table-cell>
          <table:table-cell table:formula="of:=IF([$Sheet1.A175] &lt;&gt;&quot;&quot;; [$Sheet1.A175]; &quot;&quot;)" office:value-type="float" office:value="1126" calcext:value-type="float">
            <text:p>1126</text:p>
          </table:table-cell>
          <table:table-cell table:number-columns-repeated="16380"/>
        </table:table-row>
        <table:table-row table:style-name="ro1">
          <table:table-cell table:formula="of:=IF([$Sheet1.A176] &lt;&gt;&quot;&quot;; &quot;#define &quot;; &quot;&quot;)">
            <text:p/>
          </table:table-cell>
          <table:table-cell table:formula="of:=IF([$Sheet1.A176] &lt;&gt;&quot;&quot;; [$Sheet1.I176]; &quot;&quot;)">
            <text:p/>
          </table:table-cell>
          <table:table-cell table:formula="of:=IF([$Sheet1.A176] &lt;&gt;&quot;&quot;; &quot; &quot;; &quot;&quot;)">
            <text:p/>
          </table:table-cell>
          <table:table-cell table:formula="of:=IF([$Sheet1.A176] &lt;&gt;&quot;&quot;; [$Sheet1.A176]; &quot;&quot;)">
            <text:p/>
          </table:table-cell>
          <table:table-cell table:number-columns-repeated="16380"/>
        </table:table-row>
        <table:table-row table:style-name="ro1">
          <table:table-cell table:formula="of:=IF([$Sheet1.A177] &lt;&gt;&quot;&quot;; &quot;#define &quot;; &quot;&quot;)" office:value-type="string" office:string-value="#define " calcext:value-type="string">
            <text:p>#define </text:p>
          </table:table-cell>
          <table:table-cell table:formula="of:=IF([$Sheet1.A177] &lt;&gt;&quot;&quot;; [$Sheet1.I177]; &quot;&quot;)" office:value-type="string" office:string-value="SIM_EXTERNAL_LOCK_PERIOD" calcext:value-type="string">
            <text:p>SIM_EXTERNAL_LOCK_PERIOD</text:p>
          </table:table-cell>
          <table:table-cell table:formula="of:=IF([$Sheet1.A177] &lt;&gt;&quot;&quot;; &quot; &quot;; &quot;&quot;)" office:value-type="string" office:string-value=" " calcext:value-type="string">
            <text:p><text:s/></text:p>
          </table:table-cell>
          <table:table-cell table:formula="of:=IF([$Sheet1.A177] &lt;&gt;&quot;&quot;; [$Sheet1.A177]; &quot;&quot;)" office:value-type="float" office:value="1127" calcext:value-type="float">
            <text:p>1127</text:p>
          </table:table-cell>
          <table:table-cell table:number-columns-repeated="16380"/>
        </table:table-row>
        <table:table-row table:style-name="ro1">
          <table:table-cell table:formula="of:=IF([$Sheet1.A178] &lt;&gt;&quot;&quot;; &quot;#define &quot;; &quot;&quot;)" office:value-type="string" office:string-value="#define " calcext:value-type="string">
            <text:p>#define </text:p>
          </table:table-cell>
          <table:table-cell table:formula="of:=IF([$Sheet1.A178] &lt;&gt;&quot;&quot;; [$Sheet1.I178]; &quot;&quot;)" office:value-type="string" office:string-value="SIM_EXTERNAL_LOCK_DURATION" calcext:value-type="string">
            <text:p>SIM_EXTERNAL_LOCK_DURATION</text:p>
          </table:table-cell>
          <table:table-cell table:formula="of:=IF([$Sheet1.A178] &lt;&gt;&quot;&quot;; &quot; &quot;; &quot;&quot;)" office:value-type="string" office:string-value=" " calcext:value-type="string">
            <text:p><text:s/></text:p>
          </table:table-cell>
          <table:table-cell table:formula="of:=IF([$Sheet1.A178] &lt;&gt;&quot;&quot;; [$Sheet1.A178]; &quot;&quot;)" office:value-type="float" office:value="1128" calcext:value-type="float">
            <text:p>1128</text:p>
          </table:table-cell>
          <table:table-cell table:number-columns-repeated="16380"/>
        </table:table-row>
        <table:table-row table:style-name="ro1">
          <table:table-cell table:formula="of:=IF([$Sheet1.A179] &lt;&gt;&quot;&quot;; &quot;#define &quot;; &quot;&quot;)" office:value-type="string" office:string-value="#define " calcext:value-type="string">
            <text:p>#define </text:p>
          </table:table-cell>
          <table:table-cell table:formula="of:=IF([$Sheet1.A179] &lt;&gt;&quot;&quot;; [$Sheet1.I179]; &quot;&quot;)" office:value-type="string" office:string-value="SIM_EXTERNAL_LOCK_DELAY" calcext:value-type="string">
            <text:p>SIM_EXTERNAL_LOCK_DELAY</text:p>
          </table:table-cell>
          <table:table-cell table:formula="of:=IF([$Sheet1.A179] &lt;&gt;&quot;&quot;; &quot; &quot;; &quot;&quot;)" office:value-type="string" office:string-value=" " calcext:value-type="string">
            <text:p><text:s/></text:p>
          </table:table-cell>
          <table:table-cell table:formula="of:=IF([$Sheet1.A179] &lt;&gt;&quot;&quot;; [$Sheet1.A179]; &quot;&quot;)" office:value-type="float" office:value="1129" calcext:value-type="float">
            <text:p>1129</text:p>
          </table:table-cell>
          <table:table-cell table:number-columns-repeated="16380"/>
        </table:table-row>
        <table:table-row table:style-name="ro1">
          <table:table-cell table:formula="of:=IF([$Sheet1.A180] &lt;&gt;&quot;&quot;; &quot;#define &quot;; &quot;&quot;)">
            <text:p/>
          </table:table-cell>
          <table:table-cell table:formula="of:=IF([$Sheet1.A180] &lt;&gt;&quot;&quot;; [$Sheet1.I180]; &quot;&quot;)">
            <text:p/>
          </table:table-cell>
          <table:table-cell table:formula="of:=IF([$Sheet1.A180] &lt;&gt;&quot;&quot;; &quot; &quot;; &quot;&quot;)">
            <text:p/>
          </table:table-cell>
          <table:table-cell table:formula="of:=IF([$Sheet1.A180] &lt;&gt;&quot;&quot;; [$Sheet1.A180]; &quot;&quot;)">
            <text:p/>
          </table:table-cell>
          <table:table-cell table:number-columns-repeated="16380"/>
        </table:table-row>
        <table:table-row table:style-name="ro1">
          <table:table-cell table:formula="of:=IF([$Sheet1.A181] &lt;&gt;&quot;&quot;; &quot;#define &quot;; &quot;&quot;)" office:value-type="string" office:string-value="#define " calcext:value-type="string">
            <text:p>#define </text:p>
          </table:table-cell>
          <table:table-cell table:formula="of:=IF([$Sheet1.A181] &lt;&gt;&quot;&quot;; [$Sheet1.I181]; &quot;&quot;)" office:value-type="string" office:string-value="SIM_EVENT_CODE" calcext:value-type="string">
            <text:p>SIM_EVENT_CODE</text:p>
          </table:table-cell>
          <table:table-cell table:formula="of:=IF([$Sheet1.A181] &lt;&gt;&quot;&quot;; &quot; &quot;; &quot;&quot;)" office:value-type="string" office:string-value=" " calcext:value-type="string">
            <text:p><text:s/></text:p>
          </table:table-cell>
          <table:table-cell table:formula="of:=IF([$Sheet1.A181] &lt;&gt;&quot;&quot;; [$Sheet1.A181]; &quot;&quot;)" office:value-type="float" office:value="1130" calcext:value-type="float">
            <text:p>1130</text:p>
          </table:table-cell>
          <table:table-cell table:number-columns-repeated="16380"/>
        </table:table-row>
        <table:table-row table:style-name="ro1">
          <table:table-cell table:formula="of:=IF([$Sheet1.A182] &lt;&gt;&quot;&quot;; &quot;#define &quot;; &quot;&quot;)" office:value-type="string" office:string-value="#define " calcext:value-type="string">
            <text:p>#define </text:p>
          </table:table-cell>
          <table:table-cell table:formula="of:=IF([$Sheet1.A182] &lt;&gt;&quot;&quot;; [$Sheet1.I182]; &quot;&quot;)" office:value-type="string" office:string-value="SIM_EVENT_PERIOD" calcext:value-type="string">
            <text:p>SIM_EVENT_PERIOD</text:p>
          </table:table-cell>
          <table:table-cell table:formula="of:=IF([$Sheet1.A182] &lt;&gt;&quot;&quot;; &quot; &quot;; &quot;&quot;)" office:value-type="string" office:string-value=" " calcext:value-type="string">
            <text:p><text:s/></text:p>
          </table:table-cell>
          <table:table-cell table:formula="of:=IF([$Sheet1.A182] &lt;&gt;&quot;&quot;; [$Sheet1.A182]; &quot;&quot;)" office:value-type="float" office:value="1131" calcext:value-type="float">
            <text:p>1131</text:p>
          </table:table-cell>
          <table:table-cell table:number-columns-repeated="16380"/>
        </table:table-row>
        <table:table-row table:style-name="ro1">
          <table:table-cell table:formula="of:=IF([$Sheet1.A183] &lt;&gt;&quot;&quot;; &quot;#define &quot;; &quot;&quot;)" office:value-type="string" office:string-value="#define " calcext:value-type="string">
            <text:p>#define </text:p>
          </table:table-cell>
          <table:table-cell table:formula="of:=IF([$Sheet1.A183] &lt;&gt;&quot;&quot;; [$Sheet1.I183]; &quot;&quot;)" office:value-type="string" office:string-value="SIM_EVENT_DURATION" calcext:value-type="string">
            <text:p>SIM_EVENT_DURATION</text:p>
          </table:table-cell>
          <table:table-cell table:formula="of:=IF([$Sheet1.A183] &lt;&gt;&quot;&quot;; &quot; &quot;; &quot;&quot;)" office:value-type="string" office:string-value=" " calcext:value-type="string">
            <text:p><text:s/></text:p>
          </table:table-cell>
          <table:table-cell table:formula="of:=IF([$Sheet1.A183] &lt;&gt;&quot;&quot;; [$Sheet1.A183]; &quot;&quot;)" office:value-type="float" office:value="1132" calcext:value-type="float">
            <text:p>1132</text:p>
          </table:table-cell>
          <table:table-cell table:number-columns-repeated="16380"/>
        </table:table-row>
        <table:table-row table:style-name="ro1">
          <table:table-cell table:formula="of:=IF([$Sheet1.A184] &lt;&gt;&quot;&quot;; &quot;#define &quot;; &quot;&quot;)" office:value-type="string" office:string-value="#define " calcext:value-type="string">
            <text:p>#define </text:p>
          </table:table-cell>
          <table:table-cell table:formula="of:=IF([$Sheet1.A184] &lt;&gt;&quot;&quot;; [$Sheet1.I184]; &quot;&quot;)" office:value-type="string" office:string-value="SIM_EVENT_DELAY" calcext:value-type="string">
            <text:p>SIM_EVENT_DELAY</text:p>
          </table:table-cell>
          <table:table-cell table:formula="of:=IF([$Sheet1.A184] &lt;&gt;&quot;&quot;; &quot; &quot;; &quot;&quot;)" office:value-type="string" office:string-value=" " calcext:value-type="string">
            <text:p><text:s/></text:p>
          </table:table-cell>
          <table:table-cell table:formula="of:=IF([$Sheet1.A184] &lt;&gt;&quot;&quot;; [$Sheet1.A184]; &quot;&quot;)" office:value-type="float" office:value="1133" calcext:value-type="float">
            <text:p>1133</text:p>
          </table:table-cell>
          <table:table-cell table:number-columns-repeated="16380"/>
        </table:table-row>
        <table:table-row table:style-name="ro1">
          <table:table-cell table:formula="of:=IF([$Sheet1.A185] &lt;&gt;&quot;&quot;; &quot;#define &quot;; &quot;&quot;)">
            <text:p/>
          </table:table-cell>
          <table:table-cell table:formula="of:=IF([$Sheet1.A185] &lt;&gt;&quot;&quot;; [$Sheet1.I185]; &quot;&quot;)">
            <text:p/>
          </table:table-cell>
          <table:table-cell table:formula="of:=IF([$Sheet1.A185] &lt;&gt;&quot;&quot;; &quot; &quot;; &quot;&quot;)">
            <text:p/>
          </table:table-cell>
          <table:table-cell table:formula="of:=IF([$Sheet1.A185] &lt;&gt;&quot;&quot;; [$Sheet1.A185]; &quot;&quot;)">
            <text:p/>
          </table:table-cell>
          <table:table-cell table:number-columns-repeated="16380"/>
        </table:table-row>
        <table:table-row table:style-name="ro1">
          <table:table-cell table:formula="of:=IF([$Sheet1.A186] &lt;&gt;&quot;&quot;; &quot;#define &quot;; &quot;&quot;)" office:value-type="string" office:string-value="#define " calcext:value-type="string">
            <text:p>#define </text:p>
          </table:table-cell>
          <table:table-cell table:formula="of:=IF([$Sheet1.A186] &lt;&gt;&quot;&quot;; [$Sheet1.I186]; &quot;&quot;)" office:value-type="string" office:string-value="DEBUG_PRINTOUTS" calcext:value-type="string">
            <text:p>DEBUG_PRINTOUTS</text:p>
          </table:table-cell>
          <table:table-cell table:formula="of:=IF([$Sheet1.A186] &lt;&gt;&quot;&quot;; &quot; &quot;; &quot;&quot;)" office:value-type="string" office:string-value=" " calcext:value-type="string">
            <text:p><text:s/></text:p>
          </table:table-cell>
          <table:table-cell table:formula="of:=IF([$Sheet1.A186] &lt;&gt;&quot;&quot;; [$Sheet1.A186]; &quot;&quot;)" office:value-type="float" office:value="1134" calcext:value-type="float">
            <text:p>1134</text:p>
          </table:table-cell>
          <table:table-cell table:number-columns-repeated="16380"/>
        </table:table-row>
        <table:table-row table:style-name="ro1">
          <table:table-cell table:formula="of:=IF([$Sheet1.A187] &lt;&gt;&quot;&quot;; &quot;#define &quot;; &quot;&quot;)" office:value-type="string" office:string-value="#define " calcext:value-type="string">
            <text:p>#define </text:p>
          </table:table-cell>
          <table:table-cell table:formula="of:=IF([$Sheet1.A187] &lt;&gt;&quot;&quot;; [$Sheet1.I187]; &quot;&quot;)" office:value-type="string" office:string-value="DEBUG_ARGUMENT1" calcext:value-type="string">
            <text:p>DEBUG_ARGUMENT1</text:p>
          </table:table-cell>
          <table:table-cell table:formula="of:=IF([$Sheet1.A187] &lt;&gt;&quot;&quot;; &quot; &quot;; &quot;&quot;)" office:value-type="string" office:string-value=" " calcext:value-type="string">
            <text:p><text:s/></text:p>
          </table:table-cell>
          <table:table-cell table:formula="of:=IF([$Sheet1.A187] &lt;&gt;&quot;&quot;; [$Sheet1.A187]; &quot;&quot;)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1">
          <table:table-cell table:formula="of:=IF([$Sheet1.A188] &lt;&gt;&quot;&quot;; &quot;#define &quot;; &quot;&quot;)">
            <text:p/>
          </table:table-cell>
          <table:table-cell table:formula="of:=IF([$Sheet1.A188] &lt;&gt;&quot;&quot;; [$Sheet1.I188]; &quot;&quot;)">
            <text:p/>
          </table:table-cell>
          <table:table-cell table:formula="of:=IF([$Sheet1.A188] &lt;&gt;&quot;&quot;; &quot; &quot;; &quot;&quot;)">
            <text:p/>
          </table:table-cell>
          <table:table-cell table:formula="of:=IF([$Sheet1.A188] &lt;&gt;&quot;&quot;; [$Sheet1.A188]; &quot;&quot;)">
            <text:p/>
          </table:table-cell>
          <table:table-cell table:number-columns-repeated="16380"/>
        </table:table-row>
        <table:table-row table:style-name="ro1">
          <table:table-cell table:formula="of:=IF([$Sheet1.A189] &lt;&gt;&quot;&quot;; &quot;#define &quot;; &quot;&quot;)">
            <text:p/>
          </table:table-cell>
          <table:table-cell table:formula="of:=IF([$Sheet1.A189] &lt;&gt;&quot;&quot;; [$Sheet1.I189]; &quot;&quot;)">
            <text:p/>
          </table:table-cell>
          <table:table-cell table:formula="of:=IF([$Sheet1.A189] &lt;&gt;&quot;&quot;; &quot; &quot;; &quot;&quot;)">
            <text:p/>
          </table:table-cell>
          <table:table-cell table:formula="of:=IF([$Sheet1.A189] &lt;&gt;&quot;&quot;; [$Sheet1.A189]; &quot;&quot;)">
            <text:p/>
          </table:table-cell>
          <table:table-cell table:number-columns-repeated="16380"/>
        </table:table-row>
        <table:table-row table:style-name="ro1">
          <table:table-cell table:formula="of:=IF([$Sheet1.A190] &lt;&gt;&quot;&quot;; &quot;#define &quot;; &quot;&quot;)" office:value-type="string" office:string-value="#define " calcext:value-type="string">
            <text:p>#define </text:p>
          </table:table-cell>
          <table:table-cell table:formula="of:=IF([$Sheet1.A190] &lt;&gt;&quot;&quot;; [$Sheet1.I190]; &quot;&quot;)" office:value-type="string" office:string-value="CUP1_CHANNEL1_SAMPLE" calcext:value-type="string">
            <text:p>CUP1_CHANNEL1_SAMPLE</text:p>
          </table:table-cell>
          <table:table-cell table:formula="of:=IF([$Sheet1.A190] &lt;&gt;&quot;&quot;; &quot; &quot;; &quot;&quot;)" office:value-type="string" office:string-value=" " calcext:value-type="string">
            <text:p><text:s/></text:p>
          </table:table-cell>
          <table:table-cell table:formula="of:=IF([$Sheet1.A190] &lt;&gt;&quot;&quot;; [$Sheet1.A190]; &quot;&quot;)" office:value-type="float" office:value="3001" calcext:value-type="float">
            <text:p>3001</text:p>
          </table:table-cell>
          <table:table-cell table:number-columns-repeated="16380"/>
        </table:table-row>
        <table:table-row table:style-name="ro1">
          <table:table-cell table:formula="of:=IF([$Sheet1.A191] &lt;&gt;&quot;&quot;; &quot;#define &quot;; &quot;&quot;)" office:value-type="string" office:string-value="#define " calcext:value-type="string">
            <text:p>#define </text:p>
          </table:table-cell>
          <table:table-cell table:formula="of:=IF([$Sheet1.A191] &lt;&gt;&quot;&quot;; [$Sheet1.I191]; &quot;&quot;)" office:value-type="string" office:string-value="CUP1_CHANNEL2_SAMPLE" calcext:value-type="string">
            <text:p>CUP1_CHANNEL2_SAMPLE</text:p>
          </table:table-cell>
          <table:table-cell table:formula="of:=IF([$Sheet1.A191] &lt;&gt;&quot;&quot;; &quot; &quot;; &quot;&quot;)" office:value-type="string" office:string-value=" " calcext:value-type="string">
            <text:p><text:s/></text:p>
          </table:table-cell>
          <table:table-cell table:formula="of:=IF([$Sheet1.A191] &lt;&gt;&quot;&quot;; [$Sheet1.A191]; &quot;&quot;)" office:value-type="float" office:value="3002" calcext:value-type="float">
            <text:p>3002</text:p>
          </table:table-cell>
          <table:table-cell table:number-columns-repeated="16380"/>
        </table:table-row>
        <table:table-row table:style-name="ro1">
          <table:table-cell table:formula="of:=IF([$Sheet1.A192] &lt;&gt;&quot;&quot;; &quot;#define &quot;; &quot;&quot;)" office:value-type="string" office:string-value="#define " calcext:value-type="string">
            <text:p>#define </text:p>
          </table:table-cell>
          <table:table-cell table:formula="of:=IF([$Sheet1.A192] &lt;&gt;&quot;&quot;; [$Sheet1.I192]; &quot;&quot;)" office:value-type="string" office:string-value="CUP1_CHANNEL3_SAMPLE" calcext:value-type="string">
            <text:p>CUP1_CHANNEL3_SAMPLE</text:p>
          </table:table-cell>
          <table:table-cell table:formula="of:=IF([$Sheet1.A192] &lt;&gt;&quot;&quot;; &quot; &quot;; &quot;&quot;)" office:value-type="string" office:string-value=" " calcext:value-type="string">
            <text:p><text:s/></text:p>
          </table:table-cell>
          <table:table-cell table:formula="of:=IF([$Sheet1.A192] &lt;&gt;&quot;&quot;; [$Sheet1.A192]; &quot;&quot;)" office:value-type="float" office:value="3003" calcext:value-type="float">
            <text:p>3003</text:p>
          </table:table-cell>
          <table:table-cell table:number-columns-repeated="16380"/>
        </table:table-row>
        <table:table-row table:style-name="ro1">
          <table:table-cell table:formula="of:=IF([$Sheet1.A193] &lt;&gt;&quot;&quot;; &quot;#define &quot;; &quot;&quot;)" office:value-type="string" office:string-value="#define " calcext:value-type="string">
            <text:p>#define </text:p>
          </table:table-cell>
          <table:table-cell table:formula="of:=IF([$Sheet1.A193] &lt;&gt;&quot;&quot;; [$Sheet1.I193]; &quot;&quot;)" office:value-type="string" office:string-value="CUP1_CHANNEL4_SAMPLE" calcext:value-type="string">
            <text:p>CUP1_CHANNEL4_SAMPLE</text:p>
          </table:table-cell>
          <table:table-cell table:formula="of:=IF([$Sheet1.A193] &lt;&gt;&quot;&quot;; &quot; &quot;; &quot;&quot;)" office:value-type="string" office:string-value=" " calcext:value-type="string">
            <text:p><text:s/></text:p>
          </table:table-cell>
          <table:table-cell table:formula="of:=IF([$Sheet1.A193] &lt;&gt;&quot;&quot;; [$Sheet1.A193]; &quot;&quot;)" office:value-type="float" office:value="3004" calcext:value-type="float">
            <text:p>3004</text:p>
          </table:table-cell>
          <table:table-cell table:number-columns-repeated="16380"/>
        </table:table-row>
        <table:table-row table:style-name="ro1">
          <table:table-cell table:formula="of:=IF([$Sheet1.A194] &lt;&gt;&quot;&quot;; &quot;#define &quot;; &quot;&quot;)" office:value-type="string" office:string-value="#define " calcext:value-type="string">
            <text:p>#define </text:p>
          </table:table-cell>
          <table:table-cell table:formula="of:=IF([$Sheet1.A194] &lt;&gt;&quot;&quot;; [$Sheet1.I194]; &quot;&quot;)" office:value-type="string" office:string-value="CUP1_CHANNEL_ERROR" calcext:value-type="string">
            <text:p>CUP1_CHANNEL_ERROR</text:p>
          </table:table-cell>
          <table:table-cell table:formula="of:=IF([$Sheet1.A194] &lt;&gt;&quot;&quot;; &quot; &quot;; &quot;&quot;)" office:value-type="string" office:string-value=" " calcext:value-type="string">
            <text:p><text:s/></text:p>
          </table:table-cell>
          <table:table-cell table:formula="of:=IF([$Sheet1.A194] &lt;&gt;&quot;&quot;; [$Sheet1.A194]; &quot;&quot;)" office:value-type="float" office:value="3005" calcext:value-type="float">
            <text:p>3005</text:p>
          </table:table-cell>
          <table:table-cell table:number-columns-repeated="16380"/>
        </table:table-row>
        <table:table-row table:style-name="ro1">
          <table:table-cell table:formula="of:=IF([$Sheet1.A195] &lt;&gt;&quot;&quot;; &quot;#define &quot;; &quot;&quot;)">
            <text:p/>
          </table:table-cell>
          <table:table-cell table:formula="of:=IF([$Sheet1.A195] &lt;&gt;&quot;&quot;; [$Sheet1.I195]; &quot;&quot;)">
            <text:p/>
          </table:table-cell>
          <table:table-cell table:formula="of:=IF([$Sheet1.A195] &lt;&gt;&quot;&quot;; &quot; &quot;; &quot;&quot;)">
            <text:p/>
          </table:table-cell>
          <table:table-cell table:formula="of:=IF([$Sheet1.A195] &lt;&gt;&quot;&quot;; [$Sheet1.A195]; &quot;&quot;)">
            <text:p/>
          </table:table-cell>
          <table:table-cell table:number-columns-repeated="16380"/>
        </table:table-row>
        <table:table-row table:style-name="ro1">
          <table:table-cell table:formula="of:=IF([$Sheet1.A196] &lt;&gt;&quot;&quot;; &quot;#define &quot;; &quot;&quot;)" office:value-type="string" office:string-value="#define " calcext:value-type="string">
            <text:p>#define </text:p>
          </table:table-cell>
          <table:table-cell table:formula="of:=IF([$Sheet1.A196] &lt;&gt;&quot;&quot;; [$Sheet1.I196]; &quot;&quot;)" office:value-type="string" office:string-value="CUP2_CHANNEL1_SAMPLE" calcext:value-type="string">
            <text:p>CUP2_CHANNEL1_SAMPLE</text:p>
          </table:table-cell>
          <table:table-cell table:formula="of:=IF([$Sheet1.A196] &lt;&gt;&quot;&quot;; &quot; &quot;; &quot;&quot;)" office:value-type="string" office:string-value=" " calcext:value-type="string">
            <text:p><text:s/></text:p>
          </table:table-cell>
          <table:table-cell table:formula="of:=IF([$Sheet1.A196] &lt;&gt;&quot;&quot;; [$Sheet1.A196]; &quot;&quot;)" office:value-type="float" office:value="3006" calcext:value-type="float">
            <text:p>3006</text:p>
          </table:table-cell>
          <table:table-cell table:number-columns-repeated="16380"/>
        </table:table-row>
        <table:table-row table:style-name="ro1">
          <table:table-cell table:formula="of:=IF([$Sheet1.A197] &lt;&gt;&quot;&quot;; &quot;#define &quot;; &quot;&quot;)" office:value-type="string" office:string-value="#define " calcext:value-type="string">
            <text:p>#define </text:p>
          </table:table-cell>
          <table:table-cell table:formula="of:=IF([$Sheet1.A197] &lt;&gt;&quot;&quot;; [$Sheet1.I197]; &quot;&quot;)" office:value-type="string" office:string-value="CUP2_CHANNEL2_SAMPLE" calcext:value-type="string">
            <text:p>CUP2_CHANNEL2_SAMPLE</text:p>
          </table:table-cell>
          <table:table-cell table:formula="of:=IF([$Sheet1.A197] &lt;&gt;&quot;&quot;; &quot; &quot;; &quot;&quot;)" office:value-type="string" office:string-value=" " calcext:value-type="string">
            <text:p><text:s/></text:p>
          </table:table-cell>
          <table:table-cell table:formula="of:=IF([$Sheet1.A197] &lt;&gt;&quot;&quot;; [$Sheet1.A197]; &quot;&quot;)" office:value-type="float" office:value="3007" calcext:value-type="float">
            <text:p>3007</text:p>
          </table:table-cell>
          <table:table-cell table:number-columns-repeated="16380"/>
        </table:table-row>
        <table:table-row table:style-name="ro1">
          <table:table-cell table:formula="of:=IF([$Sheet1.A198] &lt;&gt;&quot;&quot;; &quot;#define &quot;; &quot;&quot;)" office:value-type="string" office:string-value="#define " calcext:value-type="string">
            <text:p>#define </text:p>
          </table:table-cell>
          <table:table-cell table:formula="of:=IF([$Sheet1.A198] &lt;&gt;&quot;&quot;; [$Sheet1.I198]; &quot;&quot;)" office:value-type="string" office:string-value="CUP2_CHANNEL3_SAMPLE" calcext:value-type="string">
            <text:p>CUP2_CHANNEL3_SAMPLE</text:p>
          </table:table-cell>
          <table:table-cell table:formula="of:=IF([$Sheet1.A198] &lt;&gt;&quot;&quot;; &quot; &quot;; &quot;&quot;)" office:value-type="string" office:string-value=" " calcext:value-type="string">
            <text:p><text:s/></text:p>
          </table:table-cell>
          <table:table-cell table:formula="of:=IF([$Sheet1.A198] &lt;&gt;&quot;&quot;; [$Sheet1.A198]; &quot;&quot;)" office:value-type="float" office:value="3008" calcext:value-type="float">
            <text:p>3008</text:p>
          </table:table-cell>
          <table:table-cell table:number-columns-repeated="16380"/>
        </table:table-row>
        <table:table-row table:style-name="ro1">
          <table:table-cell table:formula="of:=IF([$Sheet1.A199] &lt;&gt;&quot;&quot;; &quot;#define &quot;; &quot;&quot;)" office:value-type="string" office:string-value="#define " calcext:value-type="string">
            <text:p>#define </text:p>
          </table:table-cell>
          <table:table-cell table:formula="of:=IF([$Sheet1.A199] &lt;&gt;&quot;&quot;; [$Sheet1.I199]; &quot;&quot;)" office:value-type="string" office:string-value="CUP2_CHANNEL4_SAMPLE" calcext:value-type="string">
            <text:p>CUP2_CHANNEL4_SAMPLE</text:p>
          </table:table-cell>
          <table:table-cell table:formula="of:=IF([$Sheet1.A199] &lt;&gt;&quot;&quot;; &quot; &quot;; &quot;&quot;)" office:value-type="string" office:string-value=" " calcext:value-type="string">
            <text:p><text:s/></text:p>
          </table:table-cell>
          <table:table-cell table:formula="of:=IF([$Sheet1.A199] &lt;&gt;&quot;&quot;; [$Sheet1.A199]; &quot;&quot;)" office:value-type="float" office:value="3009" calcext:value-type="float">
            <text:p>3009</text:p>
          </table:table-cell>
          <table:table-cell table:number-columns-repeated="16380"/>
        </table:table-row>
        <table:table-row table:style-name="ro1">
          <table:table-cell table:formula="of:=IF([$Sheet1.A200] &lt;&gt;&quot;&quot;; &quot;#define &quot;; &quot;&quot;)" office:value-type="string" office:string-value="#define " calcext:value-type="string">
            <text:p>#define </text:p>
          </table:table-cell>
          <table:table-cell table:formula="of:=IF([$Sheet1.A200] &lt;&gt;&quot;&quot;; [$Sheet1.I200]; &quot;&quot;)" office:value-type="string" office:string-value="CUP2_CHANNEL_ERROR" calcext:value-type="string">
            <text:p>CUP2_CHANNEL_ERROR</text:p>
          </table:table-cell>
          <table:table-cell table:formula="of:=IF([$Sheet1.A200] &lt;&gt;&quot;&quot;; &quot; &quot;; &quot;&quot;)" office:value-type="string" office:string-value=" " calcext:value-type="string">
            <text:p><text:s/></text:p>
          </table:table-cell>
          <table:table-cell table:formula="of:=IF([$Sheet1.A200] &lt;&gt;&quot;&quot;; [$Sheet1.A200]; &quot;&quot;)" office:value-type="float" office:value="3010" calcext:value-type="float">
            <text:p>3010</text:p>
          </table:table-cell>
          <table:table-cell table:number-columns-repeated="16380"/>
        </table:table-row>
        <table:table-row table:style-name="ro1">
          <table:table-cell table:formula="of:=IF([$Sheet1.A201] &lt;&gt;&quot;&quot;; &quot;#define &quot;; &quot;&quot;)">
            <text:p/>
          </table:table-cell>
          <table:table-cell table:formula="of:=IF([$Sheet1.A201] &lt;&gt;&quot;&quot;; [$Sheet1.I201]; &quot;&quot;)">
            <text:p/>
          </table:table-cell>
          <table:table-cell table:formula="of:=IF([$Sheet1.A201] &lt;&gt;&quot;&quot;; &quot; &quot;; &quot;&quot;)">
            <text:p/>
          </table:table-cell>
          <table:table-cell table:formula="of:=IF([$Sheet1.A201] &lt;&gt;&quot;&quot;; [$Sheet1.A201]; &quot;&quot;)">
            <text:p/>
          </table:table-cell>
          <table:table-cell table:number-columns-repeated="16380"/>
        </table:table-row>
        <table:table-row table:style-name="ro1">
          <table:table-cell table:formula="of:=IF([$Sheet1.A202] &lt;&gt;&quot;&quot;; &quot;#define &quot;; &quot;&quot;)" office:value-type="string" office:string-value="#define " calcext:value-type="string">
            <text:p>#define </text:p>
          </table:table-cell>
          <table:table-cell table:formula="of:=IF([$Sheet1.A202] &lt;&gt;&quot;&quot;; [$Sheet1.I202]; &quot;&quot;)" office:value-type="string" office:string-value="CUP3_CHANNEL1_SAMPLE" calcext:value-type="string">
            <text:p>CUP3_CHANNEL1_SAMPLE</text:p>
          </table:table-cell>
          <table:table-cell table:formula="of:=IF([$Sheet1.A202] &lt;&gt;&quot;&quot;; &quot; &quot;; &quot;&quot;)" office:value-type="string" office:string-value=" " calcext:value-type="string">
            <text:p><text:s/></text:p>
          </table:table-cell>
          <table:table-cell table:formula="of:=IF([$Sheet1.A202] &lt;&gt;&quot;&quot;; [$Sheet1.A202]; &quot;&quot;)" office:value-type="float" office:value="3011" calcext:value-type="float">
            <text:p>3011</text:p>
          </table:table-cell>
          <table:table-cell table:number-columns-repeated="16380"/>
        </table:table-row>
        <table:table-row table:style-name="ro1">
          <table:table-cell table:formula="of:=IF([$Sheet1.A203] &lt;&gt;&quot;&quot;; &quot;#define &quot;; &quot;&quot;)" office:value-type="string" office:string-value="#define " calcext:value-type="string">
            <text:p>#define </text:p>
          </table:table-cell>
          <table:table-cell table:formula="of:=IF([$Sheet1.A203] &lt;&gt;&quot;&quot;; [$Sheet1.I203]; &quot;&quot;)" office:value-type="string" office:string-value="CUP3_CHANNEL2_SAMPLE" calcext:value-type="string">
            <text:p>CUP3_CHANNEL2_SAMPLE</text:p>
          </table:table-cell>
          <table:table-cell table:formula="of:=IF([$Sheet1.A203] &lt;&gt;&quot;&quot;; &quot; &quot;; &quot;&quot;)" office:value-type="string" office:string-value=" " calcext:value-type="string">
            <text:p><text:s/></text:p>
          </table:table-cell>
          <table:table-cell table:formula="of:=IF([$Sheet1.A203] &lt;&gt;&quot;&quot;; [$Sheet1.A203]; &quot;&quot;)" office:value-type="float" office:value="3012" calcext:value-type="float">
            <text:p>3012</text:p>
          </table:table-cell>
          <table:table-cell table:number-columns-repeated="16380"/>
        </table:table-row>
        <table:table-row table:style-name="ro1">
          <table:table-cell table:formula="of:=IF([$Sheet1.A204] &lt;&gt;&quot;&quot;; &quot;#define &quot;; &quot;&quot;)" office:value-type="string" office:string-value="#define " calcext:value-type="string">
            <text:p>#define </text:p>
          </table:table-cell>
          <table:table-cell table:formula="of:=IF([$Sheet1.A204] &lt;&gt;&quot;&quot;; [$Sheet1.I204]; &quot;&quot;)" office:value-type="string" office:string-value="CUP3_CHANNEL3_SAMPLE" calcext:value-type="string">
            <text:p>CUP3_CHANNEL3_SAMPLE</text:p>
          </table:table-cell>
          <table:table-cell table:formula="of:=IF([$Sheet1.A204] &lt;&gt;&quot;&quot;; &quot; &quot;; &quot;&quot;)" office:value-type="string" office:string-value=" " calcext:value-type="string">
            <text:p><text:s/></text:p>
          </table:table-cell>
          <table:table-cell table:formula="of:=IF([$Sheet1.A204] &lt;&gt;&quot;&quot;; [$Sheet1.A204]; &quot;&quot;)" office:value-type="float" office:value="3013" calcext:value-type="float">
            <text:p>3013</text:p>
          </table:table-cell>
          <table:table-cell table:number-columns-repeated="16380"/>
        </table:table-row>
        <table:table-row table:style-name="ro1">
          <table:table-cell table:formula="of:=IF([$Sheet1.A205] &lt;&gt;&quot;&quot;; &quot;#define &quot;; &quot;&quot;)" office:value-type="string" office:string-value="#define " calcext:value-type="string">
            <text:p>#define </text:p>
          </table:table-cell>
          <table:table-cell table:formula="of:=IF([$Sheet1.A205] &lt;&gt;&quot;&quot;; [$Sheet1.I205]; &quot;&quot;)" office:value-type="string" office:string-value="CUP3_CHANNEL4_SAMPLE" calcext:value-type="string">
            <text:p>CUP3_CHANNEL4_SAMPLE</text:p>
          </table:table-cell>
          <table:table-cell table:formula="of:=IF([$Sheet1.A205] &lt;&gt;&quot;&quot;; &quot; &quot;; &quot;&quot;)" office:value-type="string" office:string-value=" " calcext:value-type="string">
            <text:p><text:s/></text:p>
          </table:table-cell>
          <table:table-cell table:formula="of:=IF([$Sheet1.A205] &lt;&gt;&quot;&quot;; [$Sheet1.A205]; &quot;&quot;)" office:value-type="float" office:value="3014" calcext:value-type="float">
            <text:p>3014</text:p>
          </table:table-cell>
          <table:table-cell table:number-columns-repeated="16380"/>
        </table:table-row>
        <table:table-row table:style-name="ro1">
          <table:table-cell table:formula="of:=IF([$Sheet1.A206] &lt;&gt;&quot;&quot;; &quot;#define &quot;; &quot;&quot;)" office:value-type="string" office:string-value="#define " calcext:value-type="string">
            <text:p>#define </text:p>
          </table:table-cell>
          <table:table-cell table:formula="of:=IF([$Sheet1.A206] &lt;&gt;&quot;&quot;; [$Sheet1.I206]; &quot;&quot;)" office:value-type="string" office:string-value="CUP3_CHANNEL_ERROR" calcext:value-type="string">
            <text:p>CUP3_CHANNEL_ERROR</text:p>
          </table:table-cell>
          <table:table-cell table:formula="of:=IF([$Sheet1.A206] &lt;&gt;&quot;&quot;; &quot; &quot;; &quot;&quot;)" office:value-type="string" office:string-value=" " calcext:value-type="string">
            <text:p><text:s/></text:p>
          </table:table-cell>
          <table:table-cell table:formula="of:=IF([$Sheet1.A206] &lt;&gt;&quot;&quot;; [$Sheet1.A206]; &quot;&quot;)" office:value-type="float" office:value="3015" calcext:value-type="float">
            <text:p>3015</text:p>
          </table:table-cell>
          <table:table-cell table:number-columns-repeated="16380"/>
        </table:table-row>
        <table:table-row table:style-name="ro1" table:number-rows-repeated="10483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9">00/00/0000</text:date>, <text:time style:data-style-name="N2" text:time-value="15:23:39.4205918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47:36.211344767</meta:creation-date>
    <dc:date>2026-06-09T15:41:01.343190063</dc:date>
    <meta:editing-duration>P1DT17H54M41S</meta:editing-duration>
    <meta:editing-cycles>169</meta:editing-cycles>
    <meta:generator>LibreOffice/24.2.7.2$Linux_X86_64 LibreOffice_project/420$Build-2</meta:generator>
    <meta:document-statistic meta:table-count="2" meta:cell-count="2968" meta:object-count="0"/>
  </office:meta>
</office:document-meta>
</file>