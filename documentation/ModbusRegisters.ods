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3244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5626in"/>
    </style:style>
    <style:style style:name="co14" style:family="table-column">
      <style:table-column-properties fo:break-before="auto" style:column-width="0.3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13" style:family="table-cell" style:parent-style-name="Default"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11" table:formula="of:=IF([.H3]&lt;&gt;&quot;&quot;; UPPER(ORG.LIBREOFFICE.REGEX([.H3];&quot;([a-z0-9])([A-Z])&quot;;&quot;$1_$2&quot;;&quot;g&quot;)); &quot;&quot;)" office:value-type="string" office:string-value="CUP1_CONTROL" calcext:value-type="string">
            <text:p>CUP1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1</text:p>
          </table:table-cell>
          <table:table-cell table:style-name="ce11" table:formula="of:=IF([.H4]&lt;&gt;&quot;&quot;; UPPER(ORG.LIBREOFFICE.REGEX([.H4];&quot;([a-z0-9])([A-Z])&quot;;&quot;$1_$2&quot;;&quot;g&quot;)); &quot;&quot;)" office:value-type="string" office:string-value="EXTERNAL_INHIBITION1" calcext:value-type="string">
            <text:p>EXTERNAL_INHIBITION1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table:style-name="ce11" table:formula="of:=IF([.H5]&lt;&gt;&quot;&quot;; UPPER(ORG.LIBREOFFICE.REGEX([.H5];&quot;([a-z0-9])([A-Z])&quot;;&quot;$1_$2&quot;;&quot;g&quot;)); &quot;&quot;)" office:value-type="string" office:string-value="CUP1_SWITCH" calcext:value-type="string">
            <text:p>CUP1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6]&lt;&gt;&quot;&quot;; UPPER(ORG.LIBREOFFICE.REGEX([.H6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7]&lt;&gt;&quot;&quot;; UPPER(ORG.LIBREOFFICE.REGEX([.H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11" table:formula="of:=IF([.H8]&lt;&gt;&quot;&quot;; UPPER(ORG.LIBREOFFICE.REGEX([.H8];&quot;([a-z0-9])([A-Z])&quot;;&quot;$1_$2&quot;;&quot;g&quot;)); &quot;&quot;)" office:value-type="string" office:string-value="CUP2_CONTROL" calcext:value-type="string">
            <text:p>CUP2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2</text:p>
          </table:table-cell>
          <table:table-cell table:style-name="ce11" table:formula="of:=IF([.H9]&lt;&gt;&quot;&quot;; UPPER(ORG.LIBREOFFICE.REGEX([.H9];&quot;([a-z0-9])([A-Z])&quot;;&quot;$1_$2&quot;;&quot;g&quot;)); &quot;&quot;)" office:value-type="string" office:string-value="EXTERNAL_INHIBITION2" calcext:value-type="string">
            <text:p>EXTERNAL_INHIBITION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table:style-name="ce11" table:formula="of:=IF([.H10]&lt;&gt;&quot;&quot;; UPPER(ORG.LIBREOFFICE.REGEX([.H10];&quot;([a-z0-9])([A-Z])&quot;;&quot;$1_$2&quot;;&quot;g&quot;)); &quot;&quot;)" office:value-type="string" office:string-value="CUP2_SWITCH" calcext:value-type="string">
            <text:p>CUP2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11]&lt;&gt;&quot;&quot;; UPPER(ORG.LIBREOFFICE.REGEX([.H11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12]&lt;&gt;&quot;&quot;; UPPER(ORG.LIBREOFFICE.REGEX([.H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11" table:formula="of:=IF([.H13]&lt;&gt;&quot;&quot;; UPPER(ORG.LIBREOFFICE.REGEX([.H13];&quot;([a-z0-9])([A-Z])&quot;;&quot;$1_$2&quot;;&quot;g&quot;)); &quot;&quot;)" office:value-type="string" office:string-value="CUP3_CONTROL" calcext:value-type="string">
            <text:p>CUP3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3</text:p>
          </table:table-cell>
          <table:table-cell table:style-name="ce11" table:formula="of:=IF([.H14]&lt;&gt;&quot;&quot;; UPPER(ORG.LIBREOFFICE.REGEX([.H14];&quot;([a-z0-9])([A-Z])&quot;;&quot;$1_$2&quot;;&quot;g&quot;)); &quot;&quot;)" office:value-type="string" office:string-value="EXTERNAL_INHIBITION3" calcext:value-type="string">
            <text:p>EXTERNAL_INHIBITION3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table:style-name="ce11" table:formula="of:=IF([.H15]&lt;&gt;&quot;&quot;; UPPER(ORG.LIBREOFFICE.REGEX([.H15];&quot;([a-z0-9])([A-Z])&quot;;&quot;$1_$2&quot;;&quot;g&quot;)); &quot;&quot;)" office:value-type="string" office:string-value="CUP3_SWITCH1" calcext:value-type="string">
            <text:p>CUP3_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table:style-name="ce11" table:formula="of:=IF([.H16]&lt;&gt;&quot;&quot;; UPPER(ORG.LIBREOFFICE.REGEX([.H16];&quot;([a-z0-9])([A-Z])&quot;;&quot;$1_$2&quot;;&quot;g&quot;)); &quot;&quot;)" office:value-type="string" office:string-value="CUP3_SWITCH2" calcext:value-type="string">
            <text:p>CUP3_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17]&lt;&gt;&quot;&quot;; UPPER(ORG.LIBREOFFICE.REGEX([.H1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table:style-name="ce11" table:formula="of:=IF([.H18]&lt;&gt;&quot;&quot;; UPPER(ORG.LIBREOFFICE.REGEX([.H18];&quot;([a-z0-9])([A-Z])&quot;;&quot;$1_$2&quot;;&quot;g&quot;)); &quot;&quot;)" office:value-type="string" office:string-value="CUP1_REQUESTED_STATE" calcext:value-type="string">
            <text:p>CUP1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table:style-name="ce11" table:formula="of:=IF([.H19]&lt;&gt;&quot;&quot;; UPPER(ORG.LIBREOFFICE.REGEX([.H19];&quot;([a-z0-9])([A-Z])&quot;;&quot;$1_$2&quot;;&quot;g&quot;)); &quot;&quot;)" office:value-type="string" office:string-value="CUP2_REQUESTED_STATE" calcext:value-type="string">
            <text:p>CUP2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table:style-name="ce11" table:formula="of:=IF([.H20]&lt;&gt;&quot;&quot;; UPPER(ORG.LIBREOFFICE.REGEX([.H20];&quot;([a-z0-9])([A-Z])&quot;;&quot;$1_$2&quot;;&quot;g&quot;)); &quot;&quot;)" office:value-type="string" office:string-value="CUP3_REQUESTED_STATE" calcext:value-type="string">
            <text:p>CUP3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1]&lt;&gt;&quot;&quot;; UPPER(ORG.LIBREOFFICE.REGEX([.H2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table:style-name="ce11" table:formula="of:=IF([.H22]&lt;&gt;&quot;&quot;; UPPER(ORG.LIBREOFFICE.REGEX([.H22];&quot;([a-z0-9])([A-Z])&quot;;&quot;$1_$2&quot;;&quot;g&quot;)); &quot;&quot;)" office:value-type="string" office:string-value="CUP1_STEADY" calcext:value-type="string">
            <text:p>CUP1_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[.A21]=1; TYPE([.A21])=8); [.A21]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table:style-name="ce11" table:formula="of:=IF([.H23]&lt;&gt;&quot;&quot;; UPPER(ORG.LIBREOFFICE.REGEX([.H23];&quot;([a-z0-9])([A-Z])&quot;;&quot;$1_$2&quot;;&quot;g&quot;)); &quot;&quot;)" office:value-type="string" office:string-value="CUP2_STEADY" calcext:value-type="string">
            <text:p>CUP2_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table:style-name="ce11" table:formula="of:=IF([.H24]&lt;&gt;&quot;&quot;; UPPER(ORG.LIBREOFFICE.REGEX([.H24];&quot;([a-z0-9])([A-Z])&quot;;&quot;$1_$2&quot;;&quot;g&quot;)); &quot;&quot;)" office:value-type="string" office:string-value="CUP3_STEADY" calcext:value-type="string">
            <text:p>CUP3_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4]=1; TYPE([.A24])=8); [.A24]+1; IF( OR([.A23]=1; TYPE([.A23])=8); [.A23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table:style-name="ce11" table:formula="of:=IF([.H25]&lt;&gt;&quot;&quot;; UPPER(ORG.LIBREOFFICE.REGEX([.H25];&quot;([a-z0-9])([A-Z])&quot;;&quot;$1_$2&quot;;&quot;g&quot;)); &quot;&quot;)" office:value-type="string" office:string-value="CUP1_INSERTED" calcext:value-type="string">
            <text:p>CUP1_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2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table:style-name="ce11" table:formula="of:=IF([.H26]&lt;&gt;&quot;&quot;; UPPER(ORG.LIBREOFFICE.REGEX([.H26];&quot;([a-z0-9])([A-Z])&quot;;&quot;$1_$2&quot;;&quot;g&quot;)); &quot;&quot;)" office:value-type="string" office:string-value="CUP2_INSERTED" calcext:value-type="string">
            <text:p>CUP2_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6]=1; TYPE([.A26])=8); [.A26]+1; IF( OR([.A25]=1; TYPE([.A25])=8); [.A25]+1; 0)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table:style-name="ce11" table:formula="of:=IF([.H27]&lt;&gt;&quot;&quot;; UPPER(ORG.LIBREOFFICE.REGEX([.H27];&quot;([a-z0-9])([A-Z])&quot;;&quot;$1_$2&quot;;&quot;g&quot;)); &quot;&quot;)" office:value-type="string" office:string-value="CUP3_INSERTED" calcext:value-type="string">
            <text:p>CUP3_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7]=1; TYPE([.A27])=8); [.A27]+1; IF( OR([.A26]=1; TYPE([.A26])=8); [.A26]+1; 0)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1Control</text:p>
          </table:table-cell>
          <table:table-cell table:style-name="ce11" table:formula="of:=IF([.H28]&lt;&gt;&quot;&quot;; UPPER(ORG.LIBREOFFICE.REGEX([.H28];&quot;([a-z0-9])([A-Z])&quot;;&quot;$1_$2&quot;;&quot;g&quot;)); &quot;&quot;)" office:value-type="string" office:string-value="ACTUATOR1_CONTROL" calcext:value-type="string">
            <text:p>ACTUATOR1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</text:p>
          </table:table-cell>
          <table:table-cell table:number-columns-repeated="16372"/>
        </table:table-row>
        <table:table-row table:style-name="ro1">
          <table:table-cell table:style-name="ce3" table:formula="of:=IF( OR([.A28]=1; TYPE([.A28])=8); [.A28]+1; IF( OR([.A27]=1; TYPE([.A27])=8); [.A27]+1; 0)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2Control</text:p>
          </table:table-cell>
          <table:table-cell table:style-name="ce11" table:formula="of:=IF([.H29]&lt;&gt;&quot;&quot;; UPPER(ORG.LIBREOFFICE.REGEX([.H29];&quot;([a-z0-9])([A-Z])&quot;;&quot;$1_$2&quot;;&quot;g&quot;)); &quot;&quot;)" office:value-type="string" office:string-value="ACTUATOR2_CONTROL" calcext:value-type="string">
            <text:p>ACTUATOR2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9]=1; TYPE([.A29])=8); [.A29]+1; IF( OR([.A28]=1; TYPE([.A28])=8); [.A28]+1; 0))" office:value-type="float" office:value="24" calcext:value-type="float">
            <text:p>2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In</text:p>
          </table:table-cell>
          <table:table-cell table:style-name="ce11" table:formula="of:=IF([.H30]&lt;&gt;&quot;&quot;; UPPER(ORG.LIBREOFFICE.REGEX([.H30];&quot;([a-z0-9])([A-Z])&quot;;&quot;$1_$2&quot;;&quot;g&quot;)); &quot;&quot;)" office:value-type="string" office:string-value="ACTUATOR3_CONTROL_IN" calcext:value-type="string">
            <text:p>ACTUATOR3_CONTROL_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0]=1; TYPE([.A30])=8); [.A30]+1; IF( OR([.A29]=1; TYPE([.A29])=8); [.A29]+1; 0))" office:value-type="float" office:value="25" calcext:value-type="float">
            <text:p>2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Out</text:p>
          </table:table-cell>
          <table:table-cell table:style-name="ce11" table:formula="of:=IF([.H31]&lt;&gt;&quot;&quot;; UPPER(ORG.LIBREOFFICE.REGEX([.H31];&quot;([a-z0-9])([A-Z])&quot;;&quot;$1_$2&quot;;&quot;g&quot;)); &quot;&quot;)" office:value-type="string" office:string-value="ACTUATOR3_CONTROL_OUT" calcext:value-type="string">
            <text:p>ACTUATOR3_CONTROL_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1]=1; TYPE([.A31])=8); [.A31]+1; IF( OR([.A30]=1; TYPE([.A30])=8); [.A30]+1; 0))" office:value-type="float" office:value="26" calcext:value-type="float">
            <text:p>2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Brake</text:p>
          </table:table-cell>
          <table:table-cell table:style-name="ce11" table:formula="of:=IF([.H32]&lt;&gt;&quot;&quot;; UPPER(ORG.LIBREOFFICE.REGEX([.H32];&quot;([a-z0-9])([A-Z])&quot;;&quot;$1_$2&quot;;&quot;g&quot;)); &quot;&quot;)" office:value-type="string" office:string-value="ACTUATOR3_CONTROL_BRAKE" calcext:value-type="string">
            <text:p>ACTUATOR3_CONTROL_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3]&lt;&gt;&quot;&quot;; UPPER(ORG.LIBREOFFICE.REGEX([.H33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/>
          <table:table-cell/>
          <table:table-cell table:style-name="ce10"/>
          <table:table-cell table:number-columns-repeated="5"/>
          <table:table-cell table:style-name="ce11" table:formula="of:=IF([.H34]&lt;&gt;&quot;&quot;; UPPER(ORG.LIBREOFFICE.REGEX([.H34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table:style-name="ce11" table:formula="of:=IF([.H35]&lt;&gt;&quot;&quot;; UPPER(ORG.LIBREOFFICE.REGEX([.H35];&quot;([a-z0-9])([A-Z])&quot;;&quot;$1_$2&quot;;&quot;g&quot;)); &quot;&quot;)" office:value-type="string" office:string-value="ERROR_CODE" calcext:value-type="string">
            <text:p>ERROR_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35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table:style-name="ce11" table:formula="of:=IF([.H36]&lt;&gt;&quot;&quot;; UPPER(ORG.LIBREOFFICE.REGEX([.H36];&quot;([a-z0-9])([A-Z])&quot;;&quot;$1_$2&quot;;&quot;g&quot;)); &quot;&quot;)" office:value-type="string" office:string-value="LAST_ERROR" calcext:value-type="string">
            <text:p>LAST_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table:style-name="ce11" table:formula="of:=IF([.H37]&lt;&gt;&quot;&quot;; UPPER(ORG.LIBREOFFICE.REGEX([.H37];&quot;([a-z0-9])([A-Z])&quot;;&quot;$1_$2&quot;;&quot;g&quot;)); &quot;&quot;)" office:value-type="string" office:string-value="ERROR_STORAGE" calcext:value-type="string">
            <text:p>ERROR_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8]&lt;&gt;&quot;&quot;; UPPER(ORG.LIBREOFFICE.REGEX([.H3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8]=1; TYPE([.A38])=8); [.A38]+1; IF( OR([.A37]=1; TYPE([.A37])=8); [.A37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11" table:formula="of:=IF([.H39]&lt;&gt;&quot;&quot;; UPPER(ORG.LIBREOFFICE.REGEX([.H39];&quot;([a-z0-9])([A-Z])&quot;;&quot;$1_$2&quot;;&quot;g&quot;)); &quot;&quot;)" office:value-type="string" office:string-value="TIME_LIMIT_INSERTING1" calcext:value-type="string">
            <text:p>TIME_LIMIT_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11" table:formula="of:=IF([.H40]&lt;&gt;&quot;&quot;; UPPER(ORG.LIBREOFFICE.REGEX([.H40];&quot;([a-z0-9])([A-Z])&quot;;&quot;$1_$2&quot;;&quot;g&quot;)); &quot;&quot;)" office:value-type="string" office:string-value="TIME_LIMIT_INSERTING2" calcext:value-type="string">
            <text:p>TIME_LIMIT_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0]=1; TYPE([.A40])=8); [.A40]+1; IF( OR([.A39]=1; TYPE([.A39])=8); [.A39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11" table:formula="of:=IF([.H41]&lt;&gt;&quot;&quot;; UPPER(ORG.LIBREOFFICE.REGEX([.H41];&quot;([a-z0-9])([A-Z])&quot;;&quot;$1_$2&quot;;&quot;g&quot;)); &quot;&quot;)" office:value-type="string" office:string-value="TIME_LIMIT_INSERTING3" calcext:value-type="string">
            <text:p>TIME_LIMIT_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1</text:p>
          </table:table-cell>
          <table:table-cell table:style-name="ce11" table:formula="of:=IF([.H42]&lt;&gt;&quot;&quot;; UPPER(ORG.LIBREOFFICE.REGEX([.H42];&quot;([a-z0-9])([A-Z])&quot;;&quot;$1_$2&quot;;&quot;g&quot;)); &quot;&quot;)" office:value-type="string" office:string-value="TIME_LIMIT_WITHDRAWING1" calcext:value-type="string">
            <text:p>TIME_LIMIT_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42]=1; TYPE([.A42])=8); [.A42]+1; IF( OR([.A41]=1; TYPE([.A41])=8); [.A41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2</text:p>
          </table:table-cell>
          <table:table-cell table:style-name="ce11" table:formula="of:=IF([.H43]&lt;&gt;&quot;&quot;; UPPER(ORG.LIBREOFFICE.REGEX([.H43];&quot;([a-z0-9])([A-Z])&quot;;&quot;$1_$2&quot;;&quot;g&quot;)); &quot;&quot;)" office:value-type="string" office:string-value="TIME_LIMIT_WITHDRAWING2" calcext:value-type="string">
            <text:p>TIME_LIMIT_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Withdrawing3</text:p>
          </table:table-cell>
          <table:table-cell table:style-name="ce11" table:formula="of:=IF([.H44]&lt;&gt;&quot;&quot;; UPPER(ORG.LIBREOFFICE.REGEX([.H44];&quot;([a-z0-9])([A-Z])&quot;;&quot;$1_$2&quot;;&quot;g&quot;)); &quot;&quot;)" office:value-type="string" office:string-value="TIME_LIMIT_WITHDRAWING3" calcext:value-type="string">
            <text:p>TIME_LIMIT_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45]&lt;&gt;&quot;&quot;; UPPER(ORG.LIBREOFFICE.REGEX([.H4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5]=1; TYPE([.A45])=8); [.A45]+1; IF( OR([.A44]=1; TYPE([.A44])=8); [.A44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table:style-name="ce11" table:formula="of:=IF([.H46]&lt;&gt;&quot;&quot;; UPPER(ORG.LIBREOFFICE.REGEX([.H46];&quot;([a-z0-9])([A-Z])&quot;;&quot;$1_$2&quot;;&quot;g&quot;)); &quot;&quot;)" office:value-type="string" office:string-value="ACTIVE_CUP" calcext:value-type="string">
            <text:p>ACTIVE_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47]&lt;&gt;&quot;&quot;; UPPER(ORG.LIBREOFFICE.REGEX([.H4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table:style-name="ce11" table:formula="of:=IF([.H48]&lt;&gt;&quot;&quot;; UPPER(ORG.LIBREOFFICE.REGEX([.H48];&quot;([a-z0-9])([A-Z])&quot;;&quot;$1_$2&quot;;&quot;g&quot;)); &quot;&quot;)" office:value-type="string" office:string-value="CUP1_ERROR" calcext:value-type="string">
            <text:p>CUP1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7]=1; TYPE([.A47])=8); [.A47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table:style-name="ce11" table:formula="of:=IF([.H49]&lt;&gt;&quot;&quot;; UPPER(ORG.LIBREOFFICE.REGEX([.H49];&quot;([a-z0-9])([A-Z])&quot;;&quot;$1_$2&quot;;&quot;g&quot;)); &quot;&quot;)" office:value-type="string" office:string-value="CUP2_ERROR" calcext:value-type="string">
            <text:p>CUP2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8]=1; TYPE([.A48])=8); [.A48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table:style-name="ce11" table:formula="of:=IF([.H50]&lt;&gt;&quot;&quot;; UPPER(ORG.LIBREOFFICE.REGEX([.H50];&quot;([a-z0-9])([A-Z])&quot;;&quot;$1_$2&quot;;&quot;g&quot;)); &quot;&quot;)" office:value-type="string" office:string-value="CUP3_ERROR" calcext:value-type="string">
            <text:p>CUP3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table:style-name="ce11" table:formula="of:=IF([.H51]&lt;&gt;&quot;&quot;; UPPER(ORG.LIBREOFFICE.REGEX([.H51];&quot;([a-z0-9])([A-Z])&quot;;&quot;$1_$2&quot;;&quot;g&quot;)); &quot;&quot;)" office:value-type="string" office:string-value="CUP1_LAST_ERROR" calcext:value-type="string">
            <text:p>CUP1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table:style-name="ce11" table:formula="of:=IF([.H52]&lt;&gt;&quot;&quot;; UPPER(ORG.LIBREOFFICE.REGEX([.H52];&quot;([a-z0-9])([A-Z])&quot;;&quot;$1_$2&quot;;&quot;g&quot;)); &quot;&quot;)" office:value-type="string" office:string-value="CUP2_LAST_ERROR" calcext:value-type="string">
            <text:p>CUP2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table:style-name="ce11" table:formula="of:=IF([.H53]&lt;&gt;&quot;&quot;; UPPER(ORG.LIBREOFFICE.REGEX([.H53];&quot;([a-z0-9])([A-Z])&quot;;&quot;$1_$2&quot;;&quot;g&quot;)); &quot;&quot;)" office:value-type="string" office:string-value="CUP3_LAST_ERROR" calcext:value-type="string">
            <text:p>CUP3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3]=1; TYPE([.A53])=8); [.A53]+1; IF( OR([.A52]=1; TYPE([.A52])=8); [.A52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table:style-name="ce11" table:formula="of:=IF([.H54]&lt;&gt;&quot;&quot;; UPPER(ORG.LIBREOFFICE.REGEX([.H54];&quot;([a-z0-9])([A-Z])&quot;;&quot;$1_$2&quot;;&quot;g&quot;)); &quot;&quot;)" office:value-type="string" office:string-value="CUP1_ERROR_STORAGE" calcext:value-type="string">
            <text:p>CUP1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table:style-name="ce11" table:formula="of:=IF([.H55]&lt;&gt;&quot;&quot;; UPPER(ORG.LIBREOFFICE.REGEX([.H55];&quot;([a-z0-9])([A-Z])&quot;;&quot;$1_$2&quot;;&quot;g&quot;)); &quot;&quot;)" office:value-type="string" office:string-value="CUP2_ERROR_STORAGE" calcext:value-type="string">
            <text:p>CUP2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table:style-name="ce11" table:formula="of:=IF([.H56]&lt;&gt;&quot;&quot;; UPPER(ORG.LIBREOFFICE.REGEX([.H56];&quot;([a-z0-9])([A-Z])&quot;;&quot;$1_$2&quot;;&quot;g&quot;)); &quot;&quot;)" office:value-type="string" office:string-value="CUP3_ERROR_STORAGE" calcext:value-type="string">
            <text:p>CUP3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57]&lt;&gt;&quot;&quot;; UPPER(ORG.LIBREOFFICE.REGEX([.H5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57]=1; TYPE([.A57])=8); [.A57]+1; IF( OR([.A56]=1; TYPE([.A56])=8); [.A56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1" table:formula="of:=IF([.H58]&lt;&gt;&quot;&quot;; UPPER(ORG.LIBREOFFICE.REGEX([.H58];&quot;([a-z0-9])([A-Z])&quot;;&quot;$1_$2&quot;;&quot;g&quot;)); &quot;&quot;)" office:value-type="string" office:string-value="INSTALLED_CUPS" calcext:value-type="string">
            <text:p>INSTALLED_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11" table:formula="of:=IF([.H59]&lt;&gt;&quot;&quot;; UPPER(ORG.LIBREOFFICE.REGEX([.H59];&quot;([a-z0-9])([A-Z])&quot;;&quot;$1_$2&quot;;&quot;g&quot;)); &quot;&quot;)" office:value-type="string" office:string-value="ELECTRODES_CUP1" calcext:value-type="string">
            <text:p>ELECTRODES_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11" table:formula="of:=IF([.H60]&lt;&gt;&quot;&quot;; UPPER(ORG.LIBREOFFICE.REGEX([.H60];&quot;([a-z0-9])([A-Z])&quot;;&quot;$1_$2&quot;;&quot;g&quot;)); &quot;&quot;)" office:value-type="string" office:string-value="ELECTRODES_CUP2" calcext:value-type="string">
            <text:p>ELECTRODES_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11" table:formula="of:=IF([.H61]&lt;&gt;&quot;&quot;; UPPER(ORG.LIBREOFFICE.REGEX([.H61];&quot;([a-z0-9])([A-Z])&quot;;&quot;$1_$2&quot;;&quot;g&quot;)); &quot;&quot;)" office:value-type="string" office:string-value="ELECTRODES_CUP3" calcext:value-type="string">
            <text:p>ELECTRODES_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1]=1; TYPE([.A61])=8); [.A61]+1; IF( OR([.A60]=1; TYPE([.A60])=8); [.A60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1" table:formula="of:=IF([.H62]&lt;&gt;&quot;&quot;; UPPER(ORG.LIBREOFFICE.REGEX([.H62];&quot;([a-z0-9])([A-Z])&quot;;&quot;$1_$2&quot;;&quot;g&quot;)); &quot;&quot;)" office:value-type="string" office:string-value="CUP1_TYPE" calcext:value-type="string">
            <text:p>CUP1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11" table:formula="of:=IF([.H63]&lt;&gt;&quot;&quot;; UPPER(ORG.LIBREOFFICE.REGEX([.H63];&quot;([a-z0-9])([A-Z])&quot;;&quot;$1_$2&quot;;&quot;g&quot;)); &quot;&quot;)" office:value-type="string" office:string-value="CUP2_TYPE" calcext:value-type="string">
            <text:p>CUP2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11" table:formula="of:=IF([.H64]&lt;&gt;&quot;&quot;; UPPER(ORG.LIBREOFFICE.REGEX([.H64];&quot;([a-z0-9])([A-Z])&quot;;&quot;$1_$2&quot;;&quot;g&quot;)); &quot;&quot;)" office:value-type="string" office:string-value="CUP3_TYPE" calcext:value-type="string">
            <text:p>CUP3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65]&lt;&gt;&quot;&quot;; UPPER(ORG.LIBREOFFICE.REGEX([.H6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65]=1; TYPE([.A65])=8); [.A65]+1; IF( OR([.A64]=1; TYPE([.A64])=8); [.A64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1Offset</text:p>
          </table:table-cell>
          <table:table-cell table:style-name="ce11" table:formula="of:=IF([.H66]&lt;&gt;&quot;&quot;; UPPER(ORG.LIBREOFFICE.REGEX([.H66];&quot;([a-z0-9])([A-Z])&quot;;&quot;$1_$2&quot;;&quot;g&quot;)); &quot;&quot;)" office:value-type="string" office:string-value="CUP1_CHANNEL1_GAIN1_OFFSET" calcext:value-type="string">
            <text:p>CUP1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; Gain1 applies to ADC0 (high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1Offset</text:p>
          </table:table-cell>
          <table:table-cell table:style-name="ce11" table:formula="of:=IF([.H67]&lt;&gt;&quot;&quot;; UPPER(ORG.LIBREOFFICE.REGEX([.H67];&quot;([a-z0-9])([A-Z])&quot;;&quot;$1_$2&quot;;&quot;g&quot;)); &quot;&quot;)" office:value-type="string" office:string-value="CUP1_CHANNEL2_GAIN1_OFFSET" calcext:value-type="string">
            <text:p>CUP1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1Offset</text:p>
          </table:table-cell>
          <table:table-cell table:style-name="ce11" table:formula="of:=IF([.H68]&lt;&gt;&quot;&quot;; UPPER(ORG.LIBREOFFICE.REGEX([.H68];&quot;([a-z0-9])([A-Z])&quot;;&quot;$1_$2&quot;;&quot;g&quot;)); &quot;&quot;)" office:value-type="string" office:string-value="CUP1_CHANNEL3_GAIN1_OFFSET" calcext:value-type="string">
            <text:p>CUP1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1Offset</text:p>
          </table:table-cell>
          <table:table-cell table:style-name="ce11" table:formula="of:=IF([.H69]&lt;&gt;&quot;&quot;; UPPER(ORG.LIBREOFFICE.REGEX([.H69];&quot;([a-z0-9])([A-Z])&quot;;&quot;$1_$2&quot;;&quot;g&quot;)); &quot;&quot;)" office:value-type="string" office:string-value="CUP1_CHANNEL4_GAIN1_OFFSET" calcext:value-type="string">
            <text:p>CUP1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1Offset</text:p>
          </table:table-cell>
          <table:table-cell table:style-name="ce11" table:formula="of:=IF([.H70]&lt;&gt;&quot;&quot;; UPPER(ORG.LIBREOFFICE.REGEX([.H70];&quot;([a-z0-9])([A-Z])&quot;;&quot;$1_$2&quot;;&quot;g&quot;)); &quot;&quot;)" office:value-type="string" office:string-value="CUP2_CHANNEL1_GAIN1_OFFSET" calcext:value-type="string">
            <text:p>CUP2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0]=1; TYPE([.A70])=8); [.A70]+1; IF( OR([.A69]=1; TYPE([.A69])=8); [.A69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1Offset</text:p>
          </table:table-cell>
          <table:table-cell table:style-name="ce11" table:formula="of:=IF([.H71]&lt;&gt;&quot;&quot;; UPPER(ORG.LIBREOFFICE.REGEX([.H71];&quot;([a-z0-9])([A-Z])&quot;;&quot;$1_$2&quot;;&quot;g&quot;)); &quot;&quot;)" office:value-type="string" office:string-value="CUP2_CHANNEL2_GAIN1_OFFSET" calcext:value-type="string">
            <text:p>CUP2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1Offset</text:p>
          </table:table-cell>
          <table:table-cell table:style-name="ce11" table:formula="of:=IF([.H72]&lt;&gt;&quot;&quot;; UPPER(ORG.LIBREOFFICE.REGEX([.H72];&quot;([a-z0-9])([A-Z])&quot;;&quot;$1_$2&quot;;&quot;g&quot;)); &quot;&quot;)" office:value-type="string" office:string-value="CUP2_CHANNEL3_GAIN1_OFFSET" calcext:value-type="string">
            <text:p>CUP2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1Offset</text:p>
          </table:table-cell>
          <table:table-cell table:style-name="ce11" table:formula="of:=IF([.H73]&lt;&gt;&quot;&quot;; UPPER(ORG.LIBREOFFICE.REGEX([.H73];&quot;([a-z0-9])([A-Z])&quot;;&quot;$1_$2&quot;;&quot;g&quot;)); &quot;&quot;)" office:value-type="string" office:string-value="CUP2_CHANNEL4_GAIN1_OFFSET" calcext:value-type="string">
            <text:p>CUP2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1Offset</text:p>
          </table:table-cell>
          <table:table-cell table:style-name="ce11" table:formula="of:=IF([.H74]&lt;&gt;&quot;&quot;; UPPER(ORG.LIBREOFFICE.REGEX([.H74];&quot;([a-z0-9])([A-Z])&quot;;&quot;$1_$2&quot;;&quot;g&quot;)); &quot;&quot;)" office:value-type="string" office:string-value="CUP3_CHANNEL1_GAIN1_OFFSET" calcext:value-type="string">
            <text:p>CUP3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73]=1; TYPE([.A73])=8); [.A73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1Offset</text:p>
          </table:table-cell>
          <table:table-cell table:style-name="ce11" table:formula="of:=IF([.H75]&lt;&gt;&quot;&quot;; UPPER(ORG.LIBREOFFICE.REGEX([.H75];&quot;([a-z0-9])([A-Z])&quot;;&quot;$1_$2&quot;;&quot;g&quot;)); &quot;&quot;)" office:value-type="string" office:string-value="CUP3_CHANNEL2_GAIN1_OFFSET" calcext:value-type="string">
            <text:p>CUP3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1Offset</text:p>
          </table:table-cell>
          <table:table-cell table:style-name="ce11" table:formula="of:=IF([.H76]&lt;&gt;&quot;&quot;; UPPER(ORG.LIBREOFFICE.REGEX([.H76];&quot;([a-z0-9])([A-Z])&quot;;&quot;$1_$2&quot;;&quot;g&quot;)); &quot;&quot;)" office:value-type="string" office:string-value="CUP3_CHANNEL3_GAIN1_OFFSET" calcext:value-type="string">
            <text:p>CUP3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1Offset</text:p>
          </table:table-cell>
          <table:table-cell table:style-name="ce11" table:formula="of:=IF([.H77]&lt;&gt;&quot;&quot;; UPPER(ORG.LIBREOFFICE.REGEX([.H77];&quot;([a-z0-9])([A-Z])&quot;;&quot;$1_$2&quot;;&quot;g&quot;)); &quot;&quot;)" office:value-type="string" office:string-value="CUP3_CHANNEL4_GAIN1_OFFSET" calcext:value-type="string">
            <text:p>CUP3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2Offset</text:p>
          </table:table-cell>
          <table:table-cell table:style-name="ce11" table:formula="of:=IF([.H78]&lt;&gt;&quot;&quot;; UPPER(ORG.LIBREOFFICE.REGEX([.H78];&quot;([a-z0-9])([A-Z])&quot;;&quot;$1_$2&quot;;&quot;g&quot;)); &quot;&quot;)" office:value-type="string" office:string-value="CUP1_CHANNEL1_GAIN2_OFFSET" calcext:value-type="string">
            <text:p>CUP1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 Gain2 applies to ADC1 (low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2Offset</text:p>
          </table:table-cell>
          <table:table-cell table:style-name="ce11" table:formula="of:=IF([.H79]&lt;&gt;&quot;&quot;; UPPER(ORG.LIBREOFFICE.REGEX([.H79];&quot;([a-z0-9])([A-Z])&quot;;&quot;$1_$2&quot;;&quot;g&quot;)); &quot;&quot;)" office:value-type="string" office:string-value="CUP1_CHANNEL2_GAIN2_OFFSET" calcext:value-type="string">
            <text:p>CUP1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2Offset</text:p>
          </table:table-cell>
          <table:table-cell table:style-name="ce11" table:formula="of:=IF([.H80]&lt;&gt;&quot;&quot;; UPPER(ORG.LIBREOFFICE.REGEX([.H80];&quot;([a-z0-9])([A-Z])&quot;;&quot;$1_$2&quot;;&quot;g&quot;)); &quot;&quot;)" office:value-type="string" office:string-value="CUP1_CHANNEL3_GAIN2_OFFSET" calcext:value-type="string">
            <text:p>CUP1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2Offset</text:p>
          </table:table-cell>
          <table:table-cell table:style-name="ce11" table:formula="of:=IF([.H81]&lt;&gt;&quot;&quot;; UPPER(ORG.LIBREOFFICE.REGEX([.H81];&quot;([a-z0-9])([A-Z])&quot;;&quot;$1_$2&quot;;&quot;g&quot;)); &quot;&quot;)" office:value-type="string" office:string-value="CUP1_CHANNEL4_GAIN2_OFFSET" calcext:value-type="string">
            <text:p>CUP1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2Offset</text:p>
          </table:table-cell>
          <table:table-cell table:style-name="ce11" table:formula="of:=IF([.H82]&lt;&gt;&quot;&quot;; UPPER(ORG.LIBREOFFICE.REGEX([.H82];&quot;([a-z0-9])([A-Z])&quot;;&quot;$1_$2&quot;;&quot;g&quot;)); &quot;&quot;)" office:value-type="string" office:string-value="CUP2_CHANNEL1_GAIN2_OFFSET" calcext:value-type="string">
            <text:p>CUP2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2Offset</text:p>
          </table:table-cell>
          <table:table-cell table:style-name="ce11" table:formula="of:=IF([.H83]&lt;&gt;&quot;&quot;; UPPER(ORG.LIBREOFFICE.REGEX([.H83];&quot;([a-z0-9])([A-Z])&quot;;&quot;$1_$2&quot;;&quot;g&quot;)); &quot;&quot;)" office:value-type="string" office:string-value="CUP2_CHANNEL2_GAIN2_OFFSET" calcext:value-type="string">
            <text:p>CUP2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2Offset</text:p>
          </table:table-cell>
          <table:table-cell table:style-name="ce11" table:formula="of:=IF([.H84]&lt;&gt;&quot;&quot;; UPPER(ORG.LIBREOFFICE.REGEX([.H84];&quot;([a-z0-9])([A-Z])&quot;;&quot;$1_$2&quot;;&quot;g&quot;)); &quot;&quot;)" office:value-type="string" office:string-value="CUP2_CHANNEL3_GAIN2_OFFSET" calcext:value-type="string">
            <text:p>CUP2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2Offset</text:p>
          </table:table-cell>
          <table:table-cell table:style-name="ce11" table:formula="of:=IF([.H85]&lt;&gt;&quot;&quot;; UPPER(ORG.LIBREOFFICE.REGEX([.H85];&quot;([a-z0-9])([A-Z])&quot;;&quot;$1_$2&quot;;&quot;g&quot;)); &quot;&quot;)" office:value-type="string" office:string-value="CUP2_CHANNEL4_GAIN2_OFFSET" calcext:value-type="string">
            <text:p>CUP2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2Offset</text:p>
          </table:table-cell>
          <table:table-cell table:style-name="ce11" table:formula="of:=IF([.H86]&lt;&gt;&quot;&quot;; UPPER(ORG.LIBREOFFICE.REGEX([.H86];&quot;([a-z0-9])([A-Z])&quot;;&quot;$1_$2&quot;;&quot;g&quot;)); &quot;&quot;)" office:value-type="string" office:string-value="CUP3_CHANNEL1_GAIN2_OFFSET" calcext:value-type="string">
            <text:p>CUP3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6]=1; TYPE([.A86])=8); [.A86]+1; IF( OR([.A85]=1; TYPE([.A85])=8); [.A85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2Offset</text:p>
          </table:table-cell>
          <table:table-cell table:style-name="ce11" table:formula="of:=IF([.H87]&lt;&gt;&quot;&quot;; UPPER(ORG.LIBREOFFICE.REGEX([.H87];&quot;([a-z0-9])([A-Z])&quot;;&quot;$1_$2&quot;;&quot;g&quot;)); &quot;&quot;)" office:value-type="string" office:string-value="CUP3_CHANNEL2_GAIN2_OFFSET" calcext:value-type="string">
            <text:p>CUP3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2Offset</text:p>
          </table:table-cell>
          <table:table-cell table:style-name="ce11" table:formula="of:=IF([.H88]&lt;&gt;&quot;&quot;; UPPER(ORG.LIBREOFFICE.REGEX([.H88];&quot;([a-z0-9])([A-Z])&quot;;&quot;$1_$2&quot;;&quot;g&quot;)); &quot;&quot;)" office:value-type="string" office:string-value="CUP3_CHANNEL3_GAIN2_OFFSET" calcext:value-type="string">
            <text:p>CUP3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2Offset</text:p>
          </table:table-cell>
          <table:table-cell table:style-name="ce11" table:formula="of:=IF([.H89]&lt;&gt;&quot;&quot;; UPPER(ORG.LIBREOFFICE.REGEX([.H89];&quot;([a-z0-9])([A-Z])&quot;;&quot;$1_$2&quot;;&quot;g&quot;)); &quot;&quot;)" office:value-type="string" office:string-value="CUP3_CHANNEL4_GAIN2_OFFSET" calcext:value-type="string">
            <text:p>CUP3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90]&lt;&gt;&quot;&quot;; UPPER(ORG.LIBREOFFICE.REGEX([.H90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1Factor</text:p>
          </table:table-cell>
          <table:table-cell table:style-name="ce11" table:formula="of:=IF([.H91]&lt;&gt;&quot;&quot;; UPPER(ORG.LIBREOFFICE.REGEX([.H91];&quot;([a-z0-9])([A-Z])&quot;;&quot;$1_$2&quot;;&quot;g&quot;)); &quot;&quot;)" office:value-type="string" office:string-value="CUP1_CHANNEL1_GAIN1_FACTOR" calcext:value-type="string">
            <text:p>CUP1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1 applies to ADC0; unit: pA/jedn.ADC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1Factor</text:p>
          </table:table-cell>
          <table:table-cell table:style-name="ce11" table:formula="of:=IF([.H92]&lt;&gt;&quot;&quot;; UPPER(ORG.LIBREOFFICE.REGEX([.H92];&quot;([a-z0-9])([A-Z])&quot;;&quot;$1_$2&quot;;&quot;g&quot;)); &quot;&quot;)" office:value-type="string" office:string-value="CUP1_CHANNEL2_GAIN1_FACTOR" calcext:value-type="string">
            <text:p>CUP1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1Factor</text:p>
          </table:table-cell>
          <table:table-cell table:style-name="ce11" table:formula="of:=IF([.H93]&lt;&gt;&quot;&quot;; UPPER(ORG.LIBREOFFICE.REGEX([.H93];&quot;([a-z0-9])([A-Z])&quot;;&quot;$1_$2&quot;;&quot;g&quot;)); &quot;&quot;)" office:value-type="string" office:string-value="CUP1_CHANNEL3_GAIN1_FACTOR" calcext:value-type="string">
            <text:p>CUP1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1Factor</text:p>
          </table:table-cell>
          <table:table-cell table:style-name="ce11" table:formula="of:=IF([.H94]&lt;&gt;&quot;&quot;; UPPER(ORG.LIBREOFFICE.REGEX([.H94];&quot;([a-z0-9])([A-Z])&quot;;&quot;$1_$2&quot;;&quot;g&quot;)); &quot;&quot;)" office:value-type="string" office:string-value="CUP1_CHANNEL4_GAIN1_FACTOR" calcext:value-type="string">
            <text:p>CUP1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1Factor</text:p>
          </table:table-cell>
          <table:table-cell table:style-name="ce11" table:formula="of:=IF([.H95]&lt;&gt;&quot;&quot;; UPPER(ORG.LIBREOFFICE.REGEX([.H95];&quot;([a-z0-9])([A-Z])&quot;;&quot;$1_$2&quot;;&quot;g&quot;)); &quot;&quot;)" office:value-type="string" office:string-value="CUP2_CHANNEL1_GAIN1_FACTOR" calcext:value-type="string">
            <text:p>CUP2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5]=1; TYPE([.A95])=8); [.A95]+1; IF( OR([.A94]=1; TYPE([.A94])=8); [.A94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1Factor</text:p>
          </table:table-cell>
          <table:table-cell table:style-name="ce11" table:formula="of:=IF([.H96]&lt;&gt;&quot;&quot;; UPPER(ORG.LIBREOFFICE.REGEX([.H96];&quot;([a-z0-9])([A-Z])&quot;;&quot;$1_$2&quot;;&quot;g&quot;)); &quot;&quot;)" office:value-type="string" office:string-value="CUP2_CHANNEL2_GAIN1_FACTOR" calcext:value-type="string">
            <text:p>CUP2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1Factor</text:p>
          </table:table-cell>
          <table:table-cell table:style-name="ce11" table:formula="of:=IF([.H97]&lt;&gt;&quot;&quot;; UPPER(ORG.LIBREOFFICE.REGEX([.H97];&quot;([a-z0-9])([A-Z])&quot;;&quot;$1_$2&quot;;&quot;g&quot;)); &quot;&quot;)" office:value-type="string" office:string-value="CUP2_CHANNEL3_GAIN1_FACTOR" calcext:value-type="string">
            <text:p>CUP2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1Factor</text:p>
          </table:table-cell>
          <table:table-cell table:style-name="ce11" table:formula="of:=IF([.H98]&lt;&gt;&quot;&quot;; UPPER(ORG.LIBREOFFICE.REGEX([.H98];&quot;([a-z0-9])([A-Z])&quot;;&quot;$1_$2&quot;;&quot;g&quot;)); &quot;&quot;)" office:value-type="string" office:string-value="CUP2_CHANNEL4_GAIN1_FACTOR" calcext:value-type="string">
            <text:p>CUP2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1Factor</text:p>
          </table:table-cell>
          <table:table-cell table:style-name="ce11" table:formula="of:=IF([.H99]&lt;&gt;&quot;&quot;; UPPER(ORG.LIBREOFFICE.REGEX([.H99];&quot;([a-z0-9])([A-Z])&quot;;&quot;$1_$2&quot;;&quot;g&quot;)); &quot;&quot;)" office:value-type="string" office:string-value="CUP3_CHANNEL1_GAIN1_FACTOR" calcext:value-type="string">
            <text:p>CUP3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1Factor</text:p>
          </table:table-cell>
          <table:table-cell table:style-name="ce11" table:formula="of:=IF([.H100]&lt;&gt;&quot;&quot;; UPPER(ORG.LIBREOFFICE.REGEX([.H100];&quot;([a-z0-9])([A-Z])&quot;;&quot;$1_$2&quot;;&quot;g&quot;)); &quot;&quot;)" office:value-type="string" office:string-value="CUP3_CHANNEL2_GAIN1_FACTOR" calcext:value-type="string">
            <text:p>CUP3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1Factor</text:p>
          </table:table-cell>
          <table:table-cell table:style-name="ce11" table:formula="of:=IF([.H101]&lt;&gt;&quot;&quot;; UPPER(ORG.LIBREOFFICE.REGEX([.H101];&quot;([a-z0-9])([A-Z])&quot;;&quot;$1_$2&quot;;&quot;g&quot;)); &quot;&quot;)" office:value-type="string" office:string-value="CUP3_CHANNEL3_GAIN1_FACTOR" calcext:value-type="string">
            <text:p>CUP3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1Factor</text:p>
          </table:table-cell>
          <table:table-cell table:style-name="ce11" table:formula="of:=IF([.H102]&lt;&gt;&quot;&quot;; UPPER(ORG.LIBREOFFICE.REGEX([.H102];&quot;([a-z0-9])([A-Z])&quot;;&quot;$1_$2&quot;;&quot;g&quot;)); &quot;&quot;)" office:value-type="string" office:string-value="CUP3_CHANNEL4_GAIN1_FACTOR" calcext:value-type="string">
            <text:p>CUP3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2Factor</text:p>
          </table:table-cell>
          <table:table-cell table:style-name="ce11" table:formula="of:=IF([.H103]&lt;&gt;&quot;&quot;; UPPER(ORG.LIBREOFFICE.REGEX([.H103];&quot;([a-z0-9])([A-Z])&quot;;&quot;$1_$2&quot;;&quot;g&quot;)); &quot;&quot;)" office:value-type="string" office:string-value="CUP1_CHANNEL1_GAIN2_FACTOR" calcext:value-type="string">
            <text:p>CUP1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2 applies to ADC1; unit: 10pA/jedn.ADC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2Factor</text:p>
          </table:table-cell>
          <table:table-cell table:style-name="ce11" table:formula="of:=IF([.H104]&lt;&gt;&quot;&quot;; UPPER(ORG.LIBREOFFICE.REGEX([.H104];&quot;([a-z0-9])([A-Z])&quot;;&quot;$1_$2&quot;;&quot;g&quot;)); &quot;&quot;)" office:value-type="string" office:string-value="CUP1_CHANNEL2_GAIN2_FACTOR" calcext:value-type="string">
            <text:p>CUP1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2Factor</text:p>
          </table:table-cell>
          <table:table-cell table:style-name="ce11" table:formula="of:=IF([.H105]&lt;&gt;&quot;&quot;; UPPER(ORG.LIBREOFFICE.REGEX([.H105];&quot;([a-z0-9])([A-Z])&quot;;&quot;$1_$2&quot;;&quot;g&quot;)); &quot;&quot;)" office:value-type="string" office:string-value="CUP1_CHANNEL3_GAIN2_FACTOR" calcext:value-type="string">
            <text:p>CUP1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2Factor</text:p>
          </table:table-cell>
          <table:table-cell table:style-name="ce11" table:formula="of:=IF([.H106]&lt;&gt;&quot;&quot;; UPPER(ORG.LIBREOFFICE.REGEX([.H106];&quot;([a-z0-9])([A-Z])&quot;;&quot;$1_$2&quot;;&quot;g&quot;)); &quot;&quot;)" office:value-type="string" office:string-value="CUP1_CHANNEL4_GAIN2_FACTOR" calcext:value-type="string">
            <text:p>CUP1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2Factor</text:p>
          </table:table-cell>
          <table:table-cell table:style-name="ce11" table:formula="of:=IF([.H107]&lt;&gt;&quot;&quot;; UPPER(ORG.LIBREOFFICE.REGEX([.H107];&quot;([a-z0-9])([A-Z])&quot;;&quot;$1_$2&quot;;&quot;g&quot;)); &quot;&quot;)" office:value-type="string" office:string-value="CUP2_CHANNEL1_GAIN2_FACTOR" calcext:value-type="string">
            <text:p>CUP2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2Factor</text:p>
          </table:table-cell>
          <table:table-cell table:style-name="ce11" table:formula="of:=IF([.H108]&lt;&gt;&quot;&quot;; UPPER(ORG.LIBREOFFICE.REGEX([.H108];&quot;([a-z0-9])([A-Z])&quot;;&quot;$1_$2&quot;;&quot;g&quot;)); &quot;&quot;)" office:value-type="string" office:string-value="CUP2_CHANNEL2_GAIN2_FACTOR" calcext:value-type="string">
            <text:p>CUP2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2Factor</text:p>
          </table:table-cell>
          <table:table-cell table:style-name="ce11" table:formula="of:=IF([.H109]&lt;&gt;&quot;&quot;; UPPER(ORG.LIBREOFFICE.REGEX([.H109];&quot;([a-z0-9])([A-Z])&quot;;&quot;$1_$2&quot;;&quot;g&quot;)); &quot;&quot;)" office:value-type="string" office:string-value="CUP2_CHANNEL3_GAIN2_FACTOR" calcext:value-type="string">
            <text:p>CUP2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2Factor</text:p>
          </table:table-cell>
          <table:table-cell table:style-name="ce11" table:formula="of:=IF([.H110]&lt;&gt;&quot;&quot;; UPPER(ORG.LIBREOFFICE.REGEX([.H110];&quot;([a-z0-9])([A-Z])&quot;;&quot;$1_$2&quot;;&quot;g&quot;)); &quot;&quot;)" office:value-type="string" office:string-value="CUP2_CHANNEL4_GAIN2_FACTOR" calcext:value-type="string">
            <text:p>CUP2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2Factor</text:p>
          </table:table-cell>
          <table:table-cell table:style-name="ce11" table:formula="of:=IF([.H111]&lt;&gt;&quot;&quot;; UPPER(ORG.LIBREOFFICE.REGEX([.H111];&quot;([a-z0-9])([A-Z])&quot;;&quot;$1_$2&quot;;&quot;g&quot;)); &quot;&quot;)" office:value-type="string" office:string-value="CUP3_CHANNEL1_GAIN2_FACTOR" calcext:value-type="string">
            <text:p>CUP3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1]=1; TYPE([.A111])=8); [.A111]+1; IF( OR([.A110]=1; TYPE([.A110])=8); [.A110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2Factor</text:p>
          </table:table-cell>
          <table:table-cell table:style-name="ce11" table:formula="of:=IF([.H112]&lt;&gt;&quot;&quot;; UPPER(ORG.LIBREOFFICE.REGEX([.H112];&quot;([a-z0-9])([A-Z])&quot;;&quot;$1_$2&quot;;&quot;g&quot;)); &quot;&quot;)" office:value-type="string" office:string-value="CUP3_CHANNEL2_GAIN2_FACTOR" calcext:value-type="string">
            <text:p>CUP3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2Factor</text:p>
          </table:table-cell>
          <table:table-cell table:style-name="ce11" table:formula="of:=IF([.H113]&lt;&gt;&quot;&quot;; UPPER(ORG.LIBREOFFICE.REGEX([.H113];&quot;([a-z0-9])([A-Z])&quot;;&quot;$1_$2&quot;;&quot;g&quot;)); &quot;&quot;)" office:value-type="string" office:string-value="CUP3_CHANNEL3_GAIN2_FACTOR" calcext:value-type="string">
            <text:p>CUP3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3]=1; TYPE([.A113])=8); [.A113]+1; IF( OR([.A112]=1; TYPE([.A112])=8); [.A112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2Factor</text:p>
          </table:table-cell>
          <table:table-cell table:style-name="ce11" table:formula="of:=IF([.H114]&lt;&gt;&quot;&quot;; UPPER(ORG.LIBREOFFICE.REGEX([.H114];&quot;([a-z0-9])([A-Z])&quot;;&quot;$1_$2&quot;;&quot;g&quot;)); &quot;&quot;)" office:value-type="string" office:string-value="CUP3_CHANNEL4_GAIN2_FACTOR" calcext:value-type="string">
            <text:p>CUP3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5]&lt;&gt;&quot;&quot;; UPPER(ORG.LIBREOFFICE.REGEX([.H11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angeChangeThreshold</text:p>
          </table:table-cell>
          <table:table-cell table:style-name="ce11" table:formula="of:=IF([.H116]&lt;&gt;&quot;&quot;; UPPER(ORG.LIBREOFFICE.REGEX([.H116];&quot;([a-z0-9])([A-Z])&quot;;&quot;$1_$2&quot;;&quot;g&quot;)); &quot;&quot;)" office:value-type="string" office:string-value="RANGE_CHANGE_THRESHOLD" calcext:value-type="string">
            <text:p>RANGE_CHANGE_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7]&lt;&gt;&quot;&quot;; UPPER(ORG.LIBREOFFICE.REGEX([.H11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11" table:formula="of:=IF([.H118]&lt;&gt;&quot;&quot;; UPPER(ORG.LIBREOFFICE.REGEX([.H118];&quot;([a-z0-9])([A-Z])&quot;;&quot;$1_$2&quot;;&quot;g&quot;)); &quot;&quot;)" office:value-type="string" office:string-value="CUP1_CHANNEL1_LOWER_LIMIT" calcext:value-type="string">
            <text:p>CUP1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11" table:formula="of:=IF([.H119]&lt;&gt;&quot;&quot;; UPPER(ORG.LIBREOFFICE.REGEX([.H119];&quot;([a-z0-9])([A-Z])&quot;;&quot;$1_$2&quot;;&quot;g&quot;)); &quot;&quot;)" office:value-type="string" office:string-value="CUP1_CHANNEL2_LOWER_LIMIT" calcext:value-type="string">
            <text:p>CUP1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11" table:formula="of:=IF([.H120]&lt;&gt;&quot;&quot;; UPPER(ORG.LIBREOFFICE.REGEX([.H120];&quot;([a-z0-9])([A-Z])&quot;;&quot;$1_$2&quot;;&quot;g&quot;)); &quot;&quot;)" office:value-type="string" office:string-value="CUP1_CHANNEL3_LOWER_LIMIT" calcext:value-type="string">
            <text:p>CUP1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0]=1; TYPE([.A120])=8); [.A120]+1; IF( OR([.A119]=1; TYPE([.A119])=8); [.A119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11" table:formula="of:=IF([.H121]&lt;&gt;&quot;&quot;; UPPER(ORG.LIBREOFFICE.REGEX([.H121];&quot;([a-z0-9])([A-Z])&quot;;&quot;$1_$2&quot;;&quot;g&quot;)); &quot;&quot;)" office:value-type="string" office:string-value="CUP1_CHANNEL4_LOWER_LIMIT" calcext:value-type="string">
            <text:p>CUP1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11" table:formula="of:=IF([.H122]&lt;&gt;&quot;&quot;; UPPER(ORG.LIBREOFFICE.REGEX([.H122];&quot;([a-z0-9])([A-Z])&quot;;&quot;$1_$2&quot;;&quot;g&quot;)); &quot;&quot;)" office:value-type="string" office:string-value="CUP2_CHANNEL1_LOWER_LIMIT" calcext:value-type="string">
            <text:p>CUP2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11" table:formula="of:=IF([.H123]&lt;&gt;&quot;&quot;; UPPER(ORG.LIBREOFFICE.REGEX([.H123];&quot;([a-z0-9])([A-Z])&quot;;&quot;$1_$2&quot;;&quot;g&quot;)); &quot;&quot;)" office:value-type="string" office:string-value="CUP2_CHANNEL2_LOWER_LIMIT" calcext:value-type="string">
            <text:p>CUP2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11" table:formula="of:=IF([.H124]&lt;&gt;&quot;&quot;; UPPER(ORG.LIBREOFFICE.REGEX([.H124];&quot;([a-z0-9])([A-Z])&quot;;&quot;$1_$2&quot;;&quot;g&quot;)); &quot;&quot;)" office:value-type="string" office:string-value="CUP2_CHANNEL3_LOWER_LIMIT" calcext:value-type="string">
            <text:p>CUP2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11" table:formula="of:=IF([.H125]&lt;&gt;&quot;&quot;; UPPER(ORG.LIBREOFFICE.REGEX([.H125];&quot;([a-z0-9])([A-Z])&quot;;&quot;$1_$2&quot;;&quot;g&quot;)); &quot;&quot;)" office:value-type="string" office:string-value="CUP2_CHANNEL4_LOWER_LIMIT" calcext:value-type="string">
            <text:p>CUP2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11" table:formula="of:=IF([.H126]&lt;&gt;&quot;&quot;; UPPER(ORG.LIBREOFFICE.REGEX([.H126];&quot;([a-z0-9])([A-Z])&quot;;&quot;$1_$2&quot;;&quot;g&quot;)); &quot;&quot;)" office:value-type="string" office:string-value="CUP3_CHANNEL1_LOWER_LIMIT" calcext:value-type="string">
            <text:p>CUP3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6]=1; TYPE([.A126])=8); [.A126]+1; IF( OR([.A125]=1; TYPE([.A125])=8); [.A125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11" table:formula="of:=IF([.H127]&lt;&gt;&quot;&quot;; UPPER(ORG.LIBREOFFICE.REGEX([.H127];&quot;([a-z0-9])([A-Z])&quot;;&quot;$1_$2&quot;;&quot;g&quot;)); &quot;&quot;)" office:value-type="string" office:string-value="CUP3_CHANNEL2_LOWER_LIMIT" calcext:value-type="string">
            <text:p>CUP3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11" table:formula="of:=IF([.H128]&lt;&gt;&quot;&quot;; UPPER(ORG.LIBREOFFICE.REGEX([.H128];&quot;([a-z0-9])([A-Z])&quot;;&quot;$1_$2&quot;;&quot;g&quot;)); &quot;&quot;)" office:value-type="string" office:string-value="CUP3_CHANNEL3_LOWER_LIMIT" calcext:value-type="string">
            <text:p>CUP3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11" table:formula="of:=IF([.H129]&lt;&gt;&quot;&quot;; UPPER(ORG.LIBREOFFICE.REGEX([.H129];&quot;([a-z0-9])([A-Z])&quot;;&quot;$1_$2&quot;;&quot;g&quot;)); &quot;&quot;)" office:value-type="string" office:string-value="CUP3_CHANNEL4_LOWER_LIMIT" calcext:value-type="string">
            <text:p>CUP3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30]&lt;&gt;&quot;&quot;; UPPER(ORG.LIBREOFFICE.REGEX([.H13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11" table:formula="of:=IF([.H131]&lt;&gt;&quot;&quot;; UPPER(ORG.LIBREOFFICE.REGEX([.H131];&quot;([a-z0-9])([A-Z])&quot;;&quot;$1_$2&quot;;&quot;g&quot;)); &quot;&quot;)" office:value-type="string" office:string-value="CUP1_CHANNEL1_UPPER_LIMIT" calcext:value-type="string">
            <text:p>CUP1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11" table:formula="of:=IF([.H132]&lt;&gt;&quot;&quot;; UPPER(ORG.LIBREOFFICE.REGEX([.H132];&quot;([a-z0-9])([A-Z])&quot;;&quot;$1_$2&quot;;&quot;g&quot;)); &quot;&quot;)" office:value-type="string" office:string-value="CUP1_CHANNEL2_UPPER_LIMIT" calcext:value-type="string">
            <text:p>CUP1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11" table:formula="of:=IF([.H133]&lt;&gt;&quot;&quot;; UPPER(ORG.LIBREOFFICE.REGEX([.H133];&quot;([a-z0-9])([A-Z])&quot;;&quot;$1_$2&quot;;&quot;g&quot;)); &quot;&quot;)" office:value-type="string" office:string-value="CUP1_CHANNEL3_UPPER_LIMIT" calcext:value-type="string">
            <text:p>CUP1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11" table:formula="of:=IF([.H134]&lt;&gt;&quot;&quot;; UPPER(ORG.LIBREOFFICE.REGEX([.H134];&quot;([a-z0-9])([A-Z])&quot;;&quot;$1_$2&quot;;&quot;g&quot;)); &quot;&quot;)" office:value-type="string" office:string-value="CUP1_CHANNEL4_UPPER_LIMIT" calcext:value-type="string">
            <text:p>CUP1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11" table:formula="of:=IF([.H135]&lt;&gt;&quot;&quot;; UPPER(ORG.LIBREOFFICE.REGEX([.H135];&quot;([a-z0-9])([A-Z])&quot;;&quot;$1_$2&quot;;&quot;g&quot;)); &quot;&quot;)" office:value-type="string" office:string-value="CUP2_CHANNEL1_UPPER_LIMIT" calcext:value-type="string">
            <text:p>CUP2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11" table:formula="of:=IF([.H136]&lt;&gt;&quot;&quot;; UPPER(ORG.LIBREOFFICE.REGEX([.H136];&quot;([a-z0-9])([A-Z])&quot;;&quot;$1_$2&quot;;&quot;g&quot;)); &quot;&quot;)" office:value-type="string" office:string-value="CUP2_CHANNEL2_UPPER_LIMIT" calcext:value-type="string">
            <text:p>CUP2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11" table:formula="of:=IF([.H137]&lt;&gt;&quot;&quot;; UPPER(ORG.LIBREOFFICE.REGEX([.H137];&quot;([a-z0-9])([A-Z])&quot;;&quot;$1_$2&quot;;&quot;g&quot;)); &quot;&quot;)" office:value-type="string" office:string-value="CUP2_CHANNEL3_UPPER_LIMIT" calcext:value-type="string">
            <text:p>CUP2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11" table:formula="of:=IF([.H138]&lt;&gt;&quot;&quot;; UPPER(ORG.LIBREOFFICE.REGEX([.H138];&quot;([a-z0-9])([A-Z])&quot;;&quot;$1_$2&quot;;&quot;g&quot;)); &quot;&quot;)" office:value-type="string" office:string-value="CUP2_CHANNEL4_UPPER_LIMIT" calcext:value-type="string">
            <text:p>CUP2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11" table:formula="of:=IF([.H139]&lt;&gt;&quot;&quot;; UPPER(ORG.LIBREOFFICE.REGEX([.H139];&quot;([a-z0-9])([A-Z])&quot;;&quot;$1_$2&quot;;&quot;g&quot;)); &quot;&quot;)" office:value-type="string" office:string-value="CUP3_CHANNEL1_UPPER_LIMIT" calcext:value-type="string">
            <text:p>CUP3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9]=1; TYPE([.A139])=8); [.A139]+1; IF( OR([.A138]=1; TYPE([.A138])=8); [.A138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11" table:formula="of:=IF([.H140]&lt;&gt;&quot;&quot;; UPPER(ORG.LIBREOFFICE.REGEX([.H140];&quot;([a-z0-9])([A-Z])&quot;;&quot;$1_$2&quot;;&quot;g&quot;)); &quot;&quot;)" office:value-type="string" office:string-value="CUP3_CHANNEL2_UPPER_LIMIT" calcext:value-type="string">
            <text:p>CUP3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11" table:formula="of:=IF([.H141]&lt;&gt;&quot;&quot;; UPPER(ORG.LIBREOFFICE.REGEX([.H141];&quot;([a-z0-9])([A-Z])&quot;;&quot;$1_$2&quot;;&quot;g&quot;)); &quot;&quot;)" office:value-type="string" office:string-value="CUP3_CHANNEL3_UPPER_LIMIT" calcext:value-type="string">
            <text:p>CUP3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11" table:formula="of:=IF([.H142]&lt;&gt;&quot;&quot;; UPPER(ORG.LIBREOFFICE.REGEX([.H142];&quot;([a-z0-9])([A-Z])&quot;;&quot;$1_$2&quot;;&quot;g&quot;)); &quot;&quot;)" office:value-type="string" office:string-value="CUP3_CHANNEL4_UPPER_LIMIT" calcext:value-type="string">
            <text:p>CUP3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43]&lt;&gt;&quot;&quot;; UPPER(ORG.LIBREOFFICE.REGEX([.H14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11" table:formula="of:=IF([.H144]&lt;&gt;&quot;&quot;; UPPER(ORG.LIBREOFFICE.REGEX([.H144];&quot;([a-z0-9])([A-Z])&quot;;&quot;$1_$2&quot;;&quot;g&quot;)); &quot;&quot;)" office:value-type="string" office:string-value="SIM_MECHANISM_PROPAGATION1_IN" calcext:value-type="string">
            <text:p>SIM_MECHANISM_PROPAGATION1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4]=1; TYPE([.A144])=8); [.A144]+1; IF( OR([.A143]=1; TYPE([.A143])=8); [.A143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11" table:formula="of:=IF([.H145]&lt;&gt;&quot;&quot;; UPPER(ORG.LIBREOFFICE.REGEX([.H145];&quot;([a-z0-9])([A-Z])&quot;;&quot;$1_$2&quot;;&quot;g&quot;)); &quot;&quot;)" office:value-type="string" office:string-value="SIM_MECHANISM_PROPAGATION1_IN_RAND" calcext:value-type="string">
            <text:p>SIM_MECHANISM_PROPAGATION1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5]=1; TYPE([.A145])=8); [.A145]+1; IF( OR([.A144]=1; TYPE([.A144])=8); [.A144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11" table:formula="of:=IF([.H146]&lt;&gt;&quot;&quot;; UPPER(ORG.LIBREOFFICE.REGEX([.H146];&quot;([a-z0-9])([A-Z])&quot;;&quot;$1_$2&quot;;&quot;g&quot;)); &quot;&quot;)" office:value-type="string" office:string-value="SIM_MECHANISM_PROPAGATION1_OUT" calcext:value-type="string">
            <text:p>SIM_MECHANISM_PROPAGATION1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11" table:formula="of:=IF([.H147]&lt;&gt;&quot;&quot;; UPPER(ORG.LIBREOFFICE.REGEX([.H147];&quot;([a-z0-9])([A-Z])&quot;;&quot;$1_$2&quot;;&quot;g&quot;)); &quot;&quot;)" office:value-type="string" office:string-value="SIM_MECHANISM_PROPAGATION1_OUT_RAND" calcext:value-type="string">
            <text:p>SIM_MECHANISM_PROPAGATION1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48]&lt;&gt;&quot;&quot;; UPPER(ORG.LIBREOFFICE.REGEX([.H148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11" table:formula="of:=IF([.H149]&lt;&gt;&quot;&quot;; UPPER(ORG.LIBREOFFICE.REGEX([.H149];&quot;([a-z0-9])([A-Z])&quot;;&quot;$1_$2&quot;;&quot;g&quot;)); &quot;&quot;)" office:value-type="string" office:string-value="SIM_MECHANISM_PROPAGATION2_IN" calcext:value-type="string">
            <text:p>SIM_MECHANISM_PROPAGATION2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9]=1; TYPE([.A149])=8); [.A149]+1; IF( OR([.A148]=1; TYPE([.A148])=8); [.A148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11" table:formula="of:=IF([.H150]&lt;&gt;&quot;&quot;; UPPER(ORG.LIBREOFFICE.REGEX([.H150];&quot;([a-z0-9])([A-Z])&quot;;&quot;$1_$2&quot;;&quot;g&quot;)); &quot;&quot;)" office:value-type="string" office:string-value="SIM_MECHANISM_PROPAGATION2_IN_RAND" calcext:value-type="string">
            <text:p>SIM_MECHANISM_PROPAGATION2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11" table:formula="of:=IF([.H151]&lt;&gt;&quot;&quot;; UPPER(ORG.LIBREOFFICE.REGEX([.H151];&quot;([a-z0-9])([A-Z])&quot;;&quot;$1_$2&quot;;&quot;g&quot;)); &quot;&quot;)" office:value-type="string" office:string-value="SIM_MECHANISM_PROPAGATION2_OUT" calcext:value-type="string">
            <text:p>SIM_MECHANISM_PROPAGATION2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11" table:formula="of:=IF([.H152]&lt;&gt;&quot;&quot;; UPPER(ORG.LIBREOFFICE.REGEX([.H152];&quot;([a-z0-9])([A-Z])&quot;;&quot;$1_$2&quot;;&quot;g&quot;)); &quot;&quot;)" office:value-type="string" office:string-value="SIM_MECHANISM_PROPAGATION2_OUT_RAND" calcext:value-type="string">
            <text:p>SIM_MECHANISM_PROPAGATION2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53]&lt;&gt;&quot;&quot;; UPPER(ORG.LIBREOFFICE.REGEX([.H15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11" table:formula="of:=IF([.H154]&lt;&gt;&quot;&quot;; UPPER(ORG.LIBREOFFICE.REGEX([.H154];&quot;([a-z0-9])([A-Z])&quot;;&quot;$1_$2&quot;;&quot;g&quot;)); &quot;&quot;)" office:value-type="string" office:string-value="SIM_MECHANISM_PROPAGATION3_IN" calcext:value-type="string">
            <text:p>SIM_MECHANISM_PROPAGATION3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11" table:formula="of:=IF([.H155]&lt;&gt;&quot;&quot;; UPPER(ORG.LIBREOFFICE.REGEX([.H155];&quot;([a-z0-9])([A-Z])&quot;;&quot;$1_$2&quot;;&quot;g&quot;)); &quot;&quot;)" office:value-type="string" office:string-value="SIM_MECHANISM_PROPAGATION3_IN_RAND" calcext:value-type="string">
            <text:p>SIM_MECHANISM_PROPAGATION3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11" table:formula="of:=IF([.H156]&lt;&gt;&quot;&quot;; UPPER(ORG.LIBREOFFICE.REGEX([.H156];&quot;([a-z0-9])([A-Z])&quot;;&quot;$1_$2&quot;;&quot;g&quot;)); &quot;&quot;)" office:value-type="string" office:string-value="SIM_MECHANISM_PROPAGATION3_OUT" calcext:value-type="string">
            <text:p>SIM_MECHANISM_PROPAGATION3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6]=1; TYPE([.A156])=8); [.A156]+1; IF( OR([.A155]=1; TYPE([.A155])=8); [.A155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11" table:formula="of:=IF([.H157]&lt;&gt;&quot;&quot;; UPPER(ORG.LIBREOFFICE.REGEX([.H157];&quot;([a-z0-9])([A-Z])&quot;;&quot;$1_$2&quot;;&quot;g&quot;)); &quot;&quot;)" office:value-type="string" office:string-value="SIM_MECHANISM_PROPAGATION3_OUT_RAND" calcext:value-type="string">
            <text:p>SIM_MECHANISM_PROPAGATION3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58]&lt;&gt;&quot;&quot;; UPPER(ORG.LIBREOFFICE.REGEX([.H158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8]=1; TYPE([.A158])=8); [.A158]+1; IF( OR([.A157]=1; TYPE([.A157])=8); [.A157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11" table:formula="of:=IF([.H159]&lt;&gt;&quot;&quot;; UPPER(ORG.LIBREOFFICE.REGEX([.H159];&quot;([a-z0-9])([A-Z])&quot;;&quot;$1_$2&quot;;&quot;g&quot;)); &quot;&quot;)" office:value-type="string" office:string-value="SIM_AMPLIFIER_CUP1_ELECTRODE1" calcext:value-type="string">
            <text:p>SIM_AMPLIFIER_CUP1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59]=1; TYPE([.A159])=8); [.A159]+1; IF( OR([.A158]=1; TYPE([.A158])=8); [.A158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11" table:formula="of:=IF([.H160]&lt;&gt;&quot;&quot;; UPPER(ORG.LIBREOFFICE.REGEX([.H160];&quot;([a-z0-9])([A-Z])&quot;;&quot;$1_$2&quot;;&quot;g&quot;)); &quot;&quot;)" office:value-type="string" office:string-value="SIM_AMPLIFIER_CUP1_ELECTRODE2" calcext:value-type="string">
            <text:p>SIM_AMPLIFIER_CUP1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11" table:formula="of:=IF([.H161]&lt;&gt;&quot;&quot;; UPPER(ORG.LIBREOFFICE.REGEX([.H161];&quot;([a-z0-9])([A-Z])&quot;;&quot;$1_$2&quot;;&quot;g&quot;)); &quot;&quot;)" office:value-type="string" office:string-value="SIM_AMPLIFIER_CUP1_ELECTRODE3" calcext:value-type="string">
            <text:p>SIM_AMPLIFIER_CUP1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60]=1; TYPE([.A160])=8); [.A160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11" table:formula="of:=IF([.H162]&lt;&gt;&quot;&quot;; UPPER(ORG.LIBREOFFICE.REGEX([.H162];&quot;([a-z0-9])([A-Z])&quot;;&quot;$1_$2&quot;;&quot;g&quot;)); &quot;&quot;)" office:value-type="string" office:string-value="SIM_AMPLIFIER_CUP1_ELECTRODE4" calcext:value-type="string">
            <text:p>SIM_AMPLIFIER_CUP1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11" table:formula="of:=IF([.H163]&lt;&gt;&quot;&quot;; UPPER(ORG.LIBREOFFICE.REGEX([.H163];&quot;([a-z0-9])([A-Z])&quot;;&quot;$1_$2&quot;;&quot;g&quot;)); &quot;&quot;)" office:value-type="string" office:string-value="SIM_AMPLIFIER_CUP2_ELECTRODE1" calcext:value-type="string">
            <text:p>SIM_AMPLIFIER_CUP2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11" table:formula="of:=IF([.H164]&lt;&gt;&quot;&quot;; UPPER(ORG.LIBREOFFICE.REGEX([.H164];&quot;([a-z0-9])([A-Z])&quot;;&quot;$1_$2&quot;;&quot;g&quot;)); &quot;&quot;)" office:value-type="string" office:string-value="SIM_AMPLIFIER_CUP2_ELECTRODE2" calcext:value-type="string">
            <text:p>SIM_AMPLIFIER_CUP2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11" table:formula="of:=IF([.H165]&lt;&gt;&quot;&quot;; UPPER(ORG.LIBREOFFICE.REGEX([.H165];&quot;([a-z0-9])([A-Z])&quot;;&quot;$1_$2&quot;;&quot;g&quot;)); &quot;&quot;)" office:value-type="string" office:string-value="SIM_AMPLIFIER_CUP2_ELECTRODE3" calcext:value-type="string">
            <text:p>SIM_AMPLIFIER_CUP2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11" table:formula="of:=IF([.H166]&lt;&gt;&quot;&quot;; UPPER(ORG.LIBREOFFICE.REGEX([.H166];&quot;([a-z0-9])([A-Z])&quot;;&quot;$1_$2&quot;;&quot;g&quot;)); &quot;&quot;)" office:value-type="string" office:string-value="SIM_AMPLIFIER_CUP2_ELECTRODE4" calcext:value-type="string">
            <text:p>SIM_AMPLIFIER_CUP2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11" table:formula="of:=IF([.H167]&lt;&gt;&quot;&quot;; UPPER(ORG.LIBREOFFICE.REGEX([.H167];&quot;([a-z0-9])([A-Z])&quot;;&quot;$1_$2&quot;;&quot;g&quot;)); &quot;&quot;)" office:value-type="string" office:string-value="SIM_AMPLIFIER_CUP3_ELECTRODE1" calcext:value-type="string">
            <text:p>SIM_AMPLIFIER_CUP3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11" table:formula="of:=IF([.H168]&lt;&gt;&quot;&quot;; UPPER(ORG.LIBREOFFICE.REGEX([.H168];&quot;([a-z0-9])([A-Z])&quot;;&quot;$1_$2&quot;;&quot;g&quot;)); &quot;&quot;)" office:value-type="string" office:string-value="SIM_AMPLIFIER_CUP3_ELECTRODE2" calcext:value-type="string">
            <text:p>SIM_AMPLIFIER_CUP3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11" table:formula="of:=IF([.H169]&lt;&gt;&quot;&quot;; UPPER(ORG.LIBREOFFICE.REGEX([.H169];&quot;([a-z0-9])([A-Z])&quot;;&quot;$1_$2&quot;;&quot;g&quot;)); &quot;&quot;)" office:value-type="string" office:string-value="SIM_AMPLIFIER_CUP3_ELECTRODE3" calcext:value-type="string">
            <text:p>SIM_AMPLIFIER_CUP3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9]=1; TYPE([.A169])=8); [.A169]+1; IF( OR([.A168]=1; TYPE([.A168])=8); [.A168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11" table:formula="of:=IF([.H170]&lt;&gt;&quot;&quot;; UPPER(ORG.LIBREOFFICE.REGEX([.H170];&quot;([a-z0-9])([A-Z])&quot;;&quot;$1_$2&quot;;&quot;g&quot;)); &quot;&quot;)" office:value-type="string" office:string-value="SIM_AMPLIFIER_CUP3_ELECTRODE4" calcext:value-type="string">
            <text:p>SIM_AMPLIFIER_CUP3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1]&lt;&gt;&quot;&quot;; UPPER(ORG.LIBREOFFICE.REGEX([.H171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1]=1; TYPE([.A171])=8); [.A171]+1; IF( OR([.A170]=1; TYPE([.A170])=8); [.A170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Rate</text:p>
          </table:table-cell>
          <table:table-cell table:style-name="ce11" table:formula="of:=IF([.H172]&lt;&gt;&quot;&quot;; UPPER(ORG.LIBREOFFICE.REGEX([.H172];&quot;([a-z0-9])([A-Z])&quot;;&quot;$1_$2&quot;;&quot;g&quot;)); &quot;&quot;)" office:value-type="string" office:string-value="SIM_AMPLIFIER_RANDOM_RATE" calcext:value-type="string">
            <text:p>SIM_AMPLIFIER_RANDOM_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172]=1; TYPE([.A172])=8); [.A172]+1; IF( OR([.A171]=1; TYPE([.A171])=8); [.A171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Offset</text:p>
          </table:table-cell>
          <table:table-cell table:style-name="ce11" table:formula="of:=IF([.H173]&lt;&gt;&quot;&quot;; UPPER(ORG.LIBREOFFICE.REGEX([.H173];&quot;([a-z0-9])([A-Z])&quot;;&quot;$1_$2&quot;;&quot;g&quot;)); &quot;&quot;)" office:value-type="string" office:string-value="SIM_AMPLIFIER_RANDOM_OFFSET" calcext:value-type="string">
            <text:p>SIM_AMPLIFIER_RANDOM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4]&lt;&gt;&quot;&quot;; UPPER(ORG.LIBREOFFICE.REGEX([.H17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Period</text:p>
          </table:table-cell>
          <table:table-cell table:style-name="ce11" table:formula="of:=IF([.H175]&lt;&gt;&quot;&quot;; UPPER(ORG.LIBREOFFICE.REGEX([.H175];&quot;([a-z0-9])([A-Z])&quot;;&quot;$1_$2&quot;;&quot;g&quot;)); &quot;&quot;)" office:value-type="string" office:string-value="SIM_EXTERNAL_LOCK_PERIOD" calcext:value-type="string">
            <text:p>SIM_EXTERNAL_LOCK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5]=1; TYPE([.A175])=8); [.A175]+1; IF( OR([.A174]=1; TYPE([.A174])=8); [.A174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uration</text:p>
          </table:table-cell>
          <table:table-cell table:style-name="ce11" table:formula="of:=IF([.H176]&lt;&gt;&quot;&quot;; UPPER(ORG.LIBREOFFICE.REGEX([.H176];&quot;([a-z0-9])([A-Z])&quot;;&quot;$1_$2&quot;;&quot;g&quot;)); &quot;&quot;)" office:value-type="string" office:string-value="SIM_EXTERNAL_LOCK_DURATION" calcext:value-type="string">
            <text:p>SIM_EXTERNAL_LOCK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76]=1; TYPE([.A176])=8); [.A176]+1; IF( OR([.A175]=1; TYPE([.A175])=8); [.A175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elay</text:p>
          </table:table-cell>
          <table:table-cell table:style-name="ce11" table:formula="of:=IF([.H177]&lt;&gt;&quot;&quot;; UPPER(ORG.LIBREOFFICE.REGEX([.H177];&quot;([a-z0-9])([A-Z])&quot;;&quot;$1_$2&quot;;&quot;g&quot;)); &quot;&quot;)" office:value-type="string" office:string-value="SIM_EXTERNAL_LOCK_DELAY" calcext:value-type="string">
            <text:p>SIM_EXTERNAL_LOCK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8]&lt;&gt;&quot;&quot;; UPPER(ORG.LIBREOFFICE.REGEX([.H178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Code</text:p>
          </table:table-cell>
          <table:table-cell table:style-name="ce11" table:formula="of:=IF([.H179]&lt;&gt;&quot;&quot;; UPPER(ORG.LIBREOFFICE.REGEX([.H179];&quot;([a-z0-9])([A-Z])&quot;;&quot;$1_$2&quot;;&quot;g&quot;)); &quot;&quot;)" office:value-type="string" office:string-value="SIM_EVENT_CODE" calcext:value-type="string">
            <text:p>SIM_EVENT_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179]=1; TYPE([.A179])=8); [.A179]+1; IF( OR([.A178]=1; TYPE([.A178])=8); [.A178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Period</text:p>
          </table:table-cell>
          <table:table-cell table:style-name="ce11" table:formula="of:=IF([.H180]&lt;&gt;&quot;&quot;; UPPER(ORG.LIBREOFFICE.REGEX([.H180];&quot;([a-z0-9])([A-Z])&quot;;&quot;$1_$2&quot;;&quot;g&quot;)); &quot;&quot;)" office:value-type="string" office:string-value="SIM_EVENT_PERIOD" calcext:value-type="string">
            <text:p>SIM_EVENT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uration</text:p>
          </table:table-cell>
          <table:table-cell table:style-name="ce11" table:formula="of:=IF([.H181]&lt;&gt;&quot;&quot;; UPPER(ORG.LIBREOFFICE.REGEX([.H181];&quot;([a-z0-9])([A-Z])&quot;;&quot;$1_$2&quot;;&quot;g&quot;)); &quot;&quot;)" office:value-type="string" office:string-value="SIM_EVENT_DURATION" calcext:value-type="string">
            <text:p>SIM_EVENT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81]=1; TYPE([.A181])=8); [.A181]+1; IF( OR([.A180]=1; TYPE([.A180])=8); [.A180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elay</text:p>
          </table:table-cell>
          <table:table-cell table:style-name="ce11" table:formula="of:=IF([.H182]&lt;&gt;&quot;&quot;; UPPER(ORG.LIBREOFFICE.REGEX([.H182];&quot;([a-z0-9])([A-Z])&quot;;&quot;$1_$2&quot;;&quot;g&quot;)); &quot;&quot;)" office:value-type="string" office:string-value="SIM_EVENT_DELAY" calcext:value-type="string">
            <text:p>SIM_EVENT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3]&lt;&gt;&quot;&quot;; UPPER(ORG.LIBREOFFICE.REGEX([.H18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3]=1; TYPE([.A183])=8); [.A183]+1; IF( OR([.A182]=1; TYPE([.A182])=8); [.A182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11" table:formula="of:=IF([.H184]&lt;&gt;&quot;&quot;; UPPER(ORG.LIBREOFFICE.REGEX([.H184];&quot;([a-z0-9])([A-Z])&quot;;&quot;$1_$2&quot;;&quot;g&quot;)); &quot;&quot;)" office:value-type="string" office:string-value="DEBUG_PRINTOUTS" calcext:value-type="string">
            <text:p>DEBUG_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184]=1; TYPE([.A184])=8); [.A184]+1; IF( OR([.A183]=1; TYPE([.A183])=8); [.A183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11" table:formula="of:=IF([.H185]&lt;&gt;&quot;&quot;; UPPER(ORG.LIBREOFFICE.REGEX([.H185];&quot;([a-z0-9])([A-Z])&quot;;&quot;$1_$2&quot;;&quot;g&quot;)); &quot;&quot;)" office:value-type="string" office:string-value="DEBUG_ARGUMENT1" calcext:value-type="string">
            <text:p>DEBUG_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6]&lt;&gt;&quot;&quot;; UPPER(ORG.LIBREOFFICE.REGEX([.H18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7]&lt;&gt;&quot;&quot;; UPPER(ORG.LIBREOFFICE.REGEX([.H18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table:style-name="ce11" table:formula="of:=IF([.H188]&lt;&gt;&quot;&quot;; UPPER(ORG.LIBREOFFICE.REGEX([.H188];&quot;([a-z0-9])([A-Z])&quot;;&quot;$1_$2&quot;;&quot;g&quot;)); &quot;&quot;)" office:value-type="string" office:string-value="CUP1_CHANNEL1_SAMPLE" calcext:value-type="string">
            <text:p>CUP1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188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table:style-name="ce11" table:formula="of:=IF([.H189]&lt;&gt;&quot;&quot;; UPPER(ORG.LIBREOFFICE.REGEX([.H189];&quot;([a-z0-9])([A-Z])&quot;;&quot;$1_$2&quot;;&quot;g&quot;)); &quot;&quot;)" office:value-type="string" office:string-value="CUP1_CHANNEL2_SAMPLE" calcext:value-type="string">
            <text:p>CUP1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9]=1; TYPE([.A189])=8); [.A189]+1; IF( OR([.A188]=1; TYPE([.A188])=8); [.A188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table:style-name="ce11" table:formula="of:=IF([.H190]&lt;&gt;&quot;&quot;; UPPER(ORG.LIBREOFFICE.REGEX([.H190];&quot;([a-z0-9])([A-Z])&quot;;&quot;$1_$2&quot;;&quot;g&quot;)); &quot;&quot;)" office:value-type="string" office:string-value="CUP1_CHANNEL3_SAMPLE" calcext:value-type="string">
            <text:p>CUP1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0]=1; TYPE([.A190])=8); [.A190]+1; IF( OR([.A189]=1; TYPE([.A189])=8); [.A189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table:style-name="ce11" table:formula="of:=IF([.H191]&lt;&gt;&quot;&quot;; UPPER(ORG.LIBREOFFICE.REGEX([.H191];&quot;([a-z0-9])([A-Z])&quot;;&quot;$1_$2&quot;;&quot;g&quot;)); &quot;&quot;)" office:value-type="string" office:string-value="CUP1_CHANNEL4_SAMPLE" calcext:value-type="string">
            <text:p>CUP1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1]=1; TYPE([.A191])=8); [.A191]+1; IF( OR([.A190]=1; TYPE([.A190])=8); [.A190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table:style-name="ce11" table:formula="of:=IF([.H192]&lt;&gt;&quot;&quot;; UPPER(ORG.LIBREOFFICE.REGEX([.H192];&quot;([a-z0-9])([A-Z])&quot;;&quot;$1_$2&quot;;&quot;g&quot;)); &quot;&quot;)" office:value-type="string" office:string-value="CUP1_CHANNEL_ERROR" calcext:value-type="string">
            <text:p>CUP1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3]&lt;&gt;&quot;&quot;; UPPER(ORG.LIBREOFFICE.REGEX([.H193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table:style-name="ce11" table:formula="of:=IF([.H194]&lt;&gt;&quot;&quot;; UPPER(ORG.LIBREOFFICE.REGEX([.H194];&quot;([a-z0-9])([A-Z])&quot;;&quot;$1_$2&quot;;&quot;g&quot;)); &quot;&quot;)" office:value-type="string" office:string-value="CUP2_CHANNEL1_SAMPLE" calcext:value-type="string">
            <text:p>CUP2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4]=1; TYPE([.A194])=8); [.A194]+1; IF( OR([.A193]=1; TYPE([.A193])=8); [.A193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table:style-name="ce11" table:formula="of:=IF([.H195]&lt;&gt;&quot;&quot;; UPPER(ORG.LIBREOFFICE.REGEX([.H195];&quot;([a-z0-9])([A-Z])&quot;;&quot;$1_$2&quot;;&quot;g&quot;)); &quot;&quot;)" office:value-type="string" office:string-value="CUP2_CHANNEL2_SAMPLE" calcext:value-type="string">
            <text:p>CUP2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5]=1; TYPE([.A195])=8); [.A195]+1; IF( OR([.A194]=1; TYPE([.A194])=8); [.A194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table:style-name="ce11" table:formula="of:=IF([.H196]&lt;&gt;&quot;&quot;; UPPER(ORG.LIBREOFFICE.REGEX([.H196];&quot;([a-z0-9])([A-Z])&quot;;&quot;$1_$2&quot;;&quot;g&quot;)); &quot;&quot;)" office:value-type="string" office:string-value="CUP2_CHANNEL3_SAMPLE" calcext:value-type="string">
            <text:p>CUP2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table:style-name="ce11" table:formula="of:=IF([.H197]&lt;&gt;&quot;&quot;; UPPER(ORG.LIBREOFFICE.REGEX([.H197];&quot;([a-z0-9])([A-Z])&quot;;&quot;$1_$2&quot;;&quot;g&quot;)); &quot;&quot;)" office:value-type="string" office:string-value="CUP2_CHANNEL4_SAMPLE" calcext:value-type="string">
            <text:p>CUP2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7]=1; TYPE([.A197])=8); [.A197]+1; IF( OR([.A196]=1; TYPE([.A196])=8); [.A196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table:style-name="ce11" table:formula="of:=IF([.H198]&lt;&gt;&quot;&quot;; UPPER(ORG.LIBREOFFICE.REGEX([.H198];&quot;([a-z0-9])([A-Z])&quot;;&quot;$1_$2&quot;;&quot;g&quot;)); &quot;&quot;)" office:value-type="string" office:string-value="CUP2_CHANNEL_ERROR" calcext:value-type="string">
            <text:p>CUP2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9]&lt;&gt;&quot;&quot;; UPPER(ORG.LIBREOFFICE.REGEX([.H199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table:style-name="ce11" table:formula="of:=IF([.H200]&lt;&gt;&quot;&quot;; UPPER(ORG.LIBREOFFICE.REGEX([.H200];&quot;([a-z0-9])([A-Z])&quot;;&quot;$1_$2&quot;;&quot;g&quot;)); &quot;&quot;)" office:value-type="string" office:string-value="CUP3_CHANNEL1_SAMPLE" calcext:value-type="string">
            <text:p>CUP3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0]=1; TYPE([.A200])=8); [.A200]+1; IF( OR([.A199]=1; TYPE([.A199])=8); [.A199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table:style-name="ce11" table:formula="of:=IF([.H201]&lt;&gt;&quot;&quot;; UPPER(ORG.LIBREOFFICE.REGEX([.H201];&quot;([a-z0-9])([A-Z])&quot;;&quot;$1_$2&quot;;&quot;g&quot;)); &quot;&quot;)" office:value-type="string" office:string-value="CUP3_CHANNEL2_SAMPLE" calcext:value-type="string">
            <text:p>CUP3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1]=1; TYPE([.A201])=8); [.A201]+1; IF( OR([.A200]=1; TYPE([.A200])=8); [.A200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table:style-name="ce11" table:formula="of:=IF([.H202]&lt;&gt;&quot;&quot;; UPPER(ORG.LIBREOFFICE.REGEX([.H202];&quot;([a-z0-9])([A-Z])&quot;;&quot;$1_$2&quot;;&quot;g&quot;)); &quot;&quot;)" office:value-type="string" office:string-value="CUP3_CHANNEL3_SAMPLE" calcext:value-type="string">
            <text:p>CUP3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table:style-name="ce11" table:formula="of:=IF([.H203]&lt;&gt;&quot;&quot;; UPPER(ORG.LIBREOFFICE.REGEX([.H203];&quot;([a-z0-9])([A-Z])&quot;;&quot;$1_$2&quot;;&quot;g&quot;)); &quot;&quot;)" office:value-type="string" office:string-value="CUP3_CHANNEL4_SAMPLE" calcext:value-type="string">
            <text:p>CUP3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3]=1; TYPE([.A203])=8); [.A203]+1; IF( OR([.A202]=1; TYPE([.A202])=8); [.A202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table:style-name="ce11" table:formula="of:=IF([.H204]&lt;&gt;&quot;&quot;; UPPER(ORG.LIBREOFFICE.REGEX([.H204];&quot;([a-z0-9])([A-Z])&quot;;&quot;$1_$2&quot;;&quot;g&quot;)); &quot;&quot;)" office:value-type="string" office:string-value="CUP3_CHANNEL_ERROR" calcext:value-type="string">
            <text:p>CUP3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209])/16)*2" office:value-type="float" office:value="0" calcext:value-type="float">
            <text:p>0</text:p>
          </table:table-cell>
          <table:table-cell office:value-type="string" calcext:value-type="string">
            <text:p>B <text:s/>=</text:p>
          </table:table-cell>
          <table:table-cell table:formula="of:=DEC2HEX([.C210]; 4)" office:value-type="string" office:string-value="0000" calcext:value-type="string">
            <text:p>0000</text:p>
          </table:table-cell>
          <table:table-cell table:style-name="ce7" office:value-type="string" calcext:value-type="string">
            <text:p>hex</text:p>
          </table:table-cell>
          <table:table-cell table:number-columns-repeated="16378"/>
        </table:table-row>
        <table:table-row table:style-name="ro1" table:number-rows-repeated="10483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2" table:number-columns-repeated="16381" table:default-cell-style-name="ce13"/>
        <table:table-row table:style-name="ro1" table:number-rows-repeated="2">
          <table:table-cell table:number-columns-repeated="16384"/>
        </table:table-row>
        <table:table-row table:style-name="ro1">
          <table:table-cell table:formula="of:=IF([$Sheet1.A3] &lt;&gt;&quot;&quot;; &quot;#define &quot;; &quot;&quot;)" office:value-type="string" office:string-value="#define " calcext:value-type="string">
            <text:p>#define </text:p>
          </table:table-cell>
          <table:table-cell table:formula="of:=IF([$Sheet1.A3] &lt;&gt;&quot;&quot;; [$Sheet1.I3]; &quot;&quot;)" office:value-type="string" office:string-value="CUP1_CONTROL" calcext:value-type="string">
            <text:p>CUP1_CONTROL</text:p>
          </table:table-cell>
          <table:table-cell table:formula="of:=IF([$Sheet1.A3] &lt;&gt;&quot;&quot;; &quot; &quot;; &quot;&quot;)" office:value-type="string" office:string-value=" " calcext:value-type="string">
            <text:p><text:s/></text:p>
          </table:table-cell>
          <table:table-cell table:formula="of:=IF([$Sheet1.A3] &lt;&gt;&quot;&quot;; [$Sheet1.A3]; &quot;&quot;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formula="of:=IF([$Sheet1.A4] &lt;&gt;&quot;&quot;; &quot;#define &quot;; &quot;&quot;)" office:value-type="string" office:string-value="#define " calcext:value-type="string">
            <text:p>#define </text:p>
          </table:table-cell>
          <table:table-cell table:formula="of:=IF([$Sheet1.A4] &lt;&gt;&quot;&quot;; [$Sheet1.I4]; &quot;&quot;)" office:value-type="string" office:string-value="EXTERNAL_INHIBITION1" calcext:value-type="string">
            <text:p>EXTERNAL_INHIBITION1</text:p>
          </table:table-cell>
          <table:table-cell table:formula="of:=IF([$Sheet1.A4] &lt;&gt;&quot;&quot;; &quot; &quot;; &quot;&quot;)" office:value-type="string" office:string-value=" " calcext:value-type="string">
            <text:p><text:s/></text:p>
          </table:table-cell>
          <table:table-cell table:formula="of:=IF([$Sheet1.A4] &lt;&gt;&quot;&quot;; [$Sheet1.A4]; &quot;&quot;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formula="of:=IF([$Sheet1.A5] &lt;&gt;&quot;&quot;; &quot;#define &quot;; &quot;&quot;)" office:value-type="string" office:string-value="#define " calcext:value-type="string">
            <text:p>#define </text:p>
          </table:table-cell>
          <table:table-cell table:formula="of:=IF([$Sheet1.A5] &lt;&gt;&quot;&quot;; [$Sheet1.I5]; &quot;&quot;)" office:value-type="string" office:string-value="CUP1_SWITCH" calcext:value-type="string">
            <text:p>CUP1_SWITCH</text:p>
          </table:table-cell>
          <table:table-cell table:formula="of:=IF([$Sheet1.A5] &lt;&gt;&quot;&quot;; &quot; &quot;; &quot;&quot;)" office:value-type="string" office:string-value=" " calcext:value-type="string">
            <text:p><text:s/></text:p>
          </table:table-cell>
          <table:table-cell table:formula="of:=IF([$Sheet1.A5] &lt;&gt;&quot;&quot;; [$Sheet1.A5]; &quot;&quot;)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formula="of:=IF([$Sheet1.A6] &lt;&gt;&quot;&quot;; &quot;#define &quot;; &quot;&quot;)" office:value-type="string" office:string-value="#define " calcext:value-type="string">
            <text:p>#define </text:p>
          </table:table-cell>
          <table:table-cell table:formula="of:=IF([$Sheet1.A6] &lt;&gt;&quot;&quot;; [$Sheet1.I6]; &quot;&quot;)">
            <text:p/>
          </table:table-cell>
          <table:table-cell table:formula="of:=IF([$Sheet1.A6] &lt;&gt;&quot;&quot;; &quot; &quot;; &quot;&quot;)" office:value-type="string" office:string-value=" " calcext:value-type="string">
            <text:p><text:s/></text:p>
          </table:table-cell>
          <table:table-cell table:formula="of:=IF([$Sheet1.A6] &lt;&gt;&quot;&quot;; [$Sheet1.A6]; &quot;&quot;)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formula="of:=IF([$Sheet1.A7] &lt;&gt;&quot;&quot;; &quot;#define &quot;; &quot;&quot;)">
            <text:p/>
          </table:table-cell>
          <table:table-cell table:formula="of:=IF([$Sheet1.A7] &lt;&gt;&quot;&quot;; [$Sheet1.I7]; &quot;&quot;)">
            <text:p/>
          </table:table-cell>
          <table:table-cell table:formula="of:=IF([$Sheet1.A7] &lt;&gt;&quot;&quot;; &quot; &quot;; &quot;&quot;)">
            <text:p/>
          </table:table-cell>
          <table:table-cell table:formula="of:=IF([$Sheet1.A7] &lt;&gt;&quot;&quot;; [$Sheet1.A7]; &quot;&quot;)">
            <text:p/>
          </table:table-cell>
          <table:table-cell table:number-columns-repeated="16380"/>
        </table:table-row>
        <table:table-row table:style-name="ro1">
          <table:table-cell table:formula="of:=IF([$Sheet1.A8] &lt;&gt;&quot;&quot;; &quot;#define &quot;; &quot;&quot;)" office:value-type="string" office:string-value="#define " calcext:value-type="string">
            <text:p>#define </text:p>
          </table:table-cell>
          <table:table-cell table:formula="of:=IF([$Sheet1.A8] &lt;&gt;&quot;&quot;; [$Sheet1.I8]; &quot;&quot;)" office:value-type="string" office:string-value="CUP2_CONTROL" calcext:value-type="string">
            <text:p>CUP2_CONTROL</text:p>
          </table:table-cell>
          <table:table-cell table:formula="of:=IF([$Sheet1.A8] &lt;&gt;&quot;&quot;; &quot; &quot;; &quot;&quot;)" office:value-type="string" office:string-value=" " calcext:value-type="string">
            <text:p><text:s/></text:p>
          </table:table-cell>
          <table:table-cell table:formula="of:=IF([$Sheet1.A8] &lt;&gt;&quot;&quot;; [$Sheet1.A8]; &quot;&quot;)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formula="of:=IF([$Sheet1.A9] &lt;&gt;&quot;&quot;; &quot;#define &quot;; &quot;&quot;)" office:value-type="string" office:string-value="#define " calcext:value-type="string">
            <text:p>#define </text:p>
          </table:table-cell>
          <table:table-cell table:formula="of:=IF([$Sheet1.A9] &lt;&gt;&quot;&quot;; [$Sheet1.I9]; &quot;&quot;)" office:value-type="string" office:string-value="EXTERNAL_INHIBITION2" calcext:value-type="string">
            <text:p>EXTERNAL_INHIBITION2</text:p>
          </table:table-cell>
          <table:table-cell table:formula="of:=IF([$Sheet1.A9] &lt;&gt;&quot;&quot;; &quot; &quot;; &quot;&quot;)" office:value-type="string" office:string-value=" " calcext:value-type="string">
            <text:p><text:s/></text:p>
          </table:table-cell>
          <table:table-cell table:formula="of:=IF([$Sheet1.A9] &lt;&gt;&quot;&quot;; [$Sheet1.A9]; &quot;&quot;)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formula="of:=IF([$Sheet1.A10] &lt;&gt;&quot;&quot;; &quot;#define &quot;; &quot;&quot;)" office:value-type="string" office:string-value="#define " calcext:value-type="string">
            <text:p>#define </text:p>
          </table:table-cell>
          <table:table-cell table:formula="of:=IF([$Sheet1.A10] &lt;&gt;&quot;&quot;; [$Sheet1.I10]; &quot;&quot;)" office:value-type="string" office:string-value="CUP2_SWITCH" calcext:value-type="string">
            <text:p>CUP2_SWITCH</text:p>
          </table:table-cell>
          <table:table-cell table:formula="of:=IF([$Sheet1.A10] &lt;&gt;&quot;&quot;; &quot; &quot;; &quot;&quot;)" office:value-type="string" office:string-value=" " calcext:value-type="string">
            <text:p><text:s/></text:p>
          </table:table-cell>
          <table:table-cell table:formula="of:=IF([$Sheet1.A10] &lt;&gt;&quot;&quot;; [$Sheet1.A10]; &quot;&quot;)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formula="of:=IF([$Sheet1.A11] &lt;&gt;&quot;&quot;; &quot;#define &quot;; &quot;&quot;)" office:value-type="string" office:string-value="#define " calcext:value-type="string">
            <text:p>#define </text:p>
          </table:table-cell>
          <table:table-cell table:formula="of:=IF([$Sheet1.A11] &lt;&gt;&quot;&quot;; [$Sheet1.I11]; &quot;&quot;)">
            <text:p/>
          </table:table-cell>
          <table:table-cell table:formula="of:=IF([$Sheet1.A11] &lt;&gt;&quot;&quot;; &quot; &quot;; &quot;&quot;)" office:value-type="string" office:string-value=" " calcext:value-type="string">
            <text:p><text:s/></text:p>
          </table:table-cell>
          <table:table-cell table:formula="of:=IF([$Sheet1.A11] &lt;&gt;&quot;&quot;; [$Sheet1.A11]; &quot;&quot;)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formula="of:=IF([$Sheet1.A12] &lt;&gt;&quot;&quot;; &quot;#define &quot;; &quot;&quot;)">
            <text:p/>
          </table:table-cell>
          <table:table-cell table:formula="of:=IF([$Sheet1.A12] &lt;&gt;&quot;&quot;; [$Sheet1.I12]; &quot;&quot;)">
            <text:p/>
          </table:table-cell>
          <table:table-cell table:formula="of:=IF([$Sheet1.A12] &lt;&gt;&quot;&quot;; &quot; &quot;; &quot;&quot;)">
            <text:p/>
          </table:table-cell>
          <table:table-cell table:formula="of:=IF([$Sheet1.A12] &lt;&gt;&quot;&quot;; [$Sheet1.A12]; &quot;&quot;)">
            <text:p/>
          </table:table-cell>
          <table:table-cell table:number-columns-repeated="16380"/>
        </table:table-row>
        <table:table-row table:style-name="ro1">
          <table:table-cell table:formula="of:=IF([$Sheet1.A13] &lt;&gt;&quot;&quot;; &quot;#define &quot;; &quot;&quot;)" office:value-type="string" office:string-value="#define " calcext:value-type="string">
            <text:p>#define </text:p>
          </table:table-cell>
          <table:table-cell table:formula="of:=IF([$Sheet1.A13] &lt;&gt;&quot;&quot;; [$Sheet1.I13]; &quot;&quot;)" office:value-type="string" office:string-value="CUP3_CONTROL" calcext:value-type="string">
            <text:p>CUP3_CONTROL</text:p>
          </table:table-cell>
          <table:table-cell table:formula="of:=IF([$Sheet1.A13] &lt;&gt;&quot;&quot;; &quot; &quot;; &quot;&quot;)" office:value-type="string" office:string-value=" " calcext:value-type="string">
            <text:p><text:s/></text:p>
          </table:table-cell>
          <table:table-cell table:formula="of:=IF([$Sheet1.A13] &lt;&gt;&quot;&quot;; [$Sheet1.A13]; &quot;&quot;)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formula="of:=IF([$Sheet1.A14] &lt;&gt;&quot;&quot;; &quot;#define &quot;; &quot;&quot;)" office:value-type="string" office:string-value="#define " calcext:value-type="string">
            <text:p>#define </text:p>
          </table:table-cell>
          <table:table-cell table:formula="of:=IF([$Sheet1.A14] &lt;&gt;&quot;&quot;; [$Sheet1.I14]; &quot;&quot;)" office:value-type="string" office:string-value="EXTERNAL_INHIBITION3" calcext:value-type="string">
            <text:p>EXTERNAL_INHIBITION3</text:p>
          </table:table-cell>
          <table:table-cell table:formula="of:=IF([$Sheet1.A14] &lt;&gt;&quot;&quot;; &quot; &quot;; &quot;&quot;)" office:value-type="string" office:string-value=" " calcext:value-type="string">
            <text:p><text:s/></text:p>
          </table:table-cell>
          <table:table-cell table:formula="of:=IF([$Sheet1.A14] &lt;&gt;&quot;&quot;; [$Sheet1.A14]; &quot;&quot;)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formula="of:=IF([$Sheet1.A15] &lt;&gt;&quot;&quot;; &quot;#define &quot;; &quot;&quot;)" office:value-type="string" office:string-value="#define " calcext:value-type="string">
            <text:p>#define </text:p>
          </table:table-cell>
          <table:table-cell table:formula="of:=IF([$Sheet1.A15] &lt;&gt;&quot;&quot;; [$Sheet1.I15]; &quot;&quot;)" office:value-type="string" office:string-value="CUP3_SWITCH1" calcext:value-type="string">
            <text:p>CUP3_SWITCH1</text:p>
          </table:table-cell>
          <table:table-cell table:formula="of:=IF([$Sheet1.A15] &lt;&gt;&quot;&quot;; &quot; &quot;; &quot;&quot;)" office:value-type="string" office:string-value=" " calcext:value-type="string">
            <text:p><text:s/></text:p>
          </table:table-cell>
          <table:table-cell table:formula="of:=IF([$Sheet1.A15] &lt;&gt;&quot;&quot;; [$Sheet1.A15]; &quot;&quot;)"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table:formula="of:=IF([$Sheet1.A16] &lt;&gt;&quot;&quot;; &quot;#define &quot;; &quot;&quot;)" office:value-type="string" office:string-value="#define " calcext:value-type="string">
            <text:p>#define </text:p>
          </table:table-cell>
          <table:table-cell table:formula="of:=IF([$Sheet1.A16] &lt;&gt;&quot;&quot;; [$Sheet1.I16]; &quot;&quot;)" office:value-type="string" office:string-value="CUP3_SWITCH2" calcext:value-type="string">
            <text:p>CUP3_SWITCH2</text:p>
          </table:table-cell>
          <table:table-cell table:formula="of:=IF([$Sheet1.A16] &lt;&gt;&quot;&quot;; &quot; &quot;; &quot;&quot;)" office:value-type="string" office:string-value=" " calcext:value-type="string">
            <text:p><text:s/></text:p>
          </table:table-cell>
          <table:table-cell table:formula="of:=IF([$Sheet1.A16] &lt;&gt;&quot;&quot;; [$Sheet1.A16]; &quot;&quot;)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table:formula="of:=IF([$Sheet1.A17] &lt;&gt;&quot;&quot;; &quot;#define &quot;; &quot;&quot;)">
            <text:p/>
          </table:table-cell>
          <table:table-cell table:formula="of:=IF([$Sheet1.A17] &lt;&gt;&quot;&quot;; [$Sheet1.I17]; &quot;&quot;)">
            <text:p/>
          </table:table-cell>
          <table:table-cell table:formula="of:=IF([$Sheet1.A17] &lt;&gt;&quot;&quot;; &quot; &quot;; &quot;&quot;)">
            <text:p/>
          </table:table-cell>
          <table:table-cell table:formula="of:=IF([$Sheet1.A17] &lt;&gt;&quot;&quot;; [$Sheet1.A17]; &quot;&quot;)">
            <text:p/>
          </table:table-cell>
          <table:table-cell table:number-columns-repeated="16380"/>
        </table:table-row>
        <table:table-row table:style-name="ro1">
          <table:table-cell table:formula="of:=IF([$Sheet1.A18] &lt;&gt;&quot;&quot;; &quot;#define &quot;; &quot;&quot;)" office:value-type="string" office:string-value="#define " calcext:value-type="string">
            <text:p>#define </text:p>
          </table:table-cell>
          <table:table-cell table:formula="of:=IF([$Sheet1.A18] &lt;&gt;&quot;&quot;; [$Sheet1.I18]; &quot;&quot;)" office:value-type="string" office:string-value="CUP1_REQUESTED_STATE" calcext:value-type="string">
            <text:p>CUP1_REQUESTED_STATE</text:p>
          </table:table-cell>
          <table:table-cell table:formula="of:=IF([$Sheet1.A18] &lt;&gt;&quot;&quot;; &quot; &quot;; &quot;&quot;)" office:value-type="string" office:string-value=" " calcext:value-type="string">
            <text:p><text:s/></text:p>
          </table:table-cell>
          <table:table-cell table:formula="of:=IF([$Sheet1.A18] &lt;&gt;&quot;&quot;; [$Sheet1.A18]; &quot;&quot;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formula="of:=IF([$Sheet1.A19] &lt;&gt;&quot;&quot;; &quot;#define &quot;; &quot;&quot;)" office:value-type="string" office:string-value="#define " calcext:value-type="string">
            <text:p>#define </text:p>
          </table:table-cell>
          <table:table-cell table:formula="of:=IF([$Sheet1.A19] &lt;&gt;&quot;&quot;; [$Sheet1.I19]; &quot;&quot;)" office:value-type="string" office:string-value="CUP2_REQUESTED_STATE" calcext:value-type="string">
            <text:p>CUP2_REQUESTED_STATE</text:p>
          </table:table-cell>
          <table:table-cell table:formula="of:=IF([$Sheet1.A19] &lt;&gt;&quot;&quot;; &quot; &quot;; &quot;&quot;)" office:value-type="string" office:string-value=" " calcext:value-type="string">
            <text:p><text:s/></text:p>
          </table:table-cell>
          <table:table-cell table:formula="of:=IF([$Sheet1.A19] &lt;&gt;&quot;&quot;; [$Sheet1.A19]; &quot;&quot;)"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table:formula="of:=IF([$Sheet1.A20] &lt;&gt;&quot;&quot;; &quot;#define &quot;; &quot;&quot;)" office:value-type="string" office:string-value="#define " calcext:value-type="string">
            <text:p>#define </text:p>
          </table:table-cell>
          <table:table-cell table:formula="of:=IF([$Sheet1.A20] &lt;&gt;&quot;&quot;; [$Sheet1.I20]; &quot;&quot;)" office:value-type="string" office:string-value="CUP3_REQUESTED_STATE" calcext:value-type="string">
            <text:p>CUP3_REQUESTED_STATE</text:p>
          </table:table-cell>
          <table:table-cell table:formula="of:=IF([$Sheet1.A20] &lt;&gt;&quot;&quot;; &quot; &quot;; &quot;&quot;)" office:value-type="string" office:string-value=" " calcext:value-type="string">
            <text:p><text:s/></text:p>
          </table:table-cell>
          <table:table-cell table:formula="of:=IF([$Sheet1.A20] &lt;&gt;&quot;&quot;; [$Sheet1.A20]; &quot;&quot;)"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formula="of:=IF([$Sheet1.A21] &lt;&gt;&quot;&quot;; &quot;#define &quot;; &quot;&quot;)">
            <text:p/>
          </table:table-cell>
          <table:table-cell table:formula="of:=IF([$Sheet1.A21] &lt;&gt;&quot;&quot;; [$Sheet1.I21]; &quot;&quot;)">
            <text:p/>
          </table:table-cell>
          <table:table-cell table:formula="of:=IF([$Sheet1.A21] &lt;&gt;&quot;&quot;; &quot; &quot;; &quot;&quot;)">
            <text:p/>
          </table:table-cell>
          <table:table-cell table:formula="of:=IF([$Sheet1.A21] &lt;&gt;&quot;&quot;; [$Sheet1.A21]; &quot;&quot;)">
            <text:p/>
          </table:table-cell>
          <table:table-cell table:number-columns-repeated="16380"/>
        </table:table-row>
        <table:table-row table:style-name="ro1">
          <table:table-cell table:formula="of:=IF([$Sheet1.A22] &lt;&gt;&quot;&quot;; &quot;#define &quot;; &quot;&quot;)" office:value-type="string" office:string-value="#define " calcext:value-type="string">
            <text:p>#define </text:p>
          </table:table-cell>
          <table:table-cell table:formula="of:=IF([$Sheet1.A22] &lt;&gt;&quot;&quot;; [$Sheet1.I22]; &quot;&quot;)" office:value-type="string" office:string-value="CUP1_STEADY" calcext:value-type="string">
            <text:p>CUP1_STEADY</text:p>
          </table:table-cell>
          <table:table-cell table:formula="of:=IF([$Sheet1.A22] &lt;&gt;&quot;&quot;; &quot; &quot;; &quot;&quot;)" office:value-type="string" office:string-value=" " calcext:value-type="string">
            <text:p><text:s/></text:p>
          </table:table-cell>
          <table:table-cell table:formula="of:=IF([$Sheet1.A22] &lt;&gt;&quot;&quot;; [$Sheet1.A22]; &quot;&quot;)"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formula="of:=IF([$Sheet1.A23] &lt;&gt;&quot;&quot;; &quot;#define &quot;; &quot;&quot;)" office:value-type="string" office:string-value="#define " calcext:value-type="string">
            <text:p>#define </text:p>
          </table:table-cell>
          <table:table-cell table:formula="of:=IF([$Sheet1.A23] &lt;&gt;&quot;&quot;; [$Sheet1.I23]; &quot;&quot;)" office:value-type="string" office:string-value="CUP2_STEADY" calcext:value-type="string">
            <text:p>CUP2_STEADY</text:p>
          </table:table-cell>
          <table:table-cell table:formula="of:=IF([$Sheet1.A23] &lt;&gt;&quot;&quot;; &quot; &quot;; &quot;&quot;)" office:value-type="string" office:string-value=" " calcext:value-type="string">
            <text:p><text:s/></text:p>
          </table:table-cell>
          <table:table-cell table:formula="of:=IF([$Sheet1.A23] &lt;&gt;&quot;&quot;; [$Sheet1.A23]; &quot;&quot;)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table:formula="of:=IF([$Sheet1.A24] &lt;&gt;&quot;&quot;; &quot;#define &quot;; &quot;&quot;)" office:value-type="string" office:string-value="#define " calcext:value-type="string">
            <text:p>#define </text:p>
          </table:table-cell>
          <table:table-cell table:formula="of:=IF([$Sheet1.A24] &lt;&gt;&quot;&quot;; [$Sheet1.I24]; &quot;&quot;)" office:value-type="string" office:string-value="CUP3_STEADY" calcext:value-type="string">
            <text:p>CUP3_STEADY</text:p>
          </table:table-cell>
          <table:table-cell table:formula="of:=IF([$Sheet1.A24] &lt;&gt;&quot;&quot;; &quot; &quot;; &quot;&quot;)" office:value-type="string" office:string-value=" " calcext:value-type="string">
            <text:p><text:s/></text:p>
          </table:table-cell>
          <table:table-cell table:formula="of:=IF([$Sheet1.A24] &lt;&gt;&quot;&quot;; [$Sheet1.A24]; &quot;&quot;)"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table:formula="of:=IF([$Sheet1.A25] &lt;&gt;&quot;&quot;; &quot;#define &quot;; &quot;&quot;)" office:value-type="string" office:string-value="#define " calcext:value-type="string">
            <text:p>#define </text:p>
          </table:table-cell>
          <table:table-cell table:formula="of:=IF([$Sheet1.A25] &lt;&gt;&quot;&quot;; [$Sheet1.I25]; &quot;&quot;)" office:value-type="string" office:string-value="CUP1_INSERTED" calcext:value-type="string">
            <text:p>CUP1_INSERTED</text:p>
          </table:table-cell>
          <table:table-cell table:formula="of:=IF([$Sheet1.A25] &lt;&gt;&quot;&quot;; &quot; &quot;; &quot;&quot;)" office:value-type="string" office:string-value=" " calcext:value-type="string">
            <text:p><text:s/></text:p>
          </table:table-cell>
          <table:table-cell table:formula="of:=IF([$Sheet1.A25] &lt;&gt;&quot;&quot;; [$Sheet1.A25]; &quot;&quot;)"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table:formula="of:=IF([$Sheet1.A26] &lt;&gt;&quot;&quot;; &quot;#define &quot;; &quot;&quot;)" office:value-type="string" office:string-value="#define " calcext:value-type="string">
            <text:p>#define </text:p>
          </table:table-cell>
          <table:table-cell table:formula="of:=IF([$Sheet1.A26] &lt;&gt;&quot;&quot;; [$Sheet1.I26]; &quot;&quot;)" office:value-type="string" office:string-value="CUP2_INSERTED" calcext:value-type="string">
            <text:p>CUP2_INSERTED</text:p>
          </table:table-cell>
          <table:table-cell table:formula="of:=IF([$Sheet1.A26] &lt;&gt;&quot;&quot;; &quot; &quot;; &quot;&quot;)" office:value-type="string" office:string-value=" " calcext:value-type="string">
            <text:p><text:s/></text:p>
          </table:table-cell>
          <table:table-cell table:formula="of:=IF([$Sheet1.A26] &lt;&gt;&quot;&quot;; [$Sheet1.A26]; &quot;&quot;)"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formula="of:=IF([$Sheet1.A27] &lt;&gt;&quot;&quot;; &quot;#define &quot;; &quot;&quot;)" office:value-type="string" office:string-value="#define " calcext:value-type="string">
            <text:p>#define </text:p>
          </table:table-cell>
          <table:table-cell table:formula="of:=IF([$Sheet1.A27] &lt;&gt;&quot;&quot;; [$Sheet1.I27]; &quot;&quot;)" office:value-type="string" office:string-value="CUP3_INSERTED" calcext:value-type="string">
            <text:p>CUP3_INSERTED</text:p>
          </table:table-cell>
          <table:table-cell table:formula="of:=IF([$Sheet1.A27] &lt;&gt;&quot;&quot;; &quot; &quot;; &quot;&quot;)" office:value-type="string" office:string-value=" " calcext:value-type="string">
            <text:p><text:s/></text:p>
          </table:table-cell>
          <table:table-cell table:formula="of:=IF([$Sheet1.A27] &lt;&gt;&quot;&quot;; [$Sheet1.A27]; &quot;&quot;)" office:value-type="float" office:value="21" calcext:value-type="float">
            <text:p>21</text:p>
          </table:table-cell>
          <table:table-cell table:number-columns-repeated="16380"/>
        </table:table-row>
        <table:table-row table:style-name="ro1">
          <table:table-cell table:formula="of:=IF([$Sheet1.A28] &lt;&gt;&quot;&quot;; &quot;#define &quot;; &quot;&quot;)" office:value-type="string" office:string-value="#define " calcext:value-type="string">
            <text:p>#define </text:p>
          </table:table-cell>
          <table:table-cell table:formula="of:=IF([$Sheet1.A28] &lt;&gt;&quot;&quot;; [$Sheet1.I28]; &quot;&quot;)" office:value-type="string" office:string-value="ACTUATOR1_CONTROL" calcext:value-type="string">
            <text:p>ACTUATOR1_CONTROL</text:p>
          </table:table-cell>
          <table:table-cell table:formula="of:=IF([$Sheet1.A28] &lt;&gt;&quot;&quot;; &quot; &quot;; &quot;&quot;)" office:value-type="string" office:string-value=" " calcext:value-type="string">
            <text:p><text:s/></text:p>
          </table:table-cell>
          <table:table-cell table:formula="of:=IF([$Sheet1.A28] &lt;&gt;&quot;&quot;; [$Sheet1.A28]; &quot;&quot;)"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table:formula="of:=IF([$Sheet1.A29] &lt;&gt;&quot;&quot;; &quot;#define &quot;; &quot;&quot;)" office:value-type="string" office:string-value="#define " calcext:value-type="string">
            <text:p>#define </text:p>
          </table:table-cell>
          <table:table-cell table:formula="of:=IF([$Sheet1.A29] &lt;&gt;&quot;&quot;; [$Sheet1.I29]; &quot;&quot;)" office:value-type="string" office:string-value="ACTUATOR2_CONTROL" calcext:value-type="string">
            <text:p>ACTUATOR2_CONTROL</text:p>
          </table:table-cell>
          <table:table-cell table:formula="of:=IF([$Sheet1.A29] &lt;&gt;&quot;&quot;; &quot; &quot;; &quot;&quot;)" office:value-type="string" office:string-value=" " calcext:value-type="string">
            <text:p><text:s/></text:p>
          </table:table-cell>
          <table:table-cell table:formula="of:=IF([$Sheet1.A29] &lt;&gt;&quot;&quot;; [$Sheet1.A29]; &quot;&quot;)"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table:formula="of:=IF([$Sheet1.A30] &lt;&gt;&quot;&quot;; &quot;#define &quot;; &quot;&quot;)" office:value-type="string" office:string-value="#define " calcext:value-type="string">
            <text:p>#define </text:p>
          </table:table-cell>
          <table:table-cell table:formula="of:=IF([$Sheet1.A30] &lt;&gt;&quot;&quot;; [$Sheet1.I30]; &quot;&quot;)" office:value-type="string" office:string-value="ACTUATOR3_CONTROL_IN" calcext:value-type="string">
            <text:p>ACTUATOR3_CONTROL_IN</text:p>
          </table:table-cell>
          <table:table-cell table:formula="of:=IF([$Sheet1.A30] &lt;&gt;&quot;&quot;; &quot; &quot;; &quot;&quot;)" office:value-type="string" office:string-value=" " calcext:value-type="string">
            <text:p><text:s/></text:p>
          </table:table-cell>
          <table:table-cell table:formula="of:=IF([$Sheet1.A30] &lt;&gt;&quot;&quot;; [$Sheet1.A30]; &quot;&quot;)" office:value-type="float" office:value="24" calcext:value-type="float">
            <text:p>24</text:p>
          </table:table-cell>
          <table:table-cell table:number-columns-repeated="16380"/>
        </table:table-row>
        <table:table-row table:style-name="ro1">
          <table:table-cell table:formula="of:=IF([$Sheet1.A31] &lt;&gt;&quot;&quot;; &quot;#define &quot;; &quot;&quot;)" office:value-type="string" office:string-value="#define " calcext:value-type="string">
            <text:p>#define </text:p>
          </table:table-cell>
          <table:table-cell table:formula="of:=IF([$Sheet1.A31] &lt;&gt;&quot;&quot;; [$Sheet1.I31]; &quot;&quot;)" office:value-type="string" office:string-value="ACTUATOR3_CONTROL_OUT" calcext:value-type="string">
            <text:p>ACTUATOR3_CONTROL_OUT</text:p>
          </table:table-cell>
          <table:table-cell table:formula="of:=IF([$Sheet1.A31] &lt;&gt;&quot;&quot;; &quot; &quot;; &quot;&quot;)" office:value-type="string" office:string-value=" " calcext:value-type="string">
            <text:p><text:s/></text:p>
          </table:table-cell>
          <table:table-cell table:formula="of:=IF([$Sheet1.A31] &lt;&gt;&quot;&quot;; [$Sheet1.A31]; &quot;&quot;)"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table:formula="of:=IF([$Sheet1.A32] &lt;&gt;&quot;&quot;; &quot;#define &quot;; &quot;&quot;)" office:value-type="string" office:string-value="#define " calcext:value-type="string">
            <text:p>#define </text:p>
          </table:table-cell>
          <table:table-cell table:formula="of:=IF([$Sheet1.A32] &lt;&gt;&quot;&quot;; [$Sheet1.I32]; &quot;&quot;)" office:value-type="string" office:string-value="ACTUATOR3_CONTROL_BRAKE" calcext:value-type="string">
            <text:p>ACTUATOR3_CONTROL_BRAKE</text:p>
          </table:table-cell>
          <table:table-cell table:formula="of:=IF([$Sheet1.A32] &lt;&gt;&quot;&quot;; &quot; &quot;; &quot;&quot;)" office:value-type="string" office:string-value=" " calcext:value-type="string">
            <text:p><text:s/></text:p>
          </table:table-cell>
          <table:table-cell table:formula="of:=IF([$Sheet1.A32] &lt;&gt;&quot;&quot;; [$Sheet1.A32]; &quot;&quot;)"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table:formula="of:=IF([$Sheet1.A33] &lt;&gt;&quot;&quot;; &quot;#define &quot;; &quot;&quot;)">
            <text:p/>
          </table:table-cell>
          <table:table-cell table:formula="of:=IF([$Sheet1.A33] &lt;&gt;&quot;&quot;; [$Sheet1.I33]; &quot;&quot;)">
            <text:p/>
          </table:table-cell>
          <table:table-cell table:formula="of:=IF([$Sheet1.A33] &lt;&gt;&quot;&quot;; &quot; &quot;; &quot;&quot;)">
            <text:p/>
          </table:table-cell>
          <table:table-cell table:formula="of:=IF([$Sheet1.A33] &lt;&gt;&quot;&quot;; [$Sheet1.A33]; &quot;&quot;)">
            <text:p/>
          </table:table-cell>
          <table:table-cell table:number-columns-repeated="16380"/>
        </table:table-row>
        <table:table-row table:style-name="ro1">
          <table:table-cell table:formula="of:=IF([$Sheet1.A34] &lt;&gt;&quot;&quot;; &quot;#define &quot;; &quot;&quot;)">
            <text:p/>
          </table:table-cell>
          <table:table-cell table:formula="of:=IF([$Sheet1.A34] &lt;&gt;&quot;&quot;; [$Sheet1.I34]; &quot;&quot;)">
            <text:p/>
          </table:table-cell>
          <table:table-cell table:formula="of:=IF([$Sheet1.A34] &lt;&gt;&quot;&quot;; &quot; &quot;; &quot;&quot;)">
            <text:p/>
          </table:table-cell>
          <table:table-cell table:formula="of:=IF([$Sheet1.A34] &lt;&gt;&quot;&quot;; [$Sheet1.A34]; &quot;&quot;)">
            <text:p/>
          </table:table-cell>
          <table:table-cell table:number-columns-repeated="16380"/>
        </table:table-row>
        <table:table-row table:style-name="ro1">
          <table:table-cell table:formula="of:=IF([$Sheet1.A35] &lt;&gt;&quot;&quot;; &quot;#define &quot;; &quot;&quot;)" office:value-type="string" office:string-value="#define " calcext:value-type="string">
            <text:p>#define </text:p>
          </table:table-cell>
          <table:table-cell table:formula="of:=IF([$Sheet1.A35] &lt;&gt;&quot;&quot;; [$Sheet1.I35]; &quot;&quot;)" office:value-type="string" office:string-value="ERROR_CODE" calcext:value-type="string">
            <text:p>ERROR_CODE</text:p>
          </table:table-cell>
          <table:table-cell table:formula="of:=IF([$Sheet1.A35] &lt;&gt;&quot;&quot;; &quot; &quot;; &quot;&quot;)" office:value-type="string" office:string-value=" " calcext:value-type="string">
            <text:p><text:s/></text:p>
          </table:table-cell>
          <table:table-cell table:formula="of:=IF([$Sheet1.A35] &lt;&gt;&quot;&quot;; [$Sheet1.A35]; &quot;&quot;)"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table-cell table:formula="of:=IF([$Sheet1.A36] &lt;&gt;&quot;&quot;; &quot;#define &quot;; &quot;&quot;)" office:value-type="string" office:string-value="#define " calcext:value-type="string">
            <text:p>#define </text:p>
          </table:table-cell>
          <table:table-cell table:formula="of:=IF([$Sheet1.A36] &lt;&gt;&quot;&quot;; [$Sheet1.I36]; &quot;&quot;)" office:value-type="string" office:string-value="LAST_ERROR" calcext:value-type="string">
            <text:p>LAST_ERROR</text:p>
          </table:table-cell>
          <table:table-cell table:formula="of:=IF([$Sheet1.A36] &lt;&gt;&quot;&quot;; &quot; &quot;; &quot;&quot;)" office:value-type="string" office:string-value=" " calcext:value-type="string">
            <text:p><text:s/></text:p>
          </table:table-cell>
          <table:table-cell table:formula="of:=IF([$Sheet1.A36] &lt;&gt;&quot;&quot;; [$Sheet1.A36]; &quot;&quot;)" office:value-type="float" office:value="1001" calcext:value-type="float">
            <text:p>1001</text:p>
          </table:table-cell>
          <table:table-cell table:number-columns-repeated="16380"/>
        </table:table-row>
        <table:table-row table:style-name="ro1">
          <table:table-cell table:formula="of:=IF([$Sheet1.A37] &lt;&gt;&quot;&quot;; &quot;#define &quot;; &quot;&quot;)" office:value-type="string" office:string-value="#define " calcext:value-type="string">
            <text:p>#define </text:p>
          </table:table-cell>
          <table:table-cell table:formula="of:=IF([$Sheet1.A37] &lt;&gt;&quot;&quot;; [$Sheet1.I37]; &quot;&quot;)" office:value-type="string" office:string-value="ERROR_STORAGE" calcext:value-type="string">
            <text:p>ERROR_STORAGE</text:p>
          </table:table-cell>
          <table:table-cell table:formula="of:=IF([$Sheet1.A37] &lt;&gt;&quot;&quot;; &quot; &quot;; &quot;&quot;)" office:value-type="string" office:string-value=" " calcext:value-type="string">
            <text:p><text:s/></text:p>
          </table:table-cell>
          <table:table-cell table:formula="of:=IF([$Sheet1.A37] &lt;&gt;&quot;&quot;; [$Sheet1.A37]; &quot;&quot;)" office:value-type="float" office:value="1002" calcext:value-type="float">
            <text:p>1002</text:p>
          </table:table-cell>
          <table:table-cell table:number-columns-repeated="16380"/>
        </table:table-row>
        <table:table-row table:style-name="ro1">
          <table:table-cell table:formula="of:=IF([$Sheet1.A38] &lt;&gt;&quot;&quot;; &quot;#define &quot;; &quot;&quot;)">
            <text:p/>
          </table:table-cell>
          <table:table-cell table:formula="of:=IF([$Sheet1.A38] &lt;&gt;&quot;&quot;; [$Sheet1.I38]; &quot;&quot;)">
            <text:p/>
          </table:table-cell>
          <table:table-cell table:formula="of:=IF([$Sheet1.A38] &lt;&gt;&quot;&quot;; &quot; &quot;; &quot;&quot;)">
            <text:p/>
          </table:table-cell>
          <table:table-cell table:formula="of:=IF([$Sheet1.A38] &lt;&gt;&quot;&quot;; [$Sheet1.A38]; &quot;&quot;)">
            <text:p/>
          </table:table-cell>
          <table:table-cell table:number-columns-repeated="16380"/>
        </table:table-row>
        <table:table-row table:style-name="ro1">
          <table:table-cell table:formula="of:=IF([$Sheet1.A39] &lt;&gt;&quot;&quot;; &quot;#define &quot;; &quot;&quot;)" office:value-type="string" office:string-value="#define " calcext:value-type="string">
            <text:p>#define </text:p>
          </table:table-cell>
          <table:table-cell table:formula="of:=IF([$Sheet1.A39] &lt;&gt;&quot;&quot;; [$Sheet1.I39]; &quot;&quot;)" office:value-type="string" office:string-value="TIME_LIMIT_INSERTING1" calcext:value-type="string">
            <text:p>TIME_LIMIT_INSERTING1</text:p>
          </table:table-cell>
          <table:table-cell table:formula="of:=IF([$Sheet1.A39] &lt;&gt;&quot;&quot;; &quot; &quot;; &quot;&quot;)" office:value-type="string" office:string-value=" " calcext:value-type="string">
            <text:p><text:s/></text:p>
          </table:table-cell>
          <table:table-cell table:formula="of:=IF([$Sheet1.A39] &lt;&gt;&quot;&quot;; [$Sheet1.A39]; &quot;&quot;)" office:value-type="float" office:value="1003" calcext:value-type="float">
            <text:p>1003</text:p>
          </table:table-cell>
          <table:table-cell table:number-columns-repeated="16380"/>
        </table:table-row>
        <table:table-row table:style-name="ro1">
          <table:table-cell table:formula="of:=IF([$Sheet1.A40] &lt;&gt;&quot;&quot;; &quot;#define &quot;; &quot;&quot;)" office:value-type="string" office:string-value="#define " calcext:value-type="string">
            <text:p>#define </text:p>
          </table:table-cell>
          <table:table-cell table:formula="of:=IF([$Sheet1.A40] &lt;&gt;&quot;&quot;; [$Sheet1.I40]; &quot;&quot;)" office:value-type="string" office:string-value="TIME_LIMIT_INSERTING2" calcext:value-type="string">
            <text:p>TIME_LIMIT_INSERTING2</text:p>
          </table:table-cell>
          <table:table-cell table:formula="of:=IF([$Sheet1.A40] &lt;&gt;&quot;&quot;; &quot; &quot;; &quot;&quot;)" office:value-type="string" office:string-value=" " calcext:value-type="string">
            <text:p><text:s/></text:p>
          </table:table-cell>
          <table:table-cell table:formula="of:=IF([$Sheet1.A40] &lt;&gt;&quot;&quot;; [$Sheet1.A40]; &quot;&quot;)" office:value-type="float" office:value="1004" calcext:value-type="float">
            <text:p>1004</text:p>
          </table:table-cell>
          <table:table-cell table:number-columns-repeated="16380"/>
        </table:table-row>
        <table:table-row table:style-name="ro1">
          <table:table-cell table:formula="of:=IF([$Sheet1.A41] &lt;&gt;&quot;&quot;; &quot;#define &quot;; &quot;&quot;)" office:value-type="string" office:string-value="#define " calcext:value-type="string">
            <text:p>#define </text:p>
          </table:table-cell>
          <table:table-cell table:formula="of:=IF([$Sheet1.A41] &lt;&gt;&quot;&quot;; [$Sheet1.I41]; &quot;&quot;)" office:value-type="string" office:string-value="TIME_LIMIT_INSERTING3" calcext:value-type="string">
            <text:p>TIME_LIMIT_INSERTING3</text:p>
          </table:table-cell>
          <table:table-cell table:formula="of:=IF([$Sheet1.A41] &lt;&gt;&quot;&quot;; &quot; &quot;; &quot;&quot;)" office:value-type="string" office:string-value=" " calcext:value-type="string">
            <text:p><text:s/></text:p>
          </table:table-cell>
          <table:table-cell table:formula="of:=IF([$Sheet1.A41] &lt;&gt;&quot;&quot;; [$Sheet1.A41]; &quot;&quot;)" office:value-type="float" office:value="1005" calcext:value-type="float">
            <text:p>1005</text:p>
          </table:table-cell>
          <table:table-cell table:number-columns-repeated="16380"/>
        </table:table-row>
        <table:table-row table:style-name="ro1">
          <table:table-cell table:formula="of:=IF([$Sheet1.A42] &lt;&gt;&quot;&quot;; &quot;#define &quot;; &quot;&quot;)" office:value-type="string" office:string-value="#define " calcext:value-type="string">
            <text:p>#define </text:p>
          </table:table-cell>
          <table:table-cell table:formula="of:=IF([$Sheet1.A42] &lt;&gt;&quot;&quot;; [$Sheet1.I42]; &quot;&quot;)" office:value-type="string" office:string-value="TIME_LIMIT_WITHDRAWING1" calcext:value-type="string">
            <text:p>TIME_LIMIT_WITHDRAWING1</text:p>
          </table:table-cell>
          <table:table-cell table:formula="of:=IF([$Sheet1.A42] &lt;&gt;&quot;&quot;; &quot; &quot;; &quot;&quot;)" office:value-type="string" office:string-value=" " calcext:value-type="string">
            <text:p><text:s/></text:p>
          </table:table-cell>
          <table:table-cell table:formula="of:=IF([$Sheet1.A42] &lt;&gt;&quot;&quot;; [$Sheet1.A42]; &quot;&quot;)" office:value-type="float" office:value="1006" calcext:value-type="float">
            <text:p>1006</text:p>
          </table:table-cell>
          <table:table-cell table:number-columns-repeated="16380"/>
        </table:table-row>
        <table:table-row table:style-name="ro1">
          <table:table-cell table:formula="of:=IF([$Sheet1.A43] &lt;&gt;&quot;&quot;; &quot;#define &quot;; &quot;&quot;)" office:value-type="string" office:string-value="#define " calcext:value-type="string">
            <text:p>#define </text:p>
          </table:table-cell>
          <table:table-cell table:formula="of:=IF([$Sheet1.A43] &lt;&gt;&quot;&quot;; [$Sheet1.I43]; &quot;&quot;)" office:value-type="string" office:string-value="TIME_LIMIT_WITHDRAWING2" calcext:value-type="string">
            <text:p>TIME_LIMIT_WITHDRAWING2</text:p>
          </table:table-cell>
          <table:table-cell table:formula="of:=IF([$Sheet1.A43] &lt;&gt;&quot;&quot;; &quot; &quot;; &quot;&quot;)" office:value-type="string" office:string-value=" " calcext:value-type="string">
            <text:p><text:s/></text:p>
          </table:table-cell>
          <table:table-cell table:formula="of:=IF([$Sheet1.A43] &lt;&gt;&quot;&quot;; [$Sheet1.A43]; &quot;&quot;)" office:value-type="float" office:value="1007" calcext:value-type="float">
            <text:p>1007</text:p>
          </table:table-cell>
          <table:table-cell table:number-columns-repeated="16380"/>
        </table:table-row>
        <table:table-row table:style-name="ro1">
          <table:table-cell table:formula="of:=IF([$Sheet1.A44] &lt;&gt;&quot;&quot;; &quot;#define &quot;; &quot;&quot;)" office:value-type="string" office:string-value="#define " calcext:value-type="string">
            <text:p>#define </text:p>
          </table:table-cell>
          <table:table-cell table:formula="of:=IF([$Sheet1.A44] &lt;&gt;&quot;&quot;; [$Sheet1.I44]; &quot;&quot;)" office:value-type="string" office:string-value="TIME_LIMIT_WITHDRAWING3" calcext:value-type="string">
            <text:p>TIME_LIMIT_WITHDRAWING3</text:p>
          </table:table-cell>
          <table:table-cell table:formula="of:=IF([$Sheet1.A44] &lt;&gt;&quot;&quot;; &quot; &quot;; &quot;&quot;)" office:value-type="string" office:string-value=" " calcext:value-type="string">
            <text:p><text:s/></text:p>
          </table:table-cell>
          <table:table-cell table:formula="of:=IF([$Sheet1.A44] &lt;&gt;&quot;&quot;; [$Sheet1.A44]; &quot;&quot;)" office:value-type="float" office:value="1008" calcext:value-type="float">
            <text:p>1008</text:p>
          </table:table-cell>
          <table:table-cell table:number-columns-repeated="16380"/>
        </table:table-row>
        <table:table-row table:style-name="ro1">
          <table:table-cell table:formula="of:=IF([$Sheet1.A45] &lt;&gt;&quot;&quot;; &quot;#define &quot;; &quot;&quot;)">
            <text:p/>
          </table:table-cell>
          <table:table-cell table:formula="of:=IF([$Sheet1.A45] &lt;&gt;&quot;&quot;; [$Sheet1.I45]; &quot;&quot;)">
            <text:p/>
          </table:table-cell>
          <table:table-cell table:formula="of:=IF([$Sheet1.A45] &lt;&gt;&quot;&quot;; &quot; &quot;; &quot;&quot;)">
            <text:p/>
          </table:table-cell>
          <table:table-cell table:formula="of:=IF([$Sheet1.A45] &lt;&gt;&quot;&quot;; [$Sheet1.A45]; &quot;&quot;)">
            <text:p/>
          </table:table-cell>
          <table:table-cell table:number-columns-repeated="16380"/>
        </table:table-row>
        <table:table-row table:style-name="ro1">
          <table:table-cell table:formula="of:=IF([$Sheet1.A46] &lt;&gt;&quot;&quot;; &quot;#define &quot;; &quot;&quot;)" office:value-type="string" office:string-value="#define " calcext:value-type="string">
            <text:p>#define </text:p>
          </table:table-cell>
          <table:table-cell table:formula="of:=IF([$Sheet1.A46] &lt;&gt;&quot;&quot;; [$Sheet1.I46]; &quot;&quot;)" office:value-type="string" office:string-value="ACTIVE_CUP" calcext:value-type="string">
            <text:p>ACTIVE_CUP</text:p>
          </table:table-cell>
          <table:table-cell table:formula="of:=IF([$Sheet1.A46] &lt;&gt;&quot;&quot;; &quot; &quot;; &quot;&quot;)" office:value-type="string" office:string-value=" " calcext:value-type="string">
            <text:p><text:s/></text:p>
          </table:table-cell>
          <table:table-cell table:formula="of:=IF([$Sheet1.A46] &lt;&gt;&quot;&quot;; [$Sheet1.A46]; &quot;&quot;)" office:value-type="float" office:value="1009" calcext:value-type="float">
            <text:p>1009</text:p>
          </table:table-cell>
          <table:table-cell table:number-columns-repeated="16380"/>
        </table:table-row>
        <table:table-row table:style-name="ro1">
          <table:table-cell table:formula="of:=IF([$Sheet1.A47] &lt;&gt;&quot;&quot;; &quot;#define &quot;; &quot;&quot;)">
            <text:p/>
          </table:table-cell>
          <table:table-cell table:formula="of:=IF([$Sheet1.A47] &lt;&gt;&quot;&quot;; [$Sheet1.I47]; &quot;&quot;)">
            <text:p/>
          </table:table-cell>
          <table:table-cell table:formula="of:=IF([$Sheet1.A47] &lt;&gt;&quot;&quot;; &quot; &quot;; &quot;&quot;)">
            <text:p/>
          </table:table-cell>
          <table:table-cell table:formula="of:=IF([$Sheet1.A47] &lt;&gt;&quot;&quot;; [$Sheet1.A47]; &quot;&quot;)">
            <text:p/>
          </table:table-cell>
          <table:table-cell table:number-columns-repeated="16380"/>
        </table:table-row>
        <table:table-row table:style-name="ro1">
          <table:table-cell table:formula="of:=IF([$Sheet1.A48] &lt;&gt;&quot;&quot;; &quot;#define &quot;; &quot;&quot;)" office:value-type="string" office:string-value="#define " calcext:value-type="string">
            <text:p>#define </text:p>
          </table:table-cell>
          <table:table-cell table:formula="of:=IF([$Sheet1.A48] &lt;&gt;&quot;&quot;; [$Sheet1.I48]; &quot;&quot;)" office:value-type="string" office:string-value="CUP1_ERROR" calcext:value-type="string">
            <text:p>CUP1_ERROR</text:p>
          </table:table-cell>
          <table:table-cell table:formula="of:=IF([$Sheet1.A48] &lt;&gt;&quot;&quot;; &quot; &quot;; &quot;&quot;)" office:value-type="string" office:string-value=" " calcext:value-type="string">
            <text:p><text:s/></text:p>
          </table:table-cell>
          <table:table-cell table:formula="of:=IF([$Sheet1.A48] &lt;&gt;&quot;&quot;; [$Sheet1.A48]; &quot;&quot;)" office:value-type="float" office:value="1010" calcext:value-type="float">
            <text:p>1010</text:p>
          </table:table-cell>
          <table:table-cell table:number-columns-repeated="16380"/>
        </table:table-row>
        <table:table-row table:style-name="ro1">
          <table:table-cell table:formula="of:=IF([$Sheet1.A49] &lt;&gt;&quot;&quot;; &quot;#define &quot;; &quot;&quot;)" office:value-type="string" office:string-value="#define " calcext:value-type="string">
            <text:p>#define </text:p>
          </table:table-cell>
          <table:table-cell table:formula="of:=IF([$Sheet1.A49] &lt;&gt;&quot;&quot;; [$Sheet1.I49]; &quot;&quot;)" office:value-type="string" office:string-value="CUP2_ERROR" calcext:value-type="string">
            <text:p>CUP2_ERROR</text:p>
          </table:table-cell>
          <table:table-cell table:formula="of:=IF([$Sheet1.A49] &lt;&gt;&quot;&quot;; &quot; &quot;; &quot;&quot;)" office:value-type="string" office:string-value=" " calcext:value-type="string">
            <text:p><text:s/></text:p>
          </table:table-cell>
          <table:table-cell table:formula="of:=IF([$Sheet1.A49] &lt;&gt;&quot;&quot;; [$Sheet1.A49]; &quot;&quot;)" office:value-type="float" office:value="1011" calcext:value-type="float">
            <text:p>1011</text:p>
          </table:table-cell>
          <table:table-cell table:number-columns-repeated="16380"/>
        </table:table-row>
        <table:table-row table:style-name="ro1">
          <table:table-cell table:formula="of:=IF([$Sheet1.A50] &lt;&gt;&quot;&quot;; &quot;#define &quot;; &quot;&quot;)" office:value-type="string" office:string-value="#define " calcext:value-type="string">
            <text:p>#define </text:p>
          </table:table-cell>
          <table:table-cell table:formula="of:=IF([$Sheet1.A50] &lt;&gt;&quot;&quot;; [$Sheet1.I50]; &quot;&quot;)" office:value-type="string" office:string-value="CUP3_ERROR" calcext:value-type="string">
            <text:p>CUP3_ERROR</text:p>
          </table:table-cell>
          <table:table-cell table:formula="of:=IF([$Sheet1.A50] &lt;&gt;&quot;&quot;; &quot; &quot;; &quot;&quot;)" office:value-type="string" office:string-value=" " calcext:value-type="string">
            <text:p><text:s/></text:p>
          </table:table-cell>
          <table:table-cell table:formula="of:=IF([$Sheet1.A50] &lt;&gt;&quot;&quot;; [$Sheet1.A50]; &quot;&quot;)" office:value-type="float" office:value="1012" calcext:value-type="float">
            <text:p>1012</text:p>
          </table:table-cell>
          <table:table-cell table:number-columns-repeated="16380"/>
        </table:table-row>
        <table:table-row table:style-name="ro1">
          <table:table-cell table:formula="of:=IF([$Sheet1.A51] &lt;&gt;&quot;&quot;; &quot;#define &quot;; &quot;&quot;)" office:value-type="string" office:string-value="#define " calcext:value-type="string">
            <text:p>#define </text:p>
          </table:table-cell>
          <table:table-cell table:formula="of:=IF([$Sheet1.A51] &lt;&gt;&quot;&quot;; [$Sheet1.I51]; &quot;&quot;)" office:value-type="string" office:string-value="CUP1_LAST_ERROR" calcext:value-type="string">
            <text:p>CUP1_LAST_ERROR</text:p>
          </table:table-cell>
          <table:table-cell table:formula="of:=IF([$Sheet1.A51] &lt;&gt;&quot;&quot;; &quot; &quot;; &quot;&quot;)" office:value-type="string" office:string-value=" " calcext:value-type="string">
            <text:p><text:s/></text:p>
          </table:table-cell>
          <table:table-cell table:formula="of:=IF([$Sheet1.A51] &lt;&gt;&quot;&quot;; [$Sheet1.A51]; &quot;&quot;)" office:value-type="float" office:value="1013" calcext:value-type="float">
            <text:p>1013</text:p>
          </table:table-cell>
          <table:table-cell table:number-columns-repeated="16380"/>
        </table:table-row>
        <table:table-row table:style-name="ro1">
          <table:table-cell table:formula="of:=IF([$Sheet1.A52] &lt;&gt;&quot;&quot;; &quot;#define &quot;; &quot;&quot;)" office:value-type="string" office:string-value="#define " calcext:value-type="string">
            <text:p>#define </text:p>
          </table:table-cell>
          <table:table-cell table:formula="of:=IF([$Sheet1.A52] &lt;&gt;&quot;&quot;; [$Sheet1.I52]; &quot;&quot;)" office:value-type="string" office:string-value="CUP2_LAST_ERROR" calcext:value-type="string">
            <text:p>CUP2_LAST_ERROR</text:p>
          </table:table-cell>
          <table:table-cell table:formula="of:=IF([$Sheet1.A52] &lt;&gt;&quot;&quot;; &quot; &quot;; &quot;&quot;)" office:value-type="string" office:string-value=" " calcext:value-type="string">
            <text:p><text:s/></text:p>
          </table:table-cell>
          <table:table-cell table:formula="of:=IF([$Sheet1.A52] &lt;&gt;&quot;&quot;; [$Sheet1.A52]; &quot;&quot;)" office:value-type="float" office:value="1014" calcext:value-type="float">
            <text:p>1014</text:p>
          </table:table-cell>
          <table:table-cell table:number-columns-repeated="16380"/>
        </table:table-row>
        <table:table-row table:style-name="ro1">
          <table:table-cell table:formula="of:=IF([$Sheet1.A53] &lt;&gt;&quot;&quot;; &quot;#define &quot;; &quot;&quot;)" office:value-type="string" office:string-value="#define " calcext:value-type="string">
            <text:p>#define </text:p>
          </table:table-cell>
          <table:table-cell table:formula="of:=IF([$Sheet1.A53] &lt;&gt;&quot;&quot;; [$Sheet1.I53]; &quot;&quot;)" office:value-type="string" office:string-value="CUP3_LAST_ERROR" calcext:value-type="string">
            <text:p>CUP3_LAST_ERROR</text:p>
          </table:table-cell>
          <table:table-cell table:formula="of:=IF([$Sheet1.A53] &lt;&gt;&quot;&quot;; &quot; &quot;; &quot;&quot;)" office:value-type="string" office:string-value=" " calcext:value-type="string">
            <text:p><text:s/></text:p>
          </table:table-cell>
          <table:table-cell table:formula="of:=IF([$Sheet1.A53] &lt;&gt;&quot;&quot;; [$Sheet1.A53]; &quot;&quot;)" office:value-type="float" office:value="1015" calcext:value-type="float">
            <text:p>1015</text:p>
          </table:table-cell>
          <table:table-cell table:number-columns-repeated="16380"/>
        </table:table-row>
        <table:table-row table:style-name="ro1">
          <table:table-cell table:formula="of:=IF([$Sheet1.A54] &lt;&gt;&quot;&quot;; &quot;#define &quot;; &quot;&quot;)" office:value-type="string" office:string-value="#define " calcext:value-type="string">
            <text:p>#define </text:p>
          </table:table-cell>
          <table:table-cell table:formula="of:=IF([$Sheet1.A54] &lt;&gt;&quot;&quot;; [$Sheet1.I54]; &quot;&quot;)" office:value-type="string" office:string-value="CUP1_ERROR_STORAGE" calcext:value-type="string">
            <text:p>CUP1_ERROR_STORAGE</text:p>
          </table:table-cell>
          <table:table-cell table:formula="of:=IF([$Sheet1.A54] &lt;&gt;&quot;&quot;; &quot; &quot;; &quot;&quot;)" office:value-type="string" office:string-value=" " calcext:value-type="string">
            <text:p><text:s/></text:p>
          </table:table-cell>
          <table:table-cell table:formula="of:=IF([$Sheet1.A54] &lt;&gt;&quot;&quot;; [$Sheet1.A54]; &quot;&quot;)" office:value-type="float" office:value="1016" calcext:value-type="float">
            <text:p>1016</text:p>
          </table:table-cell>
          <table:table-cell table:number-columns-repeated="16380"/>
        </table:table-row>
        <table:table-row table:style-name="ro1">
          <table:table-cell table:formula="of:=IF([$Sheet1.A55] &lt;&gt;&quot;&quot;; &quot;#define &quot;; &quot;&quot;)" office:value-type="string" office:string-value="#define " calcext:value-type="string">
            <text:p>#define </text:p>
          </table:table-cell>
          <table:table-cell table:formula="of:=IF([$Sheet1.A55] &lt;&gt;&quot;&quot;; [$Sheet1.I55]; &quot;&quot;)" office:value-type="string" office:string-value="CUP2_ERROR_STORAGE" calcext:value-type="string">
            <text:p>CUP2_ERROR_STORAGE</text:p>
          </table:table-cell>
          <table:table-cell table:formula="of:=IF([$Sheet1.A55] &lt;&gt;&quot;&quot;; &quot; &quot;; &quot;&quot;)" office:value-type="string" office:string-value=" " calcext:value-type="string">
            <text:p><text:s/></text:p>
          </table:table-cell>
          <table:table-cell table:formula="of:=IF([$Sheet1.A55] &lt;&gt;&quot;&quot;; [$Sheet1.A55]; &quot;&quot;)" office:value-type="float" office:value="1017" calcext:value-type="float">
            <text:p>1017</text:p>
          </table:table-cell>
          <table:table-cell table:number-columns-repeated="16380"/>
        </table:table-row>
        <table:table-row table:style-name="ro1">
          <table:table-cell table:formula="of:=IF([$Sheet1.A56] &lt;&gt;&quot;&quot;; &quot;#define &quot;; &quot;&quot;)" office:value-type="string" office:string-value="#define " calcext:value-type="string">
            <text:p>#define </text:p>
          </table:table-cell>
          <table:table-cell table:formula="of:=IF([$Sheet1.A56] &lt;&gt;&quot;&quot;; [$Sheet1.I56]; &quot;&quot;)" office:value-type="string" office:string-value="CUP3_ERROR_STORAGE" calcext:value-type="string">
            <text:p>CUP3_ERROR_STORAGE</text:p>
          </table:table-cell>
          <table:table-cell table:formula="of:=IF([$Sheet1.A56] &lt;&gt;&quot;&quot;; &quot; &quot;; &quot;&quot;)" office:value-type="string" office:string-value=" " calcext:value-type="string">
            <text:p><text:s/></text:p>
          </table:table-cell>
          <table:table-cell table:formula="of:=IF([$Sheet1.A56] &lt;&gt;&quot;&quot;; [$Sheet1.A56]; &quot;&quot;)" office:value-type="float" office:value="1018" calcext:value-type="float">
            <text:p>1018</text:p>
          </table:table-cell>
          <table:table-cell table:number-columns-repeated="16380"/>
        </table:table-row>
        <table:table-row table:style-name="ro1">
          <table:table-cell table:formula="of:=IF([$Sheet1.A57] &lt;&gt;&quot;&quot;; &quot;#define &quot;; &quot;&quot;)">
            <text:p/>
          </table:table-cell>
          <table:table-cell table:formula="of:=IF([$Sheet1.A57] &lt;&gt;&quot;&quot;; [$Sheet1.I57]; &quot;&quot;)">
            <text:p/>
          </table:table-cell>
          <table:table-cell table:formula="of:=IF([$Sheet1.A57] &lt;&gt;&quot;&quot;; &quot; &quot;; &quot;&quot;)">
            <text:p/>
          </table:table-cell>
          <table:table-cell table:formula="of:=IF([$Sheet1.A57] &lt;&gt;&quot;&quot;; [$Sheet1.A57]; &quot;&quot;)">
            <text:p/>
          </table:table-cell>
          <table:table-cell table:number-columns-repeated="16380"/>
        </table:table-row>
        <table:table-row table:style-name="ro1">
          <table:table-cell table:formula="of:=IF([$Sheet1.A58] &lt;&gt;&quot;&quot;; &quot;#define &quot;; &quot;&quot;)" office:value-type="string" office:string-value="#define " calcext:value-type="string">
            <text:p>#define </text:p>
          </table:table-cell>
          <table:table-cell table:formula="of:=IF([$Sheet1.A58] &lt;&gt;&quot;&quot;; [$Sheet1.I58]; &quot;&quot;)" office:value-type="string" office:string-value="INSTALLED_CUPS" calcext:value-type="string">
            <text:p>INSTALLED_CUPS</text:p>
          </table:table-cell>
          <table:table-cell table:formula="of:=IF([$Sheet1.A58] &lt;&gt;&quot;&quot;; &quot; &quot;; &quot;&quot;)" office:value-type="string" office:string-value=" " calcext:value-type="string">
            <text:p><text:s/></text:p>
          </table:table-cell>
          <table:table-cell table:formula="of:=IF([$Sheet1.A58] &lt;&gt;&quot;&quot;; [$Sheet1.A58]; &quot;&quot;)" office:value-type="float" office:value="1019" calcext:value-type="float">
            <text:p>1019</text:p>
          </table:table-cell>
          <table:table-cell table:number-columns-repeated="16380"/>
        </table:table-row>
        <table:table-row table:style-name="ro1">
          <table:table-cell table:formula="of:=IF([$Sheet1.A59] &lt;&gt;&quot;&quot;; &quot;#define &quot;; &quot;&quot;)" office:value-type="string" office:string-value="#define " calcext:value-type="string">
            <text:p>#define </text:p>
          </table:table-cell>
          <table:table-cell table:formula="of:=IF([$Sheet1.A59] &lt;&gt;&quot;&quot;; [$Sheet1.I59]; &quot;&quot;)" office:value-type="string" office:string-value="ELECTRODES_CUP1" calcext:value-type="string">
            <text:p>ELECTRODES_CUP1</text:p>
          </table:table-cell>
          <table:table-cell table:formula="of:=IF([$Sheet1.A59] &lt;&gt;&quot;&quot;; &quot; &quot;; &quot;&quot;)" office:value-type="string" office:string-value=" " calcext:value-type="string">
            <text:p><text:s/></text:p>
          </table:table-cell>
          <table:table-cell table:formula="of:=IF([$Sheet1.A59] &lt;&gt;&quot;&quot;; [$Sheet1.A59]; &quot;&quot;)" office:value-type="float" office:value="1020" calcext:value-type="float">
            <text:p>1020</text:p>
          </table:table-cell>
          <table:table-cell table:number-columns-repeated="16380"/>
        </table:table-row>
        <table:table-row table:style-name="ro1">
          <table:table-cell table:formula="of:=IF([$Sheet1.A60] &lt;&gt;&quot;&quot;; &quot;#define &quot;; &quot;&quot;)" office:value-type="string" office:string-value="#define " calcext:value-type="string">
            <text:p>#define </text:p>
          </table:table-cell>
          <table:table-cell table:formula="of:=IF([$Sheet1.A60] &lt;&gt;&quot;&quot;; [$Sheet1.I60]; &quot;&quot;)" office:value-type="string" office:string-value="ELECTRODES_CUP2" calcext:value-type="string">
            <text:p>ELECTRODES_CUP2</text:p>
          </table:table-cell>
          <table:table-cell table:formula="of:=IF([$Sheet1.A60] &lt;&gt;&quot;&quot;; &quot; &quot;; &quot;&quot;)" office:value-type="string" office:string-value=" " calcext:value-type="string">
            <text:p><text:s/></text:p>
          </table:table-cell>
          <table:table-cell table:formula="of:=IF([$Sheet1.A60] &lt;&gt;&quot;&quot;; [$Sheet1.A60]; &quot;&quot;)" office:value-type="float" office:value="1021" calcext:value-type="float">
            <text:p>1021</text:p>
          </table:table-cell>
          <table:table-cell table:number-columns-repeated="16380"/>
        </table:table-row>
        <table:table-row table:style-name="ro1">
          <table:table-cell table:formula="of:=IF([$Sheet1.A61] &lt;&gt;&quot;&quot;; &quot;#define &quot;; &quot;&quot;)" office:value-type="string" office:string-value="#define " calcext:value-type="string">
            <text:p>#define </text:p>
          </table:table-cell>
          <table:table-cell table:formula="of:=IF([$Sheet1.A61] &lt;&gt;&quot;&quot;; [$Sheet1.I61]; &quot;&quot;)" office:value-type="string" office:string-value="ELECTRODES_CUP3" calcext:value-type="string">
            <text:p>ELECTRODES_CUP3</text:p>
          </table:table-cell>
          <table:table-cell table:formula="of:=IF([$Sheet1.A61] &lt;&gt;&quot;&quot;; &quot; &quot;; &quot;&quot;)" office:value-type="string" office:string-value=" " calcext:value-type="string">
            <text:p><text:s/></text:p>
          </table:table-cell>
          <table:table-cell table:formula="of:=IF([$Sheet1.A61] &lt;&gt;&quot;&quot;; [$Sheet1.A61]; &quot;&quot;)" office:value-type="float" office:value="1022" calcext:value-type="float">
            <text:p>1022</text:p>
          </table:table-cell>
          <table:table-cell table:number-columns-repeated="16380"/>
        </table:table-row>
        <table:table-row table:style-name="ro1">
          <table:table-cell table:formula="of:=IF([$Sheet1.A62] &lt;&gt;&quot;&quot;; &quot;#define &quot;; &quot;&quot;)" office:value-type="string" office:string-value="#define " calcext:value-type="string">
            <text:p>#define </text:p>
          </table:table-cell>
          <table:table-cell table:formula="of:=IF([$Sheet1.A62] &lt;&gt;&quot;&quot;; [$Sheet1.I62]; &quot;&quot;)" office:value-type="string" office:string-value="CUP1_TYPE" calcext:value-type="string">
            <text:p>CUP1_TYPE</text:p>
          </table:table-cell>
          <table:table-cell table:formula="of:=IF([$Sheet1.A62] &lt;&gt;&quot;&quot;; &quot; &quot;; &quot;&quot;)" office:value-type="string" office:string-value=" " calcext:value-type="string">
            <text:p><text:s/></text:p>
          </table:table-cell>
          <table:table-cell table:formula="of:=IF([$Sheet1.A62] &lt;&gt;&quot;&quot;; [$Sheet1.A62]; &quot;&quot;)" office:value-type="float" office:value="1023" calcext:value-type="float">
            <text:p>1023</text:p>
          </table:table-cell>
          <table:table-cell table:number-columns-repeated="16380"/>
        </table:table-row>
        <table:table-row table:style-name="ro1">
          <table:table-cell table:formula="of:=IF([$Sheet1.A63] &lt;&gt;&quot;&quot;; &quot;#define &quot;; &quot;&quot;)" office:value-type="string" office:string-value="#define " calcext:value-type="string">
            <text:p>#define </text:p>
          </table:table-cell>
          <table:table-cell table:formula="of:=IF([$Sheet1.A63] &lt;&gt;&quot;&quot;; [$Sheet1.I63]; &quot;&quot;)" office:value-type="string" office:string-value="CUP2_TYPE" calcext:value-type="string">
            <text:p>CUP2_TYPE</text:p>
          </table:table-cell>
          <table:table-cell table:formula="of:=IF([$Sheet1.A63] &lt;&gt;&quot;&quot;; &quot; &quot;; &quot;&quot;)" office:value-type="string" office:string-value=" " calcext:value-type="string">
            <text:p><text:s/></text:p>
          </table:table-cell>
          <table:table-cell table:formula="of:=IF([$Sheet1.A63] &lt;&gt;&quot;&quot;; [$Sheet1.A63]; &quot;&quot;)" office:value-type="float" office:value="1024" calcext:value-type="float">
            <text:p>1024</text:p>
          </table:table-cell>
          <table:table-cell table:number-columns-repeated="16380"/>
        </table:table-row>
        <table:table-row table:style-name="ro1">
          <table:table-cell table:formula="of:=IF([$Sheet1.A64] &lt;&gt;&quot;&quot;; &quot;#define &quot;; &quot;&quot;)" office:value-type="string" office:string-value="#define " calcext:value-type="string">
            <text:p>#define </text:p>
          </table:table-cell>
          <table:table-cell table:formula="of:=IF([$Sheet1.A64] &lt;&gt;&quot;&quot;; [$Sheet1.I64]; &quot;&quot;)" office:value-type="string" office:string-value="CUP3_TYPE" calcext:value-type="string">
            <text:p>CUP3_TYPE</text:p>
          </table:table-cell>
          <table:table-cell table:formula="of:=IF([$Sheet1.A64] &lt;&gt;&quot;&quot;; &quot; &quot;; &quot;&quot;)" office:value-type="string" office:string-value=" " calcext:value-type="string">
            <text:p><text:s/></text:p>
          </table:table-cell>
          <table:table-cell table:formula="of:=IF([$Sheet1.A64] &lt;&gt;&quot;&quot;; [$Sheet1.A64]; &quot;&quot;)" office:value-type="float" office:value="1025" calcext:value-type="float">
            <text:p>1025</text:p>
          </table:table-cell>
          <table:table-cell table:number-columns-repeated="16380"/>
        </table:table-row>
        <table:table-row table:style-name="ro1">
          <table:table-cell table:formula="of:=IF([$Sheet1.A65] &lt;&gt;&quot;&quot;; &quot;#define &quot;; &quot;&quot;)">
            <text:p/>
          </table:table-cell>
          <table:table-cell table:formula="of:=IF([$Sheet1.A65] &lt;&gt;&quot;&quot;; [$Sheet1.I65]; &quot;&quot;)">
            <text:p/>
          </table:table-cell>
          <table:table-cell table:formula="of:=IF([$Sheet1.A65] &lt;&gt;&quot;&quot;; &quot; &quot;; &quot;&quot;)">
            <text:p/>
          </table:table-cell>
          <table:table-cell table:formula="of:=IF([$Sheet1.A65] &lt;&gt;&quot;&quot;; [$Sheet1.A65]; &quot;&quot;)">
            <text:p/>
          </table:table-cell>
          <table:table-cell table:number-columns-repeated="16380"/>
        </table:table-row>
        <table:table-row table:style-name="ro1">
          <table:table-cell table:formula="of:=IF([$Sheet1.A66] &lt;&gt;&quot;&quot;; &quot;#define &quot;; &quot;&quot;)" office:value-type="string" office:string-value="#define " calcext:value-type="string">
            <text:p>#define </text:p>
          </table:table-cell>
          <table:table-cell table:formula="of:=IF([$Sheet1.A66] &lt;&gt;&quot;&quot;; [$Sheet1.I66]; &quot;&quot;)" office:value-type="string" office:string-value="CUP1_CHANNEL1_GAIN1_OFFSET" calcext:value-type="string">
            <text:p>CUP1_CHANNEL1_GAIN1_OFFSET</text:p>
          </table:table-cell>
          <table:table-cell table:formula="of:=IF([$Sheet1.A66] &lt;&gt;&quot;&quot;; &quot; &quot;; &quot;&quot;)" office:value-type="string" office:string-value=" " calcext:value-type="string">
            <text:p><text:s/></text:p>
          </table:table-cell>
          <table:table-cell table:formula="of:=IF([$Sheet1.A66] &lt;&gt;&quot;&quot;; [$Sheet1.A66]; &quot;&quot;)" office:value-type="float" office:value="1026" calcext:value-type="float">
            <text:p>1026</text:p>
          </table:table-cell>
          <table:table-cell table:number-columns-repeated="16380"/>
        </table:table-row>
        <table:table-row table:style-name="ro1">
          <table:table-cell table:formula="of:=IF([$Sheet1.A67] &lt;&gt;&quot;&quot;; &quot;#define &quot;; &quot;&quot;)" office:value-type="string" office:string-value="#define " calcext:value-type="string">
            <text:p>#define </text:p>
          </table:table-cell>
          <table:table-cell table:formula="of:=IF([$Sheet1.A67] &lt;&gt;&quot;&quot;; [$Sheet1.I67]; &quot;&quot;)" office:value-type="string" office:string-value="CUP1_CHANNEL2_GAIN1_OFFSET" calcext:value-type="string">
            <text:p>CUP1_CHANNEL2_GAIN1_OFFSET</text:p>
          </table:table-cell>
          <table:table-cell table:formula="of:=IF([$Sheet1.A67] &lt;&gt;&quot;&quot;; &quot; &quot;; &quot;&quot;)" office:value-type="string" office:string-value=" " calcext:value-type="string">
            <text:p><text:s/></text:p>
          </table:table-cell>
          <table:table-cell table:formula="of:=IF([$Sheet1.A67] &lt;&gt;&quot;&quot;; [$Sheet1.A67]; &quot;&quot;)" office:value-type="float" office:value="1027" calcext:value-type="float">
            <text:p>1027</text:p>
          </table:table-cell>
          <table:table-cell table:number-columns-repeated="16380"/>
        </table:table-row>
        <table:table-row table:style-name="ro1">
          <table:table-cell table:formula="of:=IF([$Sheet1.A68] &lt;&gt;&quot;&quot;; &quot;#define &quot;; &quot;&quot;)" office:value-type="string" office:string-value="#define " calcext:value-type="string">
            <text:p>#define </text:p>
          </table:table-cell>
          <table:table-cell table:formula="of:=IF([$Sheet1.A68] &lt;&gt;&quot;&quot;; [$Sheet1.I68]; &quot;&quot;)" office:value-type="string" office:string-value="CUP1_CHANNEL3_GAIN1_OFFSET" calcext:value-type="string">
            <text:p>CUP1_CHANNEL3_GAIN1_OFFSET</text:p>
          </table:table-cell>
          <table:table-cell table:formula="of:=IF([$Sheet1.A68] &lt;&gt;&quot;&quot;; &quot; &quot;; &quot;&quot;)" office:value-type="string" office:string-value=" " calcext:value-type="string">
            <text:p><text:s/></text:p>
          </table:table-cell>
          <table:table-cell table:formula="of:=IF([$Sheet1.A68] &lt;&gt;&quot;&quot;; [$Sheet1.A68]; &quot;&quot;)" office:value-type="float" office:value="1028" calcext:value-type="float">
            <text:p>1028</text:p>
          </table:table-cell>
          <table:table-cell table:number-columns-repeated="16380"/>
        </table:table-row>
        <table:table-row table:style-name="ro1">
          <table:table-cell table:formula="of:=IF([$Sheet1.A69] &lt;&gt;&quot;&quot;; &quot;#define &quot;; &quot;&quot;)" office:value-type="string" office:string-value="#define " calcext:value-type="string">
            <text:p>#define </text:p>
          </table:table-cell>
          <table:table-cell table:formula="of:=IF([$Sheet1.A69] &lt;&gt;&quot;&quot;; [$Sheet1.I69]; &quot;&quot;)" office:value-type="string" office:string-value="CUP1_CHANNEL4_GAIN1_OFFSET" calcext:value-type="string">
            <text:p>CUP1_CHANNEL4_GAIN1_OFFSET</text:p>
          </table:table-cell>
          <table:table-cell table:formula="of:=IF([$Sheet1.A69] &lt;&gt;&quot;&quot;; &quot; &quot;; &quot;&quot;)" office:value-type="string" office:string-value=" " calcext:value-type="string">
            <text:p><text:s/></text:p>
          </table:table-cell>
          <table:table-cell table:formula="of:=IF([$Sheet1.A69] &lt;&gt;&quot;&quot;; [$Sheet1.A69]; &quot;&quot;)" office:value-type="float" office:value="1029" calcext:value-type="float">
            <text:p>1029</text:p>
          </table:table-cell>
          <table:table-cell table:number-columns-repeated="16380"/>
        </table:table-row>
        <table:table-row table:style-name="ro1">
          <table:table-cell table:formula="of:=IF([$Sheet1.A70] &lt;&gt;&quot;&quot;; &quot;#define &quot;; &quot;&quot;)" office:value-type="string" office:string-value="#define " calcext:value-type="string">
            <text:p>#define </text:p>
          </table:table-cell>
          <table:table-cell table:formula="of:=IF([$Sheet1.A70] &lt;&gt;&quot;&quot;; [$Sheet1.I70]; &quot;&quot;)" office:value-type="string" office:string-value="CUP2_CHANNEL1_GAIN1_OFFSET" calcext:value-type="string">
            <text:p>CUP2_CHANNEL1_GAIN1_OFFSET</text:p>
          </table:table-cell>
          <table:table-cell table:formula="of:=IF([$Sheet1.A70] &lt;&gt;&quot;&quot;; &quot; &quot;; &quot;&quot;)" office:value-type="string" office:string-value=" " calcext:value-type="string">
            <text:p><text:s/></text:p>
          </table:table-cell>
          <table:table-cell table:formula="of:=IF([$Sheet1.A70] &lt;&gt;&quot;&quot;; [$Sheet1.A70]; &quot;&quot;)" office:value-type="float" office:value="1030" calcext:value-type="float">
            <text:p>1030</text:p>
          </table:table-cell>
          <table:table-cell table:number-columns-repeated="16380"/>
        </table:table-row>
        <table:table-row table:style-name="ro1">
          <table:table-cell table:formula="of:=IF([$Sheet1.A71] &lt;&gt;&quot;&quot;; &quot;#define &quot;; &quot;&quot;)" office:value-type="string" office:string-value="#define " calcext:value-type="string">
            <text:p>#define </text:p>
          </table:table-cell>
          <table:table-cell table:formula="of:=IF([$Sheet1.A71] &lt;&gt;&quot;&quot;; [$Sheet1.I71]; &quot;&quot;)" office:value-type="string" office:string-value="CUP2_CHANNEL2_GAIN1_OFFSET" calcext:value-type="string">
            <text:p>CUP2_CHANNEL2_GAIN1_OFFSET</text:p>
          </table:table-cell>
          <table:table-cell table:formula="of:=IF([$Sheet1.A71] &lt;&gt;&quot;&quot;; &quot; &quot;; &quot;&quot;)" office:value-type="string" office:string-value=" " calcext:value-type="string">
            <text:p><text:s/></text:p>
          </table:table-cell>
          <table:table-cell table:formula="of:=IF([$Sheet1.A71] &lt;&gt;&quot;&quot;; [$Sheet1.A71]; &quot;&quot;)" office:value-type="float" office:value="1031" calcext:value-type="float">
            <text:p>1031</text:p>
          </table:table-cell>
          <table:table-cell table:number-columns-repeated="16380"/>
        </table:table-row>
        <table:table-row table:style-name="ro1">
          <table:table-cell table:formula="of:=IF([$Sheet1.A72] &lt;&gt;&quot;&quot;; &quot;#define &quot;; &quot;&quot;)" office:value-type="string" office:string-value="#define " calcext:value-type="string">
            <text:p>#define </text:p>
          </table:table-cell>
          <table:table-cell table:formula="of:=IF([$Sheet1.A72] &lt;&gt;&quot;&quot;; [$Sheet1.I72]; &quot;&quot;)" office:value-type="string" office:string-value="CUP2_CHANNEL3_GAIN1_OFFSET" calcext:value-type="string">
            <text:p>CUP2_CHANNEL3_GAIN1_OFFSET</text:p>
          </table:table-cell>
          <table:table-cell table:formula="of:=IF([$Sheet1.A72] &lt;&gt;&quot;&quot;; &quot; &quot;; &quot;&quot;)" office:value-type="string" office:string-value=" " calcext:value-type="string">
            <text:p><text:s/></text:p>
          </table:table-cell>
          <table:table-cell table:formula="of:=IF([$Sheet1.A72] &lt;&gt;&quot;&quot;; [$Sheet1.A72]; &quot;&quot;)" office:value-type="float" office:value="1032" calcext:value-type="float">
            <text:p>1032</text:p>
          </table:table-cell>
          <table:table-cell table:number-columns-repeated="16380"/>
        </table:table-row>
        <table:table-row table:style-name="ro1">
          <table:table-cell table:formula="of:=IF([$Sheet1.A73] &lt;&gt;&quot;&quot;; &quot;#define &quot;; &quot;&quot;)" office:value-type="string" office:string-value="#define " calcext:value-type="string">
            <text:p>#define </text:p>
          </table:table-cell>
          <table:table-cell table:formula="of:=IF([$Sheet1.A73] &lt;&gt;&quot;&quot;; [$Sheet1.I73]; &quot;&quot;)" office:value-type="string" office:string-value="CUP2_CHANNEL4_GAIN1_OFFSET" calcext:value-type="string">
            <text:p>CUP2_CHANNEL4_GAIN1_OFFSET</text:p>
          </table:table-cell>
          <table:table-cell table:formula="of:=IF([$Sheet1.A73] &lt;&gt;&quot;&quot;; &quot; &quot;; &quot;&quot;)" office:value-type="string" office:string-value=" " calcext:value-type="string">
            <text:p><text:s/></text:p>
          </table:table-cell>
          <table:table-cell table:formula="of:=IF([$Sheet1.A73] &lt;&gt;&quot;&quot;; [$Sheet1.A73]; &quot;&quot;)" office:value-type="float" office:value="1033" calcext:value-type="float">
            <text:p>1033</text:p>
          </table:table-cell>
          <table:table-cell table:number-columns-repeated="16380"/>
        </table:table-row>
        <table:table-row table:style-name="ro1">
          <table:table-cell table:formula="of:=IF([$Sheet1.A74] &lt;&gt;&quot;&quot;; &quot;#define &quot;; &quot;&quot;)" office:value-type="string" office:string-value="#define " calcext:value-type="string">
            <text:p>#define </text:p>
          </table:table-cell>
          <table:table-cell table:formula="of:=IF([$Sheet1.A74] &lt;&gt;&quot;&quot;; [$Sheet1.I74]; &quot;&quot;)" office:value-type="string" office:string-value="CUP3_CHANNEL1_GAIN1_OFFSET" calcext:value-type="string">
            <text:p>CUP3_CHANNEL1_GAIN1_OFFSET</text:p>
          </table:table-cell>
          <table:table-cell table:formula="of:=IF([$Sheet1.A74] &lt;&gt;&quot;&quot;; &quot; &quot;; &quot;&quot;)" office:value-type="string" office:string-value=" " calcext:value-type="string">
            <text:p><text:s/></text:p>
          </table:table-cell>
          <table:table-cell table:formula="of:=IF([$Sheet1.A74] &lt;&gt;&quot;&quot;; [$Sheet1.A74]; &quot;&quot;)" office:value-type="float" office:value="1034" calcext:value-type="float">
            <text:p>1034</text:p>
          </table:table-cell>
          <table:table-cell table:number-columns-repeated="16380"/>
        </table:table-row>
        <table:table-row table:style-name="ro1">
          <table:table-cell table:formula="of:=IF([$Sheet1.A75] &lt;&gt;&quot;&quot;; &quot;#define &quot;; &quot;&quot;)" office:value-type="string" office:string-value="#define " calcext:value-type="string">
            <text:p>#define </text:p>
          </table:table-cell>
          <table:table-cell table:formula="of:=IF([$Sheet1.A75] &lt;&gt;&quot;&quot;; [$Sheet1.I75]; &quot;&quot;)" office:value-type="string" office:string-value="CUP3_CHANNEL2_GAIN1_OFFSET" calcext:value-type="string">
            <text:p>CUP3_CHANNEL2_GAIN1_OFFSET</text:p>
          </table:table-cell>
          <table:table-cell table:formula="of:=IF([$Sheet1.A75] &lt;&gt;&quot;&quot;; &quot; &quot;; &quot;&quot;)" office:value-type="string" office:string-value=" " calcext:value-type="string">
            <text:p><text:s/></text:p>
          </table:table-cell>
          <table:table-cell table:formula="of:=IF([$Sheet1.A75] &lt;&gt;&quot;&quot;; [$Sheet1.A75]; &quot;&quot;)" office:value-type="float" office:value="1035" calcext:value-type="float">
            <text:p>1035</text:p>
          </table:table-cell>
          <table:table-cell table:number-columns-repeated="16380"/>
        </table:table-row>
        <table:table-row table:style-name="ro1">
          <table:table-cell table:formula="of:=IF([$Sheet1.A76] &lt;&gt;&quot;&quot;; &quot;#define &quot;; &quot;&quot;)" office:value-type="string" office:string-value="#define " calcext:value-type="string">
            <text:p>#define </text:p>
          </table:table-cell>
          <table:table-cell table:formula="of:=IF([$Sheet1.A76] &lt;&gt;&quot;&quot;; [$Sheet1.I76]; &quot;&quot;)" office:value-type="string" office:string-value="CUP3_CHANNEL3_GAIN1_OFFSET" calcext:value-type="string">
            <text:p>CUP3_CHANNEL3_GAIN1_OFFSET</text:p>
          </table:table-cell>
          <table:table-cell table:formula="of:=IF([$Sheet1.A76] &lt;&gt;&quot;&quot;; &quot; &quot;; &quot;&quot;)" office:value-type="string" office:string-value=" " calcext:value-type="string">
            <text:p><text:s/></text:p>
          </table:table-cell>
          <table:table-cell table:formula="of:=IF([$Sheet1.A76] &lt;&gt;&quot;&quot;; [$Sheet1.A76]; &quot;&quot;)" office:value-type="float" office:value="1036" calcext:value-type="float">
            <text:p>1036</text:p>
          </table:table-cell>
          <table:table-cell table:number-columns-repeated="16380"/>
        </table:table-row>
        <table:table-row table:style-name="ro1">
          <table:table-cell table:formula="of:=IF([$Sheet1.A77] &lt;&gt;&quot;&quot;; &quot;#define &quot;; &quot;&quot;)" office:value-type="string" office:string-value="#define " calcext:value-type="string">
            <text:p>#define </text:p>
          </table:table-cell>
          <table:table-cell table:formula="of:=IF([$Sheet1.A77] &lt;&gt;&quot;&quot;; [$Sheet1.I77]; &quot;&quot;)" office:value-type="string" office:string-value="CUP3_CHANNEL4_GAIN1_OFFSET" calcext:value-type="string">
            <text:p>CUP3_CHANNEL4_GAIN1_OFFSET</text:p>
          </table:table-cell>
          <table:table-cell table:formula="of:=IF([$Sheet1.A77] &lt;&gt;&quot;&quot;; &quot; &quot;; &quot;&quot;)" office:value-type="string" office:string-value=" " calcext:value-type="string">
            <text:p><text:s/></text:p>
          </table:table-cell>
          <table:table-cell table:formula="of:=IF([$Sheet1.A77] &lt;&gt;&quot;&quot;; [$Sheet1.A77]; &quot;&quot;)" office:value-type="float" office:value="1037" calcext:value-type="float">
            <text:p>1037</text:p>
          </table:table-cell>
          <table:table-cell table:number-columns-repeated="16380"/>
        </table:table-row>
        <table:table-row table:style-name="ro1">
          <table:table-cell table:formula="of:=IF([$Sheet1.A78] &lt;&gt;&quot;&quot;; &quot;#define &quot;; &quot;&quot;)" office:value-type="string" office:string-value="#define " calcext:value-type="string">
            <text:p>#define </text:p>
          </table:table-cell>
          <table:table-cell table:formula="of:=IF([$Sheet1.A78] &lt;&gt;&quot;&quot;; [$Sheet1.I78]; &quot;&quot;)" office:value-type="string" office:string-value="CUP1_CHANNEL1_GAIN2_OFFSET" calcext:value-type="string">
            <text:p>CUP1_CHANNEL1_GAIN2_OFFSET</text:p>
          </table:table-cell>
          <table:table-cell table:formula="of:=IF([$Sheet1.A78] &lt;&gt;&quot;&quot;; &quot; &quot;; &quot;&quot;)" office:value-type="string" office:string-value=" " calcext:value-type="string">
            <text:p><text:s/></text:p>
          </table:table-cell>
          <table:table-cell table:formula="of:=IF([$Sheet1.A78] &lt;&gt;&quot;&quot;; [$Sheet1.A78]; &quot;&quot;)" office:value-type="float" office:value="1038" calcext:value-type="float">
            <text:p>1038</text:p>
          </table:table-cell>
          <table:table-cell table:number-columns-repeated="16380"/>
        </table:table-row>
        <table:table-row table:style-name="ro1">
          <table:table-cell table:formula="of:=IF([$Sheet1.A79] &lt;&gt;&quot;&quot;; &quot;#define &quot;; &quot;&quot;)" office:value-type="string" office:string-value="#define " calcext:value-type="string">
            <text:p>#define </text:p>
          </table:table-cell>
          <table:table-cell table:formula="of:=IF([$Sheet1.A79] &lt;&gt;&quot;&quot;; [$Sheet1.I79]; &quot;&quot;)" office:value-type="string" office:string-value="CUP1_CHANNEL2_GAIN2_OFFSET" calcext:value-type="string">
            <text:p>CUP1_CHANNEL2_GAIN2_OFFSET</text:p>
          </table:table-cell>
          <table:table-cell table:formula="of:=IF([$Sheet1.A79] &lt;&gt;&quot;&quot;; &quot; &quot;; &quot;&quot;)" office:value-type="string" office:string-value=" " calcext:value-type="string">
            <text:p><text:s/></text:p>
          </table:table-cell>
          <table:table-cell table:formula="of:=IF([$Sheet1.A79] &lt;&gt;&quot;&quot;; [$Sheet1.A79]; &quot;&quot;)" office:value-type="float" office:value="1039" calcext:value-type="float">
            <text:p>1039</text:p>
          </table:table-cell>
          <table:table-cell table:number-columns-repeated="16380"/>
        </table:table-row>
        <table:table-row table:style-name="ro1">
          <table:table-cell table:formula="of:=IF([$Sheet1.A80] &lt;&gt;&quot;&quot;; &quot;#define &quot;; &quot;&quot;)" office:value-type="string" office:string-value="#define " calcext:value-type="string">
            <text:p>#define </text:p>
          </table:table-cell>
          <table:table-cell table:formula="of:=IF([$Sheet1.A80] &lt;&gt;&quot;&quot;; [$Sheet1.I80]; &quot;&quot;)" office:value-type="string" office:string-value="CUP1_CHANNEL3_GAIN2_OFFSET" calcext:value-type="string">
            <text:p>CUP1_CHANNEL3_GAIN2_OFFSET</text:p>
          </table:table-cell>
          <table:table-cell table:formula="of:=IF([$Sheet1.A80] &lt;&gt;&quot;&quot;; &quot; &quot;; &quot;&quot;)" office:value-type="string" office:string-value=" " calcext:value-type="string">
            <text:p><text:s/></text:p>
          </table:table-cell>
          <table:table-cell table:formula="of:=IF([$Sheet1.A80] &lt;&gt;&quot;&quot;; [$Sheet1.A80]; &quot;&quot;)" office:value-type="float" office:value="1040" calcext:value-type="float">
            <text:p>1040</text:p>
          </table:table-cell>
          <table:table-cell table:number-columns-repeated="16380"/>
        </table:table-row>
        <table:table-row table:style-name="ro1">
          <table:table-cell table:formula="of:=IF([$Sheet1.A81] &lt;&gt;&quot;&quot;; &quot;#define &quot;; &quot;&quot;)" office:value-type="string" office:string-value="#define " calcext:value-type="string">
            <text:p>#define </text:p>
          </table:table-cell>
          <table:table-cell table:formula="of:=IF([$Sheet1.A81] &lt;&gt;&quot;&quot;; [$Sheet1.I81]; &quot;&quot;)" office:value-type="string" office:string-value="CUP1_CHANNEL4_GAIN2_OFFSET" calcext:value-type="string">
            <text:p>CUP1_CHANNEL4_GAIN2_OFFSET</text:p>
          </table:table-cell>
          <table:table-cell table:formula="of:=IF([$Sheet1.A81] &lt;&gt;&quot;&quot;; &quot; &quot;; &quot;&quot;)" office:value-type="string" office:string-value=" " calcext:value-type="string">
            <text:p><text:s/></text:p>
          </table:table-cell>
          <table:table-cell table:formula="of:=IF([$Sheet1.A81] &lt;&gt;&quot;&quot;; [$Sheet1.A81]; &quot;&quot;)" office:value-type="float" office:value="1041" calcext:value-type="float">
            <text:p>1041</text:p>
          </table:table-cell>
          <table:table-cell table:number-columns-repeated="16380"/>
        </table:table-row>
        <table:table-row table:style-name="ro1">
          <table:table-cell table:formula="of:=IF([$Sheet1.A82] &lt;&gt;&quot;&quot;; &quot;#define &quot;; &quot;&quot;)" office:value-type="string" office:string-value="#define " calcext:value-type="string">
            <text:p>#define </text:p>
          </table:table-cell>
          <table:table-cell table:formula="of:=IF([$Sheet1.A82] &lt;&gt;&quot;&quot;; [$Sheet1.I82]; &quot;&quot;)" office:value-type="string" office:string-value="CUP2_CHANNEL1_GAIN2_OFFSET" calcext:value-type="string">
            <text:p>CUP2_CHANNEL1_GAIN2_OFFSET</text:p>
          </table:table-cell>
          <table:table-cell table:formula="of:=IF([$Sheet1.A82] &lt;&gt;&quot;&quot;; &quot; &quot;; &quot;&quot;)" office:value-type="string" office:string-value=" " calcext:value-type="string">
            <text:p><text:s/></text:p>
          </table:table-cell>
          <table:table-cell table:formula="of:=IF([$Sheet1.A82] &lt;&gt;&quot;&quot;; [$Sheet1.A82]; &quot;&quot;)" office:value-type="float" office:value="1042" calcext:value-type="float">
            <text:p>1042</text:p>
          </table:table-cell>
          <table:table-cell table:number-columns-repeated="16380"/>
        </table:table-row>
        <table:table-row table:style-name="ro1">
          <table:table-cell table:formula="of:=IF([$Sheet1.A83] &lt;&gt;&quot;&quot;; &quot;#define &quot;; &quot;&quot;)" office:value-type="string" office:string-value="#define " calcext:value-type="string">
            <text:p>#define </text:p>
          </table:table-cell>
          <table:table-cell table:formula="of:=IF([$Sheet1.A83] &lt;&gt;&quot;&quot;; [$Sheet1.I83]; &quot;&quot;)" office:value-type="string" office:string-value="CUP2_CHANNEL2_GAIN2_OFFSET" calcext:value-type="string">
            <text:p>CUP2_CHANNEL2_GAIN2_OFFSET</text:p>
          </table:table-cell>
          <table:table-cell table:formula="of:=IF([$Sheet1.A83] &lt;&gt;&quot;&quot;; &quot; &quot;; &quot;&quot;)" office:value-type="string" office:string-value=" " calcext:value-type="string">
            <text:p><text:s/></text:p>
          </table:table-cell>
          <table:table-cell table:formula="of:=IF([$Sheet1.A83] &lt;&gt;&quot;&quot;; [$Sheet1.A83]; &quot;&quot;)" office:value-type="float" office:value="1043" calcext:value-type="float">
            <text:p>1043</text:p>
          </table:table-cell>
          <table:table-cell table:number-columns-repeated="16380"/>
        </table:table-row>
        <table:table-row table:style-name="ro1">
          <table:table-cell table:formula="of:=IF([$Sheet1.A84] &lt;&gt;&quot;&quot;; &quot;#define &quot;; &quot;&quot;)" office:value-type="string" office:string-value="#define " calcext:value-type="string">
            <text:p>#define </text:p>
          </table:table-cell>
          <table:table-cell table:formula="of:=IF([$Sheet1.A84] &lt;&gt;&quot;&quot;; [$Sheet1.I84]; &quot;&quot;)" office:value-type="string" office:string-value="CUP2_CHANNEL3_GAIN2_OFFSET" calcext:value-type="string">
            <text:p>CUP2_CHANNEL3_GAIN2_OFFSET</text:p>
          </table:table-cell>
          <table:table-cell table:formula="of:=IF([$Sheet1.A84] &lt;&gt;&quot;&quot;; &quot; &quot;; &quot;&quot;)" office:value-type="string" office:string-value=" " calcext:value-type="string">
            <text:p><text:s/></text:p>
          </table:table-cell>
          <table:table-cell table:formula="of:=IF([$Sheet1.A84] &lt;&gt;&quot;&quot;; [$Sheet1.A84]; &quot;&quot;)" office:value-type="float" office:value="1044" calcext:value-type="float">
            <text:p>1044</text:p>
          </table:table-cell>
          <table:table-cell table:number-columns-repeated="16380"/>
        </table:table-row>
        <table:table-row table:style-name="ro1">
          <table:table-cell table:formula="of:=IF([$Sheet1.A85] &lt;&gt;&quot;&quot;; &quot;#define &quot;; &quot;&quot;)" office:value-type="string" office:string-value="#define " calcext:value-type="string">
            <text:p>#define </text:p>
          </table:table-cell>
          <table:table-cell table:formula="of:=IF([$Sheet1.A85] &lt;&gt;&quot;&quot;; [$Sheet1.I85]; &quot;&quot;)" office:value-type="string" office:string-value="CUP2_CHANNEL4_GAIN2_OFFSET" calcext:value-type="string">
            <text:p>CUP2_CHANNEL4_GAIN2_OFFSET</text:p>
          </table:table-cell>
          <table:table-cell table:formula="of:=IF([$Sheet1.A85] &lt;&gt;&quot;&quot;; &quot; &quot;; &quot;&quot;)" office:value-type="string" office:string-value=" " calcext:value-type="string">
            <text:p><text:s/></text:p>
          </table:table-cell>
          <table:table-cell table:formula="of:=IF([$Sheet1.A85] &lt;&gt;&quot;&quot;; [$Sheet1.A85]; &quot;&quot;)" office:value-type="float" office:value="1045" calcext:value-type="float">
            <text:p>1045</text:p>
          </table:table-cell>
          <table:table-cell table:number-columns-repeated="16380"/>
        </table:table-row>
        <table:table-row table:style-name="ro1">
          <table:table-cell table:formula="of:=IF([$Sheet1.A86] &lt;&gt;&quot;&quot;; &quot;#define &quot;; &quot;&quot;)" office:value-type="string" office:string-value="#define " calcext:value-type="string">
            <text:p>#define </text:p>
          </table:table-cell>
          <table:table-cell table:formula="of:=IF([$Sheet1.A86] &lt;&gt;&quot;&quot;; [$Sheet1.I86]; &quot;&quot;)" office:value-type="string" office:string-value="CUP3_CHANNEL1_GAIN2_OFFSET" calcext:value-type="string">
            <text:p>CUP3_CHANNEL1_GAIN2_OFFSET</text:p>
          </table:table-cell>
          <table:table-cell table:formula="of:=IF([$Sheet1.A86] &lt;&gt;&quot;&quot;; &quot; &quot;; &quot;&quot;)" office:value-type="string" office:string-value=" " calcext:value-type="string">
            <text:p><text:s/></text:p>
          </table:table-cell>
          <table:table-cell table:formula="of:=IF([$Sheet1.A86] &lt;&gt;&quot;&quot;; [$Sheet1.A86]; &quot;&quot;)" office:value-type="float" office:value="1046" calcext:value-type="float">
            <text:p>1046</text:p>
          </table:table-cell>
          <table:table-cell table:number-columns-repeated="16380"/>
        </table:table-row>
        <table:table-row table:style-name="ro1">
          <table:table-cell table:formula="of:=IF([$Sheet1.A87] &lt;&gt;&quot;&quot;; &quot;#define &quot;; &quot;&quot;)" office:value-type="string" office:string-value="#define " calcext:value-type="string">
            <text:p>#define </text:p>
          </table:table-cell>
          <table:table-cell table:formula="of:=IF([$Sheet1.A87] &lt;&gt;&quot;&quot;; [$Sheet1.I87]; &quot;&quot;)" office:value-type="string" office:string-value="CUP3_CHANNEL2_GAIN2_OFFSET" calcext:value-type="string">
            <text:p>CUP3_CHANNEL2_GAIN2_OFFSET</text:p>
          </table:table-cell>
          <table:table-cell table:formula="of:=IF([$Sheet1.A87] &lt;&gt;&quot;&quot;; &quot; &quot;; &quot;&quot;)" office:value-type="string" office:string-value=" " calcext:value-type="string">
            <text:p><text:s/></text:p>
          </table:table-cell>
          <table:table-cell table:formula="of:=IF([$Sheet1.A87] &lt;&gt;&quot;&quot;; [$Sheet1.A87]; &quot;&quot;)" office:value-type="float" office:value="1047" calcext:value-type="float">
            <text:p>1047</text:p>
          </table:table-cell>
          <table:table-cell table:number-columns-repeated="16380"/>
        </table:table-row>
        <table:table-row table:style-name="ro1">
          <table:table-cell table:formula="of:=IF([$Sheet1.A88] &lt;&gt;&quot;&quot;; &quot;#define &quot;; &quot;&quot;)" office:value-type="string" office:string-value="#define " calcext:value-type="string">
            <text:p>#define </text:p>
          </table:table-cell>
          <table:table-cell table:formula="of:=IF([$Sheet1.A88] &lt;&gt;&quot;&quot;; [$Sheet1.I88]; &quot;&quot;)" office:value-type="string" office:string-value="CUP3_CHANNEL3_GAIN2_OFFSET" calcext:value-type="string">
            <text:p>CUP3_CHANNEL3_GAIN2_OFFSET</text:p>
          </table:table-cell>
          <table:table-cell table:formula="of:=IF([$Sheet1.A88] &lt;&gt;&quot;&quot;; &quot; &quot;; &quot;&quot;)" office:value-type="string" office:string-value=" " calcext:value-type="string">
            <text:p><text:s/></text:p>
          </table:table-cell>
          <table:table-cell table:formula="of:=IF([$Sheet1.A88] &lt;&gt;&quot;&quot;; [$Sheet1.A88]; &quot;&quot;)" office:value-type="float" office:value="1048" calcext:value-type="float">
            <text:p>1048</text:p>
          </table:table-cell>
          <table:table-cell table:number-columns-repeated="16380"/>
        </table:table-row>
        <table:table-row table:style-name="ro1">
          <table:table-cell table:formula="of:=IF([$Sheet1.A89] &lt;&gt;&quot;&quot;; &quot;#define &quot;; &quot;&quot;)" office:value-type="string" office:string-value="#define " calcext:value-type="string">
            <text:p>#define </text:p>
          </table:table-cell>
          <table:table-cell table:formula="of:=IF([$Sheet1.A89] &lt;&gt;&quot;&quot;; [$Sheet1.I89]; &quot;&quot;)" office:value-type="string" office:string-value="CUP3_CHANNEL4_GAIN2_OFFSET" calcext:value-type="string">
            <text:p>CUP3_CHANNEL4_GAIN2_OFFSET</text:p>
          </table:table-cell>
          <table:table-cell table:formula="of:=IF([$Sheet1.A89] &lt;&gt;&quot;&quot;; &quot; &quot;; &quot;&quot;)" office:value-type="string" office:string-value=" " calcext:value-type="string">
            <text:p><text:s/></text:p>
          </table:table-cell>
          <table:table-cell table:formula="of:=IF([$Sheet1.A89] &lt;&gt;&quot;&quot;; [$Sheet1.A89]; &quot;&quot;)" office:value-type="float" office:value="1049" calcext:value-type="float">
            <text:p>1049</text:p>
          </table:table-cell>
          <table:table-cell table:number-columns-repeated="16380"/>
        </table:table-row>
        <table:table-row table:style-name="ro1">
          <table:table-cell table:formula="of:=IF([$Sheet1.A90] &lt;&gt;&quot;&quot;; &quot;#define &quot;; &quot;&quot;)">
            <text:p/>
          </table:table-cell>
          <table:table-cell table:formula="of:=IF([$Sheet1.A90] &lt;&gt;&quot;&quot;; [$Sheet1.I90]; &quot;&quot;)">
            <text:p/>
          </table:table-cell>
          <table:table-cell table:formula="of:=IF([$Sheet1.A90] &lt;&gt;&quot;&quot;; &quot; &quot;; &quot;&quot;)">
            <text:p/>
          </table:table-cell>
          <table:table-cell table:formula="of:=IF([$Sheet1.A90] &lt;&gt;&quot;&quot;; [$Sheet1.A90]; &quot;&quot;)">
            <text:p/>
          </table:table-cell>
          <table:table-cell table:number-columns-repeated="16380"/>
        </table:table-row>
        <table:table-row table:style-name="ro1">
          <table:table-cell table:formula="of:=IF([$Sheet1.A91] &lt;&gt;&quot;&quot;; &quot;#define &quot;; &quot;&quot;)" office:value-type="string" office:string-value="#define " calcext:value-type="string">
            <text:p>#define </text:p>
          </table:table-cell>
          <table:table-cell table:formula="of:=IF([$Sheet1.A91] &lt;&gt;&quot;&quot;; [$Sheet1.I91]; &quot;&quot;)" office:value-type="string" office:string-value="CUP1_CHANNEL1_GAIN1_FACTOR" calcext:value-type="string">
            <text:p>CUP1_CHANNEL1_GAIN1_FACTOR</text:p>
          </table:table-cell>
          <table:table-cell table:formula="of:=IF([$Sheet1.A91] &lt;&gt;&quot;&quot;; &quot; &quot;; &quot;&quot;)" office:value-type="string" office:string-value=" " calcext:value-type="string">
            <text:p><text:s/></text:p>
          </table:table-cell>
          <table:table-cell table:formula="of:=IF([$Sheet1.A91] &lt;&gt;&quot;&quot;; [$Sheet1.A91]; &quot;&quot;)" office:value-type="float" office:value="1050" calcext:value-type="float">
            <text:p>1050</text:p>
          </table:table-cell>
          <table:table-cell table:number-columns-repeated="16380"/>
        </table:table-row>
        <table:table-row table:style-name="ro1">
          <table:table-cell table:formula="of:=IF([$Sheet1.A92] &lt;&gt;&quot;&quot;; &quot;#define &quot;; &quot;&quot;)" office:value-type="string" office:string-value="#define " calcext:value-type="string">
            <text:p>#define </text:p>
          </table:table-cell>
          <table:table-cell table:formula="of:=IF([$Sheet1.A92] &lt;&gt;&quot;&quot;; [$Sheet1.I92]; &quot;&quot;)" office:value-type="string" office:string-value="CUP1_CHANNEL2_GAIN1_FACTOR" calcext:value-type="string">
            <text:p>CUP1_CHANNEL2_GAIN1_FACTOR</text:p>
          </table:table-cell>
          <table:table-cell table:formula="of:=IF([$Sheet1.A92] &lt;&gt;&quot;&quot;; &quot; &quot;; &quot;&quot;)" office:value-type="string" office:string-value=" " calcext:value-type="string">
            <text:p><text:s/></text:p>
          </table:table-cell>
          <table:table-cell table:formula="of:=IF([$Sheet1.A92] &lt;&gt;&quot;&quot;; [$Sheet1.A92]; &quot;&quot;)" office:value-type="float" office:value="1051" calcext:value-type="float">
            <text:p>1051</text:p>
          </table:table-cell>
          <table:table-cell table:number-columns-repeated="16380"/>
        </table:table-row>
        <table:table-row table:style-name="ro1">
          <table:table-cell table:formula="of:=IF([$Sheet1.A93] &lt;&gt;&quot;&quot;; &quot;#define &quot;; &quot;&quot;)" office:value-type="string" office:string-value="#define " calcext:value-type="string">
            <text:p>#define </text:p>
          </table:table-cell>
          <table:table-cell table:formula="of:=IF([$Sheet1.A93] &lt;&gt;&quot;&quot;; [$Sheet1.I93]; &quot;&quot;)" office:value-type="string" office:string-value="CUP1_CHANNEL3_GAIN1_FACTOR" calcext:value-type="string">
            <text:p>CUP1_CHANNEL3_GAIN1_FACTOR</text:p>
          </table:table-cell>
          <table:table-cell table:formula="of:=IF([$Sheet1.A93] &lt;&gt;&quot;&quot;; &quot; &quot;; &quot;&quot;)" office:value-type="string" office:string-value=" " calcext:value-type="string">
            <text:p><text:s/></text:p>
          </table:table-cell>
          <table:table-cell table:formula="of:=IF([$Sheet1.A93] &lt;&gt;&quot;&quot;; [$Sheet1.A93]; &quot;&quot;)" office:value-type="float" office:value="1052" calcext:value-type="float">
            <text:p>1052</text:p>
          </table:table-cell>
          <table:table-cell table:number-columns-repeated="16380"/>
        </table:table-row>
        <table:table-row table:style-name="ro1">
          <table:table-cell table:formula="of:=IF([$Sheet1.A94] &lt;&gt;&quot;&quot;; &quot;#define &quot;; &quot;&quot;)" office:value-type="string" office:string-value="#define " calcext:value-type="string">
            <text:p>#define </text:p>
          </table:table-cell>
          <table:table-cell table:formula="of:=IF([$Sheet1.A94] &lt;&gt;&quot;&quot;; [$Sheet1.I94]; &quot;&quot;)" office:value-type="string" office:string-value="CUP1_CHANNEL4_GAIN1_FACTOR" calcext:value-type="string">
            <text:p>CUP1_CHANNEL4_GAIN1_FACTOR</text:p>
          </table:table-cell>
          <table:table-cell table:formula="of:=IF([$Sheet1.A94] &lt;&gt;&quot;&quot;; &quot; &quot;; &quot;&quot;)" office:value-type="string" office:string-value=" " calcext:value-type="string">
            <text:p><text:s/></text:p>
          </table:table-cell>
          <table:table-cell table:formula="of:=IF([$Sheet1.A94] &lt;&gt;&quot;&quot;; [$Sheet1.A94]; &quot;&quot;)" office:value-type="float" office:value="1053" calcext:value-type="float">
            <text:p>1053</text:p>
          </table:table-cell>
          <table:table-cell table:number-columns-repeated="16380"/>
        </table:table-row>
        <table:table-row table:style-name="ro1">
          <table:table-cell table:formula="of:=IF([$Sheet1.A95] &lt;&gt;&quot;&quot;; &quot;#define &quot;; &quot;&quot;)" office:value-type="string" office:string-value="#define " calcext:value-type="string">
            <text:p>#define </text:p>
          </table:table-cell>
          <table:table-cell table:formula="of:=IF([$Sheet1.A95] &lt;&gt;&quot;&quot;; [$Sheet1.I95]; &quot;&quot;)" office:value-type="string" office:string-value="CUP2_CHANNEL1_GAIN1_FACTOR" calcext:value-type="string">
            <text:p>CUP2_CHANNEL1_GAIN1_FACTOR</text:p>
          </table:table-cell>
          <table:table-cell table:formula="of:=IF([$Sheet1.A95] &lt;&gt;&quot;&quot;; &quot; &quot;; &quot;&quot;)" office:value-type="string" office:string-value=" " calcext:value-type="string">
            <text:p><text:s/></text:p>
          </table:table-cell>
          <table:table-cell table:formula="of:=IF([$Sheet1.A95] &lt;&gt;&quot;&quot;; [$Sheet1.A95]; &quot;&quot;)" office:value-type="float" office:value="1054" calcext:value-type="float">
            <text:p>1054</text:p>
          </table:table-cell>
          <table:table-cell table:number-columns-repeated="16380"/>
        </table:table-row>
        <table:table-row table:style-name="ro1">
          <table:table-cell table:formula="of:=IF([$Sheet1.A96] &lt;&gt;&quot;&quot;; &quot;#define &quot;; &quot;&quot;)" office:value-type="string" office:string-value="#define " calcext:value-type="string">
            <text:p>#define </text:p>
          </table:table-cell>
          <table:table-cell table:formula="of:=IF([$Sheet1.A96] &lt;&gt;&quot;&quot;; [$Sheet1.I96]; &quot;&quot;)" office:value-type="string" office:string-value="CUP2_CHANNEL2_GAIN1_FACTOR" calcext:value-type="string">
            <text:p>CUP2_CHANNEL2_GAIN1_FACTOR</text:p>
          </table:table-cell>
          <table:table-cell table:formula="of:=IF([$Sheet1.A96] &lt;&gt;&quot;&quot;; &quot; &quot;; &quot;&quot;)" office:value-type="string" office:string-value=" " calcext:value-type="string">
            <text:p><text:s/></text:p>
          </table:table-cell>
          <table:table-cell table:formula="of:=IF([$Sheet1.A96] &lt;&gt;&quot;&quot;; [$Sheet1.A96]; &quot;&quot;)" office:value-type="float" office:value="1055" calcext:value-type="float">
            <text:p>1055</text:p>
          </table:table-cell>
          <table:table-cell table:number-columns-repeated="16380"/>
        </table:table-row>
        <table:table-row table:style-name="ro1">
          <table:table-cell table:formula="of:=IF([$Sheet1.A97] &lt;&gt;&quot;&quot;; &quot;#define &quot;; &quot;&quot;)" office:value-type="string" office:string-value="#define " calcext:value-type="string">
            <text:p>#define </text:p>
          </table:table-cell>
          <table:table-cell table:formula="of:=IF([$Sheet1.A97] &lt;&gt;&quot;&quot;; [$Sheet1.I97]; &quot;&quot;)" office:value-type="string" office:string-value="CUP2_CHANNEL3_GAIN1_FACTOR" calcext:value-type="string">
            <text:p>CUP2_CHANNEL3_GAIN1_FACTOR</text:p>
          </table:table-cell>
          <table:table-cell table:formula="of:=IF([$Sheet1.A97] &lt;&gt;&quot;&quot;; &quot; &quot;; &quot;&quot;)" office:value-type="string" office:string-value=" " calcext:value-type="string">
            <text:p><text:s/></text:p>
          </table:table-cell>
          <table:table-cell table:formula="of:=IF([$Sheet1.A97] &lt;&gt;&quot;&quot;; [$Sheet1.A97]; &quot;&quot;)" office:value-type="float" office:value="1056" calcext:value-type="float">
            <text:p>1056</text:p>
          </table:table-cell>
          <table:table-cell table:number-columns-repeated="16380"/>
        </table:table-row>
        <table:table-row table:style-name="ro1">
          <table:table-cell table:formula="of:=IF([$Sheet1.A98] &lt;&gt;&quot;&quot;; &quot;#define &quot;; &quot;&quot;)" office:value-type="string" office:string-value="#define " calcext:value-type="string">
            <text:p>#define </text:p>
          </table:table-cell>
          <table:table-cell table:formula="of:=IF([$Sheet1.A98] &lt;&gt;&quot;&quot;; [$Sheet1.I98]; &quot;&quot;)" office:value-type="string" office:string-value="CUP2_CHANNEL4_GAIN1_FACTOR" calcext:value-type="string">
            <text:p>CUP2_CHANNEL4_GAIN1_FACTOR</text:p>
          </table:table-cell>
          <table:table-cell table:formula="of:=IF([$Sheet1.A98] &lt;&gt;&quot;&quot;; &quot; &quot;; &quot;&quot;)" office:value-type="string" office:string-value=" " calcext:value-type="string">
            <text:p><text:s/></text:p>
          </table:table-cell>
          <table:table-cell table:formula="of:=IF([$Sheet1.A98] &lt;&gt;&quot;&quot;; [$Sheet1.A98]; &quot;&quot;)" office:value-type="float" office:value="1057" calcext:value-type="float">
            <text:p>1057</text:p>
          </table:table-cell>
          <table:table-cell table:number-columns-repeated="16380"/>
        </table:table-row>
        <table:table-row table:style-name="ro1">
          <table:table-cell table:formula="of:=IF([$Sheet1.A99] &lt;&gt;&quot;&quot;; &quot;#define &quot;; &quot;&quot;)" office:value-type="string" office:string-value="#define " calcext:value-type="string">
            <text:p>#define </text:p>
          </table:table-cell>
          <table:table-cell table:formula="of:=IF([$Sheet1.A99] &lt;&gt;&quot;&quot;; [$Sheet1.I99]; &quot;&quot;)" office:value-type="string" office:string-value="CUP3_CHANNEL1_GAIN1_FACTOR" calcext:value-type="string">
            <text:p>CUP3_CHANNEL1_GAIN1_FACTOR</text:p>
          </table:table-cell>
          <table:table-cell table:formula="of:=IF([$Sheet1.A99] &lt;&gt;&quot;&quot;; &quot; &quot;; &quot;&quot;)" office:value-type="string" office:string-value=" " calcext:value-type="string">
            <text:p><text:s/></text:p>
          </table:table-cell>
          <table:table-cell table:formula="of:=IF([$Sheet1.A99] &lt;&gt;&quot;&quot;; [$Sheet1.A99]; &quot;&quot;)" office:value-type="float" office:value="1058" calcext:value-type="float">
            <text:p>1058</text:p>
          </table:table-cell>
          <table:table-cell table:number-columns-repeated="16380"/>
        </table:table-row>
        <table:table-row table:style-name="ro1">
          <table:table-cell table:formula="of:=IF([$Sheet1.A100] &lt;&gt;&quot;&quot;; &quot;#define &quot;; &quot;&quot;)" office:value-type="string" office:string-value="#define " calcext:value-type="string">
            <text:p>#define </text:p>
          </table:table-cell>
          <table:table-cell table:formula="of:=IF([$Sheet1.A100] &lt;&gt;&quot;&quot;; [$Sheet1.I100]; &quot;&quot;)" office:value-type="string" office:string-value="CUP3_CHANNEL2_GAIN1_FACTOR" calcext:value-type="string">
            <text:p>CUP3_CHANNEL2_GAIN1_FACTOR</text:p>
          </table:table-cell>
          <table:table-cell table:formula="of:=IF([$Sheet1.A100] &lt;&gt;&quot;&quot;; &quot; &quot;; &quot;&quot;)" office:value-type="string" office:string-value=" " calcext:value-type="string">
            <text:p><text:s/></text:p>
          </table:table-cell>
          <table:table-cell table:formula="of:=IF([$Sheet1.A100] &lt;&gt;&quot;&quot;; [$Sheet1.A100]; &quot;&quot;)" office:value-type="float" office:value="1059" calcext:value-type="float">
            <text:p>1059</text:p>
          </table:table-cell>
          <table:table-cell table:number-columns-repeated="16380"/>
        </table:table-row>
        <table:table-row table:style-name="ro1">
          <table:table-cell table:formula="of:=IF([$Sheet1.A101] &lt;&gt;&quot;&quot;; &quot;#define &quot;; &quot;&quot;)" office:value-type="string" office:string-value="#define " calcext:value-type="string">
            <text:p>#define </text:p>
          </table:table-cell>
          <table:table-cell table:formula="of:=IF([$Sheet1.A101] &lt;&gt;&quot;&quot;; [$Sheet1.I101]; &quot;&quot;)" office:value-type="string" office:string-value="CUP3_CHANNEL3_GAIN1_FACTOR" calcext:value-type="string">
            <text:p>CUP3_CHANNEL3_GAIN1_FACTOR</text:p>
          </table:table-cell>
          <table:table-cell table:formula="of:=IF([$Sheet1.A101] &lt;&gt;&quot;&quot;; &quot; &quot;; &quot;&quot;)" office:value-type="string" office:string-value=" " calcext:value-type="string">
            <text:p><text:s/></text:p>
          </table:table-cell>
          <table:table-cell table:formula="of:=IF([$Sheet1.A101] &lt;&gt;&quot;&quot;; [$Sheet1.A101]; &quot;&quot;)" office:value-type="float" office:value="1060" calcext:value-type="float">
            <text:p>1060</text:p>
          </table:table-cell>
          <table:table-cell table:number-columns-repeated="16380"/>
        </table:table-row>
        <table:table-row table:style-name="ro1">
          <table:table-cell table:formula="of:=IF([$Sheet1.A102] &lt;&gt;&quot;&quot;; &quot;#define &quot;; &quot;&quot;)" office:value-type="string" office:string-value="#define " calcext:value-type="string">
            <text:p>#define </text:p>
          </table:table-cell>
          <table:table-cell table:formula="of:=IF([$Sheet1.A102] &lt;&gt;&quot;&quot;; [$Sheet1.I102]; &quot;&quot;)" office:value-type="string" office:string-value="CUP3_CHANNEL4_GAIN1_FACTOR" calcext:value-type="string">
            <text:p>CUP3_CHANNEL4_GAIN1_FACTOR</text:p>
          </table:table-cell>
          <table:table-cell table:formula="of:=IF([$Sheet1.A102] &lt;&gt;&quot;&quot;; &quot; &quot;; &quot;&quot;)" office:value-type="string" office:string-value=" " calcext:value-type="string">
            <text:p><text:s/></text:p>
          </table:table-cell>
          <table:table-cell table:formula="of:=IF([$Sheet1.A102] &lt;&gt;&quot;&quot;; [$Sheet1.A102]; &quot;&quot;)" office:value-type="float" office:value="1061" calcext:value-type="float">
            <text:p>1061</text:p>
          </table:table-cell>
          <table:table-cell table:number-columns-repeated="16380"/>
        </table:table-row>
        <table:table-row table:style-name="ro1">
          <table:table-cell table:formula="of:=IF([$Sheet1.A103] &lt;&gt;&quot;&quot;; &quot;#define &quot;; &quot;&quot;)" office:value-type="string" office:string-value="#define " calcext:value-type="string">
            <text:p>#define </text:p>
          </table:table-cell>
          <table:table-cell table:formula="of:=IF([$Sheet1.A103] &lt;&gt;&quot;&quot;; [$Sheet1.I103]; &quot;&quot;)" office:value-type="string" office:string-value="CUP1_CHANNEL1_GAIN2_FACTOR" calcext:value-type="string">
            <text:p>CUP1_CHANNEL1_GAIN2_FACTOR</text:p>
          </table:table-cell>
          <table:table-cell table:formula="of:=IF([$Sheet1.A103] &lt;&gt;&quot;&quot;; &quot; &quot;; &quot;&quot;)" office:value-type="string" office:string-value=" " calcext:value-type="string">
            <text:p><text:s/></text:p>
          </table:table-cell>
          <table:table-cell table:formula="of:=IF([$Sheet1.A103] &lt;&gt;&quot;&quot;; [$Sheet1.A103]; &quot;&quot;)" office:value-type="float" office:value="1062" calcext:value-type="float">
            <text:p>1062</text:p>
          </table:table-cell>
          <table:table-cell table:number-columns-repeated="16380"/>
        </table:table-row>
        <table:table-row table:style-name="ro1">
          <table:table-cell table:formula="of:=IF([$Sheet1.A104] &lt;&gt;&quot;&quot;; &quot;#define &quot;; &quot;&quot;)" office:value-type="string" office:string-value="#define " calcext:value-type="string">
            <text:p>#define </text:p>
          </table:table-cell>
          <table:table-cell table:formula="of:=IF([$Sheet1.A104] &lt;&gt;&quot;&quot;; [$Sheet1.I104]; &quot;&quot;)" office:value-type="string" office:string-value="CUP1_CHANNEL2_GAIN2_FACTOR" calcext:value-type="string">
            <text:p>CUP1_CHANNEL2_GAIN2_FACTOR</text:p>
          </table:table-cell>
          <table:table-cell table:formula="of:=IF([$Sheet1.A104] &lt;&gt;&quot;&quot;; &quot; &quot;; &quot;&quot;)" office:value-type="string" office:string-value=" " calcext:value-type="string">
            <text:p><text:s/></text:p>
          </table:table-cell>
          <table:table-cell table:formula="of:=IF([$Sheet1.A104] &lt;&gt;&quot;&quot;; [$Sheet1.A104]; &quot;&quot;)" office:value-type="float" office:value="1063" calcext:value-type="float">
            <text:p>1063</text:p>
          </table:table-cell>
          <table:table-cell table:number-columns-repeated="16380"/>
        </table:table-row>
        <table:table-row table:style-name="ro1">
          <table:table-cell table:formula="of:=IF([$Sheet1.A105] &lt;&gt;&quot;&quot;; &quot;#define &quot;; &quot;&quot;)" office:value-type="string" office:string-value="#define " calcext:value-type="string">
            <text:p>#define </text:p>
          </table:table-cell>
          <table:table-cell table:formula="of:=IF([$Sheet1.A105] &lt;&gt;&quot;&quot;; [$Sheet1.I105]; &quot;&quot;)" office:value-type="string" office:string-value="CUP1_CHANNEL3_GAIN2_FACTOR" calcext:value-type="string">
            <text:p>CUP1_CHANNEL3_GAIN2_FACTOR</text:p>
          </table:table-cell>
          <table:table-cell table:formula="of:=IF([$Sheet1.A105] &lt;&gt;&quot;&quot;; &quot; &quot;; &quot;&quot;)" office:value-type="string" office:string-value=" " calcext:value-type="string">
            <text:p><text:s/></text:p>
          </table:table-cell>
          <table:table-cell table:formula="of:=IF([$Sheet1.A105] &lt;&gt;&quot;&quot;; [$Sheet1.A105]; &quot;&quot;)" office:value-type="float" office:value="1064" calcext:value-type="float">
            <text:p>1064</text:p>
          </table:table-cell>
          <table:table-cell table:number-columns-repeated="16380"/>
        </table:table-row>
        <table:table-row table:style-name="ro1">
          <table:table-cell table:formula="of:=IF([$Sheet1.A106] &lt;&gt;&quot;&quot;; &quot;#define &quot;; &quot;&quot;)" office:value-type="string" office:string-value="#define " calcext:value-type="string">
            <text:p>#define </text:p>
          </table:table-cell>
          <table:table-cell table:formula="of:=IF([$Sheet1.A106] &lt;&gt;&quot;&quot;; [$Sheet1.I106]; &quot;&quot;)" office:value-type="string" office:string-value="CUP1_CHANNEL4_GAIN2_FACTOR" calcext:value-type="string">
            <text:p>CUP1_CHANNEL4_GAIN2_FACTOR</text:p>
          </table:table-cell>
          <table:table-cell table:formula="of:=IF([$Sheet1.A106] &lt;&gt;&quot;&quot;; &quot; &quot;; &quot;&quot;)" office:value-type="string" office:string-value=" " calcext:value-type="string">
            <text:p><text:s/></text:p>
          </table:table-cell>
          <table:table-cell table:formula="of:=IF([$Sheet1.A106] &lt;&gt;&quot;&quot;; [$Sheet1.A106]; &quot;&quot;)" office:value-type="float" office:value="1065" calcext:value-type="float">
            <text:p>1065</text:p>
          </table:table-cell>
          <table:table-cell table:number-columns-repeated="16380"/>
        </table:table-row>
        <table:table-row table:style-name="ro1">
          <table:table-cell table:formula="of:=IF([$Sheet1.A107] &lt;&gt;&quot;&quot;; &quot;#define &quot;; &quot;&quot;)" office:value-type="string" office:string-value="#define " calcext:value-type="string">
            <text:p>#define </text:p>
          </table:table-cell>
          <table:table-cell table:formula="of:=IF([$Sheet1.A107] &lt;&gt;&quot;&quot;; [$Sheet1.I107]; &quot;&quot;)" office:value-type="string" office:string-value="CUP2_CHANNEL1_GAIN2_FACTOR" calcext:value-type="string">
            <text:p>CUP2_CHANNEL1_GAIN2_FACTOR</text:p>
          </table:table-cell>
          <table:table-cell table:formula="of:=IF([$Sheet1.A107] &lt;&gt;&quot;&quot;; &quot; &quot;; &quot;&quot;)" office:value-type="string" office:string-value=" " calcext:value-type="string">
            <text:p><text:s/></text:p>
          </table:table-cell>
          <table:table-cell table:formula="of:=IF([$Sheet1.A107] &lt;&gt;&quot;&quot;; [$Sheet1.A107]; &quot;&quot;)" office:value-type="float" office:value="1066" calcext:value-type="float">
            <text:p>1066</text:p>
          </table:table-cell>
          <table:table-cell table:number-columns-repeated="16380"/>
        </table:table-row>
        <table:table-row table:style-name="ro1">
          <table:table-cell table:formula="of:=IF([$Sheet1.A108] &lt;&gt;&quot;&quot;; &quot;#define &quot;; &quot;&quot;)" office:value-type="string" office:string-value="#define " calcext:value-type="string">
            <text:p>#define </text:p>
          </table:table-cell>
          <table:table-cell table:formula="of:=IF([$Sheet1.A108] &lt;&gt;&quot;&quot;; [$Sheet1.I108]; &quot;&quot;)" office:value-type="string" office:string-value="CUP2_CHANNEL2_GAIN2_FACTOR" calcext:value-type="string">
            <text:p>CUP2_CHANNEL2_GAIN2_FACTOR</text:p>
          </table:table-cell>
          <table:table-cell table:formula="of:=IF([$Sheet1.A108] &lt;&gt;&quot;&quot;; &quot; &quot;; &quot;&quot;)" office:value-type="string" office:string-value=" " calcext:value-type="string">
            <text:p><text:s/></text:p>
          </table:table-cell>
          <table:table-cell table:formula="of:=IF([$Sheet1.A108] &lt;&gt;&quot;&quot;; [$Sheet1.A108]; &quot;&quot;)" office:value-type="float" office:value="1067" calcext:value-type="float">
            <text:p>1067</text:p>
          </table:table-cell>
          <table:table-cell table:number-columns-repeated="16380"/>
        </table:table-row>
        <table:table-row table:style-name="ro1">
          <table:table-cell table:formula="of:=IF([$Sheet1.A109] &lt;&gt;&quot;&quot;; &quot;#define &quot;; &quot;&quot;)" office:value-type="string" office:string-value="#define " calcext:value-type="string">
            <text:p>#define </text:p>
          </table:table-cell>
          <table:table-cell table:formula="of:=IF([$Sheet1.A109] &lt;&gt;&quot;&quot;; [$Sheet1.I109]; &quot;&quot;)" office:value-type="string" office:string-value="CUP2_CHANNEL3_GAIN2_FACTOR" calcext:value-type="string">
            <text:p>CUP2_CHANNEL3_GAIN2_FACTOR</text:p>
          </table:table-cell>
          <table:table-cell table:formula="of:=IF([$Sheet1.A109] &lt;&gt;&quot;&quot;; &quot; &quot;; &quot;&quot;)" office:value-type="string" office:string-value=" " calcext:value-type="string">
            <text:p><text:s/></text:p>
          </table:table-cell>
          <table:table-cell table:formula="of:=IF([$Sheet1.A109] &lt;&gt;&quot;&quot;; [$Sheet1.A109]; &quot;&quot;)" office:value-type="float" office:value="1068" calcext:value-type="float">
            <text:p>1068</text:p>
          </table:table-cell>
          <table:table-cell table:number-columns-repeated="16380"/>
        </table:table-row>
        <table:table-row table:style-name="ro1">
          <table:table-cell table:formula="of:=IF([$Sheet1.A110] &lt;&gt;&quot;&quot;; &quot;#define &quot;; &quot;&quot;)" office:value-type="string" office:string-value="#define " calcext:value-type="string">
            <text:p>#define </text:p>
          </table:table-cell>
          <table:table-cell table:formula="of:=IF([$Sheet1.A110] &lt;&gt;&quot;&quot;; [$Sheet1.I110]; &quot;&quot;)" office:value-type="string" office:string-value="CUP2_CHANNEL4_GAIN2_FACTOR" calcext:value-type="string">
            <text:p>CUP2_CHANNEL4_GAIN2_FACTOR</text:p>
          </table:table-cell>
          <table:table-cell table:formula="of:=IF([$Sheet1.A110] &lt;&gt;&quot;&quot;; &quot; &quot;; &quot;&quot;)" office:value-type="string" office:string-value=" " calcext:value-type="string">
            <text:p><text:s/></text:p>
          </table:table-cell>
          <table:table-cell table:formula="of:=IF([$Sheet1.A110] &lt;&gt;&quot;&quot;; [$Sheet1.A110]; &quot;&quot;)" office:value-type="float" office:value="1069" calcext:value-type="float">
            <text:p>1069</text:p>
          </table:table-cell>
          <table:table-cell table:number-columns-repeated="16380"/>
        </table:table-row>
        <table:table-row table:style-name="ro1">
          <table:table-cell table:formula="of:=IF([$Sheet1.A111] &lt;&gt;&quot;&quot;; &quot;#define &quot;; &quot;&quot;)" office:value-type="string" office:string-value="#define " calcext:value-type="string">
            <text:p>#define </text:p>
          </table:table-cell>
          <table:table-cell table:formula="of:=IF([$Sheet1.A111] &lt;&gt;&quot;&quot;; [$Sheet1.I111]; &quot;&quot;)" office:value-type="string" office:string-value="CUP3_CHANNEL1_GAIN2_FACTOR" calcext:value-type="string">
            <text:p>CUP3_CHANNEL1_GAIN2_FACTOR</text:p>
          </table:table-cell>
          <table:table-cell table:formula="of:=IF([$Sheet1.A111] &lt;&gt;&quot;&quot;; &quot; &quot;; &quot;&quot;)" office:value-type="string" office:string-value=" " calcext:value-type="string">
            <text:p><text:s/></text:p>
          </table:table-cell>
          <table:table-cell table:formula="of:=IF([$Sheet1.A111] &lt;&gt;&quot;&quot;; [$Sheet1.A111]; &quot;&quot;)" office:value-type="float" office:value="1070" calcext:value-type="float">
            <text:p>1070</text:p>
          </table:table-cell>
          <table:table-cell table:number-columns-repeated="16380"/>
        </table:table-row>
        <table:table-row table:style-name="ro1">
          <table:table-cell table:formula="of:=IF([$Sheet1.A112] &lt;&gt;&quot;&quot;; &quot;#define &quot;; &quot;&quot;)" office:value-type="string" office:string-value="#define " calcext:value-type="string">
            <text:p>#define </text:p>
          </table:table-cell>
          <table:table-cell table:formula="of:=IF([$Sheet1.A112] &lt;&gt;&quot;&quot;; [$Sheet1.I112]; &quot;&quot;)" office:value-type="string" office:string-value="CUP3_CHANNEL2_GAIN2_FACTOR" calcext:value-type="string">
            <text:p>CUP3_CHANNEL2_GAIN2_FACTOR</text:p>
          </table:table-cell>
          <table:table-cell table:formula="of:=IF([$Sheet1.A112] &lt;&gt;&quot;&quot;; &quot; &quot;; &quot;&quot;)" office:value-type="string" office:string-value=" " calcext:value-type="string">
            <text:p><text:s/></text:p>
          </table:table-cell>
          <table:table-cell table:formula="of:=IF([$Sheet1.A112] &lt;&gt;&quot;&quot;; [$Sheet1.A112]; &quot;&quot;)" office:value-type="float" office:value="1071" calcext:value-type="float">
            <text:p>1071</text:p>
          </table:table-cell>
          <table:table-cell table:number-columns-repeated="16380"/>
        </table:table-row>
        <table:table-row table:style-name="ro1">
          <table:table-cell table:formula="of:=IF([$Sheet1.A113] &lt;&gt;&quot;&quot;; &quot;#define &quot;; &quot;&quot;)" office:value-type="string" office:string-value="#define " calcext:value-type="string">
            <text:p>#define </text:p>
          </table:table-cell>
          <table:table-cell table:formula="of:=IF([$Sheet1.A113] &lt;&gt;&quot;&quot;; [$Sheet1.I113]; &quot;&quot;)" office:value-type="string" office:string-value="CUP3_CHANNEL3_GAIN2_FACTOR" calcext:value-type="string">
            <text:p>CUP3_CHANNEL3_GAIN2_FACTOR</text:p>
          </table:table-cell>
          <table:table-cell table:formula="of:=IF([$Sheet1.A113] &lt;&gt;&quot;&quot;; &quot; &quot;; &quot;&quot;)" office:value-type="string" office:string-value=" " calcext:value-type="string">
            <text:p><text:s/></text:p>
          </table:table-cell>
          <table:table-cell table:formula="of:=IF([$Sheet1.A113] &lt;&gt;&quot;&quot;; [$Sheet1.A113]; &quot;&quot;)" office:value-type="float" office:value="1072" calcext:value-type="float">
            <text:p>1072</text:p>
          </table:table-cell>
          <table:table-cell table:number-columns-repeated="16380"/>
        </table:table-row>
        <table:table-row table:style-name="ro1">
          <table:table-cell table:formula="of:=IF([$Sheet1.A114] &lt;&gt;&quot;&quot;; &quot;#define &quot;; &quot;&quot;)" office:value-type="string" office:string-value="#define " calcext:value-type="string">
            <text:p>#define </text:p>
          </table:table-cell>
          <table:table-cell table:formula="of:=IF([$Sheet1.A114] &lt;&gt;&quot;&quot;; [$Sheet1.I114]; &quot;&quot;)" office:value-type="string" office:string-value="CUP3_CHANNEL4_GAIN2_FACTOR" calcext:value-type="string">
            <text:p>CUP3_CHANNEL4_GAIN2_FACTOR</text:p>
          </table:table-cell>
          <table:table-cell table:formula="of:=IF([$Sheet1.A114] &lt;&gt;&quot;&quot;; &quot; &quot;; &quot;&quot;)" office:value-type="string" office:string-value=" " calcext:value-type="string">
            <text:p><text:s/></text:p>
          </table:table-cell>
          <table:table-cell table:formula="of:=IF([$Sheet1.A114] &lt;&gt;&quot;&quot;; [$Sheet1.A114]; &quot;&quot;)" office:value-type="float" office:value="1073" calcext:value-type="float">
            <text:p>1073</text:p>
          </table:table-cell>
          <table:table-cell table:number-columns-repeated="16380"/>
        </table:table-row>
        <table:table-row table:style-name="ro1">
          <table:table-cell table:formula="of:=IF([$Sheet1.A115] &lt;&gt;&quot;&quot;; &quot;#define &quot;; &quot;&quot;)">
            <text:p/>
          </table:table-cell>
          <table:table-cell table:formula="of:=IF([$Sheet1.A115] &lt;&gt;&quot;&quot;; [$Sheet1.I115]; &quot;&quot;)">
            <text:p/>
          </table:table-cell>
          <table:table-cell table:formula="of:=IF([$Sheet1.A115] &lt;&gt;&quot;&quot;; &quot; &quot;; &quot;&quot;)">
            <text:p/>
          </table:table-cell>
          <table:table-cell table:formula="of:=IF([$Sheet1.A115] &lt;&gt;&quot;&quot;; [$Sheet1.A115]; &quot;&quot;)">
            <text:p/>
          </table:table-cell>
          <table:table-cell table:number-columns-repeated="16380"/>
        </table:table-row>
        <table:table-row table:style-name="ro1">
          <table:table-cell table:formula="of:=IF([$Sheet1.A116] &lt;&gt;&quot;&quot;; &quot;#define &quot;; &quot;&quot;)" office:value-type="string" office:string-value="#define " calcext:value-type="string">
            <text:p>#define </text:p>
          </table:table-cell>
          <table:table-cell table:formula="of:=IF([$Sheet1.A116] &lt;&gt;&quot;&quot;; [$Sheet1.I116]; &quot;&quot;)" office:value-type="string" office:string-value="RANGE_CHANGE_THRESHOLD" calcext:value-type="string">
            <text:p>RANGE_CHANGE_THRESHOLD</text:p>
          </table:table-cell>
          <table:table-cell table:formula="of:=IF([$Sheet1.A116] &lt;&gt;&quot;&quot;; &quot; &quot;; &quot;&quot;)" office:value-type="string" office:string-value=" " calcext:value-type="string">
            <text:p><text:s/></text:p>
          </table:table-cell>
          <table:table-cell table:formula="of:=IF([$Sheet1.A116] &lt;&gt;&quot;&quot;; [$Sheet1.A116]; &quot;&quot;)" office:value-type="float" office:value="1074" calcext:value-type="float">
            <text:p>1074</text:p>
          </table:table-cell>
          <table:table-cell table:number-columns-repeated="16380"/>
        </table:table-row>
        <table:table-row table:style-name="ro1">
          <table:table-cell table:formula="of:=IF([$Sheet1.A117] &lt;&gt;&quot;&quot;; &quot;#define &quot;; &quot;&quot;)">
            <text:p/>
          </table:table-cell>
          <table:table-cell table:formula="of:=IF([$Sheet1.A117] &lt;&gt;&quot;&quot;; [$Sheet1.I117]; &quot;&quot;)">
            <text:p/>
          </table:table-cell>
          <table:table-cell table:formula="of:=IF([$Sheet1.A117] &lt;&gt;&quot;&quot;; &quot; &quot;; &quot;&quot;)">
            <text:p/>
          </table:table-cell>
          <table:table-cell table:formula="of:=IF([$Sheet1.A117] &lt;&gt;&quot;&quot;; [$Sheet1.A117]; &quot;&quot;)">
            <text:p/>
          </table:table-cell>
          <table:table-cell table:number-columns-repeated="16380"/>
        </table:table-row>
        <table:table-row table:style-name="ro1">
          <table:table-cell table:formula="of:=IF([$Sheet1.A118] &lt;&gt;&quot;&quot;; &quot;#define &quot;; &quot;&quot;)" office:value-type="string" office:string-value="#define " calcext:value-type="string">
            <text:p>#define </text:p>
          </table:table-cell>
          <table:table-cell table:formula="of:=IF([$Sheet1.A118] &lt;&gt;&quot;&quot;; [$Sheet1.I118]; &quot;&quot;)" office:value-type="string" office:string-value="CUP1_CHANNEL1_LOWER_LIMIT" calcext:value-type="string">
            <text:p>CUP1_CHANNEL1_LOWER_LIMIT</text:p>
          </table:table-cell>
          <table:table-cell table:formula="of:=IF([$Sheet1.A118] &lt;&gt;&quot;&quot;; &quot; &quot;; &quot;&quot;)" office:value-type="string" office:string-value=" " calcext:value-type="string">
            <text:p><text:s/></text:p>
          </table:table-cell>
          <table:table-cell table:formula="of:=IF([$Sheet1.A118] &lt;&gt;&quot;&quot;; [$Sheet1.A118]; &quot;&quot;)" office:value-type="float" office:value="1075" calcext:value-type="float">
            <text:p>1075</text:p>
          </table:table-cell>
          <table:table-cell table:number-columns-repeated="16380"/>
        </table:table-row>
        <table:table-row table:style-name="ro1">
          <table:table-cell table:formula="of:=IF([$Sheet1.A119] &lt;&gt;&quot;&quot;; &quot;#define &quot;; &quot;&quot;)" office:value-type="string" office:string-value="#define " calcext:value-type="string">
            <text:p>#define </text:p>
          </table:table-cell>
          <table:table-cell table:formula="of:=IF([$Sheet1.A119] &lt;&gt;&quot;&quot;; [$Sheet1.I119]; &quot;&quot;)" office:value-type="string" office:string-value="CUP1_CHANNEL2_LOWER_LIMIT" calcext:value-type="string">
            <text:p>CUP1_CHANNEL2_LOWER_LIMIT</text:p>
          </table:table-cell>
          <table:table-cell table:formula="of:=IF([$Sheet1.A119] &lt;&gt;&quot;&quot;; &quot; &quot;; &quot;&quot;)" office:value-type="string" office:string-value=" " calcext:value-type="string">
            <text:p><text:s/></text:p>
          </table:table-cell>
          <table:table-cell table:formula="of:=IF([$Sheet1.A119] &lt;&gt;&quot;&quot;; [$Sheet1.A119]; &quot;&quot;)" office:value-type="float" office:value="1076" calcext:value-type="float">
            <text:p>1076</text:p>
          </table:table-cell>
          <table:table-cell table:number-columns-repeated="16380"/>
        </table:table-row>
        <table:table-row table:style-name="ro1">
          <table:table-cell table:formula="of:=IF([$Sheet1.A120] &lt;&gt;&quot;&quot;; &quot;#define &quot;; &quot;&quot;)" office:value-type="string" office:string-value="#define " calcext:value-type="string">
            <text:p>#define </text:p>
          </table:table-cell>
          <table:table-cell table:formula="of:=IF([$Sheet1.A120] &lt;&gt;&quot;&quot;; [$Sheet1.I120]; &quot;&quot;)" office:value-type="string" office:string-value="CUP1_CHANNEL3_LOWER_LIMIT" calcext:value-type="string">
            <text:p>CUP1_CHANNEL3_LOWER_LIMIT</text:p>
          </table:table-cell>
          <table:table-cell table:formula="of:=IF([$Sheet1.A120] &lt;&gt;&quot;&quot;; &quot; &quot;; &quot;&quot;)" office:value-type="string" office:string-value=" " calcext:value-type="string">
            <text:p><text:s/></text:p>
          </table:table-cell>
          <table:table-cell table:formula="of:=IF([$Sheet1.A120] &lt;&gt;&quot;&quot;; [$Sheet1.A120]; &quot;&quot;)" office:value-type="float" office:value="1077" calcext:value-type="float">
            <text:p>1077</text:p>
          </table:table-cell>
          <table:table-cell table:number-columns-repeated="16380"/>
        </table:table-row>
        <table:table-row table:style-name="ro1">
          <table:table-cell table:formula="of:=IF([$Sheet1.A121] &lt;&gt;&quot;&quot;; &quot;#define &quot;; &quot;&quot;)" office:value-type="string" office:string-value="#define " calcext:value-type="string">
            <text:p>#define </text:p>
          </table:table-cell>
          <table:table-cell table:formula="of:=IF([$Sheet1.A121] &lt;&gt;&quot;&quot;; [$Sheet1.I121]; &quot;&quot;)" office:value-type="string" office:string-value="CUP1_CHANNEL4_LOWER_LIMIT" calcext:value-type="string">
            <text:p>CUP1_CHANNEL4_LOWER_LIMIT</text:p>
          </table:table-cell>
          <table:table-cell table:formula="of:=IF([$Sheet1.A121] &lt;&gt;&quot;&quot;; &quot; &quot;; &quot;&quot;)" office:value-type="string" office:string-value=" " calcext:value-type="string">
            <text:p><text:s/></text:p>
          </table:table-cell>
          <table:table-cell table:formula="of:=IF([$Sheet1.A121] &lt;&gt;&quot;&quot;; [$Sheet1.A121]; &quot;&quot;)" office:value-type="float" office:value="1078" calcext:value-type="float">
            <text:p>1078</text:p>
          </table:table-cell>
          <table:table-cell table:number-columns-repeated="16380"/>
        </table:table-row>
        <table:table-row table:style-name="ro1">
          <table:table-cell table:formula="of:=IF([$Sheet1.A122] &lt;&gt;&quot;&quot;; &quot;#define &quot;; &quot;&quot;)" office:value-type="string" office:string-value="#define " calcext:value-type="string">
            <text:p>#define </text:p>
          </table:table-cell>
          <table:table-cell table:formula="of:=IF([$Sheet1.A122] &lt;&gt;&quot;&quot;; [$Sheet1.I122]; &quot;&quot;)" office:value-type="string" office:string-value="CUP2_CHANNEL1_LOWER_LIMIT" calcext:value-type="string">
            <text:p>CUP2_CHANNEL1_LOWER_LIMIT</text:p>
          </table:table-cell>
          <table:table-cell table:formula="of:=IF([$Sheet1.A122] &lt;&gt;&quot;&quot;; &quot; &quot;; &quot;&quot;)" office:value-type="string" office:string-value=" " calcext:value-type="string">
            <text:p><text:s/></text:p>
          </table:table-cell>
          <table:table-cell table:formula="of:=IF([$Sheet1.A122] &lt;&gt;&quot;&quot;; [$Sheet1.A122]; &quot;&quot;)" office:value-type="float" office:value="1079" calcext:value-type="float">
            <text:p>1079</text:p>
          </table:table-cell>
          <table:table-cell table:number-columns-repeated="16380"/>
        </table:table-row>
        <table:table-row table:style-name="ro1">
          <table:table-cell table:formula="of:=IF([$Sheet1.A123] &lt;&gt;&quot;&quot;; &quot;#define &quot;; &quot;&quot;)" office:value-type="string" office:string-value="#define " calcext:value-type="string">
            <text:p>#define </text:p>
          </table:table-cell>
          <table:table-cell table:formula="of:=IF([$Sheet1.A123] &lt;&gt;&quot;&quot;; [$Sheet1.I123]; &quot;&quot;)" office:value-type="string" office:string-value="CUP2_CHANNEL2_LOWER_LIMIT" calcext:value-type="string">
            <text:p>CUP2_CHANNEL2_LOWER_LIMIT</text:p>
          </table:table-cell>
          <table:table-cell table:formula="of:=IF([$Sheet1.A123] &lt;&gt;&quot;&quot;; &quot; &quot;; &quot;&quot;)" office:value-type="string" office:string-value=" " calcext:value-type="string">
            <text:p><text:s/></text:p>
          </table:table-cell>
          <table:table-cell table:formula="of:=IF([$Sheet1.A123] &lt;&gt;&quot;&quot;; [$Sheet1.A123]; &quot;&quot;)" office:value-type="float" office:value="1080" calcext:value-type="float">
            <text:p>1080</text:p>
          </table:table-cell>
          <table:table-cell table:number-columns-repeated="16380"/>
        </table:table-row>
        <table:table-row table:style-name="ro1">
          <table:table-cell table:formula="of:=IF([$Sheet1.A124] &lt;&gt;&quot;&quot;; &quot;#define &quot;; &quot;&quot;)" office:value-type="string" office:string-value="#define " calcext:value-type="string">
            <text:p>#define </text:p>
          </table:table-cell>
          <table:table-cell table:formula="of:=IF([$Sheet1.A124] &lt;&gt;&quot;&quot;; [$Sheet1.I124]; &quot;&quot;)" office:value-type="string" office:string-value="CUP2_CHANNEL3_LOWER_LIMIT" calcext:value-type="string">
            <text:p>CUP2_CHANNEL3_LOWER_LIMIT</text:p>
          </table:table-cell>
          <table:table-cell table:formula="of:=IF([$Sheet1.A124] &lt;&gt;&quot;&quot;; &quot; &quot;; &quot;&quot;)" office:value-type="string" office:string-value=" " calcext:value-type="string">
            <text:p><text:s/></text:p>
          </table:table-cell>
          <table:table-cell table:formula="of:=IF([$Sheet1.A124] &lt;&gt;&quot;&quot;; [$Sheet1.A124]; &quot;&quot;)" office:value-type="float" office:value="1081" calcext:value-type="float">
            <text:p>1081</text:p>
          </table:table-cell>
          <table:table-cell table:number-columns-repeated="16380"/>
        </table:table-row>
        <table:table-row table:style-name="ro1">
          <table:table-cell table:formula="of:=IF([$Sheet1.A125] &lt;&gt;&quot;&quot;; &quot;#define &quot;; &quot;&quot;)" office:value-type="string" office:string-value="#define " calcext:value-type="string">
            <text:p>#define </text:p>
          </table:table-cell>
          <table:table-cell table:formula="of:=IF([$Sheet1.A125] &lt;&gt;&quot;&quot;; [$Sheet1.I125]; &quot;&quot;)" office:value-type="string" office:string-value="CUP2_CHANNEL4_LOWER_LIMIT" calcext:value-type="string">
            <text:p>CUP2_CHANNEL4_LOWER_LIMIT</text:p>
          </table:table-cell>
          <table:table-cell table:formula="of:=IF([$Sheet1.A125] &lt;&gt;&quot;&quot;; &quot; &quot;; &quot;&quot;)" office:value-type="string" office:string-value=" " calcext:value-type="string">
            <text:p><text:s/></text:p>
          </table:table-cell>
          <table:table-cell table:formula="of:=IF([$Sheet1.A125] &lt;&gt;&quot;&quot;; [$Sheet1.A125]; &quot;&quot;)" office:value-type="float" office:value="1082" calcext:value-type="float">
            <text:p>1082</text:p>
          </table:table-cell>
          <table:table-cell table:number-columns-repeated="16380"/>
        </table:table-row>
        <table:table-row table:style-name="ro1">
          <table:table-cell table:formula="of:=IF([$Sheet1.A126] &lt;&gt;&quot;&quot;; &quot;#define &quot;; &quot;&quot;)" office:value-type="string" office:string-value="#define " calcext:value-type="string">
            <text:p>#define </text:p>
          </table:table-cell>
          <table:table-cell table:formula="of:=IF([$Sheet1.A126] &lt;&gt;&quot;&quot;; [$Sheet1.I126]; &quot;&quot;)" office:value-type="string" office:string-value="CUP3_CHANNEL1_LOWER_LIMIT" calcext:value-type="string">
            <text:p>CUP3_CHANNEL1_LOWER_LIMIT</text:p>
          </table:table-cell>
          <table:table-cell table:formula="of:=IF([$Sheet1.A126] &lt;&gt;&quot;&quot;; &quot; &quot;; &quot;&quot;)" office:value-type="string" office:string-value=" " calcext:value-type="string">
            <text:p><text:s/></text:p>
          </table:table-cell>
          <table:table-cell table:formula="of:=IF([$Sheet1.A126] &lt;&gt;&quot;&quot;; [$Sheet1.A126]; &quot;&quot;)" office:value-type="float" office:value="1083" calcext:value-type="float">
            <text:p>1083</text:p>
          </table:table-cell>
          <table:table-cell table:number-columns-repeated="16380"/>
        </table:table-row>
        <table:table-row table:style-name="ro1">
          <table:table-cell table:formula="of:=IF([$Sheet1.A127] &lt;&gt;&quot;&quot;; &quot;#define &quot;; &quot;&quot;)" office:value-type="string" office:string-value="#define " calcext:value-type="string">
            <text:p>#define </text:p>
          </table:table-cell>
          <table:table-cell table:formula="of:=IF([$Sheet1.A127] &lt;&gt;&quot;&quot;; [$Sheet1.I127]; &quot;&quot;)" office:value-type="string" office:string-value="CUP3_CHANNEL2_LOWER_LIMIT" calcext:value-type="string">
            <text:p>CUP3_CHANNEL2_LOWER_LIMIT</text:p>
          </table:table-cell>
          <table:table-cell table:formula="of:=IF([$Sheet1.A127] &lt;&gt;&quot;&quot;; &quot; &quot;; &quot;&quot;)" office:value-type="string" office:string-value=" " calcext:value-type="string">
            <text:p><text:s/></text:p>
          </table:table-cell>
          <table:table-cell table:formula="of:=IF([$Sheet1.A127] &lt;&gt;&quot;&quot;; [$Sheet1.A127]; &quot;&quot;)" office:value-type="float" office:value="1084" calcext:value-type="float">
            <text:p>1084</text:p>
          </table:table-cell>
          <table:table-cell table:number-columns-repeated="16380"/>
        </table:table-row>
        <table:table-row table:style-name="ro1">
          <table:table-cell table:formula="of:=IF([$Sheet1.A128] &lt;&gt;&quot;&quot;; &quot;#define &quot;; &quot;&quot;)" office:value-type="string" office:string-value="#define " calcext:value-type="string">
            <text:p>#define </text:p>
          </table:table-cell>
          <table:table-cell table:formula="of:=IF([$Sheet1.A128] &lt;&gt;&quot;&quot;; [$Sheet1.I128]; &quot;&quot;)" office:value-type="string" office:string-value="CUP3_CHANNEL3_LOWER_LIMIT" calcext:value-type="string">
            <text:p>CUP3_CHANNEL3_LOWER_LIMIT</text:p>
          </table:table-cell>
          <table:table-cell table:formula="of:=IF([$Sheet1.A128] &lt;&gt;&quot;&quot;; &quot; &quot;; &quot;&quot;)" office:value-type="string" office:string-value=" " calcext:value-type="string">
            <text:p><text:s/></text:p>
          </table:table-cell>
          <table:table-cell table:formula="of:=IF([$Sheet1.A128] &lt;&gt;&quot;&quot;; [$Sheet1.A128]; &quot;&quot;)" office:value-type="float" office:value="1085" calcext:value-type="float">
            <text:p>1085</text:p>
          </table:table-cell>
          <table:table-cell table:number-columns-repeated="16380"/>
        </table:table-row>
        <table:table-row table:style-name="ro1">
          <table:table-cell table:formula="of:=IF([$Sheet1.A129] &lt;&gt;&quot;&quot;; &quot;#define &quot;; &quot;&quot;)" office:value-type="string" office:string-value="#define " calcext:value-type="string">
            <text:p>#define </text:p>
          </table:table-cell>
          <table:table-cell table:formula="of:=IF([$Sheet1.A129] &lt;&gt;&quot;&quot;; [$Sheet1.I129]; &quot;&quot;)" office:value-type="string" office:string-value="CUP3_CHANNEL4_LOWER_LIMIT" calcext:value-type="string">
            <text:p>CUP3_CHANNEL4_LOWER_LIMIT</text:p>
          </table:table-cell>
          <table:table-cell table:formula="of:=IF([$Sheet1.A129] &lt;&gt;&quot;&quot;; &quot; &quot;; &quot;&quot;)" office:value-type="string" office:string-value=" " calcext:value-type="string">
            <text:p><text:s/></text:p>
          </table:table-cell>
          <table:table-cell table:formula="of:=IF([$Sheet1.A129] &lt;&gt;&quot;&quot;; [$Sheet1.A129]; &quot;&quot;)" office:value-type="float" office:value="1086" calcext:value-type="float">
            <text:p>1086</text:p>
          </table:table-cell>
          <table:table-cell table:number-columns-repeated="16380"/>
        </table:table-row>
        <table:table-row table:style-name="ro1">
          <table:table-cell table:formula="of:=IF([$Sheet1.A130] &lt;&gt;&quot;&quot;; &quot;#define &quot;; &quot;&quot;)">
            <text:p/>
          </table:table-cell>
          <table:table-cell table:formula="of:=IF([$Sheet1.A130] &lt;&gt;&quot;&quot;; [$Sheet1.I130]; &quot;&quot;)">
            <text:p/>
          </table:table-cell>
          <table:table-cell table:formula="of:=IF([$Sheet1.A130] &lt;&gt;&quot;&quot;; &quot; &quot;; &quot;&quot;)">
            <text:p/>
          </table:table-cell>
          <table:table-cell table:formula="of:=IF([$Sheet1.A130] &lt;&gt;&quot;&quot;; [$Sheet1.A130]; &quot;&quot;)">
            <text:p/>
          </table:table-cell>
          <table:table-cell table:number-columns-repeated="16380"/>
        </table:table-row>
        <table:table-row table:style-name="ro1">
          <table:table-cell table:formula="of:=IF([$Sheet1.A131] &lt;&gt;&quot;&quot;; &quot;#define &quot;; &quot;&quot;)" office:value-type="string" office:string-value="#define " calcext:value-type="string">
            <text:p>#define </text:p>
          </table:table-cell>
          <table:table-cell table:formula="of:=IF([$Sheet1.A131] &lt;&gt;&quot;&quot;; [$Sheet1.I131]; &quot;&quot;)" office:value-type="string" office:string-value="CUP1_CHANNEL1_UPPER_LIMIT" calcext:value-type="string">
            <text:p>CUP1_CHANNEL1_UPPER_LIMIT</text:p>
          </table:table-cell>
          <table:table-cell table:formula="of:=IF([$Sheet1.A131] &lt;&gt;&quot;&quot;; &quot; &quot;; &quot;&quot;)" office:value-type="string" office:string-value=" " calcext:value-type="string">
            <text:p><text:s/></text:p>
          </table:table-cell>
          <table:table-cell table:formula="of:=IF([$Sheet1.A131] &lt;&gt;&quot;&quot;; [$Sheet1.A131]; &quot;&quot;)" office:value-type="float" office:value="1087" calcext:value-type="float">
            <text:p>1087</text:p>
          </table:table-cell>
          <table:table-cell table:number-columns-repeated="16380"/>
        </table:table-row>
        <table:table-row table:style-name="ro1">
          <table:table-cell table:formula="of:=IF([$Sheet1.A132] &lt;&gt;&quot;&quot;; &quot;#define &quot;; &quot;&quot;)" office:value-type="string" office:string-value="#define " calcext:value-type="string">
            <text:p>#define </text:p>
          </table:table-cell>
          <table:table-cell table:formula="of:=IF([$Sheet1.A132] &lt;&gt;&quot;&quot;; [$Sheet1.I132]; &quot;&quot;)" office:value-type="string" office:string-value="CUP1_CHANNEL2_UPPER_LIMIT" calcext:value-type="string">
            <text:p>CUP1_CHANNEL2_UPPER_LIMIT</text:p>
          </table:table-cell>
          <table:table-cell table:formula="of:=IF([$Sheet1.A132] &lt;&gt;&quot;&quot;; &quot; &quot;; &quot;&quot;)" office:value-type="string" office:string-value=" " calcext:value-type="string">
            <text:p><text:s/></text:p>
          </table:table-cell>
          <table:table-cell table:formula="of:=IF([$Sheet1.A132] &lt;&gt;&quot;&quot;; [$Sheet1.A132]; &quot;&quot;)" office:value-type="float" office:value="1088" calcext:value-type="float">
            <text:p>1088</text:p>
          </table:table-cell>
          <table:table-cell table:number-columns-repeated="16380"/>
        </table:table-row>
        <table:table-row table:style-name="ro1">
          <table:table-cell table:formula="of:=IF([$Sheet1.A133] &lt;&gt;&quot;&quot;; &quot;#define &quot;; &quot;&quot;)" office:value-type="string" office:string-value="#define " calcext:value-type="string">
            <text:p>#define </text:p>
          </table:table-cell>
          <table:table-cell table:formula="of:=IF([$Sheet1.A133] &lt;&gt;&quot;&quot;; [$Sheet1.I133]; &quot;&quot;)" office:value-type="string" office:string-value="CUP1_CHANNEL3_UPPER_LIMIT" calcext:value-type="string">
            <text:p>CUP1_CHANNEL3_UPPER_LIMIT</text:p>
          </table:table-cell>
          <table:table-cell table:formula="of:=IF([$Sheet1.A133] &lt;&gt;&quot;&quot;; &quot; &quot;; &quot;&quot;)" office:value-type="string" office:string-value=" " calcext:value-type="string">
            <text:p><text:s/></text:p>
          </table:table-cell>
          <table:table-cell table:formula="of:=IF([$Sheet1.A133] &lt;&gt;&quot;&quot;; [$Sheet1.A133]; &quot;&quot;)" office:value-type="float" office:value="1089" calcext:value-type="float">
            <text:p>1089</text:p>
          </table:table-cell>
          <table:table-cell table:number-columns-repeated="16380"/>
        </table:table-row>
        <table:table-row table:style-name="ro1">
          <table:table-cell table:formula="of:=IF([$Sheet1.A134] &lt;&gt;&quot;&quot;; &quot;#define &quot;; &quot;&quot;)" office:value-type="string" office:string-value="#define " calcext:value-type="string">
            <text:p>#define </text:p>
          </table:table-cell>
          <table:table-cell table:formula="of:=IF([$Sheet1.A134] &lt;&gt;&quot;&quot;; [$Sheet1.I134]; &quot;&quot;)" office:value-type="string" office:string-value="CUP1_CHANNEL4_UPPER_LIMIT" calcext:value-type="string">
            <text:p>CUP1_CHANNEL4_UPPER_LIMIT</text:p>
          </table:table-cell>
          <table:table-cell table:formula="of:=IF([$Sheet1.A134] &lt;&gt;&quot;&quot;; &quot; &quot;; &quot;&quot;)" office:value-type="string" office:string-value=" " calcext:value-type="string">
            <text:p><text:s/></text:p>
          </table:table-cell>
          <table:table-cell table:formula="of:=IF([$Sheet1.A134] &lt;&gt;&quot;&quot;; [$Sheet1.A134]; &quot;&quot;)" office:value-type="float" office:value="1090" calcext:value-type="float">
            <text:p>1090</text:p>
          </table:table-cell>
          <table:table-cell table:number-columns-repeated="16380"/>
        </table:table-row>
        <table:table-row table:style-name="ro1">
          <table:table-cell table:formula="of:=IF([$Sheet1.A135] &lt;&gt;&quot;&quot;; &quot;#define &quot;; &quot;&quot;)" office:value-type="string" office:string-value="#define " calcext:value-type="string">
            <text:p>#define </text:p>
          </table:table-cell>
          <table:table-cell table:formula="of:=IF([$Sheet1.A135] &lt;&gt;&quot;&quot;; [$Sheet1.I135]; &quot;&quot;)" office:value-type="string" office:string-value="CUP2_CHANNEL1_UPPER_LIMIT" calcext:value-type="string">
            <text:p>CUP2_CHANNEL1_UPPER_LIMIT</text:p>
          </table:table-cell>
          <table:table-cell table:formula="of:=IF([$Sheet1.A135] &lt;&gt;&quot;&quot;; &quot; &quot;; &quot;&quot;)" office:value-type="string" office:string-value=" " calcext:value-type="string">
            <text:p><text:s/></text:p>
          </table:table-cell>
          <table:table-cell table:formula="of:=IF([$Sheet1.A135] &lt;&gt;&quot;&quot;; [$Sheet1.A135]; &quot;&quot;)" office:value-type="float" office:value="1091" calcext:value-type="float">
            <text:p>1091</text:p>
          </table:table-cell>
          <table:table-cell table:number-columns-repeated="16380"/>
        </table:table-row>
        <table:table-row table:style-name="ro1">
          <table:table-cell table:formula="of:=IF([$Sheet1.A136] &lt;&gt;&quot;&quot;; &quot;#define &quot;; &quot;&quot;)" office:value-type="string" office:string-value="#define " calcext:value-type="string">
            <text:p>#define </text:p>
          </table:table-cell>
          <table:table-cell table:formula="of:=IF([$Sheet1.A136] &lt;&gt;&quot;&quot;; [$Sheet1.I136]; &quot;&quot;)" office:value-type="string" office:string-value="CUP2_CHANNEL2_UPPER_LIMIT" calcext:value-type="string">
            <text:p>CUP2_CHANNEL2_UPPER_LIMIT</text:p>
          </table:table-cell>
          <table:table-cell table:formula="of:=IF([$Sheet1.A136] &lt;&gt;&quot;&quot;; &quot; &quot;; &quot;&quot;)" office:value-type="string" office:string-value=" " calcext:value-type="string">
            <text:p><text:s/></text:p>
          </table:table-cell>
          <table:table-cell table:formula="of:=IF([$Sheet1.A136] &lt;&gt;&quot;&quot;; [$Sheet1.A136]; &quot;&quot;)" office:value-type="float" office:value="1092" calcext:value-type="float">
            <text:p>1092</text:p>
          </table:table-cell>
          <table:table-cell table:number-columns-repeated="16380"/>
        </table:table-row>
        <table:table-row table:style-name="ro1">
          <table:table-cell table:formula="of:=IF([$Sheet1.A137] &lt;&gt;&quot;&quot;; &quot;#define &quot;; &quot;&quot;)" office:value-type="string" office:string-value="#define " calcext:value-type="string">
            <text:p>#define </text:p>
          </table:table-cell>
          <table:table-cell table:formula="of:=IF([$Sheet1.A137] &lt;&gt;&quot;&quot;; [$Sheet1.I137]; &quot;&quot;)" office:value-type="string" office:string-value="CUP2_CHANNEL3_UPPER_LIMIT" calcext:value-type="string">
            <text:p>CUP2_CHANNEL3_UPPER_LIMIT</text:p>
          </table:table-cell>
          <table:table-cell table:formula="of:=IF([$Sheet1.A137] &lt;&gt;&quot;&quot;; &quot; &quot;; &quot;&quot;)" office:value-type="string" office:string-value=" " calcext:value-type="string">
            <text:p><text:s/></text:p>
          </table:table-cell>
          <table:table-cell table:formula="of:=IF([$Sheet1.A137] &lt;&gt;&quot;&quot;; [$Sheet1.A137]; &quot;&quot;)" office:value-type="float" office:value="1093" calcext:value-type="float">
            <text:p>1093</text:p>
          </table:table-cell>
          <table:table-cell table:number-columns-repeated="16380"/>
        </table:table-row>
        <table:table-row table:style-name="ro1">
          <table:table-cell table:formula="of:=IF([$Sheet1.A138] &lt;&gt;&quot;&quot;; &quot;#define &quot;; &quot;&quot;)" office:value-type="string" office:string-value="#define " calcext:value-type="string">
            <text:p>#define </text:p>
          </table:table-cell>
          <table:table-cell table:formula="of:=IF([$Sheet1.A138] &lt;&gt;&quot;&quot;; [$Sheet1.I138]; &quot;&quot;)" office:value-type="string" office:string-value="CUP2_CHANNEL4_UPPER_LIMIT" calcext:value-type="string">
            <text:p>CUP2_CHANNEL4_UPPER_LIMIT</text:p>
          </table:table-cell>
          <table:table-cell table:formula="of:=IF([$Sheet1.A138] &lt;&gt;&quot;&quot;; &quot; &quot;; &quot;&quot;)" office:value-type="string" office:string-value=" " calcext:value-type="string">
            <text:p><text:s/></text:p>
          </table:table-cell>
          <table:table-cell table:formula="of:=IF([$Sheet1.A138] &lt;&gt;&quot;&quot;; [$Sheet1.A138]; &quot;&quot;)" office:value-type="float" office:value="1094" calcext:value-type="float">
            <text:p>1094</text:p>
          </table:table-cell>
          <table:table-cell table:number-columns-repeated="16380"/>
        </table:table-row>
        <table:table-row table:style-name="ro1">
          <table:table-cell table:formula="of:=IF([$Sheet1.A139] &lt;&gt;&quot;&quot;; &quot;#define &quot;; &quot;&quot;)" office:value-type="string" office:string-value="#define " calcext:value-type="string">
            <text:p>#define </text:p>
          </table:table-cell>
          <table:table-cell table:formula="of:=IF([$Sheet1.A139] &lt;&gt;&quot;&quot;; [$Sheet1.I139]; &quot;&quot;)" office:value-type="string" office:string-value="CUP3_CHANNEL1_UPPER_LIMIT" calcext:value-type="string">
            <text:p>CUP3_CHANNEL1_UPPER_LIMIT</text:p>
          </table:table-cell>
          <table:table-cell table:formula="of:=IF([$Sheet1.A139] &lt;&gt;&quot;&quot;; &quot; &quot;; &quot;&quot;)" office:value-type="string" office:string-value=" " calcext:value-type="string">
            <text:p><text:s/></text:p>
          </table:table-cell>
          <table:table-cell table:formula="of:=IF([$Sheet1.A139] &lt;&gt;&quot;&quot;; [$Sheet1.A139]; &quot;&quot;)" office:value-type="float" office:value="1095" calcext:value-type="float">
            <text:p>1095</text:p>
          </table:table-cell>
          <table:table-cell table:number-columns-repeated="16380"/>
        </table:table-row>
        <table:table-row table:style-name="ro1">
          <table:table-cell table:formula="of:=IF([$Sheet1.A140] &lt;&gt;&quot;&quot;; &quot;#define &quot;; &quot;&quot;)" office:value-type="string" office:string-value="#define " calcext:value-type="string">
            <text:p>#define </text:p>
          </table:table-cell>
          <table:table-cell table:formula="of:=IF([$Sheet1.A140] &lt;&gt;&quot;&quot;; [$Sheet1.I140]; &quot;&quot;)" office:value-type="string" office:string-value="CUP3_CHANNEL2_UPPER_LIMIT" calcext:value-type="string">
            <text:p>CUP3_CHANNEL2_UPPER_LIMIT</text:p>
          </table:table-cell>
          <table:table-cell table:formula="of:=IF([$Sheet1.A140] &lt;&gt;&quot;&quot;; &quot; &quot;; &quot;&quot;)" office:value-type="string" office:string-value=" " calcext:value-type="string">
            <text:p><text:s/></text:p>
          </table:table-cell>
          <table:table-cell table:formula="of:=IF([$Sheet1.A140] &lt;&gt;&quot;&quot;; [$Sheet1.A140]; &quot;&quot;)" office:value-type="float" office:value="1096" calcext:value-type="float">
            <text:p>1096</text:p>
          </table:table-cell>
          <table:table-cell table:number-columns-repeated="16380"/>
        </table:table-row>
        <table:table-row table:style-name="ro1">
          <table:table-cell table:formula="of:=IF([$Sheet1.A141] &lt;&gt;&quot;&quot;; &quot;#define &quot;; &quot;&quot;)" office:value-type="string" office:string-value="#define " calcext:value-type="string">
            <text:p>#define </text:p>
          </table:table-cell>
          <table:table-cell table:formula="of:=IF([$Sheet1.A141] &lt;&gt;&quot;&quot;; [$Sheet1.I141]; &quot;&quot;)" office:value-type="string" office:string-value="CUP3_CHANNEL3_UPPER_LIMIT" calcext:value-type="string">
            <text:p>CUP3_CHANNEL3_UPPER_LIMIT</text:p>
          </table:table-cell>
          <table:table-cell table:formula="of:=IF([$Sheet1.A141] &lt;&gt;&quot;&quot;; &quot; &quot;; &quot;&quot;)" office:value-type="string" office:string-value=" " calcext:value-type="string">
            <text:p><text:s/></text:p>
          </table:table-cell>
          <table:table-cell table:formula="of:=IF([$Sheet1.A141] &lt;&gt;&quot;&quot;; [$Sheet1.A141]; &quot;&quot;)" office:value-type="float" office:value="1097" calcext:value-type="float">
            <text:p>1097</text:p>
          </table:table-cell>
          <table:table-cell table:number-columns-repeated="16380"/>
        </table:table-row>
        <table:table-row table:style-name="ro1">
          <table:table-cell table:formula="of:=IF([$Sheet1.A142] &lt;&gt;&quot;&quot;; &quot;#define &quot;; &quot;&quot;)" office:value-type="string" office:string-value="#define " calcext:value-type="string">
            <text:p>#define </text:p>
          </table:table-cell>
          <table:table-cell table:formula="of:=IF([$Sheet1.A142] &lt;&gt;&quot;&quot;; [$Sheet1.I142]; &quot;&quot;)" office:value-type="string" office:string-value="CUP3_CHANNEL4_UPPER_LIMIT" calcext:value-type="string">
            <text:p>CUP3_CHANNEL4_UPPER_LIMIT</text:p>
          </table:table-cell>
          <table:table-cell table:formula="of:=IF([$Sheet1.A142] &lt;&gt;&quot;&quot;; &quot; &quot;; &quot;&quot;)" office:value-type="string" office:string-value=" " calcext:value-type="string">
            <text:p><text:s/></text:p>
          </table:table-cell>
          <table:table-cell table:formula="of:=IF([$Sheet1.A142] &lt;&gt;&quot;&quot;; [$Sheet1.A142]; &quot;&quot;)" office:value-type="float" office:value="1098" calcext:value-type="float">
            <text:p>1098</text:p>
          </table:table-cell>
          <table:table-cell table:number-columns-repeated="16380"/>
        </table:table-row>
        <table:table-row table:style-name="ro1">
          <table:table-cell table:formula="of:=IF([$Sheet1.A143] &lt;&gt;&quot;&quot;; &quot;#define &quot;; &quot;&quot;)">
            <text:p/>
          </table:table-cell>
          <table:table-cell table:formula="of:=IF([$Sheet1.A143] &lt;&gt;&quot;&quot;; [$Sheet1.I143]; &quot;&quot;)">
            <text:p/>
          </table:table-cell>
          <table:table-cell table:formula="of:=IF([$Sheet1.A143] &lt;&gt;&quot;&quot;; &quot; &quot;; &quot;&quot;)">
            <text:p/>
          </table:table-cell>
          <table:table-cell table:formula="of:=IF([$Sheet1.A143] &lt;&gt;&quot;&quot;; [$Sheet1.A143]; &quot;&quot;)">
            <text:p/>
          </table:table-cell>
          <table:table-cell table:number-columns-repeated="16380"/>
        </table:table-row>
        <table:table-row table:style-name="ro1">
          <table:table-cell table:formula="of:=IF([$Sheet1.A144] &lt;&gt;&quot;&quot;; &quot;#define &quot;; &quot;&quot;)" office:value-type="string" office:string-value="#define " calcext:value-type="string">
            <text:p>#define </text:p>
          </table:table-cell>
          <table:table-cell table:formula="of:=IF([$Sheet1.A144] &lt;&gt;&quot;&quot;; [$Sheet1.I144]; &quot;&quot;)" office:value-type="string" office:string-value="SIM_MECHANISM_PROPAGATION1_IN" calcext:value-type="string">
            <text:p>SIM_MECHANISM_PROPAGATION1_IN</text:p>
          </table:table-cell>
          <table:table-cell table:formula="of:=IF([$Sheet1.A144] &lt;&gt;&quot;&quot;; &quot; &quot;; &quot;&quot;)" office:value-type="string" office:string-value=" " calcext:value-type="string">
            <text:p><text:s/></text:p>
          </table:table-cell>
          <table:table-cell table:formula="of:=IF([$Sheet1.A144] &lt;&gt;&quot;&quot;; [$Sheet1.A144]; &quot;&quot;)" office:value-type="float" office:value="1099" calcext:value-type="float">
            <text:p>1099</text:p>
          </table:table-cell>
          <table:table-cell table:number-columns-repeated="16380"/>
        </table:table-row>
        <table:table-row table:style-name="ro1">
          <table:table-cell table:formula="of:=IF([$Sheet1.A145] &lt;&gt;&quot;&quot;; &quot;#define &quot;; &quot;&quot;)" office:value-type="string" office:string-value="#define " calcext:value-type="string">
            <text:p>#define </text:p>
          </table:table-cell>
          <table:table-cell table:formula="of:=IF([$Sheet1.A145] &lt;&gt;&quot;&quot;; [$Sheet1.I145]; &quot;&quot;)" office:value-type="string" office:string-value="SIM_MECHANISM_PROPAGATION1_IN_RAND" calcext:value-type="string">
            <text:p>SIM_MECHANISM_PROPAGATION1_IN_RAND</text:p>
          </table:table-cell>
          <table:table-cell table:formula="of:=IF([$Sheet1.A145] &lt;&gt;&quot;&quot;; &quot; &quot;; &quot;&quot;)" office:value-type="string" office:string-value=" " calcext:value-type="string">
            <text:p><text:s/></text:p>
          </table:table-cell>
          <table:table-cell table:formula="of:=IF([$Sheet1.A145] &lt;&gt;&quot;&quot;; [$Sheet1.A145]; &quot;&quot;)" office:value-type="float" office:value="1100" calcext:value-type="float">
            <text:p>1100</text:p>
          </table:table-cell>
          <table:table-cell table:number-columns-repeated="16380"/>
        </table:table-row>
        <table:table-row table:style-name="ro1">
          <table:table-cell table:formula="of:=IF([$Sheet1.A146] &lt;&gt;&quot;&quot;; &quot;#define &quot;; &quot;&quot;)" office:value-type="string" office:string-value="#define " calcext:value-type="string">
            <text:p>#define </text:p>
          </table:table-cell>
          <table:table-cell table:formula="of:=IF([$Sheet1.A146] &lt;&gt;&quot;&quot;; [$Sheet1.I146]; &quot;&quot;)" office:value-type="string" office:string-value="SIM_MECHANISM_PROPAGATION1_OUT" calcext:value-type="string">
            <text:p>SIM_MECHANISM_PROPAGATION1_OUT</text:p>
          </table:table-cell>
          <table:table-cell table:formula="of:=IF([$Sheet1.A146] &lt;&gt;&quot;&quot;; &quot; &quot;; &quot;&quot;)" office:value-type="string" office:string-value=" " calcext:value-type="string">
            <text:p><text:s/></text:p>
          </table:table-cell>
          <table:table-cell table:formula="of:=IF([$Sheet1.A146] &lt;&gt;&quot;&quot;; [$Sheet1.A146]; &quot;&quot;)" office:value-type="float" office:value="1101" calcext:value-type="float">
            <text:p>1101</text:p>
          </table:table-cell>
          <table:table-cell table:number-columns-repeated="16380"/>
        </table:table-row>
        <table:table-row table:style-name="ro1">
          <table:table-cell table:formula="of:=IF([$Sheet1.A147] &lt;&gt;&quot;&quot;; &quot;#define &quot;; &quot;&quot;)" office:value-type="string" office:string-value="#define " calcext:value-type="string">
            <text:p>#define </text:p>
          </table:table-cell>
          <table:table-cell table:formula="of:=IF([$Sheet1.A147] &lt;&gt;&quot;&quot;; [$Sheet1.I147]; &quot;&quot;)" office:value-type="string" office:string-value="SIM_MECHANISM_PROPAGATION1_OUT_RAND" calcext:value-type="string">
            <text:p>SIM_MECHANISM_PROPAGATION1_OUT_RAND</text:p>
          </table:table-cell>
          <table:table-cell table:formula="of:=IF([$Sheet1.A147] &lt;&gt;&quot;&quot;; &quot; &quot;; &quot;&quot;)" office:value-type="string" office:string-value=" " calcext:value-type="string">
            <text:p><text:s/></text:p>
          </table:table-cell>
          <table:table-cell table:formula="of:=IF([$Sheet1.A147] &lt;&gt;&quot;&quot;; [$Sheet1.A147]; &quot;&quot;)" office:value-type="float" office:value="1102" calcext:value-type="float">
            <text:p>1102</text:p>
          </table:table-cell>
          <table:table-cell table:number-columns-repeated="16380"/>
        </table:table-row>
        <table:table-row table:style-name="ro1">
          <table:table-cell table:formula="of:=IF([$Sheet1.A148] &lt;&gt;&quot;&quot;; &quot;#define &quot;; &quot;&quot;)">
            <text:p/>
          </table:table-cell>
          <table:table-cell table:formula="of:=IF([$Sheet1.A148] &lt;&gt;&quot;&quot;; [$Sheet1.I148]; &quot;&quot;)">
            <text:p/>
          </table:table-cell>
          <table:table-cell table:formula="of:=IF([$Sheet1.A148] &lt;&gt;&quot;&quot;; &quot; &quot;; &quot;&quot;)">
            <text:p/>
          </table:table-cell>
          <table:table-cell table:formula="of:=IF([$Sheet1.A148] &lt;&gt;&quot;&quot;; [$Sheet1.A148]; &quot;&quot;)">
            <text:p/>
          </table:table-cell>
          <table:table-cell table:number-columns-repeated="16380"/>
        </table:table-row>
        <table:table-row table:style-name="ro1">
          <table:table-cell table:formula="of:=IF([$Sheet1.A149] &lt;&gt;&quot;&quot;; &quot;#define &quot;; &quot;&quot;)" office:value-type="string" office:string-value="#define " calcext:value-type="string">
            <text:p>#define </text:p>
          </table:table-cell>
          <table:table-cell table:formula="of:=IF([$Sheet1.A149] &lt;&gt;&quot;&quot;; [$Sheet1.I149]; &quot;&quot;)" office:value-type="string" office:string-value="SIM_MECHANISM_PROPAGATION2_IN" calcext:value-type="string">
            <text:p>SIM_MECHANISM_PROPAGATION2_IN</text:p>
          </table:table-cell>
          <table:table-cell table:formula="of:=IF([$Sheet1.A149] &lt;&gt;&quot;&quot;; &quot; &quot;; &quot;&quot;)" office:value-type="string" office:string-value=" " calcext:value-type="string">
            <text:p><text:s/></text:p>
          </table:table-cell>
          <table:table-cell table:formula="of:=IF([$Sheet1.A149] &lt;&gt;&quot;&quot;; [$Sheet1.A149]; &quot;&quot;)" office:value-type="float" office:value="1103" calcext:value-type="float">
            <text:p>1103</text:p>
          </table:table-cell>
          <table:table-cell table:number-columns-repeated="16380"/>
        </table:table-row>
        <table:table-row table:style-name="ro1">
          <table:table-cell table:formula="of:=IF([$Sheet1.A150] &lt;&gt;&quot;&quot;; &quot;#define &quot;; &quot;&quot;)" office:value-type="string" office:string-value="#define " calcext:value-type="string">
            <text:p>#define </text:p>
          </table:table-cell>
          <table:table-cell table:formula="of:=IF([$Sheet1.A150] &lt;&gt;&quot;&quot;; [$Sheet1.I150]; &quot;&quot;)" office:value-type="string" office:string-value="SIM_MECHANISM_PROPAGATION2_IN_RAND" calcext:value-type="string">
            <text:p>SIM_MECHANISM_PROPAGATION2_IN_RAND</text:p>
          </table:table-cell>
          <table:table-cell table:formula="of:=IF([$Sheet1.A150] &lt;&gt;&quot;&quot;; &quot; &quot;; &quot;&quot;)" office:value-type="string" office:string-value=" " calcext:value-type="string">
            <text:p><text:s/></text:p>
          </table:table-cell>
          <table:table-cell table:formula="of:=IF([$Sheet1.A150] &lt;&gt;&quot;&quot;; [$Sheet1.A150]; &quot;&quot;)" office:value-type="float" office:value="1104" calcext:value-type="float">
            <text:p>1104</text:p>
          </table:table-cell>
          <table:table-cell table:number-columns-repeated="16380"/>
        </table:table-row>
        <table:table-row table:style-name="ro1">
          <table:table-cell table:formula="of:=IF([$Sheet1.A151] &lt;&gt;&quot;&quot;; &quot;#define &quot;; &quot;&quot;)" office:value-type="string" office:string-value="#define " calcext:value-type="string">
            <text:p>#define </text:p>
          </table:table-cell>
          <table:table-cell table:formula="of:=IF([$Sheet1.A151] &lt;&gt;&quot;&quot;; [$Sheet1.I151]; &quot;&quot;)" office:value-type="string" office:string-value="SIM_MECHANISM_PROPAGATION2_OUT" calcext:value-type="string">
            <text:p>SIM_MECHANISM_PROPAGATION2_OUT</text:p>
          </table:table-cell>
          <table:table-cell table:formula="of:=IF([$Sheet1.A151] &lt;&gt;&quot;&quot;; &quot; &quot;; &quot;&quot;)" office:value-type="string" office:string-value=" " calcext:value-type="string">
            <text:p><text:s/></text:p>
          </table:table-cell>
          <table:table-cell table:formula="of:=IF([$Sheet1.A151] &lt;&gt;&quot;&quot;; [$Sheet1.A151]; &quot;&quot;)" office:value-type="float" office:value="1105" calcext:value-type="float">
            <text:p>1105</text:p>
          </table:table-cell>
          <table:table-cell table:number-columns-repeated="16380"/>
        </table:table-row>
        <table:table-row table:style-name="ro1">
          <table:table-cell table:formula="of:=IF([$Sheet1.A152] &lt;&gt;&quot;&quot;; &quot;#define &quot;; &quot;&quot;)" office:value-type="string" office:string-value="#define " calcext:value-type="string">
            <text:p>#define </text:p>
          </table:table-cell>
          <table:table-cell table:formula="of:=IF([$Sheet1.A152] &lt;&gt;&quot;&quot;; [$Sheet1.I152]; &quot;&quot;)" office:value-type="string" office:string-value="SIM_MECHANISM_PROPAGATION2_OUT_RAND" calcext:value-type="string">
            <text:p>SIM_MECHANISM_PROPAGATION2_OUT_RAND</text:p>
          </table:table-cell>
          <table:table-cell table:formula="of:=IF([$Sheet1.A152] &lt;&gt;&quot;&quot;; &quot; &quot;; &quot;&quot;)" office:value-type="string" office:string-value=" " calcext:value-type="string">
            <text:p><text:s/></text:p>
          </table:table-cell>
          <table:table-cell table:formula="of:=IF([$Sheet1.A152] &lt;&gt;&quot;&quot;; [$Sheet1.A152]; &quot;&quot;)" office:value-type="float" office:value="1106" calcext:value-type="float">
            <text:p>1106</text:p>
          </table:table-cell>
          <table:table-cell table:number-columns-repeated="16380"/>
        </table:table-row>
        <table:table-row table:style-name="ro1">
          <table:table-cell table:formula="of:=IF([$Sheet1.A153] &lt;&gt;&quot;&quot;; &quot;#define &quot;; &quot;&quot;)">
            <text:p/>
          </table:table-cell>
          <table:table-cell table:formula="of:=IF([$Sheet1.A153] &lt;&gt;&quot;&quot;; [$Sheet1.I153]; &quot;&quot;)">
            <text:p/>
          </table:table-cell>
          <table:table-cell table:formula="of:=IF([$Sheet1.A153] &lt;&gt;&quot;&quot;; &quot; &quot;; &quot;&quot;)">
            <text:p/>
          </table:table-cell>
          <table:table-cell table:formula="of:=IF([$Sheet1.A153] &lt;&gt;&quot;&quot;; [$Sheet1.A153]; &quot;&quot;)">
            <text:p/>
          </table:table-cell>
          <table:table-cell table:number-columns-repeated="16380"/>
        </table:table-row>
        <table:table-row table:style-name="ro1">
          <table:table-cell table:formula="of:=IF([$Sheet1.A154] &lt;&gt;&quot;&quot;; &quot;#define &quot;; &quot;&quot;)" office:value-type="string" office:string-value="#define " calcext:value-type="string">
            <text:p>#define </text:p>
          </table:table-cell>
          <table:table-cell table:formula="of:=IF([$Sheet1.A154] &lt;&gt;&quot;&quot;; [$Sheet1.I154]; &quot;&quot;)" office:value-type="string" office:string-value="SIM_MECHANISM_PROPAGATION3_IN" calcext:value-type="string">
            <text:p>SIM_MECHANISM_PROPAGATION3_IN</text:p>
          </table:table-cell>
          <table:table-cell table:formula="of:=IF([$Sheet1.A154] &lt;&gt;&quot;&quot;; &quot; &quot;; &quot;&quot;)" office:value-type="string" office:string-value=" " calcext:value-type="string">
            <text:p><text:s/></text:p>
          </table:table-cell>
          <table:table-cell table:formula="of:=IF([$Sheet1.A154] &lt;&gt;&quot;&quot;; [$Sheet1.A154]; &quot;&quot;)" office:value-type="float" office:value="1107" calcext:value-type="float">
            <text:p>1107</text:p>
          </table:table-cell>
          <table:table-cell table:number-columns-repeated="16380"/>
        </table:table-row>
        <table:table-row table:style-name="ro1">
          <table:table-cell table:formula="of:=IF([$Sheet1.A155] &lt;&gt;&quot;&quot;; &quot;#define &quot;; &quot;&quot;)" office:value-type="string" office:string-value="#define " calcext:value-type="string">
            <text:p>#define </text:p>
          </table:table-cell>
          <table:table-cell table:formula="of:=IF([$Sheet1.A155] &lt;&gt;&quot;&quot;; [$Sheet1.I155]; &quot;&quot;)" office:value-type="string" office:string-value="SIM_MECHANISM_PROPAGATION3_IN_RAND" calcext:value-type="string">
            <text:p>SIM_MECHANISM_PROPAGATION3_IN_RAND</text:p>
          </table:table-cell>
          <table:table-cell table:formula="of:=IF([$Sheet1.A155] &lt;&gt;&quot;&quot;; &quot; &quot;; &quot;&quot;)" office:value-type="string" office:string-value=" " calcext:value-type="string">
            <text:p><text:s/></text:p>
          </table:table-cell>
          <table:table-cell table:formula="of:=IF([$Sheet1.A155] &lt;&gt;&quot;&quot;; [$Sheet1.A155]; &quot;&quot;)" office:value-type="float" office:value="1108" calcext:value-type="float">
            <text:p>1108</text:p>
          </table:table-cell>
          <table:table-cell table:number-columns-repeated="16380"/>
        </table:table-row>
        <table:table-row table:style-name="ro1">
          <table:table-cell table:formula="of:=IF([$Sheet1.A156] &lt;&gt;&quot;&quot;; &quot;#define &quot;; &quot;&quot;)" office:value-type="string" office:string-value="#define " calcext:value-type="string">
            <text:p>#define </text:p>
          </table:table-cell>
          <table:table-cell table:formula="of:=IF([$Sheet1.A156] &lt;&gt;&quot;&quot;; [$Sheet1.I156]; &quot;&quot;)" office:value-type="string" office:string-value="SIM_MECHANISM_PROPAGATION3_OUT" calcext:value-type="string">
            <text:p>SIM_MECHANISM_PROPAGATION3_OUT</text:p>
          </table:table-cell>
          <table:table-cell table:formula="of:=IF([$Sheet1.A156] &lt;&gt;&quot;&quot;; &quot; &quot;; &quot;&quot;)" office:value-type="string" office:string-value=" " calcext:value-type="string">
            <text:p><text:s/></text:p>
          </table:table-cell>
          <table:table-cell table:formula="of:=IF([$Sheet1.A156] &lt;&gt;&quot;&quot;; [$Sheet1.A156]; &quot;&quot;)" office:value-type="float" office:value="1109" calcext:value-type="float">
            <text:p>1109</text:p>
          </table:table-cell>
          <table:table-cell table:number-columns-repeated="16380"/>
        </table:table-row>
        <table:table-row table:style-name="ro1">
          <table:table-cell table:formula="of:=IF([$Sheet1.A157] &lt;&gt;&quot;&quot;; &quot;#define &quot;; &quot;&quot;)" office:value-type="string" office:string-value="#define " calcext:value-type="string">
            <text:p>#define </text:p>
          </table:table-cell>
          <table:table-cell table:formula="of:=IF([$Sheet1.A157] &lt;&gt;&quot;&quot;; [$Sheet1.I157]; &quot;&quot;)" office:value-type="string" office:string-value="SIM_MECHANISM_PROPAGATION3_OUT_RAND" calcext:value-type="string">
            <text:p>SIM_MECHANISM_PROPAGATION3_OUT_RAND</text:p>
          </table:table-cell>
          <table:table-cell table:formula="of:=IF([$Sheet1.A157] &lt;&gt;&quot;&quot;; &quot; &quot;; &quot;&quot;)" office:value-type="string" office:string-value=" " calcext:value-type="string">
            <text:p><text:s/></text:p>
          </table:table-cell>
          <table:table-cell table:formula="of:=IF([$Sheet1.A157] &lt;&gt;&quot;&quot;; [$Sheet1.A157]; &quot;&quot;)" office:value-type="float" office:value="1110" calcext:value-type="float">
            <text:p>1110</text:p>
          </table:table-cell>
          <table:table-cell table:number-columns-repeated="16380"/>
        </table:table-row>
        <table:table-row table:style-name="ro1">
          <table:table-cell table:formula="of:=IF([$Sheet1.A158] &lt;&gt;&quot;&quot;; &quot;#define &quot;; &quot;&quot;)">
            <text:p/>
          </table:table-cell>
          <table:table-cell table:formula="of:=IF([$Sheet1.A158] &lt;&gt;&quot;&quot;; [$Sheet1.I158]; &quot;&quot;)">
            <text:p/>
          </table:table-cell>
          <table:table-cell table:formula="of:=IF([$Sheet1.A158] &lt;&gt;&quot;&quot;; &quot; &quot;; &quot;&quot;)">
            <text:p/>
          </table:table-cell>
          <table:table-cell table:formula="of:=IF([$Sheet1.A158] &lt;&gt;&quot;&quot;; [$Sheet1.A158]; &quot;&quot;)">
            <text:p/>
          </table:table-cell>
          <table:table-cell table:number-columns-repeated="16380"/>
        </table:table-row>
        <table:table-row table:style-name="ro1">
          <table:table-cell table:formula="of:=IF([$Sheet1.A159] &lt;&gt;&quot;&quot;; &quot;#define &quot;; &quot;&quot;)" office:value-type="string" office:string-value="#define " calcext:value-type="string">
            <text:p>#define </text:p>
          </table:table-cell>
          <table:table-cell table:formula="of:=IF([$Sheet1.A159] &lt;&gt;&quot;&quot;; [$Sheet1.I159]; &quot;&quot;)" office:value-type="string" office:string-value="SIM_AMPLIFIER_CUP1_ELECTRODE1" calcext:value-type="string">
            <text:p>SIM_AMPLIFIER_CUP1_ELECTRODE1</text:p>
          </table:table-cell>
          <table:table-cell table:formula="of:=IF([$Sheet1.A159] &lt;&gt;&quot;&quot;; &quot; &quot;; &quot;&quot;)" office:value-type="string" office:string-value=" " calcext:value-type="string">
            <text:p><text:s/></text:p>
          </table:table-cell>
          <table:table-cell table:formula="of:=IF([$Sheet1.A159] &lt;&gt;&quot;&quot;; [$Sheet1.A159]; &quot;&quot;)" office:value-type="float" office:value="1111" calcext:value-type="float">
            <text:p>1111</text:p>
          </table:table-cell>
          <table:table-cell table:number-columns-repeated="16380"/>
        </table:table-row>
        <table:table-row table:style-name="ro1">
          <table:table-cell table:formula="of:=IF([$Sheet1.A160] &lt;&gt;&quot;&quot;; &quot;#define &quot;; &quot;&quot;)" office:value-type="string" office:string-value="#define " calcext:value-type="string">
            <text:p>#define </text:p>
          </table:table-cell>
          <table:table-cell table:formula="of:=IF([$Sheet1.A160] &lt;&gt;&quot;&quot;; [$Sheet1.I160]; &quot;&quot;)" office:value-type="string" office:string-value="SIM_AMPLIFIER_CUP1_ELECTRODE2" calcext:value-type="string">
            <text:p>SIM_AMPLIFIER_CUP1_ELECTRODE2</text:p>
          </table:table-cell>
          <table:table-cell table:formula="of:=IF([$Sheet1.A160] &lt;&gt;&quot;&quot;; &quot; &quot;; &quot;&quot;)" office:value-type="string" office:string-value=" " calcext:value-type="string">
            <text:p><text:s/></text:p>
          </table:table-cell>
          <table:table-cell table:formula="of:=IF([$Sheet1.A160] &lt;&gt;&quot;&quot;; [$Sheet1.A160]; &quot;&quot;)" office:value-type="float" office:value="1112" calcext:value-type="float">
            <text:p>1112</text:p>
          </table:table-cell>
          <table:table-cell table:number-columns-repeated="16380"/>
        </table:table-row>
        <table:table-row table:style-name="ro1">
          <table:table-cell table:formula="of:=IF([$Sheet1.A161] &lt;&gt;&quot;&quot;; &quot;#define &quot;; &quot;&quot;)" office:value-type="string" office:string-value="#define " calcext:value-type="string">
            <text:p>#define </text:p>
          </table:table-cell>
          <table:table-cell table:formula="of:=IF([$Sheet1.A161] &lt;&gt;&quot;&quot;; [$Sheet1.I161]; &quot;&quot;)" office:value-type="string" office:string-value="SIM_AMPLIFIER_CUP1_ELECTRODE3" calcext:value-type="string">
            <text:p>SIM_AMPLIFIER_CUP1_ELECTRODE3</text:p>
          </table:table-cell>
          <table:table-cell table:formula="of:=IF([$Sheet1.A161] &lt;&gt;&quot;&quot;; &quot; &quot;; &quot;&quot;)" office:value-type="string" office:string-value=" " calcext:value-type="string">
            <text:p><text:s/></text:p>
          </table:table-cell>
          <table:table-cell table:formula="of:=IF([$Sheet1.A161] &lt;&gt;&quot;&quot;; [$Sheet1.A161]; &quot;&quot;)" office:value-type="float" office:value="1113" calcext:value-type="float">
            <text:p>1113</text:p>
          </table:table-cell>
          <table:table-cell table:number-columns-repeated="16380"/>
        </table:table-row>
        <table:table-row table:style-name="ro1">
          <table:table-cell table:formula="of:=IF([$Sheet1.A162] &lt;&gt;&quot;&quot;; &quot;#define &quot;; &quot;&quot;)" office:value-type="string" office:string-value="#define " calcext:value-type="string">
            <text:p>#define </text:p>
          </table:table-cell>
          <table:table-cell table:formula="of:=IF([$Sheet1.A162] &lt;&gt;&quot;&quot;; [$Sheet1.I162]; &quot;&quot;)" office:value-type="string" office:string-value="SIM_AMPLIFIER_CUP1_ELECTRODE4" calcext:value-type="string">
            <text:p>SIM_AMPLIFIER_CUP1_ELECTRODE4</text:p>
          </table:table-cell>
          <table:table-cell table:formula="of:=IF([$Sheet1.A162] &lt;&gt;&quot;&quot;; &quot; &quot;; &quot;&quot;)" office:value-type="string" office:string-value=" " calcext:value-type="string">
            <text:p><text:s/></text:p>
          </table:table-cell>
          <table:table-cell table:formula="of:=IF([$Sheet1.A162] &lt;&gt;&quot;&quot;; [$Sheet1.A162]; &quot;&quot;)" office:value-type="float" office:value="1114" calcext:value-type="float">
            <text:p>1114</text:p>
          </table:table-cell>
          <table:table-cell table:number-columns-repeated="16380"/>
        </table:table-row>
        <table:table-row table:style-name="ro1">
          <table:table-cell table:formula="of:=IF([$Sheet1.A163] &lt;&gt;&quot;&quot;; &quot;#define &quot;; &quot;&quot;)" office:value-type="string" office:string-value="#define " calcext:value-type="string">
            <text:p>#define </text:p>
          </table:table-cell>
          <table:table-cell table:formula="of:=IF([$Sheet1.A163] &lt;&gt;&quot;&quot;; [$Sheet1.I163]; &quot;&quot;)" office:value-type="string" office:string-value="SIM_AMPLIFIER_CUP2_ELECTRODE1" calcext:value-type="string">
            <text:p>SIM_AMPLIFIER_CUP2_ELECTRODE1</text:p>
          </table:table-cell>
          <table:table-cell table:formula="of:=IF([$Sheet1.A163] &lt;&gt;&quot;&quot;; &quot; &quot;; &quot;&quot;)" office:value-type="string" office:string-value=" " calcext:value-type="string">
            <text:p><text:s/></text:p>
          </table:table-cell>
          <table:table-cell table:formula="of:=IF([$Sheet1.A163] &lt;&gt;&quot;&quot;; [$Sheet1.A163]; &quot;&quot;)" office:value-type="float" office:value="1115" calcext:value-type="float">
            <text:p>1115</text:p>
          </table:table-cell>
          <table:table-cell table:number-columns-repeated="16380"/>
        </table:table-row>
        <table:table-row table:style-name="ro1">
          <table:table-cell table:formula="of:=IF([$Sheet1.A164] &lt;&gt;&quot;&quot;; &quot;#define &quot;; &quot;&quot;)" office:value-type="string" office:string-value="#define " calcext:value-type="string">
            <text:p>#define </text:p>
          </table:table-cell>
          <table:table-cell table:formula="of:=IF([$Sheet1.A164] &lt;&gt;&quot;&quot;; [$Sheet1.I164]; &quot;&quot;)" office:value-type="string" office:string-value="SIM_AMPLIFIER_CUP2_ELECTRODE2" calcext:value-type="string">
            <text:p>SIM_AMPLIFIER_CUP2_ELECTRODE2</text:p>
          </table:table-cell>
          <table:table-cell table:formula="of:=IF([$Sheet1.A164] &lt;&gt;&quot;&quot;; &quot; &quot;; &quot;&quot;)" office:value-type="string" office:string-value=" " calcext:value-type="string">
            <text:p><text:s/></text:p>
          </table:table-cell>
          <table:table-cell table:formula="of:=IF([$Sheet1.A164] &lt;&gt;&quot;&quot;; [$Sheet1.A164]; &quot;&quot;)" office:value-type="float" office:value="1116" calcext:value-type="float">
            <text:p>1116</text:p>
          </table:table-cell>
          <table:table-cell table:number-columns-repeated="16380"/>
        </table:table-row>
        <table:table-row table:style-name="ro1">
          <table:table-cell table:formula="of:=IF([$Sheet1.A165] &lt;&gt;&quot;&quot;; &quot;#define &quot;; &quot;&quot;)" office:value-type="string" office:string-value="#define " calcext:value-type="string">
            <text:p>#define </text:p>
          </table:table-cell>
          <table:table-cell table:formula="of:=IF([$Sheet1.A165] &lt;&gt;&quot;&quot;; [$Sheet1.I165]; &quot;&quot;)" office:value-type="string" office:string-value="SIM_AMPLIFIER_CUP2_ELECTRODE3" calcext:value-type="string">
            <text:p>SIM_AMPLIFIER_CUP2_ELECTRODE3</text:p>
          </table:table-cell>
          <table:table-cell table:formula="of:=IF([$Sheet1.A165] &lt;&gt;&quot;&quot;; &quot; &quot;; &quot;&quot;)" office:value-type="string" office:string-value=" " calcext:value-type="string">
            <text:p><text:s/></text:p>
          </table:table-cell>
          <table:table-cell table:formula="of:=IF([$Sheet1.A165] &lt;&gt;&quot;&quot;; [$Sheet1.A165]; &quot;&quot;)" office:value-type="float" office:value="1117" calcext:value-type="float">
            <text:p>1117</text:p>
          </table:table-cell>
          <table:table-cell table:number-columns-repeated="16380"/>
        </table:table-row>
        <table:table-row table:style-name="ro1">
          <table:table-cell table:formula="of:=IF([$Sheet1.A166] &lt;&gt;&quot;&quot;; &quot;#define &quot;; &quot;&quot;)" office:value-type="string" office:string-value="#define " calcext:value-type="string">
            <text:p>#define </text:p>
          </table:table-cell>
          <table:table-cell table:formula="of:=IF([$Sheet1.A166] &lt;&gt;&quot;&quot;; [$Sheet1.I166]; &quot;&quot;)" office:value-type="string" office:string-value="SIM_AMPLIFIER_CUP2_ELECTRODE4" calcext:value-type="string">
            <text:p>SIM_AMPLIFIER_CUP2_ELECTRODE4</text:p>
          </table:table-cell>
          <table:table-cell table:formula="of:=IF([$Sheet1.A166] &lt;&gt;&quot;&quot;; &quot; &quot;; &quot;&quot;)" office:value-type="string" office:string-value=" " calcext:value-type="string">
            <text:p><text:s/></text:p>
          </table:table-cell>
          <table:table-cell table:formula="of:=IF([$Sheet1.A166] &lt;&gt;&quot;&quot;; [$Sheet1.A166]; &quot;&quot;)" office:value-type="float" office:value="1118" calcext:value-type="float">
            <text:p>1118</text:p>
          </table:table-cell>
          <table:table-cell table:number-columns-repeated="16380"/>
        </table:table-row>
        <table:table-row table:style-name="ro1">
          <table:table-cell table:formula="of:=IF([$Sheet1.A167] &lt;&gt;&quot;&quot;; &quot;#define &quot;; &quot;&quot;)" office:value-type="string" office:string-value="#define " calcext:value-type="string">
            <text:p>#define </text:p>
          </table:table-cell>
          <table:table-cell table:formula="of:=IF([$Sheet1.A167] &lt;&gt;&quot;&quot;; [$Sheet1.I167]; &quot;&quot;)" office:value-type="string" office:string-value="SIM_AMPLIFIER_CUP3_ELECTRODE1" calcext:value-type="string">
            <text:p>SIM_AMPLIFIER_CUP3_ELECTRODE1</text:p>
          </table:table-cell>
          <table:table-cell table:formula="of:=IF([$Sheet1.A167] &lt;&gt;&quot;&quot;; &quot; &quot;; &quot;&quot;)" office:value-type="string" office:string-value=" " calcext:value-type="string">
            <text:p><text:s/></text:p>
          </table:table-cell>
          <table:table-cell table:formula="of:=IF([$Sheet1.A167] &lt;&gt;&quot;&quot;; [$Sheet1.A167]; &quot;&quot;)" office:value-type="float" office:value="1119" calcext:value-type="float">
            <text:p>1119</text:p>
          </table:table-cell>
          <table:table-cell table:number-columns-repeated="16380"/>
        </table:table-row>
        <table:table-row table:style-name="ro1">
          <table:table-cell table:formula="of:=IF([$Sheet1.A168] &lt;&gt;&quot;&quot;; &quot;#define &quot;; &quot;&quot;)" office:value-type="string" office:string-value="#define " calcext:value-type="string">
            <text:p>#define </text:p>
          </table:table-cell>
          <table:table-cell table:formula="of:=IF([$Sheet1.A168] &lt;&gt;&quot;&quot;; [$Sheet1.I168]; &quot;&quot;)" office:value-type="string" office:string-value="SIM_AMPLIFIER_CUP3_ELECTRODE2" calcext:value-type="string">
            <text:p>SIM_AMPLIFIER_CUP3_ELECTRODE2</text:p>
          </table:table-cell>
          <table:table-cell table:formula="of:=IF([$Sheet1.A168] &lt;&gt;&quot;&quot;; &quot; &quot;; &quot;&quot;)" office:value-type="string" office:string-value=" " calcext:value-type="string">
            <text:p><text:s/></text:p>
          </table:table-cell>
          <table:table-cell table:formula="of:=IF([$Sheet1.A168] &lt;&gt;&quot;&quot;; [$Sheet1.A168]; &quot;&quot;)" office:value-type="float" office:value="1120" calcext:value-type="float">
            <text:p>1120</text:p>
          </table:table-cell>
          <table:table-cell table:number-columns-repeated="16380"/>
        </table:table-row>
        <table:table-row table:style-name="ro1">
          <table:table-cell table:formula="of:=IF([$Sheet1.A169] &lt;&gt;&quot;&quot;; &quot;#define &quot;; &quot;&quot;)" office:value-type="string" office:string-value="#define " calcext:value-type="string">
            <text:p>#define </text:p>
          </table:table-cell>
          <table:table-cell table:formula="of:=IF([$Sheet1.A169] &lt;&gt;&quot;&quot;; [$Sheet1.I169]; &quot;&quot;)" office:value-type="string" office:string-value="SIM_AMPLIFIER_CUP3_ELECTRODE3" calcext:value-type="string">
            <text:p>SIM_AMPLIFIER_CUP3_ELECTRODE3</text:p>
          </table:table-cell>
          <table:table-cell table:formula="of:=IF([$Sheet1.A169] &lt;&gt;&quot;&quot;; &quot; &quot;; &quot;&quot;)" office:value-type="string" office:string-value=" " calcext:value-type="string">
            <text:p><text:s/></text:p>
          </table:table-cell>
          <table:table-cell table:formula="of:=IF([$Sheet1.A169] &lt;&gt;&quot;&quot;; [$Sheet1.A169]; &quot;&quot;)" office:value-type="float" office:value="1121" calcext:value-type="float">
            <text:p>1121</text:p>
          </table:table-cell>
          <table:table-cell table:number-columns-repeated="16380"/>
        </table:table-row>
        <table:table-row table:style-name="ro1">
          <table:table-cell table:formula="of:=IF([$Sheet1.A170] &lt;&gt;&quot;&quot;; &quot;#define &quot;; &quot;&quot;)" office:value-type="string" office:string-value="#define " calcext:value-type="string">
            <text:p>#define </text:p>
          </table:table-cell>
          <table:table-cell table:formula="of:=IF([$Sheet1.A170] &lt;&gt;&quot;&quot;; [$Sheet1.I170]; &quot;&quot;)" office:value-type="string" office:string-value="SIM_AMPLIFIER_CUP3_ELECTRODE4" calcext:value-type="string">
            <text:p>SIM_AMPLIFIER_CUP3_ELECTRODE4</text:p>
          </table:table-cell>
          <table:table-cell table:formula="of:=IF([$Sheet1.A170] &lt;&gt;&quot;&quot;; &quot; &quot;; &quot;&quot;)" office:value-type="string" office:string-value=" " calcext:value-type="string">
            <text:p><text:s/></text:p>
          </table:table-cell>
          <table:table-cell table:formula="of:=IF([$Sheet1.A170] &lt;&gt;&quot;&quot;; [$Sheet1.A170]; &quot;&quot;)" office:value-type="float" office:value="1122" calcext:value-type="float">
            <text:p>1122</text:p>
          </table:table-cell>
          <table:table-cell table:number-columns-repeated="16380"/>
        </table:table-row>
        <table:table-row table:style-name="ro1">
          <table:table-cell table:formula="of:=IF([$Sheet1.A171] &lt;&gt;&quot;&quot;; &quot;#define &quot;; &quot;&quot;)">
            <text:p/>
          </table:table-cell>
          <table:table-cell table:formula="of:=IF([$Sheet1.A171] &lt;&gt;&quot;&quot;; [$Sheet1.I171]; &quot;&quot;)">
            <text:p/>
          </table:table-cell>
          <table:table-cell table:formula="of:=IF([$Sheet1.A171] &lt;&gt;&quot;&quot;; &quot; &quot;; &quot;&quot;)">
            <text:p/>
          </table:table-cell>
          <table:table-cell table:formula="of:=IF([$Sheet1.A171] &lt;&gt;&quot;&quot;; [$Sheet1.A171]; &quot;&quot;)">
            <text:p/>
          </table:table-cell>
          <table:table-cell table:number-columns-repeated="16380"/>
        </table:table-row>
        <table:table-row table:style-name="ro1">
          <table:table-cell table:formula="of:=IF([$Sheet1.A172] &lt;&gt;&quot;&quot;; &quot;#define &quot;; &quot;&quot;)" office:value-type="string" office:string-value="#define " calcext:value-type="string">
            <text:p>#define </text:p>
          </table:table-cell>
          <table:table-cell table:formula="of:=IF([$Sheet1.A172] &lt;&gt;&quot;&quot;; [$Sheet1.I172]; &quot;&quot;)" office:value-type="string" office:string-value="SIM_AMPLIFIER_RANDOM_RATE" calcext:value-type="string">
            <text:p>SIM_AMPLIFIER_RANDOM_RATE</text:p>
          </table:table-cell>
          <table:table-cell table:formula="of:=IF([$Sheet1.A172] &lt;&gt;&quot;&quot;; &quot; &quot;; &quot;&quot;)" office:value-type="string" office:string-value=" " calcext:value-type="string">
            <text:p><text:s/></text:p>
          </table:table-cell>
          <table:table-cell table:formula="of:=IF([$Sheet1.A172] &lt;&gt;&quot;&quot;; [$Sheet1.A172]; &quot;&quot;)" office:value-type="float" office:value="1123" calcext:value-type="float">
            <text:p>1123</text:p>
          </table:table-cell>
          <table:table-cell table:number-columns-repeated="16380"/>
        </table:table-row>
        <table:table-row table:style-name="ro1">
          <table:table-cell table:formula="of:=IF([$Sheet1.A173] &lt;&gt;&quot;&quot;; &quot;#define &quot;; &quot;&quot;)" office:value-type="string" office:string-value="#define " calcext:value-type="string">
            <text:p>#define </text:p>
          </table:table-cell>
          <table:table-cell table:formula="of:=IF([$Sheet1.A173] &lt;&gt;&quot;&quot;; [$Sheet1.I173]; &quot;&quot;)" office:value-type="string" office:string-value="SIM_AMPLIFIER_RANDOM_OFFSET" calcext:value-type="string">
            <text:p>SIM_AMPLIFIER_RANDOM_OFFSET</text:p>
          </table:table-cell>
          <table:table-cell table:formula="of:=IF([$Sheet1.A173] &lt;&gt;&quot;&quot;; &quot; &quot;; &quot;&quot;)" office:value-type="string" office:string-value=" " calcext:value-type="string">
            <text:p><text:s/></text:p>
          </table:table-cell>
          <table:table-cell table:formula="of:=IF([$Sheet1.A173] &lt;&gt;&quot;&quot;; [$Sheet1.A173]; &quot;&quot;)" office:value-type="float" office:value="1124" calcext:value-type="float">
            <text:p>1124</text:p>
          </table:table-cell>
          <table:table-cell table:number-columns-repeated="16380"/>
        </table:table-row>
        <table:table-row table:style-name="ro1">
          <table:table-cell table:formula="of:=IF([$Sheet1.A174] &lt;&gt;&quot;&quot;; &quot;#define &quot;; &quot;&quot;)">
            <text:p/>
          </table:table-cell>
          <table:table-cell table:formula="of:=IF([$Sheet1.A174] &lt;&gt;&quot;&quot;; [$Sheet1.I174]; &quot;&quot;)">
            <text:p/>
          </table:table-cell>
          <table:table-cell table:formula="of:=IF([$Sheet1.A174] &lt;&gt;&quot;&quot;; &quot; &quot;; &quot;&quot;)">
            <text:p/>
          </table:table-cell>
          <table:table-cell table:formula="of:=IF([$Sheet1.A174] &lt;&gt;&quot;&quot;; [$Sheet1.A174]; &quot;&quot;)">
            <text:p/>
          </table:table-cell>
          <table:table-cell table:number-columns-repeated="16380"/>
        </table:table-row>
        <table:table-row table:style-name="ro1">
          <table:table-cell table:formula="of:=IF([$Sheet1.A175] &lt;&gt;&quot;&quot;; &quot;#define &quot;; &quot;&quot;)" office:value-type="string" office:string-value="#define " calcext:value-type="string">
            <text:p>#define </text:p>
          </table:table-cell>
          <table:table-cell table:formula="of:=IF([$Sheet1.A175] &lt;&gt;&quot;&quot;; [$Sheet1.I175]; &quot;&quot;)" office:value-type="string" office:string-value="SIM_EXTERNAL_LOCK_PERIOD" calcext:value-type="string">
            <text:p>SIM_EXTERNAL_LOCK_PERIOD</text:p>
          </table:table-cell>
          <table:table-cell table:formula="of:=IF([$Sheet1.A175] &lt;&gt;&quot;&quot;; &quot; &quot;; &quot;&quot;)" office:value-type="string" office:string-value=" " calcext:value-type="string">
            <text:p><text:s/></text:p>
          </table:table-cell>
          <table:table-cell table:formula="of:=IF([$Sheet1.A175] &lt;&gt;&quot;&quot;; [$Sheet1.A175]; &quot;&quot;)" office:value-type="float" office:value="1125" calcext:value-type="float">
            <text:p>1125</text:p>
          </table:table-cell>
          <table:table-cell table:number-columns-repeated="16380"/>
        </table:table-row>
        <table:table-row table:style-name="ro1">
          <table:table-cell table:formula="of:=IF([$Sheet1.A176] &lt;&gt;&quot;&quot;; &quot;#define &quot;; &quot;&quot;)" office:value-type="string" office:string-value="#define " calcext:value-type="string">
            <text:p>#define </text:p>
          </table:table-cell>
          <table:table-cell table:formula="of:=IF([$Sheet1.A176] &lt;&gt;&quot;&quot;; [$Sheet1.I176]; &quot;&quot;)" office:value-type="string" office:string-value="SIM_EXTERNAL_LOCK_DURATION" calcext:value-type="string">
            <text:p>SIM_EXTERNAL_LOCK_DURATION</text:p>
          </table:table-cell>
          <table:table-cell table:formula="of:=IF([$Sheet1.A176] &lt;&gt;&quot;&quot;; &quot; &quot;; &quot;&quot;)" office:value-type="string" office:string-value=" " calcext:value-type="string">
            <text:p><text:s/></text:p>
          </table:table-cell>
          <table:table-cell table:formula="of:=IF([$Sheet1.A176] &lt;&gt;&quot;&quot;; [$Sheet1.A176]; &quot;&quot;)" office:value-type="float" office:value="1126" calcext:value-type="float">
            <text:p>1126</text:p>
          </table:table-cell>
          <table:table-cell table:number-columns-repeated="16380"/>
        </table:table-row>
        <table:table-row table:style-name="ro1">
          <table:table-cell table:formula="of:=IF([$Sheet1.A177] &lt;&gt;&quot;&quot;; &quot;#define &quot;; &quot;&quot;)" office:value-type="string" office:string-value="#define " calcext:value-type="string">
            <text:p>#define </text:p>
          </table:table-cell>
          <table:table-cell table:formula="of:=IF([$Sheet1.A177] &lt;&gt;&quot;&quot;; [$Sheet1.I177]; &quot;&quot;)" office:value-type="string" office:string-value="SIM_EXTERNAL_LOCK_DELAY" calcext:value-type="string">
            <text:p>SIM_EXTERNAL_LOCK_DELAY</text:p>
          </table:table-cell>
          <table:table-cell table:formula="of:=IF([$Sheet1.A177] &lt;&gt;&quot;&quot;; &quot; &quot;; &quot;&quot;)" office:value-type="string" office:string-value=" " calcext:value-type="string">
            <text:p><text:s/></text:p>
          </table:table-cell>
          <table:table-cell table:formula="of:=IF([$Sheet1.A177] &lt;&gt;&quot;&quot;; [$Sheet1.A177]; &quot;&quot;)" office:value-type="float" office:value="1127" calcext:value-type="float">
            <text:p>1127</text:p>
          </table:table-cell>
          <table:table-cell table:number-columns-repeated="16380"/>
        </table:table-row>
        <table:table-row table:style-name="ro1">
          <table:table-cell table:formula="of:=IF([$Sheet1.A178] &lt;&gt;&quot;&quot;; &quot;#define &quot;; &quot;&quot;)">
            <text:p/>
          </table:table-cell>
          <table:table-cell table:formula="of:=IF([$Sheet1.A178] &lt;&gt;&quot;&quot;; [$Sheet1.I178]; &quot;&quot;)">
            <text:p/>
          </table:table-cell>
          <table:table-cell table:formula="of:=IF([$Sheet1.A178] &lt;&gt;&quot;&quot;; &quot; &quot;; &quot;&quot;)">
            <text:p/>
          </table:table-cell>
          <table:table-cell table:formula="of:=IF([$Sheet1.A178] &lt;&gt;&quot;&quot;; [$Sheet1.A178]; &quot;&quot;)">
            <text:p/>
          </table:table-cell>
          <table:table-cell table:number-columns-repeated="16380"/>
        </table:table-row>
        <table:table-row table:style-name="ro1">
          <table:table-cell table:formula="of:=IF([$Sheet1.A179] &lt;&gt;&quot;&quot;; &quot;#define &quot;; &quot;&quot;)" office:value-type="string" office:string-value="#define " calcext:value-type="string">
            <text:p>#define </text:p>
          </table:table-cell>
          <table:table-cell table:formula="of:=IF([$Sheet1.A179] &lt;&gt;&quot;&quot;; [$Sheet1.I179]; &quot;&quot;)" office:value-type="string" office:string-value="SIM_EVENT_CODE" calcext:value-type="string">
            <text:p>SIM_EVENT_CODE</text:p>
          </table:table-cell>
          <table:table-cell table:formula="of:=IF([$Sheet1.A179] &lt;&gt;&quot;&quot;; &quot; &quot;; &quot;&quot;)" office:value-type="string" office:string-value=" " calcext:value-type="string">
            <text:p><text:s/></text:p>
          </table:table-cell>
          <table:table-cell table:formula="of:=IF([$Sheet1.A179] &lt;&gt;&quot;&quot;; [$Sheet1.A179]; &quot;&quot;)" office:value-type="float" office:value="1128" calcext:value-type="float">
            <text:p>1128</text:p>
          </table:table-cell>
          <table:table-cell table:number-columns-repeated="16380"/>
        </table:table-row>
        <table:table-row table:style-name="ro1">
          <table:table-cell table:formula="of:=IF([$Sheet1.A180] &lt;&gt;&quot;&quot;; &quot;#define &quot;; &quot;&quot;)" office:value-type="string" office:string-value="#define " calcext:value-type="string">
            <text:p>#define </text:p>
          </table:table-cell>
          <table:table-cell table:formula="of:=IF([$Sheet1.A180] &lt;&gt;&quot;&quot;; [$Sheet1.I180]; &quot;&quot;)" office:value-type="string" office:string-value="SIM_EVENT_PERIOD" calcext:value-type="string">
            <text:p>SIM_EVENT_PERIOD</text:p>
          </table:table-cell>
          <table:table-cell table:formula="of:=IF([$Sheet1.A180] &lt;&gt;&quot;&quot;; &quot; &quot;; &quot;&quot;)" office:value-type="string" office:string-value=" " calcext:value-type="string">
            <text:p><text:s/></text:p>
          </table:table-cell>
          <table:table-cell table:formula="of:=IF([$Sheet1.A180] &lt;&gt;&quot;&quot;; [$Sheet1.A180]; &quot;&quot;)" office:value-type="float" office:value="1129" calcext:value-type="float">
            <text:p>1129</text:p>
          </table:table-cell>
          <table:table-cell table:number-columns-repeated="16380"/>
        </table:table-row>
        <table:table-row table:style-name="ro1">
          <table:table-cell table:formula="of:=IF([$Sheet1.A181] &lt;&gt;&quot;&quot;; &quot;#define &quot;; &quot;&quot;)" office:value-type="string" office:string-value="#define " calcext:value-type="string">
            <text:p>#define </text:p>
          </table:table-cell>
          <table:table-cell table:formula="of:=IF([$Sheet1.A181] &lt;&gt;&quot;&quot;; [$Sheet1.I181]; &quot;&quot;)" office:value-type="string" office:string-value="SIM_EVENT_DURATION" calcext:value-type="string">
            <text:p>SIM_EVENT_DURATION</text:p>
          </table:table-cell>
          <table:table-cell table:formula="of:=IF([$Sheet1.A181] &lt;&gt;&quot;&quot;; &quot; &quot;; &quot;&quot;)" office:value-type="string" office:string-value=" " calcext:value-type="string">
            <text:p><text:s/></text:p>
          </table:table-cell>
          <table:table-cell table:formula="of:=IF([$Sheet1.A181] &lt;&gt;&quot;&quot;; [$Sheet1.A181]; &quot;&quot;)" office:value-type="float" office:value="1130" calcext:value-type="float">
            <text:p>1130</text:p>
          </table:table-cell>
          <table:table-cell table:number-columns-repeated="16380"/>
        </table:table-row>
        <table:table-row table:style-name="ro1">
          <table:table-cell table:formula="of:=IF([$Sheet1.A182] &lt;&gt;&quot;&quot;; &quot;#define &quot;; &quot;&quot;)" office:value-type="string" office:string-value="#define " calcext:value-type="string">
            <text:p>#define </text:p>
          </table:table-cell>
          <table:table-cell table:formula="of:=IF([$Sheet1.A182] &lt;&gt;&quot;&quot;; [$Sheet1.I182]; &quot;&quot;)" office:value-type="string" office:string-value="SIM_EVENT_DELAY" calcext:value-type="string">
            <text:p>SIM_EVENT_DELAY</text:p>
          </table:table-cell>
          <table:table-cell table:formula="of:=IF([$Sheet1.A182] &lt;&gt;&quot;&quot;; &quot; &quot;; &quot;&quot;)" office:value-type="string" office:string-value=" " calcext:value-type="string">
            <text:p><text:s/></text:p>
          </table:table-cell>
          <table:table-cell table:formula="of:=IF([$Sheet1.A182] &lt;&gt;&quot;&quot;; [$Sheet1.A182]; &quot;&quot;)" office:value-type="float" office:value="1131" calcext:value-type="float">
            <text:p>1131</text:p>
          </table:table-cell>
          <table:table-cell table:number-columns-repeated="16380"/>
        </table:table-row>
        <table:table-row table:style-name="ro1">
          <table:table-cell table:formula="of:=IF([$Sheet1.A183] &lt;&gt;&quot;&quot;; &quot;#define &quot;; &quot;&quot;)">
            <text:p/>
          </table:table-cell>
          <table:table-cell table:formula="of:=IF([$Sheet1.A183] &lt;&gt;&quot;&quot;; [$Sheet1.I183]; &quot;&quot;)">
            <text:p/>
          </table:table-cell>
          <table:table-cell table:formula="of:=IF([$Sheet1.A183] &lt;&gt;&quot;&quot;; &quot; &quot;; &quot;&quot;)">
            <text:p/>
          </table:table-cell>
          <table:table-cell table:formula="of:=IF([$Sheet1.A183] &lt;&gt;&quot;&quot;; [$Sheet1.A183]; &quot;&quot;)">
            <text:p/>
          </table:table-cell>
          <table:table-cell table:number-columns-repeated="16380"/>
        </table:table-row>
        <table:table-row table:style-name="ro1">
          <table:table-cell table:formula="of:=IF([$Sheet1.A184] &lt;&gt;&quot;&quot;; &quot;#define &quot;; &quot;&quot;)" office:value-type="string" office:string-value="#define " calcext:value-type="string">
            <text:p>#define </text:p>
          </table:table-cell>
          <table:table-cell table:formula="of:=IF([$Sheet1.A184] &lt;&gt;&quot;&quot;; [$Sheet1.I184]; &quot;&quot;)" office:value-type="string" office:string-value="DEBUG_PRINTOUTS" calcext:value-type="string">
            <text:p>DEBUG_PRINTOUTS</text:p>
          </table:table-cell>
          <table:table-cell table:formula="of:=IF([$Sheet1.A184] &lt;&gt;&quot;&quot;; &quot; &quot;; &quot;&quot;)" office:value-type="string" office:string-value=" " calcext:value-type="string">
            <text:p><text:s/></text:p>
          </table:table-cell>
          <table:table-cell table:formula="of:=IF([$Sheet1.A184] &lt;&gt;&quot;&quot;; [$Sheet1.A184]; &quot;&quot;)" office:value-type="float" office:value="1132" calcext:value-type="float">
            <text:p>1132</text:p>
          </table:table-cell>
          <table:table-cell table:number-columns-repeated="16380"/>
        </table:table-row>
        <table:table-row table:style-name="ro1">
          <table:table-cell table:formula="of:=IF([$Sheet1.A185] &lt;&gt;&quot;&quot;; &quot;#define &quot;; &quot;&quot;)" office:value-type="string" office:string-value="#define " calcext:value-type="string">
            <text:p>#define </text:p>
          </table:table-cell>
          <table:table-cell table:formula="of:=IF([$Sheet1.A185] &lt;&gt;&quot;&quot;; [$Sheet1.I185]; &quot;&quot;)" office:value-type="string" office:string-value="DEBUG_ARGUMENT1" calcext:value-type="string">
            <text:p>DEBUG_ARGUMENT1</text:p>
          </table:table-cell>
          <table:table-cell table:formula="of:=IF([$Sheet1.A185] &lt;&gt;&quot;&quot;; &quot; &quot;; &quot;&quot;)" office:value-type="string" office:string-value=" " calcext:value-type="string">
            <text:p><text:s/></text:p>
          </table:table-cell>
          <table:table-cell table:formula="of:=IF([$Sheet1.A185] &lt;&gt;&quot;&quot;; [$Sheet1.A185]; &quot;&quot;)" office:value-type="float" office:value="1133" calcext:value-type="float">
            <text:p>1133</text:p>
          </table:table-cell>
          <table:table-cell table:number-columns-repeated="16380"/>
        </table:table-row>
        <table:table-row table:style-name="ro1">
          <table:table-cell table:formula="of:=IF([$Sheet1.A186] &lt;&gt;&quot;&quot;; &quot;#define &quot;; &quot;&quot;)">
            <text:p/>
          </table:table-cell>
          <table:table-cell table:formula="of:=IF([$Sheet1.A186] &lt;&gt;&quot;&quot;; [$Sheet1.I186]; &quot;&quot;)">
            <text:p/>
          </table:table-cell>
          <table:table-cell table:formula="of:=IF([$Sheet1.A186] &lt;&gt;&quot;&quot;; &quot; &quot;; &quot;&quot;)">
            <text:p/>
          </table:table-cell>
          <table:table-cell table:formula="of:=IF([$Sheet1.A186] &lt;&gt;&quot;&quot;; [$Sheet1.A186]; &quot;&quot;)">
            <text:p/>
          </table:table-cell>
          <table:table-cell table:number-columns-repeated="16380"/>
        </table:table-row>
        <table:table-row table:style-name="ro1">
          <table:table-cell table:formula="of:=IF([$Sheet1.A187] &lt;&gt;&quot;&quot;; &quot;#define &quot;; &quot;&quot;)">
            <text:p/>
          </table:table-cell>
          <table:table-cell table:formula="of:=IF([$Sheet1.A187] &lt;&gt;&quot;&quot;; [$Sheet1.I187]; &quot;&quot;)">
            <text:p/>
          </table:table-cell>
          <table:table-cell table:formula="of:=IF([$Sheet1.A187] &lt;&gt;&quot;&quot;; &quot; &quot;; &quot;&quot;)">
            <text:p/>
          </table:table-cell>
          <table:table-cell table:formula="of:=IF([$Sheet1.A187] &lt;&gt;&quot;&quot;; [$Sheet1.A187]; &quot;&quot;)">
            <text:p/>
          </table:table-cell>
          <table:table-cell table:number-columns-repeated="16380"/>
        </table:table-row>
        <table:table-row table:style-name="ro1">
          <table:table-cell table:formula="of:=IF([$Sheet1.A188] &lt;&gt;&quot;&quot;; &quot;#define &quot;; &quot;&quot;)" office:value-type="string" office:string-value="#define " calcext:value-type="string">
            <text:p>#define </text:p>
          </table:table-cell>
          <table:table-cell table:formula="of:=IF([$Sheet1.A188] &lt;&gt;&quot;&quot;; [$Sheet1.I188]; &quot;&quot;)" office:value-type="string" office:string-value="CUP1_CHANNEL1_SAMPLE" calcext:value-type="string">
            <text:p>CUP1_CHANNEL1_SAMPLE</text:p>
          </table:table-cell>
          <table:table-cell table:formula="of:=IF([$Sheet1.A188] &lt;&gt;&quot;&quot;; &quot; &quot;; &quot;&quot;)" office:value-type="string" office:string-value=" " calcext:value-type="string">
            <text:p><text:s/></text:p>
          </table:table-cell>
          <table:table-cell table:formula="of:=IF([$Sheet1.A188] &lt;&gt;&quot;&quot;; [$Sheet1.A188]; &quot;&quot;)" office:value-type="float" office:value="3001" calcext:value-type="float">
            <text:p>3001</text:p>
          </table:table-cell>
          <table:table-cell table:number-columns-repeated="16380"/>
        </table:table-row>
        <table:table-row table:style-name="ro1">
          <table:table-cell table:formula="of:=IF([$Sheet1.A189] &lt;&gt;&quot;&quot;; &quot;#define &quot;; &quot;&quot;)" office:value-type="string" office:string-value="#define " calcext:value-type="string">
            <text:p>#define </text:p>
          </table:table-cell>
          <table:table-cell table:formula="of:=IF([$Sheet1.A189] &lt;&gt;&quot;&quot;; [$Sheet1.I189]; &quot;&quot;)" office:value-type="string" office:string-value="CUP1_CHANNEL2_SAMPLE" calcext:value-type="string">
            <text:p>CUP1_CHANNEL2_SAMPLE</text:p>
          </table:table-cell>
          <table:table-cell table:formula="of:=IF([$Sheet1.A189] &lt;&gt;&quot;&quot;; &quot; &quot;; &quot;&quot;)" office:value-type="string" office:string-value=" " calcext:value-type="string">
            <text:p><text:s/></text:p>
          </table:table-cell>
          <table:table-cell table:formula="of:=IF([$Sheet1.A189] &lt;&gt;&quot;&quot;; [$Sheet1.A189]; &quot;&quot;)" office:value-type="float" office:value="3002" calcext:value-type="float">
            <text:p>3002</text:p>
          </table:table-cell>
          <table:table-cell table:number-columns-repeated="16380"/>
        </table:table-row>
        <table:table-row table:style-name="ro1">
          <table:table-cell table:formula="of:=IF([$Sheet1.A190] &lt;&gt;&quot;&quot;; &quot;#define &quot;; &quot;&quot;)" office:value-type="string" office:string-value="#define " calcext:value-type="string">
            <text:p>#define </text:p>
          </table:table-cell>
          <table:table-cell table:formula="of:=IF([$Sheet1.A190] &lt;&gt;&quot;&quot;; [$Sheet1.I190]; &quot;&quot;)" office:value-type="string" office:string-value="CUP1_CHANNEL3_SAMPLE" calcext:value-type="string">
            <text:p>CUP1_CHANNEL3_SAMPLE</text:p>
          </table:table-cell>
          <table:table-cell table:formula="of:=IF([$Sheet1.A190] &lt;&gt;&quot;&quot;; &quot; &quot;; &quot;&quot;)" office:value-type="string" office:string-value=" " calcext:value-type="string">
            <text:p><text:s/></text:p>
          </table:table-cell>
          <table:table-cell table:formula="of:=IF([$Sheet1.A190] &lt;&gt;&quot;&quot;; [$Sheet1.A190]; &quot;&quot;)" office:value-type="float" office:value="3003" calcext:value-type="float">
            <text:p>3003</text:p>
          </table:table-cell>
          <table:table-cell table:number-columns-repeated="16380"/>
        </table:table-row>
        <table:table-row table:style-name="ro1">
          <table:table-cell table:formula="of:=IF([$Sheet1.A191] &lt;&gt;&quot;&quot;; &quot;#define &quot;; &quot;&quot;)" office:value-type="string" office:string-value="#define " calcext:value-type="string">
            <text:p>#define </text:p>
          </table:table-cell>
          <table:table-cell table:formula="of:=IF([$Sheet1.A191] &lt;&gt;&quot;&quot;; [$Sheet1.I191]; &quot;&quot;)" office:value-type="string" office:string-value="CUP1_CHANNEL4_SAMPLE" calcext:value-type="string">
            <text:p>CUP1_CHANNEL4_SAMPLE</text:p>
          </table:table-cell>
          <table:table-cell table:formula="of:=IF([$Sheet1.A191] &lt;&gt;&quot;&quot;; &quot; &quot;; &quot;&quot;)" office:value-type="string" office:string-value=" " calcext:value-type="string">
            <text:p><text:s/></text:p>
          </table:table-cell>
          <table:table-cell table:formula="of:=IF([$Sheet1.A191] &lt;&gt;&quot;&quot;; [$Sheet1.A191]; &quot;&quot;)" office:value-type="float" office:value="3004" calcext:value-type="float">
            <text:p>3004</text:p>
          </table:table-cell>
          <table:table-cell table:number-columns-repeated="16380"/>
        </table:table-row>
        <table:table-row table:style-name="ro1">
          <table:table-cell table:formula="of:=IF([$Sheet1.A192] &lt;&gt;&quot;&quot;; &quot;#define &quot;; &quot;&quot;)" office:value-type="string" office:string-value="#define " calcext:value-type="string">
            <text:p>#define </text:p>
          </table:table-cell>
          <table:table-cell table:formula="of:=IF([$Sheet1.A192] &lt;&gt;&quot;&quot;; [$Sheet1.I192]; &quot;&quot;)" office:value-type="string" office:string-value="CUP1_CHANNEL_ERROR" calcext:value-type="string">
            <text:p>CUP1_CHANNEL_ERROR</text:p>
          </table:table-cell>
          <table:table-cell table:formula="of:=IF([$Sheet1.A192] &lt;&gt;&quot;&quot;; &quot; &quot;; &quot;&quot;)" office:value-type="string" office:string-value=" " calcext:value-type="string">
            <text:p><text:s/></text:p>
          </table:table-cell>
          <table:table-cell table:formula="of:=IF([$Sheet1.A192] &lt;&gt;&quot;&quot;; [$Sheet1.A192]; &quot;&quot;)" office:value-type="float" office:value="3005" calcext:value-type="float">
            <text:p>3005</text:p>
          </table:table-cell>
          <table:table-cell table:number-columns-repeated="16380"/>
        </table:table-row>
        <table:table-row table:style-name="ro1">
          <table:table-cell table:formula="of:=IF([$Sheet1.A193] &lt;&gt;&quot;&quot;; &quot;#define &quot;; &quot;&quot;)">
            <text:p/>
          </table:table-cell>
          <table:table-cell table:formula="of:=IF([$Sheet1.A193] &lt;&gt;&quot;&quot;; [$Sheet1.I193]; &quot;&quot;)">
            <text:p/>
          </table:table-cell>
          <table:table-cell table:formula="of:=IF([$Sheet1.A193] &lt;&gt;&quot;&quot;; &quot; &quot;; &quot;&quot;)">
            <text:p/>
          </table:table-cell>
          <table:table-cell table:formula="of:=IF([$Sheet1.A193] &lt;&gt;&quot;&quot;; [$Sheet1.A193]; &quot;&quot;)">
            <text:p/>
          </table:table-cell>
          <table:table-cell table:number-columns-repeated="16380"/>
        </table:table-row>
        <table:table-row table:style-name="ro1">
          <table:table-cell table:formula="of:=IF([$Sheet1.A194] &lt;&gt;&quot;&quot;; &quot;#define &quot;; &quot;&quot;)" office:value-type="string" office:string-value="#define " calcext:value-type="string">
            <text:p>#define </text:p>
          </table:table-cell>
          <table:table-cell table:formula="of:=IF([$Sheet1.A194] &lt;&gt;&quot;&quot;; [$Sheet1.I194]; &quot;&quot;)" office:value-type="string" office:string-value="CUP2_CHANNEL1_SAMPLE" calcext:value-type="string">
            <text:p>CUP2_CHANNEL1_SAMPLE</text:p>
          </table:table-cell>
          <table:table-cell table:formula="of:=IF([$Sheet1.A194] &lt;&gt;&quot;&quot;; &quot; &quot;; &quot;&quot;)" office:value-type="string" office:string-value=" " calcext:value-type="string">
            <text:p><text:s/></text:p>
          </table:table-cell>
          <table:table-cell table:formula="of:=IF([$Sheet1.A194] &lt;&gt;&quot;&quot;; [$Sheet1.A194]; &quot;&quot;)" office:value-type="float" office:value="3006" calcext:value-type="float">
            <text:p>3006</text:p>
          </table:table-cell>
          <table:table-cell table:number-columns-repeated="16380"/>
        </table:table-row>
        <table:table-row table:style-name="ro1">
          <table:table-cell table:formula="of:=IF([$Sheet1.A195] &lt;&gt;&quot;&quot;; &quot;#define &quot;; &quot;&quot;)" office:value-type="string" office:string-value="#define " calcext:value-type="string">
            <text:p>#define </text:p>
          </table:table-cell>
          <table:table-cell table:formula="of:=IF([$Sheet1.A195] &lt;&gt;&quot;&quot;; [$Sheet1.I195]; &quot;&quot;)" office:value-type="string" office:string-value="CUP2_CHANNEL2_SAMPLE" calcext:value-type="string">
            <text:p>CUP2_CHANNEL2_SAMPLE</text:p>
          </table:table-cell>
          <table:table-cell table:formula="of:=IF([$Sheet1.A195] &lt;&gt;&quot;&quot;; &quot; &quot;; &quot;&quot;)" office:value-type="string" office:string-value=" " calcext:value-type="string">
            <text:p><text:s/></text:p>
          </table:table-cell>
          <table:table-cell table:formula="of:=IF([$Sheet1.A195] &lt;&gt;&quot;&quot;; [$Sheet1.A195]; &quot;&quot;)" office:value-type="float" office:value="3007" calcext:value-type="float">
            <text:p>3007</text:p>
          </table:table-cell>
          <table:table-cell table:number-columns-repeated="16380"/>
        </table:table-row>
        <table:table-row table:style-name="ro1">
          <table:table-cell table:formula="of:=IF([$Sheet1.A196] &lt;&gt;&quot;&quot;; &quot;#define &quot;; &quot;&quot;)" office:value-type="string" office:string-value="#define " calcext:value-type="string">
            <text:p>#define </text:p>
          </table:table-cell>
          <table:table-cell table:formula="of:=IF([$Sheet1.A196] &lt;&gt;&quot;&quot;; [$Sheet1.I196]; &quot;&quot;)" office:value-type="string" office:string-value="CUP2_CHANNEL3_SAMPLE" calcext:value-type="string">
            <text:p>CUP2_CHANNEL3_SAMPLE</text:p>
          </table:table-cell>
          <table:table-cell table:formula="of:=IF([$Sheet1.A196] &lt;&gt;&quot;&quot;; &quot; &quot;; &quot;&quot;)" office:value-type="string" office:string-value=" " calcext:value-type="string">
            <text:p><text:s/></text:p>
          </table:table-cell>
          <table:table-cell table:formula="of:=IF([$Sheet1.A196] &lt;&gt;&quot;&quot;; [$Sheet1.A196]; &quot;&quot;)" office:value-type="float" office:value="3008" calcext:value-type="float">
            <text:p>3008</text:p>
          </table:table-cell>
          <table:table-cell table:number-columns-repeated="16380"/>
        </table:table-row>
        <table:table-row table:style-name="ro1">
          <table:table-cell table:formula="of:=IF([$Sheet1.A197] &lt;&gt;&quot;&quot;; &quot;#define &quot;; &quot;&quot;)" office:value-type="string" office:string-value="#define " calcext:value-type="string">
            <text:p>#define </text:p>
          </table:table-cell>
          <table:table-cell table:formula="of:=IF([$Sheet1.A197] &lt;&gt;&quot;&quot;; [$Sheet1.I197]; &quot;&quot;)" office:value-type="string" office:string-value="CUP2_CHANNEL4_SAMPLE" calcext:value-type="string">
            <text:p>CUP2_CHANNEL4_SAMPLE</text:p>
          </table:table-cell>
          <table:table-cell table:formula="of:=IF([$Sheet1.A197] &lt;&gt;&quot;&quot;; &quot; &quot;; &quot;&quot;)" office:value-type="string" office:string-value=" " calcext:value-type="string">
            <text:p><text:s/></text:p>
          </table:table-cell>
          <table:table-cell table:formula="of:=IF([$Sheet1.A197] &lt;&gt;&quot;&quot;; [$Sheet1.A197]; &quot;&quot;)" office:value-type="float" office:value="3009" calcext:value-type="float">
            <text:p>3009</text:p>
          </table:table-cell>
          <table:table-cell table:number-columns-repeated="16380"/>
        </table:table-row>
        <table:table-row table:style-name="ro1">
          <table:table-cell table:formula="of:=IF([$Sheet1.A198] &lt;&gt;&quot;&quot;; &quot;#define &quot;; &quot;&quot;)" office:value-type="string" office:string-value="#define " calcext:value-type="string">
            <text:p>#define </text:p>
          </table:table-cell>
          <table:table-cell table:formula="of:=IF([$Sheet1.A198] &lt;&gt;&quot;&quot;; [$Sheet1.I198]; &quot;&quot;)" office:value-type="string" office:string-value="CUP2_CHANNEL_ERROR" calcext:value-type="string">
            <text:p>CUP2_CHANNEL_ERROR</text:p>
          </table:table-cell>
          <table:table-cell table:formula="of:=IF([$Sheet1.A198] &lt;&gt;&quot;&quot;; &quot; &quot;; &quot;&quot;)" office:value-type="string" office:string-value=" " calcext:value-type="string">
            <text:p><text:s/></text:p>
          </table:table-cell>
          <table:table-cell table:formula="of:=IF([$Sheet1.A198] &lt;&gt;&quot;&quot;; [$Sheet1.A198]; &quot;&quot;)" office:value-type="float" office:value="3010" calcext:value-type="float">
            <text:p>3010</text:p>
          </table:table-cell>
          <table:table-cell table:number-columns-repeated="16380"/>
        </table:table-row>
        <table:table-row table:style-name="ro1">
          <table:table-cell table:formula="of:=IF([$Sheet1.A199] &lt;&gt;&quot;&quot;; &quot;#define &quot;; &quot;&quot;)">
            <text:p/>
          </table:table-cell>
          <table:table-cell table:formula="of:=IF([$Sheet1.A199] &lt;&gt;&quot;&quot;; [$Sheet1.I199]; &quot;&quot;)">
            <text:p/>
          </table:table-cell>
          <table:table-cell table:formula="of:=IF([$Sheet1.A199] &lt;&gt;&quot;&quot;; &quot; &quot;; &quot;&quot;)">
            <text:p/>
          </table:table-cell>
          <table:table-cell table:formula="of:=IF([$Sheet1.A199] &lt;&gt;&quot;&quot;; [$Sheet1.A199]; &quot;&quot;)">
            <text:p/>
          </table:table-cell>
          <table:table-cell table:number-columns-repeated="16380"/>
        </table:table-row>
        <table:table-row table:style-name="ro1">
          <table:table-cell table:formula="of:=IF([$Sheet1.A200] &lt;&gt;&quot;&quot;; &quot;#define &quot;; &quot;&quot;)" office:value-type="string" office:string-value="#define " calcext:value-type="string">
            <text:p>#define </text:p>
          </table:table-cell>
          <table:table-cell table:formula="of:=IF([$Sheet1.A200] &lt;&gt;&quot;&quot;; [$Sheet1.I200]; &quot;&quot;)" office:value-type="string" office:string-value="CUP3_CHANNEL1_SAMPLE" calcext:value-type="string">
            <text:p>CUP3_CHANNEL1_SAMPLE</text:p>
          </table:table-cell>
          <table:table-cell table:formula="of:=IF([$Sheet1.A200] &lt;&gt;&quot;&quot;; &quot; &quot;; &quot;&quot;)" office:value-type="string" office:string-value=" " calcext:value-type="string">
            <text:p><text:s/></text:p>
          </table:table-cell>
          <table:table-cell table:formula="of:=IF([$Sheet1.A200] &lt;&gt;&quot;&quot;; [$Sheet1.A200]; &quot;&quot;)" office:value-type="float" office:value="3011" calcext:value-type="float">
            <text:p>3011</text:p>
          </table:table-cell>
          <table:table-cell table:number-columns-repeated="16380"/>
        </table:table-row>
        <table:table-row table:style-name="ro1">
          <table:table-cell table:formula="of:=IF([$Sheet1.A201] &lt;&gt;&quot;&quot;; &quot;#define &quot;; &quot;&quot;)" office:value-type="string" office:string-value="#define " calcext:value-type="string">
            <text:p>#define </text:p>
          </table:table-cell>
          <table:table-cell table:formula="of:=IF([$Sheet1.A201] &lt;&gt;&quot;&quot;; [$Sheet1.I201]; &quot;&quot;)" office:value-type="string" office:string-value="CUP3_CHANNEL2_SAMPLE" calcext:value-type="string">
            <text:p>CUP3_CHANNEL2_SAMPLE</text:p>
          </table:table-cell>
          <table:table-cell table:formula="of:=IF([$Sheet1.A201] &lt;&gt;&quot;&quot;; &quot; &quot;; &quot;&quot;)" office:value-type="string" office:string-value=" " calcext:value-type="string">
            <text:p><text:s/></text:p>
          </table:table-cell>
          <table:table-cell table:formula="of:=IF([$Sheet1.A201] &lt;&gt;&quot;&quot;; [$Sheet1.A201]; &quot;&quot;)" office:value-type="float" office:value="3012" calcext:value-type="float">
            <text:p>3012</text:p>
          </table:table-cell>
          <table:table-cell table:number-columns-repeated="16380"/>
        </table:table-row>
        <table:table-row table:style-name="ro1">
          <table:table-cell table:formula="of:=IF([$Sheet1.A202] &lt;&gt;&quot;&quot;; &quot;#define &quot;; &quot;&quot;)" office:value-type="string" office:string-value="#define " calcext:value-type="string">
            <text:p>#define </text:p>
          </table:table-cell>
          <table:table-cell table:formula="of:=IF([$Sheet1.A202] &lt;&gt;&quot;&quot;; [$Sheet1.I202]; &quot;&quot;)" office:value-type="string" office:string-value="CUP3_CHANNEL3_SAMPLE" calcext:value-type="string">
            <text:p>CUP3_CHANNEL3_SAMPLE</text:p>
          </table:table-cell>
          <table:table-cell table:formula="of:=IF([$Sheet1.A202] &lt;&gt;&quot;&quot;; &quot; &quot;; &quot;&quot;)" office:value-type="string" office:string-value=" " calcext:value-type="string">
            <text:p><text:s/></text:p>
          </table:table-cell>
          <table:table-cell table:formula="of:=IF([$Sheet1.A202] &lt;&gt;&quot;&quot;; [$Sheet1.A202]; &quot;&quot;)" office:value-type="float" office:value="3013" calcext:value-type="float">
            <text:p>3013</text:p>
          </table:table-cell>
          <table:table-cell table:number-columns-repeated="16380"/>
        </table:table-row>
        <table:table-row table:style-name="ro1">
          <table:table-cell table:formula="of:=IF([$Sheet1.A203] &lt;&gt;&quot;&quot;; &quot;#define &quot;; &quot;&quot;)" office:value-type="string" office:string-value="#define " calcext:value-type="string">
            <text:p>#define </text:p>
          </table:table-cell>
          <table:table-cell table:formula="of:=IF([$Sheet1.A203] &lt;&gt;&quot;&quot;; [$Sheet1.I203]; &quot;&quot;)" office:value-type="string" office:string-value="CUP3_CHANNEL4_SAMPLE" calcext:value-type="string">
            <text:p>CUP3_CHANNEL4_SAMPLE</text:p>
          </table:table-cell>
          <table:table-cell table:formula="of:=IF([$Sheet1.A203] &lt;&gt;&quot;&quot;; &quot; &quot;; &quot;&quot;)" office:value-type="string" office:string-value=" " calcext:value-type="string">
            <text:p><text:s/></text:p>
          </table:table-cell>
          <table:table-cell table:formula="of:=IF([$Sheet1.A203] &lt;&gt;&quot;&quot;; [$Sheet1.A203]; &quot;&quot;)" office:value-type="float" office:value="3014" calcext:value-type="float">
            <text:p>3014</text:p>
          </table:table-cell>
          <table:table-cell table:number-columns-repeated="16380"/>
        </table:table-row>
        <table:table-row table:style-name="ro1">
          <table:table-cell table:formula="of:=IF([$Sheet1.A204] &lt;&gt;&quot;&quot;; &quot;#define &quot;; &quot;&quot;)" office:value-type="string" office:string-value="#define " calcext:value-type="string">
            <text:p>#define </text:p>
          </table:table-cell>
          <table:table-cell table:formula="of:=IF([$Sheet1.A204] &lt;&gt;&quot;&quot;; [$Sheet1.I204]; &quot;&quot;)" office:value-type="string" office:string-value="CUP3_CHANNEL_ERROR" calcext:value-type="string">
            <text:p>CUP3_CHANNEL_ERROR</text:p>
          </table:table-cell>
          <table:table-cell table:formula="of:=IF([$Sheet1.A204] &lt;&gt;&quot;&quot;; &quot; &quot;; &quot;&quot;)" office:value-type="string" office:string-value=" " calcext:value-type="string">
            <text:p><text:s/></text:p>
          </table:table-cell>
          <table:table-cell table:formula="of:=IF([$Sheet1.A204] &lt;&gt;&quot;&quot;; [$Sheet1.A204]; &quot;&quot;)" office:value-type="float" office:value="3015" calcext:value-type="float">
            <text:p>3015</text:p>
          </table:table-cell>
          <table:table-cell table:number-columns-repeated="16380"/>
        </table:table-row>
        <table:table-row table:style-name="ro1" table:number-rows-repeated="10483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 style:data-style-name="N2" text:time-value="15:06:12.622664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6-08T15:12:23.290532001</dc:date>
    <meta:editing-duration>P1DT17H36M31S</meta:editing-duration>
    <meta:editing-cycles>165</meta:editing-cycles>
    <meta:generator>LibreOffice/24.2.7.2$Linux_X86_64 LibreOffice_project/420$Build-2</meta:generator>
    <meta:document-statistic meta:table-count="2" meta:cell-count="2945" meta:object-count="0"/>
  </office:meta>
</office:document-meta>
</file>