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2.8091in"/>
    </style:style>
    <style:style style:name="co8" style:family="table-column">
      <style:table-column-properties fo:break-before="auto" style:column-width="1.3835in"/>
    </style:style>
    <style:style style:name="co9" style:family="table-column">
      <style:table-column-properties fo:break-before="auto" style:column-width="1.7264in"/>
    </style:style>
    <style:style style:name="co10" style:family="table-column">
      <style:table-column-properties fo:break-before="auto" style:column-width="16.439in"/>
    </style:style>
    <style:style style:name="co11" style:family="table-column">
      <style:table-column-properties fo:break-before="auto" style:column-width="5.1256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7"/>
        <table:table-column table:style-name="co11" table:default-cell-style-name="ce3"/>
        <table:table-column table:style-name="co12" table:number-columns-repeated="16371" table:default-cell-style-name="ce3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Main application</text:p>
          </table:table-cell>
          <table:table-cell office:value-type="string" calcext:value-type="string">
            <text:p>Descrip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1638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3]=1; TYPE([.A3])=8); [.A3]+1; IF( OR([.A2]=1; TYPE([.A2])=8); [.A2]+1; 0))" office:value-type="float" office:value="2" calcext:value-type="float">
            <text:p>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style-name="ce3" table:formula="of:=IF( OR([.A4]=1; TYPE([.A4])=8); [.A4]+1; IF( OR([.A3]=1; TYPE([.A3])=8); [.A3]+1; 0))" office:value-type="float" office:value="3" calcext:value-type="float">
            <text:p>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1Control</text:p>
          </table:table-cell>
          <table:table-cell table:number-columns-repeated="16372"/>
        </table:table-row>
        <table:table-row table:style-name="ro1">
          <table:table-cell table:style-name="ce3" table:formula="of:=IF( OR([.A5]=1; TYPE([.A5])=8); [.A5]+1; IF( OR([.A4]=1; TYPE([.A4])=8); [.A4]+1; 0))" office:value-type="float" office:value="4" calcext:value-type="float">
            <text:p>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7"/>
        </table:table-row>
        <table:table-row table:style-name="ro1">
          <table:table-cell table:style-name="ce3" table:formula="of:=IF( OR([.A7]=1; TYPE([.A7])=8); [.A7]+1; IF( OR([.A6]=1; TYPE([.A6])=8); [.A6]+1; 0))" office:value-type="float" office:value="5" calcext:value-type="float">
            <text:p>5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8]=1; TYPE([.A8])=8); [.A8]+1; IF( OR([.A7]=1; TYPE([.A7])=8); [.A7]+1; 0))" office:value-type="float" office:value="6" calcext:value-type="float">
            <text:p>6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ernalInhibition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2"/>
        </table:table-row>
        <table:table-row table:style-name="ro1">
          <table:table-cell table:style-name="ce3" table:formula="of:=IF( OR([.A9]=1; TYPE([.A9])=8); [.A9]+1; IF( OR([.A8]=1; TYPE([.A8])=8); [.A8]+1; 0))" office:value-type="float" office:value="7" calcext:value-type="float">
            <text:p>7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2Control</text:p>
          </table:table-cell>
          <table:table-cell table:number-columns-repeated="16372"/>
        </table:table-row>
        <table:table-row table:style-name="ro1">
          <table:table-cell table:style-name="ce3" table:formula="of:=IF( OR([.A10]=1; TYPE([.A10])=8); [.A10]+1; IF( OR([.A9]=1; TYPE([.A9])=8); [.A9]+1; 0))" office:value-type="float" office:value="8" calcext:value-type="float">
            <text:p>8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7"/>
        </table:table-row>
        <table:table-row table:style-name="ro1">
          <table:table-cell table:style-name="ce3" table:formula="of:=IF( OR([.A12]=1; TYPE([.A12])=8); [.A12]+1; IF( OR([.A11]=1; TYPE([.A11])=8); [.A11]+1; 0))" office:value-type="float" office:value="9" calcext:value-type="float">
            <text:p>9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2"/>
        </table:table-row>
        <table:table-row table:style-name="ro1">
          <table:table-cell table:style-name="ce3" table:formula="of:=IF( OR([.A13]=1; TYPE([.A13])=8); [.A13]+1; IF( OR([.A12]=1; TYPE([.A12])=8); [.A12]+1; 0))" office:value-type="float" office:value="10" calcext:value-type="float">
            <text:p>10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table:style-name="ce3" table:formula="of:=IF( OR([.A14]=1; TYPE([.A14])=8); [.A14]+1; IF( OR([.A13]=1; TYPE([.A13])=8); [.A13]+1; 0))" office:value-type="float" office:value="11" calcext:value-type="float">
            <text:p>1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1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Cup3Control</text:p>
          </table:table-cell>
          <table:table-cell table:number-columns-repeated="16372"/>
        </table:table-row>
        <table:table-row table:style-name="ro1">
          <table:table-cell table:style-name="ce3" table:formula="of:=IF( OR([.A15]=1; TYPE([.A15])=8); [.A15]+1; IF( OR([.A14]=1; TYPE([.A14])=8); [.A14]+1; 0))" office:value-type="float" office:value="12" calcext:value-type="float">
            <text:p>1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3Control</text:p>
          </table:table-cell>
          <table:table-cell table:number-columns-repeated="16372"/>
        </table:table-row>
        <table:table-row table:style-name="ro1">
          <table:table-cell table:number-columns-repeated="16383"/>
        </table:table-row>
        <table:table-row table:style-name="ro1">
          <table:table-cell table:style-name="ce3" table:formula="of:=IF( OR([.A17]=1; TYPE([.A17])=8); [.A17]+1; IF( OR([.A16]=1; TYPE([.A16])=8); [.A16]+1; 0))" office:value-type="float" office:value="13" calcext:value-type="float">
            <text:p>1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2"/>
        </table:table-row>
        <table:table-row table:style-name="ro1">
          <table:table-cell table:style-name="ce3" table:formula="of:=IF( OR([.A18]=1; TYPE([.A18])=8); [.A18]+1; IF( OR([.A17]=1; TYPE([.A17])=8); [.A17]+1; 0))" office:value-type="float" office:value="14" calcext:value-type="float">
            <text:p>1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9]=1; TYPE([.A19])=8); [.A19]+1; IF( OR([.A18]=1; TYPE([.A18])=8); [.A18]+1; 0))" office:value-type="float" office:value="15" calcext:value-type="float">
            <text:p>15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6382"/>
        </table:table-row>
        <table:table-row table:style-name="ro1">
          <table:table-cell table:style-name="ce3" table:formula="of:=IF( OR([.A21]=1; TYPE([.A21])=8); [.A21]+1; IF( OR([.A20]=1; TYPE([.A20])=8); [.A20]+1; 0))" office:value-type="float" office:value="16" calcext:value-type="float">
            <text:p>16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heck whether the mechanism of the cup is in a transient state; true = steady state; false = transient state</text:p>
          </table:table-cell>
          <table:table-cell table:number-columns-repeated="16372"/>
        </table:table-row>
        <table:table-row table:style-name="ro1">
          <table:table-cell table:style-name="ce3" table:formula="of:=IF( OR([.A22]=1; TYPE([.A22])=8); [.A22]+1; IF( OR([.A21]=1; TYPE([.A21])=8); [.A21]+1; 0))" office:value-type="float" office:value="17" calcext:value-type="float">
            <text:p>17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3]=1; TYPE([.A23])=8); [.A23]+1; IF( OR([.A22]=1; TYPE([.A22])=8); [.A22]+1; 0))" office:value-type="float" office:value="18" calcext:value-type="float">
            <text:p>18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4]=1; TYPE([.A24])=8); [.A24]+1; IF( OR([.A23]=1; TYPE([.A23])=8); [.A23]+1; 0))" office:value-type="float" office:value="19" calcext:value-type="float">
            <text:p>19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tatus of the cup; true = inserted; false = withdrawn</text:p>
          </table:table-cell>
          <table:table-cell table:number-columns-repeated="16372"/>
        </table:table-row>
        <table:table-row table:style-name="ro1">
          <table:table-cell table:style-name="ce3" table:formula="of:=IF( OR([.A25]=1; TYPE([.A25])=8); [.A25]+1; IF( OR([.A24]=1; TYPE([.A24])=8); [.A24]+1; 0))" office:value-type="float" office:value="20" calcext:value-type="float">
            <text:p>20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6]=1; TYPE([.A26])=8); [.A26]+1; IF( OR([.A25]=1; TYPE([.A25])=8); [.A25]+1; 0))" office:value-type="float" office:value="21" calcext:value-type="float">
            <text:p>2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7]=1; TYPE([.A27])=8); [.A27]+1; IF( OR([.A26]=1; TYPE([.A26])=8); [.A26]+1; 0))" office:value-type="float" office:value="22" calcext:value-type="float">
            <text:p>2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1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</text:p>
          </table:table-cell>
          <table:table-cell table:number-columns-repeated="16372"/>
        </table:table-row>
        <table:table-row table:style-name="ro1">
          <table:table-cell table:style-name="ce3" table:formula="of:=IF( OR([.A28]=1; TYPE([.A28])=8); [.A28]+1; IF( OR([.A27]=1; TYPE([.A27])=8); [.A27]+1; 0))" office:value-type="float" office:value="23" calcext:value-type="float">
            <text:p>2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2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29]=1; TYPE([.A29])=8); [.A29]+1; IF( OR([.A28]=1; TYPE([.A28])=8); [.A28]+1; 0))" office:value-type="float" office:value="24" calcext:value-type="float">
            <text:p>2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In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0]=1; TYPE([.A30])=8); [.A30]+1; IF( OR([.A29]=1; TYPE([.A29])=8); [.A29]+1; 0))" office:value-type="float" office:value="25" calcext:value-type="float">
            <text:p>25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Out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31]=1; TYPE([.A31])=8); [.A31]+1; IF( OR([.A30]=1; TYPE([.A30])=8); [.A30]+1; 0))" office:value-type="float" office:value="26" calcext:value-type="float">
            <text:p>26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Brak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6382"/>
        </table:table-row>
        <table:table-row table:style-name="ro1">
          <table:table-cell table:style-name="ce3"/>
          <table:table-cell/>
          <table:table-cell table:style-name="ce10"/>
          <table:table-cell table:number-columns-repeated="16380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2"/>
        </table:table-row>
        <table:table-row table:style-name="ro1">
          <table:table-cell table:style-name="ce3" table:formula="of:=[.A35]+1" office:value-type="float" office:value="1001" calcext:value-type="float">
            <text:p>10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de of the last error</text:p>
          </table:table-cell>
          <table:table-cell table:number-columns-repeated="16372"/>
        </table:table-row>
        <table:table-row table:style-name="ro1">
          <table:table-cell table:style-name="ce3" table:formula="of:=IF( OR([.A36]=1; TYPE([.A36])=8); [.A36]+1; IF( OR([.A35]=1; TYPE([.A35])=8); [.A35]+1; 0))" office:value-type="float" office:value="1002" calcext:value-type="float">
            <text:p>10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office:value-type="string" calcext:value-type="string">
            <text:p>MainFSM,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6382"/>
        </table:table-row>
        <table:table-row table:style-name="ro1">
          <table:table-cell table:style-name="ce3" table:formula="of:=IF( OR([.A38]=1; TYPE([.A38])=8); [.A38]+1; IF( OR([.A37]=1; TYPE([.A37])=8); [.A37]+1; 0))" office:value-type="float" office:value="1003" calcext:value-type="float">
            <text:p>10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insert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39]=1; TYPE([.A39])=8); [.A39]+1; IF( OR([.A38]=1; TYPE([.A38])=8); [.A38]+1; 0))" office:value-type="float" office:value="1004" calcext:value-type="float">
            <text:p>10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0]=1; TYPE([.A40])=8); [.A40]+1; IF( OR([.A39]=1; TYPE([.A39])=8); [.A39]+1; 0))" office:value-type="float" office:value="1005" calcext:value-type="float">
            <text:p>10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Insert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1]=1; TYPE([.A41])=8); [.A41]+1; IF( OR([.A40]=1; TYPE([.A40])=8); [.A40]+1; 0))" office:value-type="float" office:value="1006" calcext:value-type="float">
            <text:p>10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imeLimitWithdraw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withdraw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 OR([.A42]=1; TYPE([.A42])=8); [.A42]+1; IF( OR([.A41]=1; TYPE([.A41])=8); [.A41]+1; 0))" office:value-type="float" office:value="1007" calcext:value-type="float">
            <text:p>100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imeLimitWithdraw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3]=1; TYPE([.A43])=8); [.A43]+1; IF( OR([.A42]=1; TYPE([.A42])=8); [.A42]+1; 0))" office:value-type="float" office:value="1008" calcext:value-type="float">
            <text:p>100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Withdraw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16383"/>
        </table:table-row>
        <table:table-row table:style-name="ro1">
          <table:table-cell table:style-name="ce3" table:formula="of:=IF( OR([.A45]=1; TYPE([.A45])=8); [.A45]+1; IF( OR([.A44]=1; TYPE([.A44])=8); [.A44]+1; 0))" office:value-type="float" office:value="1009" calcext:value-type="float">
            <text:p>100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2"/>
        </table:table-row>
        <table:table-row table:style-name="ro1">
          <table:table-cell table:number-columns-repeated="16383"/>
        </table:table-row>
        <table:table-row table:style-name="ro1">
          <table:table-cell table:style-name="ce3" table:formula="of:=IF( OR([.A47]=1; TYPE([.A47])=8); [.A47]+1; IF( OR([.A46]=1; TYPE([.A46])=8); [.A46]+1; 0))" office:value-type="float" office:value="1010" calcext:value-type="float">
            <text:p>10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Error code for the cup mechanism (bitmap)</text:p>
          </table:table-cell>
          <table:table-cell table:number-columns-repeated="16372"/>
        </table:table-row>
        <table:table-row table:style-name="ro1">
          <table:table-cell table:style-name="ce3" table:formula="of:=IF( OR([.A48]=1; TYPE([.A48])=8); [.A48]+1; IF( OR([.A47]=1; TYPE([.A47])=8); [.A47]+1; 0))" office:value-type="float" office:value="1011" calcext:value-type="float">
            <text:p>10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49]=1; TYPE([.A49])=8); [.A49]+1; IF( OR([.A48]=1; TYPE([.A48])=8); [.A48]+1; 0))" office:value-type="float" office:value="1012" calcext:value-type="float">
            <text:p>10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0]=1; TYPE([.A50])=8); [.A50]+1; IF( OR([.A49]=1; TYPE([.A49])=8); [.A49]+1; 0))" office:value-type="float" office:value="1013" calcext:value-type="float">
            <text:p>101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2"/>
        </table:table-row>
        <table:table-row table:style-name="ro1">
          <table:table-cell table:style-name="ce3" table:formula="of:=IF( OR([.A51]=1; TYPE([.A51])=8); [.A51]+1; IF( OR([.A50]=1; TYPE([.A50])=8); [.A50]+1; 0))" office:value-type="float" office:value="1014" calcext:value-type="float">
            <text:p>101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2]=1; TYPE([.A52])=8); [.A52]+1; IF( OR([.A51]=1; TYPE([.A51])=8); [.A51]+1; 0))" office:value-type="float" office:value="1015" calcext:value-type="float">
            <text:p>101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3]=1; TYPE([.A53])=8); [.A53]+1; IF( OR([.A52]=1; TYPE([.A52])=8); [.A52]+1; 0))" office:value-type="float" office:value="1016" calcext:value-type="float">
            <text:p>101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2"/>
        </table:table-row>
        <table:table-row table:style-name="ro1">
          <table:table-cell table:style-name="ce3" table:formula="of:=IF( OR([.A54]=1; TYPE([.A54])=8); [.A54]+1; IF( OR([.A53]=1; TYPE([.A53])=8); [.A53]+1; 0))" office:value-type="float" office:value="1017" calcext:value-type="float">
            <text:p>101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55]=1; TYPE([.A55])=8); [.A55]+1; IF( OR([.A54]=1; TYPE([.A54])=8); [.A54]+1; 0))" office:value-type="float" office:value="1018" calcext:value-type="float">
            <text:p>101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16383"/>
        </table:table-row>
        <table:table-row table:style-name="ro1">
          <table:table-cell table:style-name="ce3" table:formula="of:=IF( OR([.A57]=1; TYPE([.A57])=8); [.A57]+1; IF( OR([.A56]=1; TYPE([.A56])=8); [.A56]+1; 0))" office:value-type="float" office:value="1019" calcext:value-type="float">
            <text:p>101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2"/>
        </table:table-row>
        <table:table-row table:style-name="ro1">
          <table:table-cell table:style-name="ce3" table:formula="of:=IF( OR([.A58]=1; TYPE([.A58])=8); [.A58]+1; IF( OR([.A57]=1; TYPE([.A57])=8); [.A57]+1; 0))" office:value-type="float" office:value="1020" calcext:value-type="float">
            <text:p>102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2"/>
        </table:table-row>
        <table:table-row table:style-name="ro1">
          <table:table-cell table:style-name="ce3" table:formula="of:=IF( OR([.A59]=1; TYPE([.A59])=8); [.A59]+1; IF( OR([.A58]=1; TYPE([.A58])=8); [.A58]+1; 0))" office:value-type="float" office:value="1021" calcext:value-type="float">
            <text:p>102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0]=1; TYPE([.A60])=8); [.A60]+1; IF( OR([.A59]=1; TYPE([.A59])=8); [.A59]+1; 0))" office:value-type="float" office:value="1022" calcext:value-type="float">
            <text:p>102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Cup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1]=1; TYPE([.A61])=8); [.A61]+1; IF( OR([.A60]=1; TYPE([.A60])=8); [.A60]+1; 0))" office:value-type="float" office:value="1023" calcext:value-type="float">
            <text:p>102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ype of the Faraday cup; 0 = pneumatic mechanism with 1 limit switch; 1 = motor mechnism with 2 limit switches</text:p>
          </table:table-cell>
          <table:table-cell table:number-columns-repeated="16372"/>
        </table:table-row>
        <table:table-row table:style-name="ro1">
          <table:table-cell table:style-name="ce3" table:formula="of:=IF( OR([.A62]=1; TYPE([.A62])=8); [.A62]+1; IF( OR([.A61]=1; TYPE([.A61])=8); [.A61]+1; 0))" office:value-type="float" office:value="1024" calcext:value-type="float">
            <text:p>102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3]=1; TYPE([.A63])=8); [.A63]+1; IF( OR([.A62]=1; TYPE([.A62])=8); [.A62]+1; 0))" office:value-type="float" office:value="1025" calcext:value-type="float">
            <text:p>102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p3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16383"/>
        </table:table-row>
        <table:table-row table:style-name="ro1">
          <table:table-cell table:style-name="ce3" table:formula="of:=IF( OR([.A65]=1; TYPE([.A65])=8); [.A65]+1; IF( OR([.A64]=1; TYPE([.A64])=8); [.A64]+1; 0))" office:value-type="float" office:value="1026" calcext:value-type="float">
            <text:p>102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, and gains 1–2 (where Gain1 applies to ADC0 and Gain2 applies to ADC1)</text:p>
          </table:table-cell>
          <table:table-cell table:number-columns-repeated="16372"/>
        </table:table-row>
        <table:table-row table:style-name="ro1">
          <table:table-cell table:style-name="ce3" table:formula="of:=IF( OR([.A66]=1; TYPE([.A66])=8); [.A66]+1; IF( OR([.A65]=1; TYPE([.A65])=8); [.A65]+1; 0))" office:value-type="float" office:value="1027" calcext:value-type="float">
            <text:p>102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7]=1; TYPE([.A67])=8); [.A67]+1; IF( OR([.A66]=1; TYPE([.A66])=8); [.A66]+1; 0))" office:value-type="float" office:value="1028" calcext:value-type="float">
            <text:p>102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8]=1; TYPE([.A68])=8); [.A68]+1; IF( OR([.A67]=1; TYPE([.A67])=8); [.A67]+1; 0))" office:value-type="float" office:value="1029" calcext:value-type="float">
            <text:p>102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69]=1; TYPE([.A69])=8); [.A69]+1; IF( OR([.A68]=1; TYPE([.A68])=8); [.A68]+1; 0))" office:value-type="float" office:value="1030" calcext:value-type="float">
            <text:p>103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0]=1; TYPE([.A70])=8); [.A70]+1; IF( OR([.A69]=1; TYPE([.A69])=8); [.A69]+1; 0))" office:value-type="float" office:value="1031" calcext:value-type="float">
            <text:p>103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1]=1; TYPE([.A71])=8); [.A71]+1; IF( OR([.A70]=1; TYPE([.A70])=8); [.A70]+1; 0))" office:value-type="float" office:value="1032" calcext:value-type="float">
            <text:p>103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2]=1; TYPE([.A72])=8); [.A72]+1; IF( OR([.A71]=1; TYPE([.A71])=8); [.A71]+1; 0))" office:value-type="float" office:value="1033" calcext:value-type="float">
            <text:p>103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3]=1; TYPE([.A73])=8); [.A73]+1; IF( OR([.A72]=1; TYPE([.A72])=8); [.A72]+1; 0))" office:value-type="float" office:value="1034" calcext:value-type="float">
            <text:p>103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4]=1; TYPE([.A74])=8); [.A74]+1; IF( OR([.A73]=1; TYPE([.A73])=8); [.A73]+1; 0))" office:value-type="float" office:value="1035" calcext:value-type="float">
            <text:p>103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5]=1; TYPE([.A75])=8); [.A75]+1; IF( OR([.A74]=1; TYPE([.A74])=8); [.A74]+1; 0))" office:value-type="float" office:value="1036" calcext:value-type="float">
            <text:p>103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6]=1; TYPE([.A76])=8); [.A76]+1; IF( OR([.A75]=1; TYPE([.A75])=8); [.A75]+1; 0))" office:value-type="float" office:value="1037" calcext:value-type="float">
            <text:p>103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7]=1; TYPE([.A77])=8); [.A77]+1; IF( OR([.A76]=1; TYPE([.A76])=8); [.A76]+1; 0))" office:value-type="float" office:value="1038" calcext:value-type="float">
            <text:p>103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8]=1; TYPE([.A78])=8); [.A78]+1; IF( OR([.A77]=1; TYPE([.A77])=8); [.A77]+1; 0))" office:value-type="float" office:value="1039" calcext:value-type="float">
            <text:p>103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79]=1; TYPE([.A79])=8); [.A79]+1; IF( OR([.A78]=1; TYPE([.A78])=8); [.A78]+1; 0))" office:value-type="float" office:value="1040" calcext:value-type="float">
            <text:p>104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0]=1; TYPE([.A80])=8); [.A80]+1; IF( OR([.A79]=1; TYPE([.A79])=8); [.A79]+1; 0))" office:value-type="float" office:value="1041" calcext:value-type="float">
            <text:p>104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1]=1; TYPE([.A81])=8); [.A81]+1; IF( OR([.A80]=1; TYPE([.A80])=8); [.A80]+1; 0))" office:value-type="float" office:value="1042" calcext:value-type="float">
            <text:p>104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2]=1; TYPE([.A82])=8); [.A82]+1; IF( OR([.A81]=1; TYPE([.A81])=8); [.A81]+1; 0))" office:value-type="float" office:value="1043" calcext:value-type="float">
            <text:p>104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3]=1; TYPE([.A83])=8); [.A83]+1; IF( OR([.A82]=1; TYPE([.A82])=8); [.A82]+1; 0))" office:value-type="float" office:value="1044" calcext:value-type="float">
            <text:p>104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4]=1; TYPE([.A84])=8); [.A84]+1; IF( OR([.A83]=1; TYPE([.A83])=8); [.A83]+1; 0))" office:value-type="float" office:value="1045" calcext:value-type="float">
            <text:p>104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5]=1; TYPE([.A85])=8); [.A85]+1; IF( OR([.A84]=1; TYPE([.A84])=8); [.A84]+1; 0))" office:value-type="float" office:value="1046" calcext:value-type="float">
            <text:p>104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6]=1; TYPE([.A86])=8); [.A86]+1; IF( OR([.A85]=1; TYPE([.A85])=8); [.A85]+1; 0))" office:value-type="float" office:value="1047" calcext:value-type="float">
            <text:p>104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7]=1; TYPE([.A87])=8); [.A87]+1; IF( OR([.A86]=1; TYPE([.A86])=8); [.A86]+1; 0))" office:value-type="float" office:value="1048" calcext:value-type="float">
            <text:p>104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88]=1; TYPE([.A88])=8); [.A88]+1; IF( OR([.A87]=1; TYPE([.A87])=8); [.A87]+1; 0))" office:value-type="float" office:value="1049" calcext:value-type="float">
            <text:p>104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number-columns-repeated="16383"/>
        </table:table-row>
        <table:table-row table:style-name="ro1">
          <table:table-cell table:style-name="ce3" table:formula="of:=IF( OR([.A90]=1; TYPE([.A90])=8); [.A90]+1; IF( OR([.A89]=1; TYPE([.A89])=8); [.A89]+1; 0))" office:value-type="float" office:value="1050" calcext:value-type="float">
            <text:p>105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, and gains 1–2 (where Gain1 applies to ADC0 and Gain2 applies to ADC1)</text:p>
          </table:table-cell>
          <table:table-cell table:number-columns-repeated="16372"/>
        </table:table-row>
        <table:table-row table:style-name="ro1">
          <table:table-cell table:style-name="ce3" table:formula="of:=IF( OR([.A91]=1; TYPE([.A91])=8); [.A91]+1; IF( OR([.A90]=1; TYPE([.A90])=8); [.A90]+1; 0))" office:value-type="float" office:value="1051" calcext:value-type="float">
            <text:p>105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2]=1; TYPE([.A92])=8); [.A92]+1; IF( OR([.A91]=1; TYPE([.A91])=8); [.A91]+1; 0))" office:value-type="float" office:value="1052" calcext:value-type="float">
            <text:p>105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3]=1; TYPE([.A93])=8); [.A93]+1; IF( OR([.A92]=1; TYPE([.A92])=8); [.A92]+1; 0))" office:value-type="float" office:value="1053" calcext:value-type="float">
            <text:p>105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4]=1; TYPE([.A94])=8); [.A94]+1; IF( OR([.A93]=1; TYPE([.A93])=8); [.A93]+1; 0))" office:value-type="float" office:value="1054" calcext:value-type="float">
            <text:p>105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5]=1; TYPE([.A95])=8); [.A95]+1; IF( OR([.A94]=1; TYPE([.A94])=8); [.A94]+1; 0))" office:value-type="float" office:value="1055" calcext:value-type="float">
            <text:p>105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6]=1; TYPE([.A96])=8); [.A96]+1; IF( OR([.A95]=1; TYPE([.A95])=8); [.A95]+1; 0))" office:value-type="float" office:value="1056" calcext:value-type="float">
            <text:p>105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7]=1; TYPE([.A97])=8); [.A97]+1; IF( OR([.A96]=1; TYPE([.A96])=8); [.A96]+1; 0))" office:value-type="float" office:value="1057" calcext:value-type="float">
            <text:p>105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8]=1; TYPE([.A98])=8); [.A98]+1; IF( OR([.A97]=1; TYPE([.A97])=8); [.A97]+1; 0))" office:value-type="float" office:value="1058" calcext:value-type="float">
            <text:p>105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99]=1; TYPE([.A99])=8); [.A99]+1; IF( OR([.A98]=1; TYPE([.A98])=8); [.A98]+1; 0))" office:value-type="float" office:value="1059" calcext:value-type="float">
            <text:p>105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0]=1; TYPE([.A100])=8); [.A100]+1; IF( OR([.A99]=1; TYPE([.A99])=8); [.A99]+1; 0))" office:value-type="float" office:value="1060" calcext:value-type="float">
            <text:p>106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1]=1; TYPE([.A101])=8); [.A101]+1; IF( OR([.A100]=1; TYPE([.A100])=8); [.A100]+1; 0))" office:value-type="float" office:value="1061" calcext:value-type="float">
            <text:p>106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2]=1; TYPE([.A102])=8); [.A102]+1; IF( OR([.A101]=1; TYPE([.A101])=8); [.A101]+1; 0))" office:value-type="float" office:value="1062" calcext:value-type="float">
            <text:p>106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3]=1; TYPE([.A103])=8); [.A103]+1; IF( OR([.A102]=1; TYPE([.A102])=8); [.A102]+1; 0))" office:value-type="float" office:value="1063" calcext:value-type="float">
            <text:p>106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4]=1; TYPE([.A104])=8); [.A104]+1; IF( OR([.A103]=1; TYPE([.A103])=8); [.A103]+1; 0))" office:value-type="float" office:value="1064" calcext:value-type="float">
            <text:p>106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5]=1; TYPE([.A105])=8); [.A105]+1; IF( OR([.A104]=1; TYPE([.A104])=8); [.A104]+1; 0))" office:value-type="float" office:value="1065" calcext:value-type="float">
            <text:p>106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6]=1; TYPE([.A106])=8); [.A106]+1; IF( OR([.A105]=1; TYPE([.A105])=8); [.A105]+1; 0))" office:value-type="float" office:value="1066" calcext:value-type="float">
            <text:p>106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7]=1; TYPE([.A107])=8); [.A107]+1; IF( OR([.A106]=1; TYPE([.A106])=8); [.A106]+1; 0))" office:value-type="float" office:value="1067" calcext:value-type="float">
            <text:p>106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8]=1; TYPE([.A108])=8); [.A108]+1; IF( OR([.A107]=1; TYPE([.A107])=8); [.A107]+1; 0))" office:value-type="float" office:value="1068" calcext:value-type="float">
            <text:p>106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09]=1; TYPE([.A109])=8); [.A109]+1; IF( OR([.A108]=1; TYPE([.A108])=8); [.A108]+1; 0))" office:value-type="float" office:value="1069" calcext:value-type="float">
            <text:p>106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0]=1; TYPE([.A110])=8); [.A110]+1; IF( OR([.A109]=1; TYPE([.A109])=8); [.A109]+1; 0))" office:value-type="float" office:value="1070" calcext:value-type="float">
            <text:p>107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1]=1; TYPE([.A111])=8); [.A111]+1; IF( OR([.A110]=1; TYPE([.A110])=8); [.A110]+1; 0))" office:value-type="float" office:value="1071" calcext:value-type="float">
            <text:p>107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2]=1; TYPE([.A112])=8); [.A112]+1; IF( OR([.A111]=1; TYPE([.A111])=8); [.A111]+1; 0))" office:value-type="float" office:value="1072" calcext:value-type="float">
            <text:p>107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3]=1; TYPE([.A113])=8); [.A113]+1; IF( OR([.A112]=1; TYPE([.A112])=8); [.A112]+1; 0))" office:value-type="float" office:value="1073" calcext:value-type="float">
            <text:p>107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6382"/>
        </table:table-row>
        <table:table-row table:style-name="ro1">
          <table:table-cell table:style-name="ce3" table:formula="of:=IF( OR([.A115]=1; TYPE([.A115])=8); [.A115]+1; IF( OR([.A114]=1; TYPE([.A114])=8); [.A114]+1; 0))" office:value-type="float" office:value="1074" calcext:value-type="float">
            <text:p>107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angeChangeThreshol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threshold value for the signal with higher gain (ADC1); if ADC1 is less than RangeChangeThreshold, use ADC1 in the calculation; otherwise, use ADC0 (i.e., the signal with lower gain).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17]=1; TYPE([.A117])=8); [.A117]+1; IF( OR([.A116]=1; TYPE([.A116])=8); [.A116]+1; 0))" office:value-type="float" office:value="1075" calcext:value-type="float">
            <text:p>107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8]=1; TYPE([.A118])=8); [.A118]+1; IF( OR([.A117]=1; TYPE([.A117])=8); [.A117]+1; 0))" office:value-type="float" office:value="1076" calcext:value-type="float">
            <text:p>107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19]=1; TYPE([.A119])=8); [.A119]+1; IF( OR([.A118]=1; TYPE([.A118])=8); [.A118]+1; 0))" office:value-type="float" office:value="1077" calcext:value-type="float">
            <text:p>107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0]=1; TYPE([.A120])=8); [.A120]+1; IF( OR([.A119]=1; TYPE([.A119])=8); [.A119]+1; 0))" office:value-type="float" office:value="1078" calcext:value-type="float">
            <text:p>107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1]=1; TYPE([.A121])=8); [.A121]+1; IF( OR([.A120]=1; TYPE([.A120])=8); [.A120]+1; 0))" office:value-type="float" office:value="1079" calcext:value-type="float">
            <text:p>107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2]=1; TYPE([.A122])=8); [.A122]+1; IF( OR([.A121]=1; TYPE([.A121])=8); [.A121]+1; 0))" office:value-type="float" office:value="1080" calcext:value-type="float">
            <text:p>108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3]=1; TYPE([.A123])=8); [.A123]+1; IF( OR([.A122]=1; TYPE([.A122])=8); [.A122]+1; 0))" office:value-type="float" office:value="1081" calcext:value-type="float">
            <text:p>108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4]=1; TYPE([.A124])=8); [.A124]+1; IF( OR([.A123]=1; TYPE([.A123])=8); [.A123]+1; 0))" office:value-type="float" office:value="1082" calcext:value-type="float">
            <text:p>108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5]=1; TYPE([.A125])=8); [.A125]+1; IF( OR([.A124]=1; TYPE([.A124])=8); [.A124]+1; 0))" office:value-type="float" office:value="1083" calcext:value-type="float">
            <text:p>108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6]=1; TYPE([.A126])=8); [.A126]+1; IF( OR([.A125]=1; TYPE([.A125])=8); [.A125]+1; 0))" office:value-type="float" office:value="1084" calcext:value-type="float">
            <text:p>108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7]=1; TYPE([.A127])=8); [.A127]+1; IF( OR([.A126]=1; TYPE([.A126])=8); [.A126]+1; 0))" office:value-type="float" office:value="1085" calcext:value-type="float">
            <text:p>108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28]=1; TYPE([.A128])=8); [.A128]+1; IF( OR([.A127]=1; TYPE([.A127])=8); [.A127]+1; 0))" office:value-type="float" office:value="1086" calcext:value-type="float">
            <text:p>108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30]=1; TYPE([.A130])=8); [.A130]+1; IF( OR([.A129]=1; TYPE([.A129])=8); [.A129]+1; 0))" office:value-type="float" office:value="1087" calcext:value-type="float">
            <text:p>108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1]=1; TYPE([.A131])=8); [.A131]+1; IF( OR([.A130]=1; TYPE([.A130])=8); [.A130]+1; 0))" office:value-type="float" office:value="1088" calcext:value-type="float">
            <text:p>108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2]=1; TYPE([.A132])=8); [.A132]+1; IF( OR([.A131]=1; TYPE([.A131])=8); [.A131]+1; 0))" office:value-type="float" office:value="1089" calcext:value-type="float">
            <text:p>108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3]=1; TYPE([.A133])=8); [.A133]+1; IF( OR([.A132]=1; TYPE([.A132])=8); [.A132]+1; 0))" office:value-type="float" office:value="1090" calcext:value-type="float">
            <text:p>109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4]=1; TYPE([.A134])=8); [.A134]+1; IF( OR([.A133]=1; TYPE([.A133])=8); [.A133]+1; 0))" office:value-type="float" office:value="1091" calcext:value-type="float">
            <text:p>109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5]=1; TYPE([.A135])=8); [.A135]+1; IF( OR([.A134]=1; TYPE([.A134])=8); [.A134]+1; 0))" office:value-type="float" office:value="1092" calcext:value-type="float">
            <text:p>109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6]=1; TYPE([.A136])=8); [.A136]+1; IF( OR([.A135]=1; TYPE([.A135])=8); [.A135]+1; 0))" office:value-type="float" office:value="1093" calcext:value-type="float">
            <text:p>109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7]=1; TYPE([.A137])=8); [.A137]+1; IF( OR([.A136]=1; TYPE([.A136])=8); [.A136]+1; 0))" office:value-type="float" office:value="1094" calcext:value-type="float">
            <text:p>109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8]=1; TYPE([.A138])=8); [.A138]+1; IF( OR([.A137]=1; TYPE([.A137])=8); [.A137]+1; 0))" office:value-type="float" office:value="1095" calcext:value-type="float">
            <text:p>109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39]=1; TYPE([.A139])=8); [.A139]+1; IF( OR([.A138]=1; TYPE([.A138])=8); [.A138]+1; 0))" office:value-type="float" office:value="1096" calcext:value-type="float">
            <text:p>109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0]=1; TYPE([.A140])=8); [.A140]+1; IF( OR([.A139]=1; TYPE([.A139])=8); [.A139]+1; 0))" office:value-type="float" office:value="1097" calcext:value-type="float">
            <text:p>109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41]=1; TYPE([.A141])=8); [.A141]+1; IF( OR([.A140]=1; TYPE([.A140])=8); [.A140]+1; 0))" office:value-type="float" office:value="1098" calcext:value-type="float">
            <text:p>109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43]=1; TYPE([.A143])=8); [.A143]+1; IF( OR([.A142]=1; TYPE([.A142])=8); [.A142]+1; 0))" office:value-type="float" office:value="1099" calcext:value-type="float">
            <text:p>109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4]=1; TYPE([.A144])=8); [.A144]+1; IF( OR([.A143]=1; TYPE([.A143])=8); [.A143]+1; 0))" office:value-type="float" office:value="1100" calcext:value-type="float">
            <text:p>11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In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45]=1; TYPE([.A145])=8); [.A145]+1; IF( OR([.A144]=1; TYPE([.A144])=8); [.A144]+1; 0))" office:value-type="float" office:value="1101" calcext:value-type="float">
            <text:p>11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6]=1; TYPE([.A146])=8); [.A146]+1; IF( OR([.A145]=1; TYPE([.A145])=8); [.A145]+1; 0))" office:value-type="float" office:value="1102" calcext:value-type="float">
            <text:p>11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1Out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1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 table:number-columns-repeated="3"/>
          <table:table-cell table:number-columns-repeated="16373"/>
        </table:table-row>
        <table:table-row table:style-name="ro1">
          <table:table-cell table:style-name="ce3" table:formula="of:=IF( OR([.A148]=1; TYPE([.A148])=8); [.A148]+1; IF( OR([.A147]=1; TYPE([.A147])=8); [.A147]+1; 0))" office:value-type="float" office:value="1103" calcext:value-type="float">
            <text:p>11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49]=1; TYPE([.A149])=8); [.A149]+1; IF( OR([.A148]=1; TYPE([.A148])=8); [.A148]+1; 0))" office:value-type="float" office:value="1104" calcext:value-type="float">
            <text:p>11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In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0]=1; TYPE([.A150])=8); [.A150]+1; IF( OR([.A149]=1; TYPE([.A149])=8); [.A149]+1; 0))" office:value-type="float" office:value="1105" calcext:value-type="float">
            <text:p>11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1]=1; TYPE([.A151])=8); [.A151]+1; IF( OR([.A150]=1; TYPE([.A150])=8); [.A150]+1; 0))" office:value-type="float" office:value="1106" calcext:value-type="float">
            <text:p>11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2Out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2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 table:number-columns-repeated="3"/>
          <table:table-cell table:number-columns-repeated="16373"/>
        </table:table-row>
        <table:table-row table:style-name="ro1">
          <table:table-cell table:style-name="ce3" table:formula="of:=IF( OR([.A153]=1; TYPE([.A153])=8); [.A153]+1; IF( OR([.A152]=1; TYPE([.A152])=8); [.A152]+1; 0))" office:value-type="float" office:value="1107" calcext:value-type="float">
            <text:p>110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I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4]=1; TYPE([.A154])=8); [.A154]+1; IF( OR([.A153]=1; TYPE([.A153])=8); [.A153]+1; 0))" office:value-type="float" office:value="1108" calcext:value-type="float">
            <text:p>110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In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inser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 table:formula="of:=IF( OR([.A155]=1; TYPE([.A155])=8); [.A155]+1; IF( OR([.A154]=1; TYPE([.A154])=8); [.A154]+1; 0))" office:value-type="float" office:value="1109" calcext:value-type="float">
            <text:p>110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Ou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constant component (in clock ticks)</text:p>
          </table:table-cell>
          <table:table-cell table:number-columns-repeated="16372"/>
        </table:table-row>
        <table:table-row table:style-name="ro1">
          <table:table-cell table:style-name="ce3" table:formula="of:=IF( OR([.A156]=1; TYPE([.A156])=8); [.A156]+1; IF( OR([.A155]=1; TYPE([.A155])=8); [.A155]+1; 0))" office:value-type="float" office:value="1110" calcext:value-type="float">
            <text:p>11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MechanismPropagation3OutRan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esponse time of the mechanism #3 during ejection - random component (std. dev. in clock ticks / 10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6"/>
          <table:table-cell table:style-name="ce2" table:number-columns-repeated="3"/>
          <table:table-cell table:number-columns-repeated="16373"/>
        </table:table-row>
        <table:table-row table:style-name="ro1">
          <table:table-cell table:style-name="ce3" table:formula="of:=IF( OR([.A158]=1; TYPE([.A158])=8); [.A158]+1; IF( OR([.A157]=1; TYPE([.A157])=8); [.A157]+1; 0))" office:value-type="float" office:value="1111" calcext:value-type="float">
            <text:p>11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The output value of the analog-to-digital converter (for the high-gain range) in converter units × 8</text:p>
          </table:table-cell>
          <table:table-cell table:number-columns-repeated="16372"/>
        </table:table-row>
        <table:table-row table:style-name="ro1">
          <table:table-cell table:style-name="ce3" table:formula="of:=IF( OR([.A159]=1; TYPE([.A159])=8); [.A159]+1; IF( OR([.A158]=1; TYPE([.A158])=8); [.A158]+1; 0))" office:value-type="float" office:value="1112" calcext:value-type="float">
            <text:p>11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0]=1; TYPE([.A160])=8); [.A160]+1; IF( OR([.A159]=1; TYPE([.A159])=8); [.A159]+1; 0))" office:value-type="float" office:value="1113" calcext:value-type="float">
            <text:p>111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1]=1; TYPE([.A161])=8); [.A161]+1; IF( OR([.A160]=1; TYPE([.A160])=8); [.A160]+1; 0))" office:value-type="float" office:value="1114" calcext:value-type="float">
            <text:p>111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1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2]=1; TYPE([.A162])=8); [.A162]+1; IF( OR([.A161]=1; TYPE([.A161])=8); [.A161]+1; 0))" office:value-type="float" office:value="1115" calcext:value-type="float">
            <text:p>111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3]=1; TYPE([.A163])=8); [.A163]+1; IF( OR([.A162]=1; TYPE([.A162])=8); [.A162]+1; 0))" office:value-type="float" office:value="1116" calcext:value-type="float">
            <text:p>111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4]=1; TYPE([.A164])=8); [.A164]+1; IF( OR([.A163]=1; TYPE([.A163])=8); [.A163]+1; 0))" office:value-type="float" office:value="1117" calcext:value-type="float">
            <text:p>111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5]=1; TYPE([.A165])=8); [.A165]+1; IF( OR([.A164]=1; TYPE([.A164])=8); [.A164]+1; 0))" office:value-type="float" office:value="1118" calcext:value-type="float">
            <text:p>111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2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6]=1; TYPE([.A166])=8); [.A166]+1; IF( OR([.A165]=1; TYPE([.A165])=8); [.A165]+1; 0))" office:value-type="float" office:value="1119" calcext:value-type="float">
            <text:p>111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7]=1; TYPE([.A167])=8); [.A167]+1; IF( OR([.A166]=1; TYPE([.A166])=8); [.A166]+1; 0))" office:value-type="float" office:value="1120" calcext:value-type="float">
            <text:p>112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8]=1; TYPE([.A168])=8); [.A168]+1; IF( OR([.A167]=1; TYPE([.A167])=8); [.A167]+1; 0))" office:value-type="float" office:value="1121" calcext:value-type="float">
            <text:p>112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 OR([.A169]=1; TYPE([.A169])=8); [.A169]+1; IF( OR([.A168]=1; TYPE([.A168])=8); [.A168]+1; 0))" office:value-type="float" office:value="1122" calcext:value-type="float">
            <text:p>112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Cup3Electrode4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1]=1; TYPE([.A171])=8); [.A171]+1; IF( OR([.A170]=1; TYPE([.A170])=8); [.A170]+1; 0))" office:value-type="float" office:value="1123" calcext:value-type="float">
            <text:p>112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RandomRat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ratio coefficient</text:p>
          </table:table-cell>
          <table:table-cell table:number-columns-repeated="16372"/>
        </table:table-row>
        <table:table-row table:style-name="ro1">
          <table:table-cell table:style-name="ce3" table:formula="of:=IF( OR([.A172]=1; TYPE([.A172])=8); [.A172]+1; IF( OR([.A171]=1; TYPE([.A171])=8); [.A171]+1; 0))" office:value-type="float" office:value="1124" calcext:value-type="float">
            <text:p>112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AmplifierRandom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Random component of the SimAmplifierCupNElectrodeM signal - offset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4]=1; TYPE([.A174])=8); [.A174]+1; IF( OR([.A173]=1; TYPE([.A173])=8); [.A173]+1; 0))" office:value-type="float" office:value="1125" calcext:value-type="float">
            <text:p>112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xternalLock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75]=1; TYPE([.A175])=8); [.A175]+1; IF( OR([.A174]=1; TYPE([.A174])=8); [.A174]+1; 0))" office:value-type="float" office:value="1126" calcext:value-type="float">
            <text:p>112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xternalLock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uration (in tics); If the duration is 0xFFFF, the signal is set indefinitely; if the duration is zero, the signal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76]=1; TYPE([.A176])=8); [.A176]+1; IF( OR([.A175]=1; TYPE([.A175])=8); [.A175]+1; 0))" office:value-type="float" office:value="1127" calcext:value-type="float">
            <text:p>112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xternalLock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xternal lock simulation - delay (in tics)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 OR([.A178]=1; TYPE([.A178])=8); [.A178]+1; IF( OR([.A177]=1; TYPE([.A177])=8); [.A177]+1; 0))" office:value-type="float" office:value="1128" calcext:value-type="float">
            <text:p>112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Cod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event type</text:p>
          </table:table-cell>
          <table:table-cell table:number-columns-repeated="16372"/>
        </table:table-row>
        <table:table-row table:style-name="ro1">
          <table:table-cell table:style-name="ce3" table:formula="of:=IF( OR([.A179]=1; TYPE([.A179])=8); [.A179]+1; IF( OR([.A178]=1; TYPE([.A178])=8); [.A178]+1; 0))" office:value-type="float" office:value="1129" calcext:value-type="float">
            <text:p>112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Perio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period (in tics); if it is zero, a single event occurs</text:p>
          </table:table-cell>
          <table:table-cell table:number-columns-repeated="16372"/>
        </table:table-row>
        <table:table-row table:style-name="ro1">
          <table:table-cell table:style-name="ce3" table:formula="of:=IF( OR([.A180]=1; TYPE([.A180])=8); [.A180]+1; IF( OR([.A179]=1; TYPE([.A179])=8); [.A179]+1; 0))" office:value-type="float" office:value="1130" calcext:value-type="float">
            <text:p>113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Duration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uration (in tics); If the duration is 0xFFFF, the event lasts indefinitely; if the duration is zero, the event is not generated;</text:p>
          </table:table-cell>
          <table:table-cell table:number-columns-repeated="16372"/>
        </table:table-row>
        <table:table-row table:style-name="ro1">
          <table:table-cell table:style-name="ce3" table:formula="of:=IF( OR([.A181]=1; TYPE([.A181])=8); [.A181]+1; IF( OR([.A180]=1; TYPE([.A180])=8); [.A180]+1; 0))" office:value-type="float" office:value="1131" calcext:value-type="float">
            <text:p>113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imEventDelay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DebugSimulator</text:p>
          </table:table-cell>
          <table:table-cell office:value-type="string" calcext:value-type="string">
            <text:p>Event simulation - delay (in tics)</text:p>
          </table:table-cell>
          <table:table-cell table:number-columns-repeated="16372"/>
        </table:table-row>
        <table:table-row table:style-name="ro1" table:number-rows-repeated="2">
          <table:table-cell table:style-name="ce3"/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[.A185]+1" office:value-type="float" office:value="3002" calcext:value-type="float">
            <text:p>300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86]=1; TYPE([.A186])=8); [.A186]+1; IF( OR([.A185]=1; TYPE([.A185])=8); [.A185]+1; 0))" office:value-type="float" office:value="3003" calcext:value-type="float">
            <text:p>300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87]=1; TYPE([.A187])=8); [.A187]+1; IF( OR([.A186]=1; TYPE([.A186])=8); [.A186]+1; 0))" office:value-type="float" office:value="3004" calcext:value-type="float">
            <text:p>300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88]=1; TYPE([.A188])=8); [.A188]+1; IF( OR([.A187]=1; TYPE([.A187])=8); [.A187]+1; 0))" office:value-type="float" office:value="3005" calcext:value-type="float">
            <text:p>300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If the measured value exceeds the limit (Cup1Channel1LowerLimit ..., or Cup1Channel1UpperLimit ...), the corresponding bit is set: bit 0 for channel 1, bit 1 for channel 2, and so on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6382"/>
        </table:table-row>
        <table:table-row table:style-name="ro1">
          <table:table-cell table:style-name="ce3" table:formula="of:=IF( OR([.A190]=1; TYPE([.A190])=8); [.A190]+1; IF( OR([.A189]=1; TYPE([.A189])=8); [.A189]+1; 0))" office:value-type="float" office:value="3006" calcext:value-type="float">
            <text:p>3006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1]=1; TYPE([.A191])=8); [.A191]+1; IF( OR([.A190]=1; TYPE([.A190])=8); [.A190]+1; 0))" office:value-type="float" office:value="3007" calcext:value-type="float">
            <text:p>3007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2]=1; TYPE([.A192])=8); [.A192]+1; IF( OR([.A191]=1; TYPE([.A191])=8); [.A191]+1; 0))" office:value-type="float" office:value="3008" calcext:value-type="float">
            <text:p>3008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3]=1; TYPE([.A193])=8); [.A193]+1; IF( OR([.A192]=1; TYPE([.A192])=8); [.A192]+1; 0))" office:value-type="float" office:value="3009" calcext:value-type="float">
            <text:p>3009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4]=1; TYPE([.A194])=8); [.A194]+1; IF( OR([.A193]=1; TYPE([.A193])=8); [.A193]+1; 0))" office:value-type="float" office:value="3010" calcext:value-type="float">
            <text:p>3010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6382"/>
        </table:table-row>
        <table:table-row table:style-name="ro1">
          <table:table-cell table:style-name="ce3" table:formula="of:=IF( OR([.A196]=1; TYPE([.A196])=8); [.A196]+1; IF( OR([.A195]=1; TYPE([.A195])=8); [.A195]+1; 0))" office:value-type="float" office:value="3011" calcext:value-type="float">
            <text:p>301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7]=1; TYPE([.A197])=8); [.A197]+1; IF( OR([.A196]=1; TYPE([.A196])=8); [.A196]+1; 0))" office:value-type="float" office:value="3012" calcext:value-type="float">
            <text:p>301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8]=1; TYPE([.A198])=8); [.A198]+1; IF( OR([.A197]=1; TYPE([.A197])=8); [.A197]+1; 0))" office:value-type="float" office:value="3013" calcext:value-type="float">
            <text:p>301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199]=1; TYPE([.A199])=8); [.A199]+1; IF( OR([.A198]=1; TYPE([.A198])=8); [.A198]+1; 0))" office:value-type="float" office:value="3014" calcext:value-type="float">
            <text:p>301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 OR([.A200]=1; TYPE([.A200])=8); [.A200]+1; IF( OR([.A199]=1; TYPE([.A199])=8); [.A199]+1; 0))" office:value-type="float" office:value="3015" calcext:value-type="float">
            <text:p>301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 table:number-rows-repeated="2">
          <table:table-cell table:number-columns-repeated="16383"/>
        </table:table-row>
        <table:table-row table:style-name="ro1">
          <table:table-cell table:style-name="ce5"/>
          <table:table-cell table:style-name="ce7"/>
          <table:table-cell table:number-columns-repeated="16381"/>
        </table:table-row>
        <table:table-row table:style-name="ro1" table:number-rows-repeated="2"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ROUNDUP(SUM([.C2:.C206])/16)*2" office:value-type="float" office:value="298" calcext:value-type="float">
            <text:p>298</text:p>
          </table:table-cell>
          <table:table-cell office:value-type="string" calcext:value-type="string">
            <text:p>B <text:s/>=</text:p>
          </table:table-cell>
          <table:table-cell table:formula="of:=DEC2HEX([.C207]; 4)" office:value-type="string" office:string-value="012A" calcext:value-type="string">
            <text:p>012A</text:p>
          </table:table-cell>
          <table:table-cell table:style-name="ce7" office:value-type="string" calcext:value-type="string">
            <text:p>hex</text:p>
          </table:table-cell>
          <table:table-cell table:number-columns-repeated="16377"/>
        </table:table-row>
        <table:table-row table:style-name="ro1" table:number-rows-repeated="1048368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6">00/00/0000</text:date>, <text:time style:data-style-name="N2" text:time-value="09:44:15.6682806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5-26T09:48:02.039551012</dc:date>
    <meta:editing-duration>P1DT16H48M32S</meta:editing-duration>
    <meta:editing-cycles>150</meta:editing-cycles>
    <meta:generator>LibreOffice/24.2.7.2$Linux_X86_64 LibreOffice_project/420$Build-2</meta:generator>
    <meta:document-statistic meta:table-count="1" meta:cell-count="1912" meta:object-count="0"/>
  </office:meta>
</office:document-meta>
</file>