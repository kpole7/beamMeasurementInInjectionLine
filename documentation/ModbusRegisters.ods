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5362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2.8091in"/>
    </style:style>
    <style:style style:name="co7" style:family="table-column">
      <style:table-column-properties fo:break-before="auto" style:column-width="3.3244in"/>
    </style:style>
    <style:style style:name="co8" style:family="table-column">
      <style:table-column-properties fo:break-before="auto" style:column-width="1.3835in"/>
    </style:style>
    <style:style style:name="co9" style:family="table-column">
      <style:table-column-properties fo:break-before="auto" style:column-width="1.7264in"/>
    </style:style>
    <style:style style:name="co10" style:family="table-column">
      <style:table-column-properties fo:break-before="auto" style:column-width="16.439in"/>
    </style:style>
    <style:style style:name="co11" style:family="table-column">
      <style:table-column-properties fo:break-before="auto" style:column-width="5.1256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3.1417in"/>
    </style:style>
    <style:style style:name="co14" style:family="table-column">
      <style:table-column-properties fo:break-before="auto" style:column-width="0.1283in"/>
    </style:style>
    <style:style style:name="co15" style:family="table-column">
      <style:table-column-properties fo:break-before="auto" style:column-width="5.522in"/>
    </style:style>
    <style:style style:name="co16" style:family="table-column">
      <style:table-column-properties fo:break-before="auto" style:column-width="3.7311in"/>
    </style:style>
    <style:style style:name="co17" style:family="table-column">
      <style:table-column-properties fo:break-before="auto" style:column-width="0.7827in"/>
    </style:style>
    <style:style style:name="co18" style:family="table-column">
      <style:table-column-properties fo:break-before="auto" style:column-width="0.3217in"/>
    </style:style>
    <style:style style:name="co19" style:family="table-column">
      <style:table-column-properties fo:break-before="auto" style:column-width="0.1071in"/>
    </style:style>
    <style:style style:name="co20" style:family="table-column">
      <style:table-column-properties fo:break-before="auto" style:column-width="9.5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style:font-name="Noto Mono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Mono"/>
    </style:style>
    <style:style style:name="ce10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13" style:family="table-cell" style:parent-style-name="Default">
      <style:text-properties style:font-name="Noto Mono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Mono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7"/>
        <table:table-column table:style-name="co11" table:default-cell-style-name="ce3"/>
        <table:table-column table:style-name="co12" table:number-columns-repeated="16371" table:default-cell-style-name="ce3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RW/R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ternative name</text:p>
          </table:table-cell>
          <table:table-cell office:value-type="string" calcext:value-type="string">
            <text:p>Right to modify</text:p>
          </table:table-cell>
          <table:table-cell office:value-type="string" calcext:value-type="string">
            <text:p>Main application</text:p>
          </table:table-cell>
          <table:table-cell office:value-type="string" calcext:value-type="string">
            <text:p>Descrip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1638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1Control</text:p>
          </table:table-cell>
          <table:table-cell table:style-name="ce11" table:formula="of:=IF([.H3]&lt;&gt;&quot;&quot;; UPPER(ORG.LIBREOFFICE.REGEX([.H3];&quot;([a-z0-9])([A-Z])&quot;;&quot;$1_$2&quot;;&quot;g&quot;)); &quot;&quot;)" office:value-type="string" office:string-value="CUP1_CONTROL" calcext:value-type="string">
            <text:p>CUP1_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1 using a pneumatic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3]=1; TYPE([.A3])=8); [.A3]+1; IF( OR([.A2]=1; TYPE([.A2])=8); [.A2]+1; 0))" office:value-type="float" office:value="2" calcext:value-type="float">
            <text:p>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xternalInhibition1</text:p>
          </table:table-cell>
          <table:table-cell table:style-name="ce11" table:formula="of:=IF([.H4]&lt;&gt;&quot;&quot;; UPPER(ORG.LIBREOFFICE.REGEX([.H4];&quot;([a-z0-9])([A-Z])&quot;;&quot;$1_$2&quot;;&quot;g&quot;)); &quot;&quot;)" office:value-type="string" office:string-value="EXTERNAL_INHIBITION1" calcext:value-type="string">
            <text:p>EXTERNAL_INHIBITION1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not installed; always equals 'false'</text:p>
          </table:table-cell>
          <table:table-cell table:number-columns-repeated="16372"/>
        </table:table-row>
        <table:table-row table:style-name="ro1">
          <table:table-cell table:style-name="ce3" table:formula="of:=IF( OR([.A4]=1; TYPE([.A4])=8); [.A4]+1; IF( OR([.A3]=1; TYPE([.A3])=8); [.A3]+1; 0))" office:value-type="float" office:value="3" calcext:value-type="float">
            <text:p>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Cup1Switch</text:p>
          </table:table-cell>
          <table:table-cell table:style-name="ce11" table:formula="of:=IF([.H5]&lt;&gt;&quot;&quot;; UPPER(ORG.LIBREOFFICE.REGEX([.H5];&quot;([a-z0-9])([A-Z])&quot;;&quot;$1_$2&quot;;&quot;g&quot;)); &quot;&quot;)" office:value-type="string" office:string-value="CUP1_SWITCH" calcext:value-type="string">
            <text:p>CUP1_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1Control</text:p>
          </table:table-cell>
          <table:table-cell table:number-columns-repeated="16372"/>
        </table:table-row>
        <table:table-row table:style-name="ro1">
          <table:table-cell table:style-name="ce3" table:formula="of:=IF( OR([.A5]=1; TYPE([.A5])=8); [.A5]+1; IF( OR([.A4]=1; TYPE([.A4])=8); [.A4]+1; 0))" office:value-type="float" office:value="4" calcext:value-type="float">
            <text:p>4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11" table:formula="of:=IF([.H6]&lt;&gt;&quot;&quot;; UPPER(ORG.LIBREOFFICE.REGEX([.H6];&quot;([a-z0-9])([A-Z])&quot;;&quot;$1_$2&quot;;&quot;g&quot;)); &quot;&quot;)">
            <text:p/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2"/>
          <table:table-cell table:style-name="ce11" table:formula="of:=IF([.H7]&lt;&gt;&quot;&quot;; UPPER(ORG.LIBREOFFICE.REGEX([.H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7]=1; TYPE([.A7])=8); [.A7]+1; IF( OR([.A6]=1; TYPE([.A6])=8); [.A6]+1; 0))" office:value-type="float" office:value="5" calcext:value-type="float">
            <text:p>5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2Control</text:p>
          </table:table-cell>
          <table:table-cell table:style-name="ce11" table:formula="of:=IF([.H8]&lt;&gt;&quot;&quot;; UPPER(ORG.LIBREOFFICE.REGEX([.H8];&quot;([a-z0-9])([A-Z])&quot;;&quot;$1_$2&quot;;&quot;g&quot;)); &quot;&quot;)" office:value-type="string" office:string-value="CUP2_CONTROL" calcext:value-type="string">
            <text:p>CUP2_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2 using a pneumatic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8]=1; TYPE([.A8])=8); [.A8]+1; IF( OR([.A7]=1; TYPE([.A7])=8); [.A7]+1; 0))" office:value-type="float" office:value="6" calcext:value-type="float">
            <text:p>6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xternalInhibition2</text:p>
          </table:table-cell>
          <table:table-cell table:style-name="ce11" table:formula="of:=IF([.H9]&lt;&gt;&quot;&quot;; UPPER(ORG.LIBREOFFICE.REGEX([.H9];&quot;([a-z0-9])([A-Z])&quot;;&quot;$1_$2&quot;;&quot;g&quot;)); &quot;&quot;)" office:value-type="string" office:string-value="EXTERNAL_INHIBITION2" calcext:value-type="string">
            <text:p>EXTERNAL_INHIBITION2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the external inhibit logic signal; true = inhibition enabled; false = inhibition disabled</text:p>
          </table:table-cell>
          <table:table-cell table:number-columns-repeated="16372"/>
        </table:table-row>
        <table:table-row table:style-name="ro1">
          <table:table-cell table:style-name="ce3" table:formula="of:=IF( OR([.A9]=1; TYPE([.A9])=8); [.A9]+1; IF( OR([.A8]=1; TYPE([.A8])=8); [.A8]+1; 0))" office:value-type="float" office:value="7" calcext:value-type="float">
            <text:p>7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Cup2Switch</text:p>
          </table:table-cell>
          <table:table-cell table:style-name="ce11" table:formula="of:=IF([.H10]&lt;&gt;&quot;&quot;; UPPER(ORG.LIBREOFFICE.REGEX([.H10];&quot;([a-z0-9])([A-Z])&quot;;&quot;$1_$2&quot;;&quot;g&quot;)); &quot;&quot;)" office:value-type="string" office:string-value="CUP2_SWITCH" calcext:value-type="string">
            <text:p>CUP2_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2Control</text:p>
          </table:table-cell>
          <table:table-cell table:number-columns-repeated="16372"/>
        </table:table-row>
        <table:table-row table:style-name="ro1">
          <table:table-cell table:style-name="ce3" table:formula="of:=IF( OR([.A10]=1; TYPE([.A10])=8); [.A10]+1; IF( OR([.A9]=1; TYPE([.A9])=8); [.A9]+1; 0))" office:value-type="float" office:value="8" calcext:value-type="float">
            <text:p>8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11" table:formula="of:=IF([.H11]&lt;&gt;&quot;&quot;; UPPER(ORG.LIBREOFFICE.REGEX([.H11];&quot;([a-z0-9])([A-Z])&quot;;&quot;$1_$2&quot;;&quot;g&quot;)); &quot;&quot;)">
            <text:p/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2"/>
          <table:table-cell table:style-name="ce11" table:formula="of:=IF([.H12]&lt;&gt;&quot;&quot;; UPPER(ORG.LIBREOFFICE.REGEX([.H12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2]=1; TYPE([.A12])=8); [.A12]+1; IF( OR([.A11]=1; TYPE([.A11])=8); [.A11]+1; 0))" office:value-type="float" office:value="9" calcext:value-type="float">
            <text:p>9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3Control</text:p>
          </table:table-cell>
          <table:table-cell table:style-name="ce11" table:formula="of:=IF([.H13]&lt;&gt;&quot;&quot;; UPPER(ORG.LIBREOFFICE.REGEX([.H13];&quot;([a-z0-9])([A-Z])&quot;;&quot;$1_$2&quot;;&quot;g&quot;)); &quot;&quot;)" office:value-type="string" office:string-value="CUP3_CONTROL" calcext:value-type="string">
            <text:p>CUP3_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3 using a motor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13]=1; TYPE([.A13])=8); [.A13]+1; IF( OR([.A12]=1; TYPE([.A12])=8); [.A12]+1; 0))" office:value-type="float" office:value="10" calcext:value-type="float">
            <text:p>10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xternalInhibition3</text:p>
          </table:table-cell>
          <table:table-cell table:style-name="ce11" table:formula="of:=IF([.H14]&lt;&gt;&quot;&quot;; UPPER(ORG.LIBREOFFICE.REGEX([.H14];&quot;([a-z0-9])([A-Z])&quot;;&quot;$1_$2&quot;;&quot;g&quot;)); &quot;&quot;)" office:value-type="string" office:string-value="EXTERNAL_INHIBITION3" calcext:value-type="string">
            <text:p>EXTERNAL_INHIBITION3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not installed; always equals 'false'</text:p>
          </table:table-cell>
          <table:table-cell table:number-columns-repeated="16372"/>
        </table:table-row>
        <table:table-row table:style-name="ro1">
          <table:table-cell table:style-name="ce3" table:formula="of:=IF( OR([.A14]=1; TYPE([.A14])=8); [.A14]+1; IF( OR([.A13]=1; TYPE([.A13])=8); [.A13]+1; 0))" office:value-type="float" office:value="11" calcext:value-type="float">
            <text:p>1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Cup3SwitchA</text:p>
          </table:table-cell>
          <table:table-cell table:style-name="ce11" table:formula="of:=IF([.H15]&lt;&gt;&quot;&quot;; UPPER(ORG.LIBREOFFICE.REGEX([.H15];&quot;([a-z0-9])([A-Z])&quot;;&quot;$1_$2&quot;;&quot;g&quot;)); &quot;&quot;)" office:value-type="string" office:string-value="CUP3_SWITCH_A" calcext:value-type="string">
            <text:p>CUP3_SWITCH_A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3Control</text:p>
          </table:table-cell>
          <table:table-cell table:number-columns-repeated="16372"/>
        </table:table-row>
        <table:table-row table:style-name="ro1">
          <table:table-cell table:style-name="ce3" table:formula="of:=IF( OR([.A15]=1; TYPE([.A15])=8); [.A15]+1; IF( OR([.A14]=1; TYPE([.A14])=8); [.A14]+1; 0))" office:value-type="float" office:value="12" calcext:value-type="float">
            <text:p>1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Cup3SwitchB</text:p>
          </table:table-cell>
          <table:table-cell table:style-name="ce11" table:formula="of:=IF([.H16]&lt;&gt;&quot;&quot;; UPPER(ORG.LIBREOFFICE.REGEX([.H16];&quot;([a-z0-9])([A-Z])&quot;;&quot;$1_$2&quot;;&quot;g&quot;)); &quot;&quot;)" office:value-type="string" office:string-value="CUP3_SWITCH_B" calcext:value-type="string">
            <text:p>CUP3_SWITCH_B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be equal to the negation of register Cup3Control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17]&lt;&gt;&quot;&quot;; UPPER(ORG.LIBREOFFICE.REGEX([.H1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7]=1; TYPE([.A17])=8); [.A17]+1; IF( OR([.A16]=1; TYPE([.A16])=8); [.A16]+1; 0))" office:value-type="float" office:value="13" calcext:value-type="float">
            <text:p>1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Cup1ErrorRecovery</text:p>
          </table:table-cell>
          <table:table-cell table:style-name="ce11" table:formula="of:=IF([.H18]&lt;&gt;&quot;&quot;; UPPER(ORG.LIBREOFFICE.REGEX([.H18];&quot;([a-z0-9])([A-Z])&quot;;&quot;$1_$2&quot;;&quot;g&quot;)); &quot;&quot;)" office:value-type="string" office:string-value="CUP1_ERROR_RECOVERY" calcext:value-type="string">
            <text:p>CUP1_ERROR_RECOVER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eset the Faraday cup #1 at the user's request; change false to true =&gt; clear the error and try to restore the inserted position</text:p>
          </table:table-cell>
          <table:table-cell table:number-columns-repeated="16372"/>
        </table:table-row>
        <table:table-row table:style-name="ro1">
          <table:table-cell table:style-name="ce3" table:formula="of:=IF( OR([.A18]=1; TYPE([.A18])=8); [.A18]+1; IF( OR([.A17]=1; TYPE([.A17])=8); [.A17]+1; 0))" office:value-type="float" office:value="14" calcext:value-type="float">
            <text:p>14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Cup2ErrorRecovery</text:p>
          </table:table-cell>
          <table:table-cell table:style-name="ce11" table:formula="of:=IF([.H19]&lt;&gt;&quot;&quot;; UPPER(ORG.LIBREOFFICE.REGEX([.H19];&quot;([a-z0-9])([A-Z])&quot;;&quot;$1_$2&quot;;&quot;g&quot;)); &quot;&quot;)" office:value-type="string" office:string-value="CUP2_ERROR_RECOVERY" calcext:value-type="string">
            <text:p>CUP2_ERROR_RECOVER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 <text:s text:c="15"/>#2 <text:s text:c="5"/>- // -</text:p>
          </table:table-cell>
          <table:table-cell table:number-columns-repeated="16372"/>
        </table:table-row>
        <table:table-row table:style-name="ro1">
          <table:table-cell table:style-name="ce3" table:formula="of:=IF( OR([.A19]=1; TYPE([.A19])=8); [.A19]+1; IF( OR([.A18]=1; TYPE([.A18])=8); [.A18]+1; 0))" office:value-type="float" office:value="15" calcext:value-type="float">
            <text:p>15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Cup3ErrorRecovery</text:p>
          </table:table-cell>
          <table:table-cell table:style-name="ce11" table:formula="of:=IF([.H20]&lt;&gt;&quot;&quot;; UPPER(ORG.LIBREOFFICE.REGEX([.H20];&quot;([a-z0-9])([A-Z])&quot;;&quot;$1_$2&quot;;&quot;g&quot;)); &quot;&quot;)" office:value-type="string" office:string-value="CUP3_ERROR_RECOVERY" calcext:value-type="string">
            <text:p>CUP3_ERROR_RECOVER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 <text:s text:c="15"/>#3 <text:s text:c="5"/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3"/>
          <table:table-cell table:style-name="ce2" table:number-columns-repeated="3"/>
          <table:table-cell/>
          <table:table-cell table:style-name="ce11"/>
          <table:table-cell table:number-columns-repeated="16375"/>
        </table:table-row>
        <table:table-row table:style-name="ro1">
          <table:table-cell table:style-name="ce3" table:formula="of:=IF( OR([.A21]=1; TYPE([.A21])=8); [.A21]+1; IF( OR([.A20]=1; TYPE([.A20])=8); [.A20]+1; 0))" office:value-type="float" office:value="16" calcext:value-type="float">
            <text:p>16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Cup1RequestedState</text:p>
          </table:table-cell>
          <table:table-cell table:style-name="ce11" table:formula="of:=IF([.H22]&lt;&gt;&quot;&quot;; UPPER(ORG.LIBREOFFICE.REGEX([.H22];&quot;([a-z0-9])([A-Z])&quot;;&quot;$1_$2&quot;;&quot;g&quot;)); &quot;&quot;)" office:value-type="string" office:string-value="CUP1_REQUESTED_STATE" calcext:value-type="string">
            <text:p>CUP1_REQUESTED_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mmand for the AuxiliaryFSM; true = insert the cup; false = withdraw the cup</text:p>
          </table:table-cell>
          <table:table-cell table:number-columns-repeated="16372"/>
        </table:table-row>
        <table:table-row table:style-name="ro1">
          <table:table-cell table:style-name="ce3" table:formula="of:=IF( OR([.A22]=1; TYPE([.A22])=8); [.A22]+1; IF( OR([.A21]=1; TYPE([.A21])=8); [.A21]+1; 0))" office:value-type="float" office:value="17" calcext:value-type="float">
            <text:p>17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Cup2RequestedState</text:p>
          </table:table-cell>
          <table:table-cell table:style-name="ce11" table:formula="of:=IF([.H23]&lt;&gt;&quot;&quot;; UPPER(ORG.LIBREOFFICE.REGEX([.H23];&quot;([a-z0-9])([A-Z])&quot;;&quot;$1_$2&quot;;&quot;g&quot;)); &quot;&quot;)" office:value-type="string" office:string-value="CUP2_REQUESTED_STATE" calcext:value-type="string">
            <text:p>CUP2_REQUESTED_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3]=1; TYPE([.A23])=8); [.A23]+1; IF( OR([.A22]=1; TYPE([.A22])=8); [.A22]+1; 0))" office:value-type="float" office:value="18" calcext:value-type="float">
            <text:p>18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Cup3RequestedState</text:p>
          </table:table-cell>
          <table:table-cell table:style-name="ce11" table:formula="of:=IF([.H24]&lt;&gt;&quot;&quot;; UPPER(ORG.LIBREOFFICE.REGEX([.H24];&quot;([a-z0-9])([A-Z])&quot;;&quot;$1_$2&quot;;&quot;g&quot;)); &quot;&quot;)" office:value-type="string" office:string-value="CUP3_REQUESTED_STATE" calcext:value-type="string">
            <text:p>CUP3_REQUESTED_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/>
          <table:table-cell table:number-columns-repeated="16375"/>
        </table:table-row>
        <table:table-row table:style-name="ro1">
          <table:table-cell table:style-name="ce3" table:formula="of:=IF( OR([.A25]=1; TYPE([.A25])=8); [.A25]+1; IF( OR([.A24]=1; TYPE([.A24])=8); [.A24]+1; 0))" office:value-type="float" office:value="19" calcext:value-type="float">
            <text:p>19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Actuator1Control</text:p>
          </table:table-cell>
          <table:table-cell table:style-name="ce11" table:formula="of:=IF([.H26]&lt;&gt;&quot;&quot;; UPPER(ORG.LIBREOFFICE.REGEX([.H26];&quot;([a-z0-9])([A-Z])&quot;;&quot;$1_$2&quot;;&quot;g&quot;)); &quot;&quot;)" office:value-type="string" office:string-value="ACTUATOR1_CONTROL" calcext:value-type="string">
            <text:p>ACTUATOR1_CONTROL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he logic state of the output controlling Faraday cup actuator #1; true = active open-collector output, uC port is high; false = open-collector output inactive (circuit open), uC port is low</text:p>
          </table:table-cell>
          <table:table-cell table:number-columns-repeated="16372"/>
        </table:table-row>
        <table:table-row table:style-name="ro1">
          <table:table-cell table:style-name="ce3" table:formula="of:=IF( OR([.A26]=1; TYPE([.A26])=8); [.A26]+1; IF( OR(#REF!=1; TYPE(#REF!)=8); #REF!+1; 0))" office:value-type="float" office:value="20" calcext:value-type="float">
            <text:p>20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Actuator2Control</text:p>
          </table:table-cell>
          <table:table-cell table:style-name="ce11" table:formula="of:=IF([.H27]&lt;&gt;&quot;&quot;; UPPER(ORG.LIBREOFFICE.REGEX([.H27];&quot;([a-z0-9])([A-Z])&quot;;&quot;$1_$2&quot;;&quot;g&quot;)); &quot;&quot;)" office:value-type="string" office:string-value="ACTUATOR2_CONTROL" calcext:value-type="string">
            <text:p>ACTUATOR2_CONTROL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he logic state of the output controlling Faraday cup actuator #2; true = active open-collector output, uC port is high; false = open-collector output inactive (circuit open), uC port is low</text:p>
          </table:table-cell>
          <table:table-cell table:number-columns-repeated="16372"/>
        </table:table-row>
        <table:table-row table:style-name="ro1">
          <table:table-cell table:style-name="ce3" table:formula="of:=IF( OR([.A27]=1; TYPE([.A27])=8); [.A27]+1; IF( OR([.A26]=1; TYPE([.A26])=8); [.A26]+1; 0))" office:value-type="float" office:value="21" calcext:value-type="float">
            <text:p>2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Actuator3ControlIn</text:p>
          </table:table-cell>
          <table:table-cell table:style-name="ce11" table:formula="of:=IF([.H28]&lt;&gt;&quot;&quot;; UPPER(ORG.LIBREOFFICE.REGEX([.H28];&quot;([a-z0-9])([A-Z])&quot;;&quot;$1_$2&quot;;&quot;g&quot;)); &quot;&quot;)" office:value-type="string" office:string-value="ACTUATOR3_CONTROL_IN" calcext:value-type="string">
            <text:p>ACTUATOR3_CONTROL_IN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rue = (voltage V3a-V3b = +12V); false = high impedance outputs</text:p>
          </table:table-cell>
          <table:table-cell table:number-columns-repeated="16372"/>
        </table:table-row>
        <table:table-row table:style-name="ro1">
          <table:table-cell table:style-name="ce3" table:formula="of:=IF( OR([.A28]=1; TYPE([.A28])=8); [.A28]+1; IF( OR([.A27]=1; TYPE([.A27])=8); [.A27]+1; 0))" office:value-type="float" office:value="22" calcext:value-type="float">
            <text:p>2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Actuator3ControlOut</text:p>
          </table:table-cell>
          <table:table-cell table:style-name="ce11" table:formula="of:=IF([.H29]&lt;&gt;&quot;&quot;; UPPER(ORG.LIBREOFFICE.REGEX([.H29];&quot;([a-z0-9])([A-Z])&quot;;&quot;$1_$2&quot;;&quot;g&quot;)); &quot;&quot;)" office:value-type="string" office:string-value="ACTUATOR3_CONTROL_OUT" calcext:value-type="string">
            <text:p>ACTUATOR3_CONTROL_OUT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rue = (voltage V3a-V3b = -12V); false = high impedance outputs</text:p>
          </table:table-cell>
          <table:table-cell table:number-columns-repeated="16372"/>
        </table:table-row>
        <table:table-row table:style-name="ro1">
          <table:table-cell table:style-name="ce3" table:formula="of:=IF( OR([.A29]=1; TYPE([.A29])=8); [.A29]+1; IF( OR([.A28]=1; TYPE([.A28])=8); [.A28]+1; 0))" office:value-type="float" office:value="23" calcext:value-type="float">
            <text:p>2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Actuator3ControlBrake</text:p>
          </table:table-cell>
          <table:table-cell table:style-name="ce11" table:formula="of:=IF([.H30]&lt;&gt;&quot;&quot;; UPPER(ORG.LIBREOFFICE.REGEX([.H30];&quot;([a-z0-9])([A-Z])&quot;;&quot;$1_$2&quot;;&quot;g&quot;)); &quot;&quot;)" office:value-type="string" office:string-value="ACTUATOR3_CONTROL_BRAKE" calcext:value-type="string">
            <text:p>ACTUATOR3_CONTROL_BRAK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rue = the brake is on (active open-collector output, uC port is high); false = the brake is off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31]&lt;&gt;&quot;&quot;; UPPER(ORG.LIBREOFFICE.REGEX([.H31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/>
          <table:table-cell/>
          <table:table-cell table:style-name="ce10"/>
          <table:table-cell table:number-columns-repeated="5"/>
          <table:table-cell table:style-name="ce11" table:formula="of:=IF([.H32]&lt;&gt;&quot;&quot;; UPPER(ORG.LIBREOFFICE.REGEX([.H32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Code</text:p>
          </table:table-cell>
          <table:table-cell table:style-name="ce11" table:formula="of:=IF([.H33]&lt;&gt;&quot;&quot;; UPPER(ORG.LIBREOFFICE.REGEX([.H33];&quot;([a-z0-9])([A-Z])&quot;;&quot;$1_$2&quot;;&quot;g&quot;)); &quot;&quot;)" office:value-type="string" office:string-value="ERROR_CODE" calcext:value-type="string">
            <text:p>ERROR_CODE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Error code for the entire device (bitmap)</text:p>
          </table:table-cell>
          <table:table-cell table:number-columns-repeated="16372"/>
        </table:table-row>
        <table:table-row table:style-name="ro1">
          <table:table-cell table:style-name="ce3" table:formula="of:=[.A33]+1" office:value-type="float" office:value="1001" calcext:value-type="float">
            <text:p>100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tError</text:p>
          </table:table-cell>
          <table:table-cell table:style-name="ce11" table:formula="of:=IF([.H34]&lt;&gt;&quot;&quot;; UPPER(ORG.LIBREOFFICE.REGEX([.H34];&quot;([a-z0-9])([A-Z])&quot;;&quot;$1_$2&quot;;&quot;g&quot;)); &quot;&quot;)" office:value-type="string" office:string-value="LAST_ERROR" calcext:value-type="string">
            <text:p>LAST_ERROR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de of the last error</text:p>
          </table:table-cell>
          <table:table-cell table:number-columns-repeated="16372"/>
        </table:table-row>
        <table:table-row table:style-name="ro1">
          <table:table-cell table:style-name="ce3" table:formula="of:=IF( OR([.A34]=1; TYPE([.A34])=8); [.A34]+1; IF( OR([.A33]=1; TYPE([.A33])=8); [.A33]+1; 0))" office:value-type="float" office:value="1002" calcext:value-type="float">
            <text:p>100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Storage</text:p>
          </table:table-cell>
          <table:table-cell table:style-name="ce11" table:formula="of:=IF([.H35]&lt;&gt;&quot;&quot;; UPPER(ORG.LIBREOFFICE.REGEX([.H35];&quot;([a-z0-9])([A-Z])&quot;;&quot;$1_$2&quot;;&quot;g&quot;)); &quot;&quot;)" office:value-type="string" office:string-value="ERROR_STORAGE" calcext:value-type="string">
            <text:p>ERROR_STORAGE</text:p>
          </table:table-cell>
          <table:table-cell office:value-type="string" calcext:value-type="string">
            <text:p>MainFSM,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; can be reset via Modbus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36]&lt;&gt;&quot;&quot;; UPPER(ORG.LIBREOFFICE.REGEX([.H36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36]=1; TYPE([.A36])=8); [.A36]+1; IF( OR([.A35]=1; TYPE([.A35])=8); [.A35]+1; 0))" office:value-type="float" office:value="1003" calcext:value-type="float">
            <text:p>100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imeLimitInserting1</text:p>
          </table:table-cell>
          <table:table-cell table:style-name="ce11" table:formula="of:=IF([.H37]&lt;&gt;&quot;&quot;; UPPER(ORG.LIBREOFFICE.REGEX([.H37];&quot;([a-z0-9])([A-Z])&quot;;&quot;$1_$2&quot;;&quot;g&quot;)); &quot;&quot;)" office:value-type="string" office:string-value="TIME_LIMIT_INSERTING1" calcext:value-type="string">
            <text:p>TIME_LIMIT_INSERT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inserting a Faraday cup; unit = millisecond</text:p>
          </table:table-cell>
          <table:table-cell table:number-columns-repeated="16372"/>
        </table:table-row>
        <table:table-row table:style-name="ro1">
          <table:table-cell table:style-name="ce3" table:formula="of:=IF( OR([.A37]=1; TYPE([.A37])=8); [.A37]+1; IF( OR([.A36]=1; TYPE([.A36])=8); [.A36]+1; 0))" office:value-type="float" office:value="1004" calcext:value-type="float">
            <text:p>100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imeLimitInserting2</text:p>
          </table:table-cell>
          <table:table-cell table:style-name="ce11" table:formula="of:=IF([.H38]&lt;&gt;&quot;&quot;; UPPER(ORG.LIBREOFFICE.REGEX([.H38];&quot;([a-z0-9])([A-Z])&quot;;&quot;$1_$2&quot;;&quot;g&quot;)); &quot;&quot;)" office:value-type="string" office:string-value="TIME_LIMIT_INSERTING2" calcext:value-type="string">
            <text:p>TIME_LIMIT_INSERT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38]=1; TYPE([.A38])=8); [.A38]+1; IF( OR([.A37]=1; TYPE([.A37])=8); [.A37]+1; 0))" office:value-type="float" office:value="1005" calcext:value-type="float">
            <text:p>100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imeLimitInserting3</text:p>
          </table:table-cell>
          <table:table-cell table:style-name="ce11" table:formula="of:=IF([.H39]&lt;&gt;&quot;&quot;; UPPER(ORG.LIBREOFFICE.REGEX([.H39];&quot;([a-z0-9])([A-Z])&quot;;&quot;$1_$2&quot;;&quot;g&quot;)); &quot;&quot;)" office:value-type="string" office:string-value="TIME_LIMIT_INSERTING3" calcext:value-type="string">
            <text:p>TIME_LIMIT_INSERT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39]=1; TYPE([.A39])=8); [.A39]+1; IF( OR([.A38]=1; TYPE([.A38])=8); [.A38]+1; 0))" office:value-type="float" office:value="1006" calcext:value-type="float">
            <text:p>100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imeLimitWithdrawing1</text:p>
          </table:table-cell>
          <table:table-cell table:style-name="ce11" table:formula="of:=IF([.H40]&lt;&gt;&quot;&quot;; UPPER(ORG.LIBREOFFICE.REGEX([.H40];&quot;([a-z0-9])([A-Z])&quot;;&quot;$1_$2&quot;;&quot;g&quot;)); &quot;&quot;)" office:value-type="string" office:string-value="TIME_LIMIT_WITHDRAWING1" calcext:value-type="string">
            <text:p>TIME_LIMIT_WITHDRAW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withdrawing a Faraday cup; unit = millisecond</text:p>
          </table:table-cell>
          <table:table-cell table:number-columns-repeated="16372"/>
        </table:table-row>
        <table:table-row table:style-name="ro1">
          <table:table-cell table:style-name="ce3" table:formula="of:=IF( OR([.A40]=1; TYPE([.A40])=8); [.A40]+1; IF( OR([.A39]=1; TYPE([.A39])=8); [.A39]+1; 0))" office:value-type="float" office:value="1007" calcext:value-type="float">
            <text:p>100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imeLimitWithdrawing2</text:p>
          </table:table-cell>
          <table:table-cell table:style-name="ce11" table:formula="of:=IF([.H41]&lt;&gt;&quot;&quot;; UPPER(ORG.LIBREOFFICE.REGEX([.H41];&quot;([a-z0-9])([A-Z])&quot;;&quot;$1_$2&quot;;&quot;g&quot;)); &quot;&quot;)" office:value-type="string" office:string-value="TIME_LIMIT_WITHDRAWING2" calcext:value-type="string">
            <text:p>TIME_LIMIT_WITHDRAW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1]=1; TYPE([.A41])=8); [.A41]+1; IF( OR([.A40]=1; TYPE([.A40])=8); [.A40]+1; 0))" office:value-type="float" office:value="1008" calcext:value-type="float">
            <text:p>100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TimeLimitWithdrawing3</text:p>
          </table:table-cell>
          <table:table-cell table:style-name="ce11" table:formula="of:=IF([.H42]&lt;&gt;&quot;&quot;; UPPER(ORG.LIBREOFFICE.REGEX([.H42];&quot;([a-z0-9])([A-Z])&quot;;&quot;$1_$2&quot;;&quot;g&quot;)); &quot;&quot;)" office:value-type="string" office:string-value="TIME_LIMIT_WITHDRAWING3" calcext:value-type="string">
            <text:p>TIME_LIMIT_WITHDRAW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43]&lt;&gt;&quot;&quot;; UPPER(ORG.LIBREOFFICE.REGEX([.H43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43]=1; TYPE([.A43])=8); [.A43]+1; IF( OR([.A42]=1; TYPE([.A42])=8); [.A42]+1; 0))" office:value-type="float" office:value="1009" calcext:value-type="float">
            <text:p>100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Cup</text:p>
          </table:table-cell>
          <table:table-cell table:style-name="ce11" table:formula="of:=IF([.H44]&lt;&gt;&quot;&quot;; UPPER(ORG.LIBREOFFICE.REGEX([.H44];&quot;([a-z0-9])([A-Z])&quot;;&quot;$1_$2&quot;;&quot;g&quot;)); &quot;&quot;)" office:value-type="string" office:string-value="ACTIVE_CUP" calcext:value-type="string">
            <text:p>ACTIVE_CUP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The first inserted Faraday cup as seen from the ion source side; if none is inserted, the previous value should be retained; 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45]&lt;&gt;&quot;&quot;; UPPER(ORG.LIBREOFFICE.REGEX([.H45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45]=1; TYPE([.A45])=8); [.A45]+1; IF( OR([.A44]=1; TYPE([.A44])=8); [.A44]+1; 0))" office:value-type="float" office:value="1010" calcext:value-type="float">
            <text:p>101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FsmState</text:p>
          </table:table-cell>
          <table:table-cell table:style-name="ce11" table:formula="of:=IF([.H46]&lt;&gt;&quot;&quot;; UPPER(ORG.LIBREOFFICE.REGEX([.H46];&quot;([a-z0-9])([A-Z])&quot;;&quot;$1_$2&quot;;&quot;g&quot;)); &quot;&quot;)" office:value-type="string" office:string-value="CUP1_FSM_STATE" calcext:value-type="string">
            <text:p>CUP1_FSM_STAT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State of the finite state machine</text:p>
          </table:table-cell>
          <table:table-cell table:number-columns-repeated="16372"/>
        </table:table-row>
        <table:table-row table:style-name="ro1">
          <table:table-cell table:style-name="ce3" table:formula="of:=IF( OR([.A46]=1; TYPE([.A46])=8); [.A46]+1; IF( OR([.A45]=1; TYPE([.A45])=8); [.A45]+1; 0))" office:value-type="float" office:value="1011" calcext:value-type="float">
            <text:p>101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FsmState</text:p>
          </table:table-cell>
          <table:table-cell table:style-name="ce11" table:formula="of:=IF([.H47]&lt;&gt;&quot;&quot;; UPPER(ORG.LIBREOFFICE.REGEX([.H47];&quot;([a-z0-9])([A-Z])&quot;;&quot;$1_$2&quot;;&quot;g&quot;)); &quot;&quot;)" office:value-type="string" office:string-value="CUP2_FSM_STATE" calcext:value-type="string">
            <text:p>CUP2_FSM_STAT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7]=1; TYPE([.A47])=8); [.A47]+1; IF( OR([.A46]=1; TYPE([.A46])=8); [.A46]+1; 0))" office:value-type="float" office:value="1012" calcext:value-type="float">
            <text:p>101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FsmState</text:p>
          </table:table-cell>
          <table:table-cell table:style-name="ce11" table:formula="of:=IF([.H48]&lt;&gt;&quot;&quot;; UPPER(ORG.LIBREOFFICE.REGEX([.H48];&quot;([a-z0-9])([A-Z])&quot;;&quot;$1_$2&quot;;&quot;g&quot;)); &quot;&quot;)" office:value-type="string" office:string-value="CUP3_FSM_STATE" calcext:value-type="string">
            <text:p>CUP3_FSM_STAT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8]=1; TYPE([.A48])=8); [.A48]+1; IF( OR([.A45]=1; TYPE([.A45])=8); [.A45]+1; 0))" office:value-type="float" office:value="1013" calcext:value-type="float">
            <text:p>101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</text:p>
          </table:table-cell>
          <table:table-cell table:style-name="ce11" table:formula="of:=IF([.H49]&lt;&gt;&quot;&quot;; UPPER(ORG.LIBREOFFICE.REGEX([.H49];&quot;([a-z0-9])([A-Z])&quot;;&quot;$1_$2&quot;;&quot;g&quot;)); &quot;&quot;)" office:value-type="string" office:string-value="CUP1_ERROR" calcext:value-type="string">
            <text:p>CUP1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Error code for the cup mechanism (bitmap)</text:p>
          </table:table-cell>
          <table:table-cell table:number-columns-repeated="16372"/>
        </table:table-row>
        <table:table-row table:style-name="ro1">
          <table:table-cell table:style-name="ce3" table:formula="of:=IF( OR([.A49]=1; TYPE([.A49])=8); [.A49]+1; IF( OR([.A45]=1; TYPE([.A45])=8); [.A45]+1; 0))" office:value-type="float" office:value="1014" calcext:value-type="float">
            <text:p>101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</text:p>
          </table:table-cell>
          <table:table-cell table:style-name="ce11" table:formula="of:=IF([.H50]&lt;&gt;&quot;&quot;; UPPER(ORG.LIBREOFFICE.REGEX([.H50];&quot;([a-z0-9])([A-Z])&quot;;&quot;$1_$2&quot;;&quot;g&quot;)); &quot;&quot;)" office:value-type="string" office:string-value="CUP2_ERROR" calcext:value-type="string">
            <text:p>CUP2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0]=1; TYPE([.A50])=8); [.A50]+1; IF( OR([.A49]=1; TYPE([.A49])=8); [.A49]+1; 0))" office:value-type="float" office:value="1015" calcext:value-type="float">
            <text:p>101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</text:p>
          </table:table-cell>
          <table:table-cell table:style-name="ce11" table:formula="of:=IF([.H51]&lt;&gt;&quot;&quot;; UPPER(ORG.LIBREOFFICE.REGEX([.H51];&quot;([a-z0-9])([A-Z])&quot;;&quot;$1_$2&quot;;&quot;g&quot;)); &quot;&quot;)" office:value-type="string" office:string-value="CUP3_ERROR" calcext:value-type="string">
            <text:p>CUP3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1]=1; TYPE([.A51])=8); [.A51]+1; IF( OR([.A50]=1; TYPE([.A50])=8); [.A50]+1; 0))" office:value-type="float" office:value="1016" calcext:value-type="float">
            <text:p>101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LastError</text:p>
          </table:table-cell>
          <table:table-cell table:style-name="ce11" table:formula="of:=IF([.H52]&lt;&gt;&quot;&quot;; UPPER(ORG.LIBREOFFICE.REGEX([.H52];&quot;([a-z0-9])([A-Z])&quot;;&quot;$1_$2&quot;;&quot;g&quot;)); &quot;&quot;)" office:value-type="string" office:string-value="CUP1_LAST_ERROR" calcext:value-type="string">
            <text:p>CUP1_LAST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de of the last error for the cup mechanism</text:p>
          </table:table-cell>
          <table:table-cell table:number-columns-repeated="16372"/>
        </table:table-row>
        <table:table-row table:style-name="ro1">
          <table:table-cell table:style-name="ce3" table:formula="of:=IF( OR([.A52]=1; TYPE([.A52])=8); [.A52]+1; IF( OR([.A51]=1; TYPE([.A51])=8); [.A51]+1; 0))" office:value-type="float" office:value="1017" calcext:value-type="float">
            <text:p>101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LastError</text:p>
          </table:table-cell>
          <table:table-cell table:style-name="ce11" table:formula="of:=IF([.H53]&lt;&gt;&quot;&quot;; UPPER(ORG.LIBREOFFICE.REGEX([.H53];&quot;([a-z0-9])([A-Z])&quot;;&quot;$1_$2&quot;;&quot;g&quot;)); &quot;&quot;)" office:value-type="string" office:string-value="CUP2_LAST_ERROR" calcext:value-type="string">
            <text:p>CUP2_LAST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3]=1; TYPE([.A53])=8); [.A53]+1; IF( OR([.A52]=1; TYPE([.A52])=8); [.A52]+1; 0))" office:value-type="float" office:value="1018" calcext:value-type="float">
            <text:p>101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LastError</text:p>
          </table:table-cell>
          <table:table-cell table:style-name="ce11" table:formula="of:=IF([.H54]&lt;&gt;&quot;&quot;; UPPER(ORG.LIBREOFFICE.REGEX([.H54];&quot;([a-z0-9])([A-Z])&quot;;&quot;$1_$2&quot;;&quot;g&quot;)); &quot;&quot;)" office:value-type="string" office:string-value="CUP3_LAST_ERROR" calcext:value-type="string">
            <text:p>CUP3_LAST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4]=1; TYPE([.A54])=8); [.A54]+1; IF( OR([.A53]=1; TYPE([.A53])=8); [.A53]+1; 0))" office:value-type="float" office:value="1019" calcext:value-type="float">
            <text:p>101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Storage</text:p>
          </table:table-cell>
          <table:table-cell table:style-name="ce11" table:formula="of:=IF([.H55]&lt;&gt;&quot;&quot;; UPPER(ORG.LIBREOFFICE.REGEX([.H55];&quot;([a-z0-9])([A-Z])&quot;;&quot;$1_$2&quot;;&quot;g&quot;)); &quot;&quot;)" office:value-type="string" office:string-value="CUP1_ERROR_STORAGE" calcext:value-type="string">
            <text:p>CUP1_ERROR_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 for the cup mechanism; can be reset via Modbus</text:p>
          </table:table-cell>
          <table:table-cell table:number-columns-repeated="16372"/>
        </table:table-row>
        <table:table-row table:style-name="ro1">
          <table:table-cell table:style-name="ce3" table:formula="of:=IF( OR([.A55]=1; TYPE([.A55])=8); [.A55]+1; IF( OR([.A54]=1; TYPE([.A54])=8); [.A54]+1; 0))" office:value-type="float" office:value="1020" calcext:value-type="float">
            <text:p>102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Storage</text:p>
          </table:table-cell>
          <table:table-cell table:style-name="ce11" table:formula="of:=IF([.H56]&lt;&gt;&quot;&quot;; UPPER(ORG.LIBREOFFICE.REGEX([.H56];&quot;([a-z0-9])([A-Z])&quot;;&quot;$1_$2&quot;;&quot;g&quot;)); &quot;&quot;)" office:value-type="string" office:string-value="CUP2_ERROR_STORAGE" calcext:value-type="string">
            <text:p>CUP2_ERROR_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6]=1; TYPE([.A56])=8); [.A56]+1; IF( OR([.A55]=1; TYPE([.A55])=8); [.A55]+1; 0))" office:value-type="float" office:value="1021" calcext:value-type="float">
            <text:p>102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Storage</text:p>
          </table:table-cell>
          <table:table-cell table:style-name="ce11" table:formula="of:=IF([.H57]&lt;&gt;&quot;&quot;; UPPER(ORG.LIBREOFFICE.REGEX([.H57];&quot;([a-z0-9])([A-Z])&quot;;&quot;$1_$2&quot;;&quot;g&quot;)); &quot;&quot;)" office:value-type="string" office:string-value="CUP3_ERROR_STORAGE" calcext:value-type="string">
            <text:p>CUP3_ERROR_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58]&lt;&gt;&quot;&quot;; UPPER(ORG.LIBREOFFICE.REGEX([.H58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58]=1; TYPE([.A58])=8); [.A58]+1; IF( OR([.A57]=1; TYPE([.A57])=8); [.A57]+1; 0))" office:value-type="float" office:value="1022" calcext:value-type="float">
            <text:p>102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talledCups</text:p>
          </table:table-cell>
          <table:table-cell table:style-name="ce11" table:formula="of:=IF([.H59]&lt;&gt;&quot;&quot;; UPPER(ORG.LIBREOFFICE.REGEX([.H59];&quot;([a-z0-9])([A-Z])&quot;;&quot;$1_$2&quot;;&quot;g&quot;)); &quot;&quot;)" office:value-type="string" office:string-value="INSTALLED_CUPS" calcext:value-type="string">
            <text:p>INSTALLED_CUPS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Faraday cups to be used</text:p>
          </table:table-cell>
          <table:table-cell table:number-columns-repeated="16372"/>
        </table:table-row>
        <table:table-row table:style-name="ro1">
          <table:table-cell table:style-name="ce3" table:formula="of:=IF( OR([.A59]=1; TYPE([.A59])=8); [.A59]+1; IF( OR([.A58]=1; TYPE([.A58])=8); [.A58]+1; 0))" office:value-type="float" office:value="1023" calcext:value-type="float">
            <text:p>102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1</text:p>
          </table:table-cell>
          <table:table-cell table:style-name="ce11" table:formula="of:=IF([.H60]&lt;&gt;&quot;&quot;; UPPER(ORG.LIBREOFFICE.REGEX([.H60];&quot;([a-z0-9])([A-Z])&quot;;&quot;$1_$2&quot;;&quot;g&quot;)); &quot;&quot;)" office:value-type="string" office:string-value="ELECTRODES_CUP1" calcext:value-type="string">
            <text:p>ELECTRODES_CUP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electrodes installed in the Faraday cup</text:p>
          </table:table-cell>
          <table:table-cell table:number-columns-repeated="16372"/>
        </table:table-row>
        <table:table-row table:style-name="ro1">
          <table:table-cell table:style-name="ce3" table:formula="of:=IF( OR([.A60]=1; TYPE([.A60])=8); [.A60]+1; IF( OR([.A59]=1; TYPE([.A59])=8); [.A59]+1; 0))" office:value-type="float" office:value="1024" calcext:value-type="float">
            <text:p>102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2</text:p>
          </table:table-cell>
          <table:table-cell table:style-name="ce11" table:formula="of:=IF([.H61]&lt;&gt;&quot;&quot;; UPPER(ORG.LIBREOFFICE.REGEX([.H61];&quot;([a-z0-9])([A-Z])&quot;;&quot;$1_$2&quot;;&quot;g&quot;)); &quot;&quot;)" office:value-type="string" office:string-value="ELECTRODES_CUP2" calcext:value-type="string">
            <text:p>ELECTRODES_CUP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1]=1; TYPE([.A61])=8); [.A61]+1; IF( OR([.A60]=1; TYPE([.A60])=8); [.A60]+1; 0))" office:value-type="float" office:value="1025" calcext:value-type="float">
            <text:p>102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3</text:p>
          </table:table-cell>
          <table:table-cell table:style-name="ce11" table:formula="of:=IF([.H62]&lt;&gt;&quot;&quot;; UPPER(ORG.LIBREOFFICE.REGEX([.H62];&quot;([a-z0-9])([A-Z])&quot;;&quot;$1_$2&quot;;&quot;g&quot;)); &quot;&quot;)" office:value-type="string" office:string-value="ELECTRODES_CUP3" calcext:value-type="string">
            <text:p>ELECTRODES_CUP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2]=1; TYPE([.A62])=8); [.A62]+1; IF( OR([.A61]=1; TYPE([.A61])=8); [.A61]+1; 0))" office:value-type="float" office:value="1026" calcext:value-type="float">
            <text:p>102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Type</text:p>
          </table:table-cell>
          <table:table-cell table:style-name="ce11" table:formula="of:=IF([.H63]&lt;&gt;&quot;&quot;; UPPER(ORG.LIBREOFFICE.REGEX([.H63];&quot;([a-z0-9])([A-Z])&quot;;&quot;$1_$2&quot;;&quot;g&quot;)); &quot;&quot;)" office:value-type="string" office:string-value="CUP1_TYPE" calcext:value-type="string">
            <text:p>CUP1_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ype of the Faraday cup; 0 = pneumatic mechanism with 1 limit switch; 1 = pneumatic mechanism with 1 limit switch and lock functionality; 2 = motor mechnism with 2 limit switches</text:p>
          </table:table-cell>
          <table:table-cell table:number-columns-repeated="16372"/>
        </table:table-row>
        <table:table-row table:style-name="ro1">
          <table:table-cell table:style-name="ce3" table:formula="of:=IF( OR([.A63]=1; TYPE([.A63])=8); [.A63]+1; IF( OR([.A62]=1; TYPE([.A62])=8); [.A62]+1; 0))" office:value-type="float" office:value="1027" calcext:value-type="float">
            <text:p>102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2Type</text:p>
          </table:table-cell>
          <table:table-cell table:style-name="ce11" table:formula="of:=IF([.H64]&lt;&gt;&quot;&quot;; UPPER(ORG.LIBREOFFICE.REGEX([.H64];&quot;([a-z0-9])([A-Z])&quot;;&quot;$1_$2&quot;;&quot;g&quot;)); &quot;&quot;)" office:value-type="string" office:string-value="CUP2_TYPE" calcext:value-type="string">
            <text:p>CUP2_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4]=1; TYPE([.A64])=8); [.A64]+1; IF( OR([.A63]=1; TYPE([.A63])=8); [.A63]+1; 0))" office:value-type="float" office:value="1028" calcext:value-type="float">
            <text:p>102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up3Type</text:p>
          </table:table-cell>
          <table:table-cell table:style-name="ce11" table:formula="of:=IF([.H65]&lt;&gt;&quot;&quot;; UPPER(ORG.LIBREOFFICE.REGEX([.H65];&quot;([a-z0-9])([A-Z])&quot;;&quot;$1_$2&quot;;&quot;g&quot;)); &quot;&quot;)" office:value-type="string" office:string-value="CUP3_TYPE" calcext:value-type="string">
            <text:p>CUP3_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66]&lt;&gt;&quot;&quot;; UPPER(ORG.LIBREOFFICE.REGEX([.H66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66]=1; TYPE([.A66])=8); [.A66]+1; IF( OR([.A65]=1; TYPE([.A65])=8); [.A65]+1; 0))" office:value-type="float" office:value="1029" calcext:value-type="float">
            <text:p>102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style-name="ce17" office:value-type="float" office:value="24169" calcext:value-type="float">
            <text:p>24169</text:p>
          </table:table-cell>
          <table:table-cell office:value-type="string" calcext:value-type="string">
            <text:p>CalibrationCurrent1</text:p>
          </table:table-cell>
          <table:table-cell table:style-name="ce11" table:formula="of:=IF([.H67]&lt;&gt;&quot;&quot;; UPPER(ORG.LIBREOFFICE.REGEX([.H67];&quot;([a-z0-9])([A-Z])&quot;;&quot;$1_$2&quot;;&quot;g&quot;)); &quot;&quot;)" office:value-type="string" office:string-value="CALIBRATION_CURRENT1" calcext:value-type="string">
            <text:p>CALIBRATION_CURRE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Calibration current value #1 (unit = 10nA)</text:p>
          </table:table-cell>
          <table:table-cell table:number-columns-repeated="16372"/>
        </table:table-row>
        <table:table-row table:style-name="ro1">
          <table:table-cell table:style-name="ce3" table:formula="of:=IF( OR([.A67]=1; TYPE([.A67])=8); [.A67]+1; IF( OR([.A66]=1; TYPE([.A66])=8); [.A66]+1; 0))" office:value-type="float" office:value="1030" calcext:value-type="float">
            <text:p>103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style-name="ce17" office:value-type="float" office:value="2410" calcext:value-type="float">
            <text:p>2410</text:p>
          </table:table-cell>
          <table:table-cell office:value-type="string" calcext:value-type="string">
            <text:p>CalibrationCurrent2</text:p>
          </table:table-cell>
          <table:table-cell table:style-name="ce11" table:formula="of:=IF([.H68]&lt;&gt;&quot;&quot;; UPPER(ORG.LIBREOFFICE.REGEX([.H68];&quot;([a-z0-9])([A-Z])&quot;;&quot;$1_$2&quot;;&quot;g&quot;)); &quot;&quot;)" office:value-type="string" office:string-value="CALIBRATION_CURRENT2" calcext:value-type="string">
            <text:p>CALIBRATION_CURRE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5"/>- // - <text:s text:c="14"/>#2 <text:s text:c="4"/>- // -</text:p>
          </table:table-cell>
          <table:table-cell table:number-columns-repeated="16372"/>
        </table:table-row>
        <table:table-row table:style-name="ro1">
          <table:table-cell table:style-name="ce3" table:formula="of:=IF( OR([.A68]=1; TYPE([.A68])=8); [.A68]+1; IF( OR([.A67]=1; TYPE([.A67])=8); [.A67]+1; 0))" office:value-type="float" office:value="1031" calcext:value-type="float">
            <text:p>103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style-name="ce17" office:value-type="float" office:value="2198" calcext:value-type="float">
            <text:p>2198</text:p>
          </table:table-cell>
          <table:table-cell office:value-type="string" calcext:value-type="string">
            <text:p>CalibrationCurrent3</text:p>
          </table:table-cell>
          <table:table-cell table:style-name="ce11" table:formula="of:=IF([.H69]&lt;&gt;&quot;&quot;; UPPER(ORG.LIBREOFFICE.REGEX([.H69];&quot;([a-z0-9])([A-Z])&quot;;&quot;$1_$2&quot;;&quot;g&quot;)); &quot;&quot;)" office:value-type="string" office:string-value="CALIBRATION_CURRENT3" calcext:value-type="string">
            <text:p>CALIBRATION_CURRE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5"/>- // - <text:s text:c="14"/>#3 <text:s text:c="4"/>- // -</text:p>
          </table:table-cell>
          <table:table-cell table:number-columns-repeated="16372"/>
        </table:table-row>
        <table:table-row table:style-name="ro1">
          <table:table-cell table:style-name="ce3" table:formula="of:=IF( OR([.A69]=1; TYPE([.A69])=8); [.A69]+1; IF( OR([.A68]=1; TYPE([.A68])=8); [.A68]+1; 0))" office:value-type="float" office:value="1032" calcext:value-type="float">
            <text:p>103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style-name="ce17" office:value-type="float" office:value="158" calcext:value-type="float">
            <text:p>158</text:p>
          </table:table-cell>
          <table:table-cell office:value-type="string" calcext:value-type="string">
            <text:p>CalibrationCurrent4</text:p>
          </table:table-cell>
          <table:table-cell table:style-name="ce11" table:formula="of:=IF([.H70]&lt;&gt;&quot;&quot;; UPPER(ORG.LIBREOFFICE.REGEX([.H70];&quot;([a-z0-9])([A-Z])&quot;;&quot;$1_$2&quot;;&quot;g&quot;)); &quot;&quot;)" office:value-type="string" office:string-value="CALIBRATION_CURRENT4" calcext:value-type="string">
            <text:p>CALIBRATION_CURRENT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5"/>- // - <text:s text:c="14"/>#4 <text:s text:c="4"/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/>
          <table:table-cell table:number-columns-repeated="16375"/>
        </table:table-row>
        <table:table-row table:style-name="ro1">
          <table:table-cell table:style-name="ce3" table:formula="of:=IF( OR([.A71]=1; TYPE([.A71])=8); [.A71]+1; IF( OR([.A70]=1; TYPE([.A70])=8); [.A70]+1; 0))" office:value-type="float" office:value="1033" calcext:value-type="float">
            <text:p>103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Cup1Channel1GainLowPoint1</text:p>
          </table:table-cell>
          <table:table-cell table:style-name="ce11" table:formula="of:=IF([.H72]&lt;&gt;&quot;&quot;; UPPER(ORG.LIBREOFFICE.REGEX([.H72];&quot;([a-z0-9])([A-Z])&quot;;&quot;$1_$2&quot;;&quot;g&quot;)); &quot;&quot;)" office:value-type="string" office:string-value="CUP1_CHANNEL1_GAIN_LOW_POINT1" calcext:value-type="string">
            <text:p>CUP1_CHANNEL1_GAIN_LOW_POI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1 value when cup 1, channel 1 is selected and calibration current #1 is applied to the input (ADC1 = low-gain signal); default values = experimentally measured values</text:p>
          </table:table-cell>
          <table:table-cell table:number-columns-repeated="16372"/>
        </table:table-row>
        <table:table-row table:style-name="ro1">
          <table:table-cell table:style-name="ce3" table:formula="of:=IF( OR([.A72]=1; TYPE([.A72])=8); [.A72]+1; IF( OR([.A71]=1; TYPE([.A71])=8); [.A71]+1; 0))" office:value-type="float" office:value="1034" calcext:value-type="float">
            <text:p>103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up1Channel1GainLowPoint2</text:p>
          </table:table-cell>
          <table:table-cell table:style-name="ce11" table:formula="of:=IF([.H73]&lt;&gt;&quot;&quot;; UPPER(ORG.LIBREOFFICE.REGEX([.H73];&quot;([a-z0-9])([A-Z])&quot;;&quot;$1_$2&quot;;&quot;g&quot;)); &quot;&quot;)" office:value-type="string" office:string-value="CUP1_CHANNEL1_GAIN_LOW_POINT2" calcext:value-type="string">
            <text:p>CUP1_CHANNEL1_GAIN_LOW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73]=1; TYPE([.A73])=8); [.A73]+1; IF( OR([.A72]=1; TYPE([.A72])=8); [.A72]+1; 0))" office:value-type="float" office:value="1035" calcext:value-type="float">
            <text:p>103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Cup1Channel1GainLowPoint3</text:p>
          </table:table-cell>
          <table:table-cell table:style-name="ce11" table:formula="of:=IF([.H74]&lt;&gt;&quot;&quot;; UPPER(ORG.LIBREOFFICE.REGEX([.H74];&quot;([a-z0-9])([A-Z])&quot;;&quot;$1_$2&quot;;&quot;g&quot;)); &quot;&quot;)" office:value-type="string" office:string-value="CUP1_CHANNEL1_GAIN_LOW_POINT3" calcext:value-type="string">
            <text:p>CUP1_CHANNEL1_GAIN_LOW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74]=1; TYPE([.A74])=8); [.A74]+1; IF( OR([.A66]=1; TYPE([.A66])=8); [.A66]+1; 0))" office:value-type="float" office:value="1036" calcext:value-type="float">
            <text:p>103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Cup1Channel1GainHighPoint2</text:p>
          </table:table-cell>
          <table:table-cell table:style-name="ce11" table:formula="of:=IF([.H75]&lt;&gt;&quot;&quot;; UPPER(ORG.LIBREOFFICE.REGEX([.H75];&quot;([a-z0-9])([A-Z])&quot;;&quot;$1_$2&quot;;&quot;g&quot;)); &quot;&quot;)" office:value-type="string" office:string-value="CUP1_CHANNEL1_GAIN_HIGH_POINT2" calcext:value-type="string">
            <text:p>CUP1_CHANNEL1_GAIN_HIGH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0 value when cup 1, channel 1 is selected and calibration current #1 is applied to the input (ADC0 = high-gain signal)</text:p>
          </table:table-cell>
          <table:table-cell table:number-columns-repeated="16372"/>
        </table:table-row>
        <table:table-row table:style-name="ro1">
          <table:table-cell table:style-name="ce3" table:formula="of:=IF( OR([.A75]=1; TYPE([.A75])=8); [.A75]+1; IF( OR([.A74]=1; TYPE([.A74])=8); [.A74]+1; 0))" office:value-type="float" office:value="1037" calcext:value-type="float">
            <text:p>103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Cup1Channel1GainHighPoint3</text:p>
          </table:table-cell>
          <table:table-cell table:style-name="ce11" table:formula="of:=IF([.H76]&lt;&gt;&quot;&quot;; UPPER(ORG.LIBREOFFICE.REGEX([.H76];&quot;([a-z0-9])([A-Z])&quot;;&quot;$1_$2&quot;;&quot;g&quot;)); &quot;&quot;)" office:value-type="string" office:string-value="CUP1_CHANNEL1_GAIN_HIGH_POINT3" calcext:value-type="string">
            <text:p>CUP1_CHANNEL1_GAIN_HIGH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76]=1; TYPE([.A76])=8); [.A76]+1; IF( OR([.A75]=1; TYPE([.A75])=8); [.A75]+1; 0))" office:value-type="float" office:value="1038" calcext:value-type="float">
            <text:p>103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up1Channel1GainHighPoint4</text:p>
          </table:table-cell>
          <table:table-cell table:style-name="ce11" table:formula="of:=IF([.H77]&lt;&gt;&quot;&quot;; UPPER(ORG.LIBREOFFICE.REGEX([.H77];&quot;([a-z0-9])([A-Z])&quot;;&quot;$1_$2&quot;;&quot;g&quot;)); &quot;&quot;)" office:value-type="string" office:string-value="CUP1_CHANNEL1_GAIN_HIGH_POINT4" calcext:value-type="string">
            <text:p>CUP1_CHANNEL1_GAIN_HIGH_POINT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77]=1; TYPE([.A77])=8); [.A77]+1; IF( OR([.A76]=1; TYPE([.A76])=8); [.A76]+1; 0))" office:value-type="float" office:value="1039" calcext:value-type="float">
            <text:p>103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32" calcext:value-type="float">
            <text:p>1732</text:p>
          </table:table-cell>
          <table:table-cell office:value-type="string" calcext:value-type="string">
            <text:p>Cup1Channel2GainLowPoint1</text:p>
          </table:table-cell>
          <table:table-cell table:style-name="ce11" table:formula="of:=IF([.H78]&lt;&gt;&quot;&quot;; UPPER(ORG.LIBREOFFICE.REGEX([.H78];&quot;([a-z0-9])([A-Z])&quot;;&quot;$1_$2&quot;;&quot;g&quot;)); &quot;&quot;)" office:value-type="string" office:string-value="CUP1_CHANNEL2_GAIN_LOW_POINT1" calcext:value-type="string">
            <text:p>CUP1_CHANNEL2_GAIN_LOW_POI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1 value when cup 1, channel 2 is selected and calibration current #1 is applied to the input (ADC1 = low-gain signal)</text:p>
          </table:table-cell>
          <table:table-cell table:number-columns-repeated="16372"/>
        </table:table-row>
        <table:table-row table:style-name="ro1">
          <table:table-cell table:style-name="ce3" table:formula="of:=IF( OR([.A78]=1; TYPE([.A78])=8); [.A78]+1; IF( OR([.A77]=1; TYPE([.A77])=8); [.A77]+1; 0))" office:value-type="float" office:value="1040" calcext:value-type="float">
            <text:p>104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Cup1Channel2GainLowPoint2</text:p>
          </table:table-cell>
          <table:table-cell table:style-name="ce11" table:formula="of:=IF([.H79]&lt;&gt;&quot;&quot;; UPPER(ORG.LIBREOFFICE.REGEX([.H79];&quot;([a-z0-9])([A-Z])&quot;;&quot;$1_$2&quot;;&quot;g&quot;)); &quot;&quot;)" office:value-type="string" office:string-value="CUP1_CHANNEL2_GAIN_LOW_POINT2" calcext:value-type="string">
            <text:p>CUP1_CHANNEL2_GAIN_LOW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79]=1; TYPE([.A79])=8); [.A79]+1; IF( OR([.A78]=1; TYPE([.A78])=8); [.A78]+1; 0))" office:value-type="float" office:value="1041" calcext:value-type="float">
            <text:p>104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Cup1Channel2GainLowPoint3</text:p>
          </table:table-cell>
          <table:table-cell table:style-name="ce11" table:formula="of:=IF([.H80]&lt;&gt;&quot;&quot;; UPPER(ORG.LIBREOFFICE.REGEX([.H80];&quot;([a-z0-9])([A-Z])&quot;;&quot;$1_$2&quot;;&quot;g&quot;)); &quot;&quot;)" office:value-type="string" office:string-value="CUP1_CHANNEL2_GAIN_LOW_POINT3" calcext:value-type="string">
            <text:p>CUP1_CHANNEL2_GAIN_LOW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80]=1; TYPE([.A80])=8); [.A80]+1; IF( OR([.A79]=1; TYPE([.A79])=8); [.A79]+1; 0))" office:value-type="float" office:value="1042" calcext:value-type="float">
            <text:p>104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Cup1Channel2GainHighPoint2</text:p>
          </table:table-cell>
          <table:table-cell table:style-name="ce11" table:formula="of:=IF([.H81]&lt;&gt;&quot;&quot;; UPPER(ORG.LIBREOFFICE.REGEX([.H81];&quot;([a-z0-9])([A-Z])&quot;;&quot;$1_$2&quot;;&quot;g&quot;)); &quot;&quot;)" office:value-type="string" office:string-value="CUP1_CHANNEL2_GAIN_HIGH_POINT2" calcext:value-type="string">
            <text:p>CUP1_CHANNEL2_GAIN_HIGH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0 value when cup 1, channel 2 is selected and calibration current #1 is applied to the input (ADC0 = high-gain signal)</text:p>
          </table:table-cell>
          <table:table-cell table:number-columns-repeated="16372"/>
        </table:table-row>
        <table:table-row table:style-name="ro1">
          <table:table-cell table:style-name="ce3" table:formula="of:=IF( OR([.A81]=1; TYPE([.A81])=8); [.A81]+1; IF( OR([.A80]=1; TYPE([.A80])=8); [.A80]+1; 0))" office:value-type="float" office:value="1043" calcext:value-type="float">
            <text:p>104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Cup1Channel2GainHighPoint3</text:p>
          </table:table-cell>
          <table:table-cell table:style-name="ce11" table:formula="of:=IF([.H82]&lt;&gt;&quot;&quot;; UPPER(ORG.LIBREOFFICE.REGEX([.H82];&quot;([a-z0-9])([A-Z])&quot;;&quot;$1_$2&quot;;&quot;g&quot;)); &quot;&quot;)" office:value-type="string" office:string-value="CUP1_CHANNEL2_GAIN_HIGH_POINT3" calcext:value-type="string">
            <text:p>CUP1_CHANNEL2_GAIN_HIGH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82]=1; TYPE([.A82])=8); [.A82]+1; IF( OR([.A81]=1; TYPE([.A81])=8); [.A81]+1; 0))" office:value-type="float" office:value="1044" calcext:value-type="float">
            <text:p>104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up1Channel2GainHighPoint4</text:p>
          </table:table-cell>
          <table:table-cell table:style-name="ce11" table:formula="of:=IF([.H83]&lt;&gt;&quot;&quot;; UPPER(ORG.LIBREOFFICE.REGEX([.H83];&quot;([a-z0-9])([A-Z])&quot;;&quot;$1_$2&quot;;&quot;g&quot;)); &quot;&quot;)" office:value-type="string" office:string-value="CUP1_CHANNEL2_GAIN_HIGH_POINT4" calcext:value-type="string">
            <text:p>CUP1_CHANNEL2_GAIN_HIGH_POINT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83]=1; TYPE([.A83])=8); [.A83]+1; IF( OR([.A82]=1; TYPE([.A82])=8); [.A82]+1; 0))" office:value-type="float" office:value="1045" calcext:value-type="float">
            <text:p>104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Cup1Channel3GainLowPoint1</text:p>
          </table:table-cell>
          <table:table-cell table:style-name="ce11" table:formula="of:=IF([.H84]&lt;&gt;&quot;&quot;; UPPER(ORG.LIBREOFFICE.REGEX([.H84];&quot;([a-z0-9])([A-Z])&quot;;&quot;$1_$2&quot;;&quot;g&quot;)); &quot;&quot;)" office:value-type="string" office:string-value="CUP1_CHANNEL3_GAIN_LOW_POINT1" calcext:value-type="string">
            <text:p>CUP1_CHANNEL3_GAIN_LOW_POI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1 value when cup 1, channel 3 is selected and calibration current #1 is applied to the input (ADC1 = low-gain signal)</text:p>
          </table:table-cell>
          <table:table-cell table:number-columns-repeated="16372"/>
        </table:table-row>
        <table:table-row table:style-name="ro1">
          <table:table-cell table:style-name="ce3" table:formula="of:=IF( OR([.A84]=1; TYPE([.A84])=8); [.A84]+1; IF( OR([.A83]=1; TYPE([.A83])=8); [.A83]+1; 0))" office:value-type="float" office:value="1046" calcext:value-type="float">
            <text:p>104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Cup1Channel3GainLowPoint2</text:p>
          </table:table-cell>
          <table:table-cell table:style-name="ce11" table:formula="of:=IF([.H85]&lt;&gt;&quot;&quot;; UPPER(ORG.LIBREOFFICE.REGEX([.H85];&quot;([a-z0-9])([A-Z])&quot;;&quot;$1_$2&quot;;&quot;g&quot;)); &quot;&quot;)" office:value-type="string" office:string-value="CUP1_CHANNEL3_GAIN_LOW_POINT2" calcext:value-type="string">
            <text:p>CUP1_CHANNEL3_GAIN_LOW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85]=1; TYPE([.A85])=8); [.A85]+1; IF( OR([.A84]=1; TYPE([.A84])=8); [.A84]+1; 0))" office:value-type="float" office:value="1047" calcext:value-type="float">
            <text:p>104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up1Channel3GainLowPoint3</text:p>
          </table:table-cell>
          <table:table-cell table:style-name="ce11" table:formula="of:=IF([.H86]&lt;&gt;&quot;&quot;; UPPER(ORG.LIBREOFFICE.REGEX([.H86];&quot;([a-z0-9])([A-Z])&quot;;&quot;$1_$2&quot;;&quot;g&quot;)); &quot;&quot;)" office:value-type="string" office:string-value="CUP1_CHANNEL3_GAIN_LOW_POINT3" calcext:value-type="string">
            <text:p>CUP1_CHANNEL3_GAIN_LOW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86]=1; TYPE([.A86])=8); [.A86]+1; IF( OR([.A85]=1; TYPE([.A85])=8); [.A85]+1; 0))" office:value-type="float" office:value="1048" calcext:value-type="float">
            <text:p>104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Cup1Channel3GainHighPoint2</text:p>
          </table:table-cell>
          <table:table-cell table:style-name="ce11" table:formula="of:=IF([.H87]&lt;&gt;&quot;&quot;; UPPER(ORG.LIBREOFFICE.REGEX([.H87];&quot;([a-z0-9])([A-Z])&quot;;&quot;$1_$2&quot;;&quot;g&quot;)); &quot;&quot;)" office:value-type="string" office:string-value="CUP1_CHANNEL3_GAIN_HIGH_POINT2" calcext:value-type="string">
            <text:p>CUP1_CHANNEL3_GAIN_HIGH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0 value when cup 1, channel 3 is selected and calibration current #1 is applied to the input (ADC0 = high-gain signal)</text:p>
          </table:table-cell>
          <table:table-cell table:number-columns-repeated="16372"/>
        </table:table-row>
        <table:table-row table:style-name="ro1">
          <table:table-cell table:style-name="ce3" table:formula="of:=IF( OR([.A87]=1; TYPE([.A87])=8); [.A87]+1; IF( OR([.A86]=1; TYPE([.A86])=8); [.A86]+1; 0))" office:value-type="float" office:value="1049" calcext:value-type="float">
            <text:p>104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Cup1Channel3GainHighPoint3</text:p>
          </table:table-cell>
          <table:table-cell table:style-name="ce11" table:formula="of:=IF([.H88]&lt;&gt;&quot;&quot;; UPPER(ORG.LIBREOFFICE.REGEX([.H88];&quot;([a-z0-9])([A-Z])&quot;;&quot;$1_$2&quot;;&quot;g&quot;)); &quot;&quot;)" office:value-type="string" office:string-value="CUP1_CHANNEL3_GAIN_HIGH_POINT3" calcext:value-type="string">
            <text:p>CUP1_CHANNEL3_GAIN_HIGH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88]=1; TYPE([.A88])=8); [.A88]+1; IF( OR([.A87]=1; TYPE([.A87])=8); [.A87]+1; 0))" office:value-type="float" office:value="1050" calcext:value-type="float">
            <text:p>105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Cup1Channel3GainHighPoint4</text:p>
          </table:table-cell>
          <table:table-cell table:style-name="ce11" table:formula="of:=IF([.H89]&lt;&gt;&quot;&quot;; UPPER(ORG.LIBREOFFICE.REGEX([.H89];&quot;([a-z0-9])([A-Z])&quot;;&quot;$1_$2&quot;;&quot;g&quot;)); &quot;&quot;)" office:value-type="string" office:string-value="CUP1_CHANNEL3_GAIN_HIGH_POINT4" calcext:value-type="string">
            <text:p>CUP1_CHANNEL3_GAIN_HIGH_POINT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89]=1; TYPE([.A89])=8); [.A89]+1; IF( OR([.A88]=1; TYPE([.A88])=8); [.A88]+1; 0))" office:value-type="float" office:value="1051" calcext:value-type="float">
            <text:p>105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Cup1Channel4GainLowPoint1</text:p>
          </table:table-cell>
          <table:table-cell table:style-name="ce11" table:formula="of:=IF([.H90]&lt;&gt;&quot;&quot;; UPPER(ORG.LIBREOFFICE.REGEX([.H90];&quot;([a-z0-9])([A-Z])&quot;;&quot;$1_$2&quot;;&quot;g&quot;)); &quot;&quot;)" office:value-type="string" office:string-value="CUP1_CHANNEL4_GAIN_LOW_POINT1" calcext:value-type="string">
            <text:p>CUP1_CHANNEL4_GAIN_LOW_POI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1 value when cup 1, channel 4 is selected and calibration current #1 is applied to the input (ADC1 = low-gain signal)</text:p>
          </table:table-cell>
          <table:table-cell table:number-columns-repeated="16372"/>
        </table:table-row>
        <table:table-row table:style-name="ro1">
          <table:table-cell table:style-name="ce3" table:formula="of:=IF( OR([.A90]=1; TYPE([.A90])=8); [.A90]+1; IF( OR([.A89]=1; TYPE([.A89])=8); [.A89]+1; 0))" office:value-type="float" office:value="1052" calcext:value-type="float">
            <text:p>105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up1Channel4GainLowPoint2</text:p>
          </table:table-cell>
          <table:table-cell table:style-name="ce11" table:formula="of:=IF([.H91]&lt;&gt;&quot;&quot;; UPPER(ORG.LIBREOFFICE.REGEX([.H91];&quot;([a-z0-9])([A-Z])&quot;;&quot;$1_$2&quot;;&quot;g&quot;)); &quot;&quot;)" office:value-type="string" office:string-value="CUP1_CHANNEL4_GAIN_LOW_POINT2" calcext:value-type="string">
            <text:p>CUP1_CHANNEL4_GAIN_LOW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91]=1; TYPE([.A91])=8); [.A91]+1; IF( OR([.A90]=1; TYPE([.A90])=8); [.A90]+1; 0))" office:value-type="float" office:value="1053" calcext:value-type="float">
            <text:p>105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Cup1Channel4GainLowPoint3</text:p>
          </table:table-cell>
          <table:table-cell table:style-name="ce11" table:formula="of:=IF([.H92]&lt;&gt;&quot;&quot;; UPPER(ORG.LIBREOFFICE.REGEX([.H92];&quot;([a-z0-9])([A-Z])&quot;;&quot;$1_$2&quot;;&quot;g&quot;)); &quot;&quot;)" office:value-type="string" office:string-value="CUP1_CHANNEL4_GAIN_LOW_POINT3" calcext:value-type="string">
            <text:p>CUP1_CHANNEL4_GAIN_LOW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92]=1; TYPE([.A92])=8); [.A92]+1; IF( OR([.A91]=1; TYPE([.A91])=8); [.A91]+1; 0))" office:value-type="float" office:value="1054" calcext:value-type="float">
            <text:p>105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19" calcext:value-type="float">
            <text:p>1719</text:p>
          </table:table-cell>
          <table:table-cell office:value-type="string" calcext:value-type="string">
            <text:p>Cup1Channel4GainHighPoint2</text:p>
          </table:table-cell>
          <table:table-cell table:style-name="ce11" table:formula="of:=IF([.H93]&lt;&gt;&quot;&quot;; UPPER(ORG.LIBREOFFICE.REGEX([.H93];&quot;([a-z0-9])([A-Z])&quot;;&quot;$1_$2&quot;;&quot;g&quot;)); &quot;&quot;)" office:value-type="string" office:string-value="CUP1_CHANNEL4_GAIN_HIGH_POINT2" calcext:value-type="string">
            <text:p>CUP1_CHANNEL4_GAIN_HIGH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0 value when cup 1, channel 4 is selected and calibration current #1 is applied to the input (ADC0 = high-gain signal)</text:p>
          </table:table-cell>
          <table:table-cell table:number-columns-repeated="16372"/>
        </table:table-row>
        <table:table-row table:style-name="ro1">
          <table:table-cell table:style-name="ce3" table:formula="of:=IF( OR([.A93]=1; TYPE([.A93])=8); [.A93]+1; IF( OR([.A92]=1; TYPE([.A92])=8); [.A92]+1; 0))" office:value-type="float" office:value="1055" calcext:value-type="float">
            <text:p>105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Cup1Channel4GainHighPoint3</text:p>
          </table:table-cell>
          <table:table-cell table:style-name="ce11" table:formula="of:=IF([.H94]&lt;&gt;&quot;&quot;; UPPER(ORG.LIBREOFFICE.REGEX([.H94];&quot;([a-z0-9])([A-Z])&quot;;&quot;$1_$2&quot;;&quot;g&quot;)); &quot;&quot;)" office:value-type="string" office:string-value="CUP1_CHANNEL4_GAIN_HIGH_POINT3" calcext:value-type="string">
            <text:p>CUP1_CHANNEL4_GAIN_HIGH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94]=1; TYPE([.A94])=8); [.A94]+1; IF( OR([.A93]=1; TYPE([.A93])=8); [.A93]+1; 0))" office:value-type="float" office:value="1056" calcext:value-type="float">
            <text:p>105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up1Channel4GainHighPoint4</text:p>
          </table:table-cell>
          <table:table-cell table:style-name="ce11" table:formula="of:=IF([.H95]&lt;&gt;&quot;&quot;; UPPER(ORG.LIBREOFFICE.REGEX([.H95];&quot;([a-z0-9])([A-Z])&quot;;&quot;$1_$2&quot;;&quot;g&quot;)); &quot;&quot;)" office:value-type="string" office:string-value="CUP1_CHANNEL4_GAIN_HIGH_POINT4" calcext:value-type="string">
            <text:p>CUP1_CHANNEL4_GAIN_HIGH_POINT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96]&lt;&gt;&quot;&quot;; UPPER(ORG.LIBREOFFICE.REGEX([.H96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96]=1; TYPE([.A96])=8); [.A96]+1; IF( OR([.A95]=1; TYPE([.A95])=8); [.A95]+1; 0))" office:value-type="float" office:value="1057" calcext:value-type="float">
            <text:p>105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Cup2Channel1GainLowPoint1</text:p>
          </table:table-cell>
          <table:table-cell table:style-name="ce11" table:formula="of:=IF([.H97]&lt;&gt;&quot;&quot;; UPPER(ORG.LIBREOFFICE.REGEX([.H97];&quot;([a-z0-9])([A-Z])&quot;;&quot;$1_$2&quot;;&quot;g&quot;)); &quot;&quot;)" office:value-type="string" office:string-value="CUP2_CHANNEL1_GAIN_LOW_POINT1" calcext:value-type="string">
            <text:p>CUP2_CHANNEL1_GAIN_LOW_POI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1 value when cup 2, channel 1 is selected and calibration current #1 is applied to the input (ADC1 = low-gain signal)</text:p>
          </table:table-cell>
          <table:table-cell table:number-columns-repeated="16372"/>
        </table:table-row>
        <table:table-row table:style-name="ro1">
          <table:table-cell table:style-name="ce3" table:formula="of:=IF( OR([.A97]=1; TYPE([.A97])=8); [.A97]+1; IF( OR([.A96]=1; TYPE([.A96])=8); [.A96]+1; 0))" office:value-type="float" office:value="1058" calcext:value-type="float">
            <text:p>105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up2Channel1GainLowPoint2</text:p>
          </table:table-cell>
          <table:table-cell table:style-name="ce11" table:formula="of:=IF([.H98]&lt;&gt;&quot;&quot;; UPPER(ORG.LIBREOFFICE.REGEX([.H98];&quot;([a-z0-9])([A-Z])&quot;;&quot;$1_$2&quot;;&quot;g&quot;)); &quot;&quot;)" office:value-type="string" office:string-value="CUP2_CHANNEL1_GAIN_LOW_POINT2" calcext:value-type="string">
            <text:p>CUP2_CHANNEL1_GAIN_LOW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98]=1; TYPE([.A98])=8); [.A98]+1; IF( OR([.A97]=1; TYPE([.A97])=8); [.A97]+1; 0))" office:value-type="float" office:value="1059" calcext:value-type="float">
            <text:p>105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up2Channel1GainLowPoint3</text:p>
          </table:table-cell>
          <table:table-cell table:style-name="ce11" table:formula="of:=IF([.H99]&lt;&gt;&quot;&quot;; UPPER(ORG.LIBREOFFICE.REGEX([.H99];&quot;([a-z0-9])([A-Z])&quot;;&quot;$1_$2&quot;;&quot;g&quot;)); &quot;&quot;)" office:value-type="string" office:string-value="CUP2_CHANNEL1_GAIN_LOW_POINT3" calcext:value-type="string">
            <text:p>CUP2_CHANNEL1_GAIN_LOW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99]=1; TYPE([.A99])=8); [.A99]+1; IF( OR([.A98]=1; TYPE([.A98])=8); [.A98]+1; 0))" office:value-type="float" office:value="1060" calcext:value-type="float">
            <text:p>106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Cup2Channel1GainHighPoint2</text:p>
          </table:table-cell>
          <table:table-cell table:style-name="ce11" table:formula="of:=IF([.H100]&lt;&gt;&quot;&quot;; UPPER(ORG.LIBREOFFICE.REGEX([.H100];&quot;([a-z0-9])([A-Z])&quot;;&quot;$1_$2&quot;;&quot;g&quot;)); &quot;&quot;)" office:value-type="string" office:string-value="CUP2_CHANNEL1_GAIN_HIGH_POINT2" calcext:value-type="string">
            <text:p>CUP2_CHANNEL1_GAIN_HIGH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0 value when cup 2, channel 1 is selected and calibration current #1 is applied to the input (ADC0 = high-gain signal)</text:p>
          </table:table-cell>
          <table:table-cell table:number-columns-repeated="16372"/>
        </table:table-row>
        <table:table-row table:style-name="ro1">
          <table:table-cell table:style-name="ce3" table:formula="of:=IF( OR([.A100]=1; TYPE([.A100])=8); [.A100]+1; IF( OR([.A99]=1; TYPE([.A99])=8); [.A99]+1; 0))" office:value-type="float" office:value="1061" calcext:value-type="float">
            <text:p>106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Cup2Channel1GainHighPoint3</text:p>
          </table:table-cell>
          <table:table-cell table:style-name="ce11" table:formula="of:=IF([.H101]&lt;&gt;&quot;&quot;; UPPER(ORG.LIBREOFFICE.REGEX([.H101];&quot;([a-z0-9])([A-Z])&quot;;&quot;$1_$2&quot;;&quot;g&quot;)); &quot;&quot;)" office:value-type="string" office:string-value="CUP2_CHANNEL1_GAIN_HIGH_POINT3" calcext:value-type="string">
            <text:p>CUP2_CHANNEL1_GAIN_HIGH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01]=1; TYPE([.A101])=8); [.A101]+1; IF( OR([.A100]=1; TYPE([.A100])=8); [.A100]+1; 0))" office:value-type="float" office:value="1062" calcext:value-type="float">
            <text:p>106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up2Channel1GainHighPoint4</text:p>
          </table:table-cell>
          <table:table-cell table:style-name="ce11" table:formula="of:=IF([.H102]&lt;&gt;&quot;&quot;; UPPER(ORG.LIBREOFFICE.REGEX([.H102];&quot;([a-z0-9])([A-Z])&quot;;&quot;$1_$2&quot;;&quot;g&quot;)); &quot;&quot;)" office:value-type="string" office:string-value="CUP2_CHANNEL1_GAIN_HIGH_POINT4" calcext:value-type="string">
            <text:p>CUP2_CHANNEL1_GAIN_HIGH_POINT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02]=1; TYPE([.A102])=8); [.A102]+1; IF( OR([.A101]=1; TYPE([.A101])=8); [.A101]+1; 0))" office:value-type="float" office:value="1063" calcext:value-type="float">
            <text:p>106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28" calcext:value-type="float">
            <text:p>1728</text:p>
          </table:table-cell>
          <table:table-cell office:value-type="string" calcext:value-type="string">
            <text:p>Cup2Channel2GainLowPoint1</text:p>
          </table:table-cell>
          <table:table-cell table:style-name="ce11" table:formula="of:=IF([.H103]&lt;&gt;&quot;&quot;; UPPER(ORG.LIBREOFFICE.REGEX([.H103];&quot;([a-z0-9])([A-Z])&quot;;&quot;$1_$2&quot;;&quot;g&quot;)); &quot;&quot;)" office:value-type="string" office:string-value="CUP2_CHANNEL2_GAIN_LOW_POINT1" calcext:value-type="string">
            <text:p>CUP2_CHANNEL2_GAIN_LOW_POI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1 value when cup 2, channel 2 is selected and calibration current #1 is applied to the input (ADC1 = low-gain signal)</text:p>
          </table:table-cell>
          <table:table-cell table:number-columns-repeated="16372"/>
        </table:table-row>
        <table:table-row table:style-name="ro1">
          <table:table-cell table:style-name="ce3" table:formula="of:=IF( OR([.A103]=1; TYPE([.A103])=8); [.A103]+1; IF( OR([.A102]=1; TYPE([.A102])=8); [.A102]+1; 0))" office:value-type="float" office:value="1064" calcext:value-type="float">
            <text:p>106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up2Channel2GainLowPoint2</text:p>
          </table:table-cell>
          <table:table-cell table:style-name="ce11" table:formula="of:=IF([.H104]&lt;&gt;&quot;&quot;; UPPER(ORG.LIBREOFFICE.REGEX([.H104];&quot;([a-z0-9])([A-Z])&quot;;&quot;$1_$2&quot;;&quot;g&quot;)); &quot;&quot;)" office:value-type="string" office:string-value="CUP2_CHANNEL2_GAIN_LOW_POINT2" calcext:value-type="string">
            <text:p>CUP2_CHANNEL2_GAIN_LOW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04]=1; TYPE([.A104])=8); [.A104]+1; IF( OR([.A103]=1; TYPE([.A103])=8); [.A103]+1; 0))" office:value-type="float" office:value="1065" calcext:value-type="float">
            <text:p>106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Cup2Channel2GainLowPoint3</text:p>
          </table:table-cell>
          <table:table-cell table:style-name="ce11" table:formula="of:=IF([.H105]&lt;&gt;&quot;&quot;; UPPER(ORG.LIBREOFFICE.REGEX([.H105];&quot;([a-z0-9])([A-Z])&quot;;&quot;$1_$2&quot;;&quot;g&quot;)); &quot;&quot;)" office:value-type="string" office:string-value="CUP2_CHANNEL2_GAIN_LOW_POINT3" calcext:value-type="string">
            <text:p>CUP2_CHANNEL2_GAIN_LOW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05]=1; TYPE([.A105])=8); [.A105]+1; IF( OR([.A104]=1; TYPE([.A104])=8); [.A104]+1; 0))" office:value-type="float" office:value="1066" calcext:value-type="float">
            <text:p>106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Cup2Channel2GainHighPoint2</text:p>
          </table:table-cell>
          <table:table-cell table:style-name="ce11" table:formula="of:=IF([.H106]&lt;&gt;&quot;&quot;; UPPER(ORG.LIBREOFFICE.REGEX([.H106];&quot;([a-z0-9])([A-Z])&quot;;&quot;$1_$2&quot;;&quot;g&quot;)); &quot;&quot;)" office:value-type="string" office:string-value="CUP2_CHANNEL2_GAIN_HIGH_POINT2" calcext:value-type="string">
            <text:p>CUP2_CHANNEL2_GAIN_HIGH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0 value when cup 2, channel 2 is selected and calibration current #1 is applied to the input (ADC0 = high-gain signal)</text:p>
          </table:table-cell>
          <table:table-cell table:number-columns-repeated="16372"/>
        </table:table-row>
        <table:table-row table:style-name="ro1">
          <table:table-cell table:style-name="ce3" table:formula="of:=IF( OR([.A106]=1; TYPE([.A106])=8); [.A106]+1; IF( OR([.A105]=1; TYPE([.A105])=8); [.A105]+1; 0))" office:value-type="float" office:value="1067" calcext:value-type="float">
            <text:p>106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32" calcext:value-type="float">
            <text:p>1632</text:p>
          </table:table-cell>
          <table:table-cell office:value-type="string" calcext:value-type="string">
            <text:p>Cup2Channel2GainHighPoint3</text:p>
          </table:table-cell>
          <table:table-cell table:style-name="ce11" table:formula="of:=IF([.H107]&lt;&gt;&quot;&quot;; UPPER(ORG.LIBREOFFICE.REGEX([.H107];&quot;([a-z0-9])([A-Z])&quot;;&quot;$1_$2&quot;;&quot;g&quot;)); &quot;&quot;)" office:value-type="string" office:string-value="CUP2_CHANNEL2_GAIN_HIGH_POINT3" calcext:value-type="string">
            <text:p>CUP2_CHANNEL2_GAIN_HIGH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07]=1; TYPE([.A107])=8); [.A107]+1; IF( OR([.A106]=1; TYPE([.A106])=8); [.A106]+1; 0))" office:value-type="float" office:value="1068" calcext:value-type="float">
            <text:p>106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up2Channel2GainHighPoint4</text:p>
          </table:table-cell>
          <table:table-cell table:style-name="ce11" table:formula="of:=IF([.H108]&lt;&gt;&quot;&quot;; UPPER(ORG.LIBREOFFICE.REGEX([.H108];&quot;([a-z0-9])([A-Z])&quot;;&quot;$1_$2&quot;;&quot;g&quot;)); &quot;&quot;)" office:value-type="string" office:string-value="CUP2_CHANNEL2_GAIN_HIGH_POINT4" calcext:value-type="string">
            <text:p>CUP2_CHANNEL2_GAIN_HIGH_POINT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08]=1; TYPE([.A108])=8); [.A108]+1; IF( OR([.A107]=1; TYPE([.A107])=8); [.A107]+1; 0))" office:value-type="float" office:value="1069" calcext:value-type="float">
            <text:p>106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Cup2Channel3GainLowPoint1</text:p>
          </table:table-cell>
          <table:table-cell table:style-name="ce11" table:formula="of:=IF([.H109]&lt;&gt;&quot;&quot;; UPPER(ORG.LIBREOFFICE.REGEX([.H109];&quot;([a-z0-9])([A-Z])&quot;;&quot;$1_$2&quot;;&quot;g&quot;)); &quot;&quot;)" office:value-type="string" office:string-value="CUP2_CHANNEL3_GAIN_LOW_POINT1" calcext:value-type="string">
            <text:p>CUP2_CHANNEL3_GAIN_LOW_POI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1 value when cup 2, channel 3 is selected and calibration current #1 is applied to the input (ADC1 = low-gain signal)</text:p>
          </table:table-cell>
          <table:table-cell table:number-columns-repeated="16372"/>
        </table:table-row>
        <table:table-row table:style-name="ro1">
          <table:table-cell table:style-name="ce3" table:formula="of:=IF( OR([.A109]=1; TYPE([.A109])=8); [.A109]+1; IF( OR([.A108]=1; TYPE([.A108])=8); [.A108]+1; 0))" office:value-type="float" office:value="1070" calcext:value-type="float">
            <text:p>107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Cup2Channel3GainLowPoint2</text:p>
          </table:table-cell>
          <table:table-cell table:style-name="ce11" table:formula="of:=IF([.H110]&lt;&gt;&quot;&quot;; UPPER(ORG.LIBREOFFICE.REGEX([.H110];&quot;([a-z0-9])([A-Z])&quot;;&quot;$1_$2&quot;;&quot;g&quot;)); &quot;&quot;)" office:value-type="string" office:string-value="CUP2_CHANNEL3_GAIN_LOW_POINT2" calcext:value-type="string">
            <text:p>CUP2_CHANNEL3_GAIN_LOW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10]=1; TYPE([.A110])=8); [.A110]+1; IF( OR([.A109]=1; TYPE([.A109])=8); [.A109]+1; 0))" office:value-type="float" office:value="1071" calcext:value-type="float">
            <text:p>107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up2Channel3GainLowPoint3</text:p>
          </table:table-cell>
          <table:table-cell table:style-name="ce11" table:formula="of:=IF([.H111]&lt;&gt;&quot;&quot;; UPPER(ORG.LIBREOFFICE.REGEX([.H111];&quot;([a-z0-9])([A-Z])&quot;;&quot;$1_$2&quot;;&quot;g&quot;)); &quot;&quot;)" office:value-type="string" office:string-value="CUP2_CHANNEL3_GAIN_LOW_POINT3" calcext:value-type="string">
            <text:p>CUP2_CHANNEL3_GAIN_LOW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11]=1; TYPE([.A111])=8); [.A111]+1; IF( OR([.A110]=1; TYPE([.A110])=8); [.A110]+1; 0))" office:value-type="float" office:value="1072" calcext:value-type="float">
            <text:p>107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Cup2Channel3GainHighPoint2</text:p>
          </table:table-cell>
          <table:table-cell table:style-name="ce11" table:formula="of:=IF([.H112]&lt;&gt;&quot;&quot;; UPPER(ORG.LIBREOFFICE.REGEX([.H112];&quot;([a-z0-9])([A-Z])&quot;;&quot;$1_$2&quot;;&quot;g&quot;)); &quot;&quot;)" office:value-type="string" office:string-value="CUP2_CHANNEL3_GAIN_HIGH_POINT2" calcext:value-type="string">
            <text:p>CUP2_CHANNEL3_GAIN_HIGH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0 value when cup 2, channel 3 is selected and calibration current #1 is applied to the input (ADC0 = high-gain signal)</text:p>
          </table:table-cell>
          <table:table-cell table:number-columns-repeated="16372"/>
        </table:table-row>
        <table:table-row table:style-name="ro1">
          <table:table-cell table:style-name="ce3" table:formula="of:=IF( OR([.A112]=1; TYPE([.A112])=8); [.A112]+1; IF( OR([.A111]=1; TYPE([.A111])=8); [.A111]+1; 0))" office:value-type="float" office:value="1073" calcext:value-type="float">
            <text:p>107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558" calcext:value-type="float">
            <text:p>1558</text:p>
          </table:table-cell>
          <table:table-cell office:value-type="string" calcext:value-type="string">
            <text:p>Cup2Channel3GainHighPoint3</text:p>
          </table:table-cell>
          <table:table-cell table:style-name="ce11" table:formula="of:=IF([.H113]&lt;&gt;&quot;&quot;; UPPER(ORG.LIBREOFFICE.REGEX([.H113];&quot;([a-z0-9])([A-Z])&quot;;&quot;$1_$2&quot;;&quot;g&quot;)); &quot;&quot;)" office:value-type="string" office:string-value="CUP2_CHANNEL3_GAIN_HIGH_POINT3" calcext:value-type="string">
            <text:p>CUP2_CHANNEL3_GAIN_HIGH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13]=1; TYPE([.A113])=8); [.A113]+1; IF( OR([.A112]=1; TYPE([.A112])=8); [.A112]+1; 0))" office:value-type="float" office:value="1074" calcext:value-type="float">
            <text:p>107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up2Channel3GainHighPoint4</text:p>
          </table:table-cell>
          <table:table-cell table:style-name="ce11" table:formula="of:=IF([.H114]&lt;&gt;&quot;&quot;; UPPER(ORG.LIBREOFFICE.REGEX([.H114];&quot;([a-z0-9])([A-Z])&quot;;&quot;$1_$2&quot;;&quot;g&quot;)); &quot;&quot;)" office:value-type="string" office:string-value="CUP2_CHANNEL3_GAIN_HIGH_POINT4" calcext:value-type="string">
            <text:p>CUP2_CHANNEL3_GAIN_HIGH_POINT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14]=1; TYPE([.A114])=8); [.A114]+1; IF( OR([.A113]=1; TYPE([.A113])=8); [.A113]+1; 0))" office:value-type="float" office:value="1075" calcext:value-type="float">
            <text:p>107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Cup2Channel4GainLowPoint1</text:p>
          </table:table-cell>
          <table:table-cell table:style-name="ce11" table:formula="of:=IF([.H115]&lt;&gt;&quot;&quot;; UPPER(ORG.LIBREOFFICE.REGEX([.H115];&quot;([a-z0-9])([A-Z])&quot;;&quot;$1_$2&quot;;&quot;g&quot;)); &quot;&quot;)" office:value-type="string" office:string-value="CUP2_CHANNEL4_GAIN_LOW_POINT1" calcext:value-type="string">
            <text:p>CUP2_CHANNEL4_GAIN_LOW_POI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1 value when cup 2, channel 4 is selected and calibration current #1 is applied to the input (ADC1 = low-gain signal)</text:p>
          </table:table-cell>
          <table:table-cell table:number-columns-repeated="16372"/>
        </table:table-row>
        <table:table-row table:style-name="ro1">
          <table:table-cell table:style-name="ce3" table:formula="of:=IF( OR([.A115]=1; TYPE([.A115])=8); [.A115]+1; IF( OR([.A114]=1; TYPE([.A114])=8); [.A114]+1; 0))" office:value-type="float" office:value="1076" calcext:value-type="float">
            <text:p>107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Cup2Channel4GainLowPoint2</text:p>
          </table:table-cell>
          <table:table-cell table:style-name="ce11" table:formula="of:=IF([.H116]&lt;&gt;&quot;&quot;; UPPER(ORG.LIBREOFFICE.REGEX([.H116];&quot;([a-z0-9])([A-Z])&quot;;&quot;$1_$2&quot;;&quot;g&quot;)); &quot;&quot;)" office:value-type="string" office:string-value="CUP2_CHANNEL4_GAIN_LOW_POINT2" calcext:value-type="string">
            <text:p>CUP2_CHANNEL4_GAIN_LOW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16]=1; TYPE([.A116])=8); [.A116]+1; IF( OR([.A115]=1; TYPE([.A115])=8); [.A115]+1; 0))" office:value-type="float" office:value="1077" calcext:value-type="float">
            <text:p>107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Cup2Channel4GainLowPoint3</text:p>
          </table:table-cell>
          <table:table-cell table:style-name="ce11" table:formula="of:=IF([.H117]&lt;&gt;&quot;&quot;; UPPER(ORG.LIBREOFFICE.REGEX([.H117];&quot;([a-z0-9])([A-Z])&quot;;&quot;$1_$2&quot;;&quot;g&quot;)); &quot;&quot;)" office:value-type="string" office:string-value="CUP2_CHANNEL4_GAIN_LOW_POINT3" calcext:value-type="string">
            <text:p>CUP2_CHANNEL4_GAIN_LOW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17]=1; TYPE([.A117])=8); [.A117]+1; IF( OR([.A116]=1; TYPE([.A116])=8); [.A116]+1; 0))" office:value-type="float" office:value="1078" calcext:value-type="float">
            <text:p>107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Cup2Channel4GainHighPoint2</text:p>
          </table:table-cell>
          <table:table-cell table:style-name="ce11" table:formula="of:=IF([.H118]&lt;&gt;&quot;&quot;; UPPER(ORG.LIBREOFFICE.REGEX([.H118];&quot;([a-z0-9])([A-Z])&quot;;&quot;$1_$2&quot;;&quot;g&quot;)); &quot;&quot;)" office:value-type="string" office:string-value="CUP2_CHANNEL4_GAIN_HIGH_POINT2" calcext:value-type="string">
            <text:p>CUP2_CHANNEL4_GAIN_HIGH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0 value when cup 2, channel 4 is selected and calibration current #1 is applied to the input (ADC0 = high-gain signal)</text:p>
          </table:table-cell>
          <table:table-cell table:number-columns-repeated="16372"/>
        </table:table-row>
        <table:table-row table:style-name="ro1">
          <table:table-cell table:style-name="ce3" table:formula="of:=IF( OR([.A118]=1; TYPE([.A118])=8); [.A118]+1; IF( OR([.A117]=1; TYPE([.A117])=8); [.A117]+1; 0))" office:value-type="float" office:value="1079" calcext:value-type="float">
            <text:p>107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Cup2Channel4GainHighPoint3</text:p>
          </table:table-cell>
          <table:table-cell table:style-name="ce11" table:formula="of:=IF([.H119]&lt;&gt;&quot;&quot;; UPPER(ORG.LIBREOFFICE.REGEX([.H119];&quot;([a-z0-9])([A-Z])&quot;;&quot;$1_$2&quot;;&quot;g&quot;)); &quot;&quot;)" office:value-type="string" office:string-value="CUP2_CHANNEL4_GAIN_HIGH_POINT3" calcext:value-type="string">
            <text:p>CUP2_CHANNEL4_GAIN_HIGH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19]=1; TYPE([.A119])=8); [.A119]+1; IF( OR([.A118]=1; TYPE([.A118])=8); [.A118]+1; 0))" office:value-type="float" office:value="1080" calcext:value-type="float">
            <text:p>108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Cup2Channel4GainHighPoint4</text:p>
          </table:table-cell>
          <table:table-cell table:style-name="ce11" table:formula="of:=IF([.H120]&lt;&gt;&quot;&quot;; UPPER(ORG.LIBREOFFICE.REGEX([.H120];&quot;([a-z0-9])([A-Z])&quot;;&quot;$1_$2&quot;;&quot;g&quot;)); &quot;&quot;)" office:value-type="string" office:string-value="CUP2_CHANNEL4_GAIN_HIGH_POINT4" calcext:value-type="string">
            <text:p>CUP2_CHANNEL4_GAIN_HIGH_POINT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21]=1; TYPE([.A121])=8); [.A121]+1; IF( OR([.A120]=1; TYPE([.A120])=8); [.A120]+1; 0))" office:value-type="float" office:value="1081" calcext:value-type="float">
            <text:p>108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Cup3Channel1GainLowPoint1</text:p>
          </table:table-cell>
          <table:table-cell table:style-name="ce11" table:formula="of:=IF([.H122]&lt;&gt;&quot;&quot;; UPPER(ORG.LIBREOFFICE.REGEX([.H122];&quot;([a-z0-9])([A-Z])&quot;;&quot;$1_$2&quot;;&quot;g&quot;)); &quot;&quot;)" office:value-type="string" office:string-value="CUP3_CHANNEL1_GAIN_LOW_POINT1" calcext:value-type="string">
            <text:p>CUP3_CHANNEL1_GAIN_LOW_POI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1 value when cup 3, channel 1 is selected and calibration current #1 is applied to the input (ADC1 = low-gain signal)</text:p>
          </table:table-cell>
          <table:table-cell table:number-columns-repeated="16372"/>
        </table:table-row>
        <table:table-row table:style-name="ro1">
          <table:table-cell table:style-name="ce3" table:formula="of:=IF( OR([.A122]=1; TYPE([.A122])=8); [.A122]+1; IF( OR([.A121]=1; TYPE([.A121])=8); [.A121]+1; 0))" office:value-type="float" office:value="1082" calcext:value-type="float">
            <text:p>108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Cup3Channel1GainLowPoint2</text:p>
          </table:table-cell>
          <table:table-cell table:style-name="ce11" table:formula="of:=IF([.H123]&lt;&gt;&quot;&quot;; UPPER(ORG.LIBREOFFICE.REGEX([.H123];&quot;([a-z0-9])([A-Z])&quot;;&quot;$1_$2&quot;;&quot;g&quot;)); &quot;&quot;)" office:value-type="string" office:string-value="CUP3_CHANNEL1_GAIN_LOW_POINT2" calcext:value-type="string">
            <text:p>CUP3_CHANNEL1_GAIN_LOW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23]=1; TYPE([.A123])=8); [.A123]+1; IF( OR([.A122]=1; TYPE([.A122])=8); [.A122]+1; 0))" office:value-type="float" office:value="1083" calcext:value-type="float">
            <text:p>108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up3Channel1GainLowPoint3</text:p>
          </table:table-cell>
          <table:table-cell table:style-name="ce11" table:formula="of:=IF([.H124]&lt;&gt;&quot;&quot;; UPPER(ORG.LIBREOFFICE.REGEX([.H124];&quot;([a-z0-9])([A-Z])&quot;;&quot;$1_$2&quot;;&quot;g&quot;)); &quot;&quot;)" office:value-type="string" office:string-value="CUP3_CHANNEL1_GAIN_LOW_POINT3" calcext:value-type="string">
            <text:p>CUP3_CHANNEL1_GAIN_LOW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24]=1; TYPE([.A124])=8); [.A124]+1; IF( OR([.A123]=1; TYPE([.A123])=8); [.A123]+1; 0))" office:value-type="float" office:value="1084" calcext:value-type="float">
            <text:p>108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51" calcext:value-type="float">
            <text:p>1751</text:p>
          </table:table-cell>
          <table:table-cell office:value-type="string" calcext:value-type="string">
            <text:p>Cup3Channel1GainHighPoint2</text:p>
          </table:table-cell>
          <table:table-cell table:style-name="ce11" table:formula="of:=IF([.H125]&lt;&gt;&quot;&quot;; UPPER(ORG.LIBREOFFICE.REGEX([.H125];&quot;([a-z0-9])([A-Z])&quot;;&quot;$1_$2&quot;;&quot;g&quot;)); &quot;&quot;)" office:value-type="string" office:string-value="CUP3_CHANNEL1_GAIN_HIGH_POINT2" calcext:value-type="string">
            <text:p>CUP3_CHANNEL1_GAIN_HIGH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0 value when cup 3, channel 1 is selected and calibration current #1 is applied to the input (ADC0 = high-gain signal)</text:p>
          </table:table-cell>
          <table:table-cell table:number-columns-repeated="16372"/>
        </table:table-row>
        <table:table-row table:style-name="ro1">
          <table:table-cell table:style-name="ce3" table:formula="of:=IF( OR([.A125]=1; TYPE([.A125])=8); [.A125]+1; IF( OR([.A124]=1; TYPE([.A124])=8); [.A124]+1; 0))" office:value-type="float" office:value="1085" calcext:value-type="float">
            <text:p>108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Cup3Channel1GainHighPoint3</text:p>
          </table:table-cell>
          <table:table-cell table:style-name="ce11" table:formula="of:=IF([.H126]&lt;&gt;&quot;&quot;; UPPER(ORG.LIBREOFFICE.REGEX([.H126];&quot;([a-z0-9])([A-Z])&quot;;&quot;$1_$2&quot;;&quot;g&quot;)); &quot;&quot;)" office:value-type="string" office:string-value="CUP3_CHANNEL1_GAIN_HIGH_POINT3" calcext:value-type="string">
            <text:p>CUP3_CHANNEL1_GAIN_HIGH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26]=1; TYPE([.A126])=8); [.A126]+1; IF( OR([.A125]=1; TYPE([.A125])=8); [.A125]+1; 0))" office:value-type="float" office:value="1086" calcext:value-type="float">
            <text:p>108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up3Channel1GainHighPoint4</text:p>
          </table:table-cell>
          <table:table-cell table:style-name="ce11" table:formula="of:=IF([.H127]&lt;&gt;&quot;&quot;; UPPER(ORG.LIBREOFFICE.REGEX([.H127];&quot;([a-z0-9])([A-Z])&quot;;&quot;$1_$2&quot;;&quot;g&quot;)); &quot;&quot;)" office:value-type="string" office:string-value="CUP3_CHANNEL1_GAIN_HIGH_POINT4" calcext:value-type="string">
            <text:p>CUP3_CHANNEL1_GAIN_HIGH_POINT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27]=1; TYPE([.A127])=8); [.A127]+1; IF( OR([.A126]=1; TYPE([.A126])=8); [.A126]+1; 0))" office:value-type="float" office:value="1087" calcext:value-type="float">
            <text:p>108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Cup3Channel2GainLowPoint1</text:p>
          </table:table-cell>
          <table:table-cell table:style-name="ce11" table:formula="of:=IF([.H128]&lt;&gt;&quot;&quot;; UPPER(ORG.LIBREOFFICE.REGEX([.H128];&quot;([a-z0-9])([A-Z])&quot;;&quot;$1_$2&quot;;&quot;g&quot;)); &quot;&quot;)" office:value-type="string" office:string-value="CUP3_CHANNEL2_GAIN_LOW_POINT1" calcext:value-type="string">
            <text:p>CUP3_CHANNEL2_GAIN_LOW_POI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1 value when cup 3, channel 2 is selected and calibration current #1 is applied to the input (ADC1 = low-gain signal)</text:p>
          </table:table-cell>
          <table:table-cell table:number-columns-repeated="16372"/>
        </table:table-row>
        <table:table-row table:style-name="ro1">
          <table:table-cell table:style-name="ce3" table:formula="of:=IF( OR([.A128]=1; TYPE([.A128])=8); [.A128]+1; IF( OR([.A127]=1; TYPE([.A127])=8); [.A127]+1; 0))" office:value-type="float" office:value="1088" calcext:value-type="float">
            <text:p>108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Cup3Channel2GainLowPoint2</text:p>
          </table:table-cell>
          <table:table-cell table:style-name="ce11" table:formula="of:=IF([.H129]&lt;&gt;&quot;&quot;; UPPER(ORG.LIBREOFFICE.REGEX([.H129];&quot;([a-z0-9])([A-Z])&quot;;&quot;$1_$2&quot;;&quot;g&quot;)); &quot;&quot;)" office:value-type="string" office:string-value="CUP3_CHANNEL2_GAIN_LOW_POINT2" calcext:value-type="string">
            <text:p>CUP3_CHANNEL2_GAIN_LOW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29]=1; TYPE([.A129])=8); [.A129]+1; IF( OR([.A128]=1; TYPE([.A128])=8); [.A128]+1; 0))" office:value-type="float" office:value="1089" calcext:value-type="float">
            <text:p>108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Cup3Channel2GainLowPoint3</text:p>
          </table:table-cell>
          <table:table-cell table:style-name="ce11" table:formula="of:=IF([.H130]&lt;&gt;&quot;&quot;; UPPER(ORG.LIBREOFFICE.REGEX([.H130];&quot;([a-z0-9])([A-Z])&quot;;&quot;$1_$2&quot;;&quot;g&quot;)); &quot;&quot;)" office:value-type="string" office:string-value="CUP3_CHANNEL2_GAIN_LOW_POINT3" calcext:value-type="string">
            <text:p>CUP3_CHANNEL2_GAIN_LOW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30]=1; TYPE([.A130])=8); [.A130]+1; IF( OR([.A129]=1; TYPE([.A129])=8); [.A129]+1; 0))" office:value-type="float" office:value="1090" calcext:value-type="float">
            <text:p>109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Cup3Channel2GainHighPoint2</text:p>
          </table:table-cell>
          <table:table-cell table:style-name="ce11" table:formula="of:=IF([.H131]&lt;&gt;&quot;&quot;; UPPER(ORG.LIBREOFFICE.REGEX([.H131];&quot;([a-z0-9])([A-Z])&quot;;&quot;$1_$2&quot;;&quot;g&quot;)); &quot;&quot;)" office:value-type="string" office:string-value="CUP3_CHANNEL2_GAIN_HIGH_POINT2" calcext:value-type="string">
            <text:p>CUP3_CHANNEL2_GAIN_HIGH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0 value when cup 3, channel 2 is selected and calibration current #1 is applied to the input (ADC0 = high-gain signal)</text:p>
          </table:table-cell>
          <table:table-cell table:number-columns-repeated="16372"/>
        </table:table-row>
        <table:table-row table:style-name="ro1">
          <table:table-cell table:style-name="ce3" table:formula="of:=IF( OR([.A131]=1; TYPE([.A131])=8); [.A131]+1; IF( OR([.A130]=1; TYPE([.A130])=8); [.A130]+1; 0))" office:value-type="float" office:value="1091" calcext:value-type="float">
            <text:p>109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Cup3Channel2GainHighPoint3</text:p>
          </table:table-cell>
          <table:table-cell table:style-name="ce11" table:formula="of:=IF([.H132]&lt;&gt;&quot;&quot;; UPPER(ORG.LIBREOFFICE.REGEX([.H132];&quot;([a-z0-9])([A-Z])&quot;;&quot;$1_$2&quot;;&quot;g&quot;)); &quot;&quot;)" office:value-type="string" office:string-value="CUP3_CHANNEL2_GAIN_HIGH_POINT3" calcext:value-type="string">
            <text:p>CUP3_CHANNEL2_GAIN_HIGH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32]=1; TYPE([.A132])=8); [.A132]+1; IF( OR([.A131]=1; TYPE([.A131])=8); [.A131]+1; 0))" office:value-type="float" office:value="1092" calcext:value-type="float">
            <text:p>109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up3Channel2GainHighPoint4</text:p>
          </table:table-cell>
          <table:table-cell table:style-name="ce11" table:formula="of:=IF([.H133]&lt;&gt;&quot;&quot;; UPPER(ORG.LIBREOFFICE.REGEX([.H133];&quot;([a-z0-9])([A-Z])&quot;;&quot;$1_$2&quot;;&quot;g&quot;)); &quot;&quot;)" office:value-type="string" office:string-value="CUP3_CHANNEL2_GAIN_HIGH_POINT4" calcext:value-type="string">
            <text:p>CUP3_CHANNEL2_GAIN_HIGH_POINT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33]=1; TYPE([.A133])=8); [.A133]+1; IF( OR([.A132]=1; TYPE([.A132])=8); [.A132]+1; 0))" office:value-type="float" office:value="1093" calcext:value-type="float">
            <text:p>109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Cup3Channel3GainLowPoint1</text:p>
          </table:table-cell>
          <table:table-cell table:style-name="ce11" table:formula="of:=IF([.H134]&lt;&gt;&quot;&quot;; UPPER(ORG.LIBREOFFICE.REGEX([.H134];&quot;([a-z0-9])([A-Z])&quot;;&quot;$1_$2&quot;;&quot;g&quot;)); &quot;&quot;)" office:value-type="string" office:string-value="CUP3_CHANNEL3_GAIN_LOW_POINT1" calcext:value-type="string">
            <text:p>CUP3_CHANNEL3_GAIN_LOW_POI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1 value when cup 3, channel 3 is selected and calibration current #1 is applied to the input (ADC1 = low-gain signal)</text:p>
          </table:table-cell>
          <table:table-cell table:number-columns-repeated="16372"/>
        </table:table-row>
        <table:table-row table:style-name="ro1">
          <table:table-cell table:style-name="ce3" table:formula="of:=IF( OR([.A134]=1; TYPE([.A134])=8); [.A134]+1; IF( OR([.A133]=1; TYPE([.A133])=8); [.A133]+1; 0))" office:value-type="float" office:value="1094" calcext:value-type="float">
            <text:p>109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up3Channel3GainLowPoint2</text:p>
          </table:table-cell>
          <table:table-cell table:style-name="ce11" table:formula="of:=IF([.H135]&lt;&gt;&quot;&quot;; UPPER(ORG.LIBREOFFICE.REGEX([.H135];&quot;([a-z0-9])([A-Z])&quot;;&quot;$1_$2&quot;;&quot;g&quot;)); &quot;&quot;)" office:value-type="string" office:string-value="CUP3_CHANNEL3_GAIN_LOW_POINT2" calcext:value-type="string">
            <text:p>CUP3_CHANNEL3_GAIN_LOW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35]=1; TYPE([.A135])=8); [.A135]+1; IF( OR([.A134]=1; TYPE([.A134])=8); [.A134]+1; 0))" office:value-type="float" office:value="1095" calcext:value-type="float">
            <text:p>109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up3Channel3GainLowPoint3</text:p>
          </table:table-cell>
          <table:table-cell table:style-name="ce11" table:formula="of:=IF([.H136]&lt;&gt;&quot;&quot;; UPPER(ORG.LIBREOFFICE.REGEX([.H136];&quot;([a-z0-9])([A-Z])&quot;;&quot;$1_$2&quot;;&quot;g&quot;)); &quot;&quot;)" office:value-type="string" office:string-value="CUP3_CHANNEL3_GAIN_LOW_POINT3" calcext:value-type="string">
            <text:p>CUP3_CHANNEL3_GAIN_LOW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36]=1; TYPE([.A136])=8); [.A136]+1; IF( OR([.A135]=1; TYPE([.A135])=8); [.A135]+1; 0))" office:value-type="float" office:value="1096" calcext:value-type="float">
            <text:p>109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Cup3Channel3GainHighPoint2</text:p>
          </table:table-cell>
          <table:table-cell table:style-name="ce11" table:formula="of:=IF([.H137]&lt;&gt;&quot;&quot;; UPPER(ORG.LIBREOFFICE.REGEX([.H137];&quot;([a-z0-9])([A-Z])&quot;;&quot;$1_$2&quot;;&quot;g&quot;)); &quot;&quot;)" office:value-type="string" office:string-value="CUP3_CHANNEL3_GAIN_HIGH_POINT2" calcext:value-type="string">
            <text:p>CUP3_CHANNEL3_GAIN_HIGH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0 value when cup 3, channel 3 is selected and calibration current #1 is applied to the input (ADC0 = high-gain signal)</text:p>
          </table:table-cell>
          <table:table-cell table:number-columns-repeated="16372"/>
        </table:table-row>
        <table:table-row table:style-name="ro1">
          <table:table-cell table:style-name="ce3" table:formula="of:=IF( OR([.A137]=1; TYPE([.A137])=8); [.A137]+1; IF( OR([.A136]=1; TYPE([.A136])=8); [.A136]+1; 0))" office:value-type="float" office:value="1097" calcext:value-type="float">
            <text:p>109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Cup3Channel3GainHighPoint3</text:p>
          </table:table-cell>
          <table:table-cell table:style-name="ce11" table:formula="of:=IF([.H138]&lt;&gt;&quot;&quot;; UPPER(ORG.LIBREOFFICE.REGEX([.H138];&quot;([a-z0-9])([A-Z])&quot;;&quot;$1_$2&quot;;&quot;g&quot;)); &quot;&quot;)" office:value-type="string" office:string-value="CUP3_CHANNEL3_GAIN_HIGH_POINT3" calcext:value-type="string">
            <text:p>CUP3_CHANNEL3_GAIN_HIGH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38]=1; TYPE([.A138])=8); [.A138]+1; IF( OR([.A137]=1; TYPE([.A137])=8); [.A137]+1; 0))" office:value-type="float" office:value="1098" calcext:value-type="float">
            <text:p>109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up3Channel3GainHighPoint4</text:p>
          </table:table-cell>
          <table:table-cell table:style-name="ce11" table:formula="of:=IF([.H139]&lt;&gt;&quot;&quot;; UPPER(ORG.LIBREOFFICE.REGEX([.H139];&quot;([a-z0-9])([A-Z])&quot;;&quot;$1_$2&quot;;&quot;g&quot;)); &quot;&quot;)" office:value-type="string" office:string-value="CUP3_CHANNEL3_GAIN_HIGH_POINT4" calcext:value-type="string">
            <text:p>CUP3_CHANNEL3_GAIN_HIGH_POINT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39]=1; TYPE([.A139])=8); [.A139]+1; IF( OR([.A138]=1; TYPE([.A138])=8); [.A138]+1; 0))" office:value-type="float" office:value="1099" calcext:value-type="float">
            <text:p>109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Cup3Channel4GainLowPoint1</text:p>
          </table:table-cell>
          <table:table-cell table:style-name="ce11" table:formula="of:=IF([.H140]&lt;&gt;&quot;&quot;; UPPER(ORG.LIBREOFFICE.REGEX([.H140];&quot;([a-z0-9])([A-Z])&quot;;&quot;$1_$2&quot;;&quot;g&quot;)); &quot;&quot;)" office:value-type="string" office:string-value="CUP3_CHANNEL4_GAIN_LOW_POINT1" calcext:value-type="string">
            <text:p>CUP3_CHANNEL4_GAIN_LOW_POI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1 value when cup 3, channel 4 is selected and calibration current #1 is applied to the input (ADC1 = low-gain signal)</text:p>
          </table:table-cell>
          <table:table-cell table:number-columns-repeated="16372"/>
        </table:table-row>
        <table:table-row table:style-name="ro1">
          <table:table-cell table:style-name="ce3" table:formula="of:=IF( OR([.A140]=1; TYPE([.A140])=8); [.A140]+1; IF( OR([.A139]=1; TYPE([.A139])=8); [.A139]+1; 0))" office:value-type="float" office:value="1100" calcext:value-type="float">
            <text:p>110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Cup3Channel4GainLowPoint2</text:p>
          </table:table-cell>
          <table:table-cell table:style-name="ce11" table:formula="of:=IF([.H141]&lt;&gt;&quot;&quot;; UPPER(ORG.LIBREOFFICE.REGEX([.H141];&quot;([a-z0-9])([A-Z])&quot;;&quot;$1_$2&quot;;&quot;g&quot;)); &quot;&quot;)" office:value-type="string" office:string-value="CUP3_CHANNEL4_GAIN_LOW_POINT2" calcext:value-type="string">
            <text:p>CUP3_CHANNEL4_GAIN_LOW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41]=1; TYPE([.A141])=8); [.A141]+1; IF( OR([.A140]=1; TYPE([.A140])=8); [.A140]+1; 0))" office:value-type="float" office:value="1101" calcext:value-type="float">
            <text:p>110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Cup3Channel4GainLowPoint3</text:p>
          </table:table-cell>
          <table:table-cell table:style-name="ce11" table:formula="of:=IF([.H142]&lt;&gt;&quot;&quot;; UPPER(ORG.LIBREOFFICE.REGEX([.H142];&quot;([a-z0-9])([A-Z])&quot;;&quot;$1_$2&quot;;&quot;g&quot;)); &quot;&quot;)" office:value-type="string" office:string-value="CUP3_CHANNEL4_GAIN_LOW_POINT3" calcext:value-type="string">
            <text:p>CUP3_CHANNEL4_GAIN_LOW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42]=1; TYPE([.A142])=8); [.A142]+1; IF( OR([.A141]=1; TYPE([.A141])=8); [.A141]+1; 0))" office:value-type="float" office:value="1102" calcext:value-type="float">
            <text:p>110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Cup3Channel4GainHighPoint2</text:p>
          </table:table-cell>
          <table:table-cell table:style-name="ce11" table:formula="of:=IF([.H143]&lt;&gt;&quot;&quot;; UPPER(ORG.LIBREOFFICE.REGEX([.H143];&quot;([a-z0-9])([A-Z])&quot;;&quot;$1_$2&quot;;&quot;g&quot;)); &quot;&quot;)" office:value-type="string" office:string-value="CUP3_CHANNEL4_GAIN_HIGH_POINT2" calcext:value-type="string">
            <text:p>CUP3_CHANNEL4_GAIN_HIGH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0 value when cup 3, channel 4 is selected and calibration current #1 is applied to the input (ADC0 = high-gain signal)</text:p>
          </table:table-cell>
          <table:table-cell table:number-columns-repeated="16372"/>
        </table:table-row>
        <table:table-row table:style-name="ro1">
          <table:table-cell table:style-name="ce3" table:formula="of:=IF( OR([.A143]=1; TYPE([.A143])=8); [.A143]+1; IF( OR([.A142]=1; TYPE([.A142])=8); [.A142]+1; 0))" office:value-type="float" office:value="1103" calcext:value-type="float">
            <text:p>110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Cup3Channel4GainHighPoint3</text:p>
          </table:table-cell>
          <table:table-cell table:style-name="ce11" table:formula="of:=IF([.H144]&lt;&gt;&quot;&quot;; UPPER(ORG.LIBREOFFICE.REGEX([.H144];&quot;([a-z0-9])([A-Z])&quot;;&quot;$1_$2&quot;;&quot;g&quot;)); &quot;&quot;)" office:value-type="string" office:string-value="CUP3_CHANNEL4_GAIN_HIGH_POINT3" calcext:value-type="string">
            <text:p>CUP3_CHANNEL4_GAIN_HIGH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44]=1; TYPE([.A144])=8); [.A144]+1; IF( OR([.A143]=1; TYPE([.A143])=8); [.A143]+1; 0))" office:value-type="float" office:value="1104" calcext:value-type="float">
            <text:p>110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up3Channel4GainHighPoint4</text:p>
          </table:table-cell>
          <table:table-cell table:style-name="ce11" table:formula="of:=IF([.H145]&lt;&gt;&quot;&quot;; UPPER(ORG.LIBREOFFICE.REGEX([.H145];&quot;([a-z0-9])([A-Z])&quot;;&quot;$1_$2&quot;;&quot;g&quot;)); &quot;&quot;)" office:value-type="string" office:string-value="CUP3_CHANNEL4_GAIN_HIGH_POINT4" calcext:value-type="string">
            <text:p>CUP3_CHANNEL4_GAIN_HIGH_POINT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46]=1; TYPE([.A146])=8); [.A146]+1; IF( OR([.A145]=1; TYPE([.A145])=8); [.A145]+1; 0))" office:value-type="float" office:value="1105" calcext:value-type="float">
            <text:p>110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LowerLimit</text:p>
          </table:table-cell>
          <table:table-cell table:style-name="ce11" table:formula="of:=IF([.H147]&lt;&gt;&quot;&quot;; UPPER(ORG.LIBREOFFICE.REGEX([.H147];&quot;([a-z0-9])([A-Z])&quot;;&quot;$1_$2&quot;;&quot;g&quot;)); &quot;&quot;)" office:value-type="string" office:string-value="CUP1_CHANNEL1_LOWER_LIMIT" calcext:value-type="string">
            <text:p>CUP1_CHANNEL1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47]=1; TYPE([.A147])=8); [.A147]+1; IF( OR([.A146]=1; TYPE([.A146])=8); [.A146]+1; 0))" office:value-type="float" office:value="1106" calcext:value-type="float">
            <text:p>110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LowerLimit</text:p>
          </table:table-cell>
          <table:table-cell table:style-name="ce11" table:formula="of:=IF([.H148]&lt;&gt;&quot;&quot;; UPPER(ORG.LIBREOFFICE.REGEX([.H148];&quot;([a-z0-9])([A-Z])&quot;;&quot;$1_$2&quot;;&quot;g&quot;)); &quot;&quot;)" office:value-type="string" office:string-value="CUP1_CHANNEL2_LOWER_LIMIT" calcext:value-type="string">
            <text:p>CUP1_CHANNEL2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48]=1; TYPE([.A148])=8); [.A148]+1; IF( OR([.A147]=1; TYPE([.A147])=8); [.A147]+1; 0))" office:value-type="float" office:value="1107" calcext:value-type="float">
            <text:p>110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LowerLimit</text:p>
          </table:table-cell>
          <table:table-cell table:style-name="ce11" table:formula="of:=IF([.H149]&lt;&gt;&quot;&quot;; UPPER(ORG.LIBREOFFICE.REGEX([.H149];&quot;([a-z0-9])([A-Z])&quot;;&quot;$1_$2&quot;;&quot;g&quot;)); &quot;&quot;)" office:value-type="string" office:string-value="CUP1_CHANNEL3_LOWER_LIMIT" calcext:value-type="string">
            <text:p>CUP1_CHANNEL3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49]=1; TYPE([.A149])=8); [.A149]+1; IF( OR([.A148]=1; TYPE([.A148])=8); [.A148]+1; 0))" office:value-type="float" office:value="1108" calcext:value-type="float">
            <text:p>110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LowerLimit</text:p>
          </table:table-cell>
          <table:table-cell table:style-name="ce11" table:formula="of:=IF([.H150]&lt;&gt;&quot;&quot;; UPPER(ORG.LIBREOFFICE.REGEX([.H150];&quot;([a-z0-9])([A-Z])&quot;;&quot;$1_$2&quot;;&quot;g&quot;)); &quot;&quot;)" office:value-type="string" office:string-value="CUP1_CHANNEL4_LOWER_LIMIT" calcext:value-type="string">
            <text:p>CUP1_CHANNEL4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50]=1; TYPE([.A150])=8); [.A150]+1; IF( OR([.A149]=1; TYPE([.A149])=8); [.A149]+1; 0))" office:value-type="float" office:value="1109" calcext:value-type="float">
            <text:p>110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LowerLimit</text:p>
          </table:table-cell>
          <table:table-cell table:style-name="ce11" table:formula="of:=IF([.H151]&lt;&gt;&quot;&quot;; UPPER(ORG.LIBREOFFICE.REGEX([.H151];&quot;([a-z0-9])([A-Z])&quot;;&quot;$1_$2&quot;;&quot;g&quot;)); &quot;&quot;)" office:value-type="string" office:string-value="CUP2_CHANNEL1_LOWER_LIMIT" calcext:value-type="string">
            <text:p>CUP2_CHANNEL1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51]=1; TYPE([.A151])=8); [.A151]+1; IF( OR([.A150]=1; TYPE([.A150])=8); [.A150]+1; 0))" office:value-type="float" office:value="1110" calcext:value-type="float">
            <text:p>111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LowerLimit</text:p>
          </table:table-cell>
          <table:table-cell table:style-name="ce11" table:formula="of:=IF([.H152]&lt;&gt;&quot;&quot;; UPPER(ORG.LIBREOFFICE.REGEX([.H152];&quot;([a-z0-9])([A-Z])&quot;;&quot;$1_$2&quot;;&quot;g&quot;)); &quot;&quot;)" office:value-type="string" office:string-value="CUP2_CHANNEL2_LOWER_LIMIT" calcext:value-type="string">
            <text:p>CUP2_CHANNEL2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52]=1; TYPE([.A152])=8); [.A152]+1; IF( OR([.A151]=1; TYPE([.A151])=8); [.A151]+1; 0))" office:value-type="float" office:value="1111" calcext:value-type="float">
            <text:p>111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LowerLimit</text:p>
          </table:table-cell>
          <table:table-cell table:style-name="ce11" table:formula="of:=IF([.H153]&lt;&gt;&quot;&quot;; UPPER(ORG.LIBREOFFICE.REGEX([.H153];&quot;([a-z0-9])([A-Z])&quot;;&quot;$1_$2&quot;;&quot;g&quot;)); &quot;&quot;)" office:value-type="string" office:string-value="CUP2_CHANNEL3_LOWER_LIMIT" calcext:value-type="string">
            <text:p>CUP2_CHANNEL3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53]=1; TYPE([.A153])=8); [.A153]+1; IF( OR([.A152]=1; TYPE([.A152])=8); [.A152]+1; 0))" office:value-type="float" office:value="1112" calcext:value-type="float">
            <text:p>111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LowerLimit</text:p>
          </table:table-cell>
          <table:table-cell table:style-name="ce11" table:formula="of:=IF([.H154]&lt;&gt;&quot;&quot;; UPPER(ORG.LIBREOFFICE.REGEX([.H154];&quot;([a-z0-9])([A-Z])&quot;;&quot;$1_$2&quot;;&quot;g&quot;)); &quot;&quot;)" office:value-type="string" office:string-value="CUP2_CHANNEL4_LOWER_LIMIT" calcext:value-type="string">
            <text:p>CUP2_CHANNEL4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54]=1; TYPE([.A154])=8); [.A154]+1; IF( OR([.A153]=1; TYPE([.A153])=8); [.A153]+1; 0))" office:value-type="float" office:value="1113" calcext:value-type="float">
            <text:p>111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LowerLimit</text:p>
          </table:table-cell>
          <table:table-cell table:style-name="ce11" table:formula="of:=IF([.H155]&lt;&gt;&quot;&quot;; UPPER(ORG.LIBREOFFICE.REGEX([.H155];&quot;([a-z0-9])([A-Z])&quot;;&quot;$1_$2&quot;;&quot;g&quot;)); &quot;&quot;)" office:value-type="string" office:string-value="CUP3_CHANNEL1_LOWER_LIMIT" calcext:value-type="string">
            <text:p>CUP3_CHANNEL1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55]=1; TYPE([.A155])=8); [.A155]+1; IF( OR([.A154]=1; TYPE([.A154])=8); [.A154]+1; 0))" office:value-type="float" office:value="1114" calcext:value-type="float">
            <text:p>111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LowerLimit</text:p>
          </table:table-cell>
          <table:table-cell table:style-name="ce11" table:formula="of:=IF([.H156]&lt;&gt;&quot;&quot;; UPPER(ORG.LIBREOFFICE.REGEX([.H156];&quot;([a-z0-9])([A-Z])&quot;;&quot;$1_$2&quot;;&quot;g&quot;)); &quot;&quot;)" office:value-type="string" office:string-value="CUP3_CHANNEL2_LOWER_LIMIT" calcext:value-type="string">
            <text:p>CUP3_CHANNEL2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56]=1; TYPE([.A156])=8); [.A156]+1; IF( OR([.A155]=1; TYPE([.A155])=8); [.A155]+1; 0))" office:value-type="float" office:value="1115" calcext:value-type="float">
            <text:p>111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LowerLimit</text:p>
          </table:table-cell>
          <table:table-cell table:style-name="ce11" table:formula="of:=IF([.H157]&lt;&gt;&quot;&quot;; UPPER(ORG.LIBREOFFICE.REGEX([.H157];&quot;([a-z0-9])([A-Z])&quot;;&quot;$1_$2&quot;;&quot;g&quot;)); &quot;&quot;)" office:value-type="string" office:string-value="CUP3_CHANNEL3_LOWER_LIMIT" calcext:value-type="string">
            <text:p>CUP3_CHANNEL3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57]=1; TYPE([.A157])=8); [.A157]+1; IF( OR([.A156]=1; TYPE([.A156])=8); [.A156]+1; 0))" office:value-type="float" office:value="1116" calcext:value-type="float">
            <text:p>111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LowerLimit</text:p>
          </table:table-cell>
          <table:table-cell table:style-name="ce11" table:formula="of:=IF([.H158]&lt;&gt;&quot;&quot;; UPPER(ORG.LIBREOFFICE.REGEX([.H158];&quot;([a-z0-9])([A-Z])&quot;;&quot;$1_$2&quot;;&quot;g&quot;)); &quot;&quot;)" office:value-type="string" office:string-value="CUP3_CHANNEL4_LOWER_LIMIT" calcext:value-type="string">
            <text:p>CUP3_CHANNEL4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59]&lt;&gt;&quot;&quot;; UPPER(ORG.LIBREOFFICE.REGEX([.H159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59]=1; TYPE([.A159])=8); [.A159]+1; IF( OR([.A158]=1; TYPE([.A158])=8); [.A158]+1; 0))" office:value-type="float" office:value="1117" calcext:value-type="float">
            <text:p>111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1UpperLimit</text:p>
          </table:table-cell>
          <table:table-cell table:style-name="ce11" table:formula="of:=IF([.H160]&lt;&gt;&quot;&quot;; UPPER(ORG.LIBREOFFICE.REGEX([.H160];&quot;([a-z0-9])([A-Z])&quot;;&quot;$1_$2&quot;;&quot;g&quot;)); &quot;&quot;)" office:value-type="string" office:string-value="CUP1_CHANNEL1_UPPER_LIMIT" calcext:value-type="string">
            <text:p>CUP1_CHANNEL1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0]=1; TYPE([.A160])=8); [.A160]+1; IF( OR([.A159]=1; TYPE([.A159])=8); [.A159]+1; 0))" office:value-type="float" office:value="1118" calcext:value-type="float">
            <text:p>111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2UpperLimit</text:p>
          </table:table-cell>
          <table:table-cell table:style-name="ce11" table:formula="of:=IF([.H161]&lt;&gt;&quot;&quot;; UPPER(ORG.LIBREOFFICE.REGEX([.H161];&quot;([a-z0-9])([A-Z])&quot;;&quot;$1_$2&quot;;&quot;g&quot;)); &quot;&quot;)" office:value-type="string" office:string-value="CUP1_CHANNEL2_UPPER_LIMIT" calcext:value-type="string">
            <text:p>CUP1_CHANNEL2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1]=1; TYPE([.A161])=8); [.A161]+1; IF( OR([.A160]=1; TYPE([.A160])=8); [.A160]+1; 0))" office:value-type="float" office:value="1119" calcext:value-type="float">
            <text:p>111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3UpperLimit</text:p>
          </table:table-cell>
          <table:table-cell table:style-name="ce11" table:formula="of:=IF([.H162]&lt;&gt;&quot;&quot;; UPPER(ORG.LIBREOFFICE.REGEX([.H162];&quot;([a-z0-9])([A-Z])&quot;;&quot;$1_$2&quot;;&quot;g&quot;)); &quot;&quot;)" office:value-type="string" office:string-value="CUP1_CHANNEL3_UPPER_LIMIT" calcext:value-type="string">
            <text:p>CUP1_CHANNEL3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2]=1; TYPE([.A162])=8); [.A162]+1; IF( OR([.A161]=1; TYPE([.A161])=8); [.A161]+1; 0))" office:value-type="float" office:value="1120" calcext:value-type="float">
            <text:p>112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4UpperLimit</text:p>
          </table:table-cell>
          <table:table-cell table:style-name="ce11" table:formula="of:=IF([.H163]&lt;&gt;&quot;&quot;; UPPER(ORG.LIBREOFFICE.REGEX([.H163];&quot;([a-z0-9])([A-Z])&quot;;&quot;$1_$2&quot;;&quot;g&quot;)); &quot;&quot;)" office:value-type="string" office:string-value="CUP1_CHANNEL4_UPPER_LIMIT" calcext:value-type="string">
            <text:p>CUP1_CHANNEL4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3]=1; TYPE([.A163])=8); [.A163]+1; IF( OR([.A162]=1; TYPE([.A162])=8); [.A162]+1; 0))" office:value-type="float" office:value="1121" calcext:value-type="float">
            <text:p>112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1UpperLimit</text:p>
          </table:table-cell>
          <table:table-cell table:style-name="ce11" table:formula="of:=IF([.H164]&lt;&gt;&quot;&quot;; UPPER(ORG.LIBREOFFICE.REGEX([.H164];&quot;([a-z0-9])([A-Z])&quot;;&quot;$1_$2&quot;;&quot;g&quot;)); &quot;&quot;)" office:value-type="string" office:string-value="CUP2_CHANNEL1_UPPER_LIMIT" calcext:value-type="string">
            <text:p>CUP2_CHANNEL1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4]=1; TYPE([.A164])=8); [.A164]+1; IF( OR([.A163]=1; TYPE([.A163])=8); [.A163]+1; 0))" office:value-type="float" office:value="1122" calcext:value-type="float">
            <text:p>112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2UpperLimit</text:p>
          </table:table-cell>
          <table:table-cell table:style-name="ce11" table:formula="of:=IF([.H165]&lt;&gt;&quot;&quot;; UPPER(ORG.LIBREOFFICE.REGEX([.H165];&quot;([a-z0-9])([A-Z])&quot;;&quot;$1_$2&quot;;&quot;g&quot;)); &quot;&quot;)" office:value-type="string" office:string-value="CUP2_CHANNEL2_UPPER_LIMIT" calcext:value-type="string">
            <text:p>CUP2_CHANNEL2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5]=1; TYPE([.A165])=8); [.A165]+1; IF( OR([.A164]=1; TYPE([.A164])=8); [.A164]+1; 0))" office:value-type="float" office:value="1123" calcext:value-type="float">
            <text:p>112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3UpperLimit</text:p>
          </table:table-cell>
          <table:table-cell table:style-name="ce11" table:formula="of:=IF([.H166]&lt;&gt;&quot;&quot;; UPPER(ORG.LIBREOFFICE.REGEX([.H166];&quot;([a-z0-9])([A-Z])&quot;;&quot;$1_$2&quot;;&quot;g&quot;)); &quot;&quot;)" office:value-type="string" office:string-value="CUP2_CHANNEL3_UPPER_LIMIT" calcext:value-type="string">
            <text:p>CUP2_CHANNEL3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6]=1; TYPE([.A166])=8); [.A166]+1; IF( OR([.A165]=1; TYPE([.A165])=8); [.A165]+1; 0))" office:value-type="float" office:value="1124" calcext:value-type="float">
            <text:p>112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4UpperLimit</text:p>
          </table:table-cell>
          <table:table-cell table:style-name="ce11" table:formula="of:=IF([.H167]&lt;&gt;&quot;&quot;; UPPER(ORG.LIBREOFFICE.REGEX([.H167];&quot;([a-z0-9])([A-Z])&quot;;&quot;$1_$2&quot;;&quot;g&quot;)); &quot;&quot;)" office:value-type="string" office:string-value="CUP2_CHANNEL4_UPPER_LIMIT" calcext:value-type="string">
            <text:p>CUP2_CHANNEL4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7]=1; TYPE([.A167])=8); [.A167]+1; IF( OR([.A166]=1; TYPE([.A166])=8); [.A166]+1; 0))" office:value-type="float" office:value="1125" calcext:value-type="float">
            <text:p>112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1UpperLimit</text:p>
          </table:table-cell>
          <table:table-cell table:style-name="ce11" table:formula="of:=IF([.H168]&lt;&gt;&quot;&quot;; UPPER(ORG.LIBREOFFICE.REGEX([.H168];&quot;([a-z0-9])([A-Z])&quot;;&quot;$1_$2&quot;;&quot;g&quot;)); &quot;&quot;)" office:value-type="string" office:string-value="CUP3_CHANNEL1_UPPER_LIMIT" calcext:value-type="string">
            <text:p>CUP3_CHANNEL1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8]=1; TYPE([.A168])=8); [.A168]+1; IF( OR([.A167]=1; TYPE([.A167])=8); [.A167]+1; 0))" office:value-type="float" office:value="1126" calcext:value-type="float">
            <text:p>112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2UpperLimit</text:p>
          </table:table-cell>
          <table:table-cell table:style-name="ce11" table:formula="of:=IF([.H169]&lt;&gt;&quot;&quot;; UPPER(ORG.LIBREOFFICE.REGEX([.H169];&quot;([a-z0-9])([A-Z])&quot;;&quot;$1_$2&quot;;&quot;g&quot;)); &quot;&quot;)" office:value-type="string" office:string-value="CUP3_CHANNEL2_UPPER_LIMIT" calcext:value-type="string">
            <text:p>CUP3_CHANNEL2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9]=1; TYPE([.A169])=8); [.A169]+1; IF( OR([.A168]=1; TYPE([.A168])=8); [.A168]+1; 0))" office:value-type="float" office:value="1127" calcext:value-type="float">
            <text:p>112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3UpperLimit</text:p>
          </table:table-cell>
          <table:table-cell table:style-name="ce11" table:formula="of:=IF([.H170]&lt;&gt;&quot;&quot;; UPPER(ORG.LIBREOFFICE.REGEX([.H170];&quot;([a-z0-9])([A-Z])&quot;;&quot;$1_$2&quot;;&quot;g&quot;)); &quot;&quot;)" office:value-type="string" office:string-value="CUP3_CHANNEL3_UPPER_LIMIT" calcext:value-type="string">
            <text:p>CUP3_CHANNEL3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70]=1; TYPE([.A170])=8); [.A170]+1; IF( OR([.A169]=1; TYPE([.A169])=8); [.A169]+1; 0))" office:value-type="float" office:value="1128" calcext:value-type="float">
            <text:p>112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4UpperLimit</text:p>
          </table:table-cell>
          <table:table-cell table:style-name="ce11" table:formula="of:=IF([.H171]&lt;&gt;&quot;&quot;; UPPER(ORG.LIBREOFFICE.REGEX([.H171];&quot;([a-z0-9])([A-Z])&quot;;&quot;$1_$2&quot;;&quot;g&quot;)); &quot;&quot;)" office:value-type="string" office:string-value="CUP3_CHANNEL4_UPPER_LIMIT" calcext:value-type="string">
            <text:p>CUP3_CHANNEL4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72]&lt;&gt;&quot;&quot;; UPPER(ORG.LIBREOFFICE.REGEX([.H172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2]=1; TYPE([.A172])=8); [.A172]+1; IF( OR([.A171]=1; TYPE([.A171])=8); [.A171]+1; 0))" office:value-type="float" office:value="1129" calcext:value-type="float">
            <text:p>112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SimMechanismPropagation1In</text:p>
          </table:table-cell>
          <table:table-cell table:style-name="ce11" table:formula="of:=IF([.H173]&lt;&gt;&quot;&quot;; UPPER(ORG.LIBREOFFICE.REGEX([.H173];&quot;([a-z0-9])([A-Z])&quot;;&quot;$1_$2&quot;;&quot;g&quot;)); &quot;&quot;)" office:value-type="string" office:string-value="SIM_MECHANISM_PROPAGATION1_IN" calcext:value-type="string">
            <text:p>SIM_MECHANISM_PROPAGATION1_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73]=1; TYPE([.A173])=8); [.A173]+1; IF( OR([.A172]=1; TYPE([.A172])=8); [.A172]+1; 0))" office:value-type="float" office:value="1130" calcext:value-type="float">
            <text:p>113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1InRand</text:p>
          </table:table-cell>
          <table:table-cell table:style-name="ce11" table:formula="of:=IF([.H174]&lt;&gt;&quot;&quot;; UPPER(ORG.LIBREOFFICE.REGEX([.H174];&quot;([a-z0-9])([A-Z])&quot;;&quot;$1_$2&quot;;&quot;g&quot;)); &quot;&quot;)" office:value-type="string" office:string-value="SIM_MECHANISM_PROPAGATION1_IN_RAND" calcext:value-type="string">
            <text:p>SIM_MECHANISM_PROPAGATION1_IN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74]=1; TYPE([.A174])=8); [.A174]+1; IF( OR([.A173]=1; TYPE([.A173])=8); [.A173]+1; 0))" office:value-type="float" office:value="1131" calcext:value-type="float">
            <text:p>113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SimMechanismPropagation1Out</text:p>
          </table:table-cell>
          <table:table-cell table:style-name="ce11" table:formula="of:=IF([.H175]&lt;&gt;&quot;&quot;; UPPER(ORG.LIBREOFFICE.REGEX([.H175];&quot;([a-z0-9])([A-Z])&quot;;&quot;$1_$2&quot;;&quot;g&quot;)); &quot;&quot;)" office:value-type="string" office:string-value="SIM_MECHANISM_PROPAGATION1_OUT" calcext:value-type="string">
            <text:p>SIM_MECHANISM_PROPAGATION1_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75]=1; TYPE([.A175])=8); [.A175]+1; IF( OR([.A174]=1; TYPE([.A174])=8); [.A174]+1; 0))" office:value-type="float" office:value="1132" calcext:value-type="float">
            <text:p>113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1OutRand</text:p>
          </table:table-cell>
          <table:table-cell table:style-name="ce11" table:formula="of:=IF([.H176]&lt;&gt;&quot;&quot;; UPPER(ORG.LIBREOFFICE.REGEX([.H176];&quot;([a-z0-9])([A-Z])&quot;;&quot;$1_$2&quot;;&quot;g&quot;)); &quot;&quot;)" office:value-type="string" office:string-value="SIM_MECHANISM_PROPAGATION1_OUT_RAND" calcext:value-type="string">
            <text:p>SIM_MECHANISM_PROPAGATION1_OUT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/>
          <table:table-cell table:style-name="ce11" table:formula="of:=IF([.H177]&lt;&gt;&quot;&quot;; UPPER(ORG.LIBREOFFICE.REGEX([.H177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7]=1; TYPE([.A177])=8); [.A177]+1; IF( OR([.A176]=1; TYPE([.A176])=8); [.A176]+1; 0))" office:value-type="float" office:value="1133" calcext:value-type="float">
            <text:p>113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SimMechanismPropagation2In</text:p>
          </table:table-cell>
          <table:table-cell table:style-name="ce11" table:formula="of:=IF([.H178]&lt;&gt;&quot;&quot;; UPPER(ORG.LIBREOFFICE.REGEX([.H178];&quot;([a-z0-9])([A-Z])&quot;;&quot;$1_$2&quot;;&quot;g&quot;)); &quot;&quot;)" office:value-type="string" office:string-value="SIM_MECHANISM_PROPAGATION2_IN" calcext:value-type="string">
            <text:p>SIM_MECHANISM_PROPAGATION2_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78]=1; TYPE([.A178])=8); [.A178]+1; IF( OR([.A177]=1; TYPE([.A177])=8); [.A177]+1; 0))" office:value-type="float" office:value="1134" calcext:value-type="float">
            <text:p>113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2InRand</text:p>
          </table:table-cell>
          <table:table-cell table:style-name="ce11" table:formula="of:=IF([.H179]&lt;&gt;&quot;&quot;; UPPER(ORG.LIBREOFFICE.REGEX([.H179];&quot;([a-z0-9])([A-Z])&quot;;&quot;$1_$2&quot;;&quot;g&quot;)); &quot;&quot;)" office:value-type="string" office:string-value="SIM_MECHANISM_PROPAGATION2_IN_RAND" calcext:value-type="string">
            <text:p>SIM_MECHANISM_PROPAGATION2_IN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79]=1; TYPE([.A179])=8); [.A179]+1; IF( OR([.A178]=1; TYPE([.A178])=8); [.A178]+1; 0))" office:value-type="float" office:value="1135" calcext:value-type="float">
            <text:p>113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SimMechanismPropagation2Out</text:p>
          </table:table-cell>
          <table:table-cell table:style-name="ce11" table:formula="of:=IF([.H180]&lt;&gt;&quot;&quot;; UPPER(ORG.LIBREOFFICE.REGEX([.H180];&quot;([a-z0-9])([A-Z])&quot;;&quot;$1_$2&quot;;&quot;g&quot;)); &quot;&quot;)" office:value-type="string" office:string-value="SIM_MECHANISM_PROPAGATION2_OUT" calcext:value-type="string">
            <text:p>SIM_MECHANISM_PROPAGATION2_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80]=1; TYPE([.A180])=8); [.A180]+1; IF( OR([.A179]=1; TYPE([.A179])=8); [.A179]+1; 0))" office:value-type="float" office:value="1136" calcext:value-type="float">
            <text:p>113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2OutRand</text:p>
          </table:table-cell>
          <table:table-cell table:style-name="ce11" table:formula="of:=IF([.H181]&lt;&gt;&quot;&quot;; UPPER(ORG.LIBREOFFICE.REGEX([.H181];&quot;([a-z0-9])([A-Z])&quot;;&quot;$1_$2&quot;;&quot;g&quot;)); &quot;&quot;)" office:value-type="string" office:string-value="SIM_MECHANISM_PROPAGATION2_OUT_RAND" calcext:value-type="string">
            <text:p>SIM_MECHANISM_PROPAGATION2_OUT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/>
          <table:table-cell table:style-name="ce11" table:formula="of:=IF([.H182]&lt;&gt;&quot;&quot;; UPPER(ORG.LIBREOFFICE.REGEX([.H182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82]=1; TYPE([.A182])=8); [.A182]+1; IF( OR([.A181]=1; TYPE([.A181])=8); [.A181]+1; 0))" office:value-type="float" office:value="1137" calcext:value-type="float">
            <text:p>113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500" calcext:value-type="float">
            <text:p>1500</text:p>
          </table:table-cell>
          <table:table-cell table:style-name="ce2" office:value-type="string" calcext:value-type="string">
            <text:p>SimMechanismPropagation3In</text:p>
          </table:table-cell>
          <table:table-cell table:style-name="ce11" table:formula="of:=IF([.H183]&lt;&gt;&quot;&quot;; UPPER(ORG.LIBREOFFICE.REGEX([.H183];&quot;([a-z0-9])([A-Z])&quot;;&quot;$1_$2&quot;;&quot;g&quot;)); &quot;&quot;)" office:value-type="string" office:string-value="SIM_MECHANISM_PROPAGATION3_IN" calcext:value-type="string">
            <text:p>SIM_MECHANISM_PROPAGATION3_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83]=1; TYPE([.A183])=8); [.A183]+1; IF( OR([.A182]=1; TYPE([.A182])=8); [.A182]+1; 0))" office:value-type="float" office:value="1138" calcext:value-type="float">
            <text:p>113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3InRand</text:p>
          </table:table-cell>
          <table:table-cell table:style-name="ce11" table:formula="of:=IF([.H184]&lt;&gt;&quot;&quot;; UPPER(ORG.LIBREOFFICE.REGEX([.H184];&quot;([a-z0-9])([A-Z])&quot;;&quot;$1_$2&quot;;&quot;g&quot;)); &quot;&quot;)" office:value-type="string" office:string-value="SIM_MECHANISM_PROPAGATION3_IN_RAND" calcext:value-type="string">
            <text:p>SIM_MECHANISM_PROPAGATION3_IN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84]=1; TYPE([.A184])=8); [.A184]+1; IF( OR([.A183]=1; TYPE([.A183])=8); [.A183]+1; 0))" office:value-type="float" office:value="1139" calcext:value-type="float">
            <text:p>113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SimMechanismPropagation3Out</text:p>
          </table:table-cell>
          <table:table-cell table:style-name="ce11" table:formula="of:=IF([.H185]&lt;&gt;&quot;&quot;; UPPER(ORG.LIBREOFFICE.REGEX([.H185];&quot;([a-z0-9])([A-Z])&quot;;&quot;$1_$2&quot;;&quot;g&quot;)); &quot;&quot;)" office:value-type="string" office:string-value="SIM_MECHANISM_PROPAGATION3_OUT" calcext:value-type="string">
            <text:p>SIM_MECHANISM_PROPAGATION3_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85]=1; TYPE([.A185])=8); [.A185]+1; IF( OR([.A184]=1; TYPE([.A184])=8); [.A184]+1; 0))" office:value-type="float" office:value="1140" calcext:value-type="float">
            <text:p>114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3OutRand</text:p>
          </table:table-cell>
          <table:table-cell table:style-name="ce11" table:formula="of:=IF([.H186]&lt;&gt;&quot;&quot;; UPPER(ORG.LIBREOFFICE.REGEX([.H186];&quot;([a-z0-9])([A-Z])&quot;;&quot;$1_$2&quot;;&quot;g&quot;)); &quot;&quot;)" office:value-type="string" office:string-value="SIM_MECHANISM_PROPAGATION3_OUT_RAND" calcext:value-type="string">
            <text:p>SIM_MECHANISM_PROPAGATION3_OUT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86]=1; TYPE([.A186])=8); [.A186]+1; IF( OR([.A185]=1; TYPE([.A185])=8); [.A185]+1; 0))" office:value-type="float" office:value="1141" calcext:value-type="float">
            <text:p>114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SimMechanism3InertialMotion</text:p>
          </table:table-cell>
          <table:table-cell table:style-name="ce11" table:formula="of:=IF([.H187]&lt;&gt;&quot;&quot;; UPPER(ORG.LIBREOFFICE.REGEX([.H187];&quot;([a-z0-9])([A-Z])&quot;;&quot;$1_$2&quot;;&quot;g&quot;)); &quot;&quot;)" office:value-type="string" office:string-value="SIM_MECHANISM3_INERTIAL_MOTION" calcext:value-type="string">
            <text:p>SIM_MECHANISM3_INERTIAL_MO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The time it takes for the engine to come to a stop without braking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87]=1; TYPE([.A187])=8); [.A187]+1; IF( OR([.A186]=1; TYPE([.A186])=8); [.A186]+1; 0))" office:value-type="float" office:value="1142" calcext:value-type="float">
            <text:p>114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SimMechanism3BrakedMotion</text:p>
          </table:table-cell>
          <table:table-cell table:style-name="ce11" table:formula="of:=IF([.H188]&lt;&gt;&quot;&quot;; UPPER(ORG.LIBREOFFICE.REGEX([.H188];&quot;([a-z0-9])([A-Z])&quot;;&quot;$1_$2&quot;;&quot;g&quot;)); &quot;&quot;)" office:value-type="string" office:string-value="SIM_MECHANISM3_BRAKED_MOTION" calcext:value-type="string">
            <text:p>SIM_MECHANISM3_BRAKED_MO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The time it takes for the engine to come to a stop with braking (in clock tick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/>
          <table:table-cell table:style-name="ce11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89]=1; TYPE([.A189])=8); [.A189]+1; IF( OR([.A188]=1; TYPE([.A188])=8); [.A188]+1; 0))" office:value-type="float" office:value="1143" calcext:value-type="float">
            <text:p>114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1</text:p>
          </table:table-cell>
          <table:table-cell table:style-name="ce11" table:formula="of:=IF([.H190]&lt;&gt;&quot;&quot;; UPPER(ORG.LIBREOFFICE.REGEX([.H190];&quot;([a-z0-9])([A-Z])&quot;;&quot;$1_$2&quot;;&quot;g&quot;)); &quot;&quot;)" office:value-type="string" office:string-value="SIM_AMPLIFIER_CUP1_ELECTRODE1" calcext:value-type="string">
            <text:p>SIM_AMPLIFIER_CUP1_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The output value of the analog-to-digital converter (for the high-gain range) in converter units × 8</text:p>
          </table:table-cell>
          <table:table-cell table:number-columns-repeated="16372"/>
        </table:table-row>
        <table:table-row table:style-name="ro1">
          <table:table-cell table:style-name="ce3" table:formula="of:=IF( OR([.A190]=1; TYPE([.A190])=8); [.A190]+1; IF( OR([.A187]=1; TYPE([.A187])=8); [.A187]+1; 0))" office:value-type="float" office:value="1144" calcext:value-type="float">
            <text:p>114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2</text:p>
          </table:table-cell>
          <table:table-cell table:style-name="ce11" table:formula="of:=IF([.H191]&lt;&gt;&quot;&quot;; UPPER(ORG.LIBREOFFICE.REGEX([.H191];&quot;([a-z0-9])([A-Z])&quot;;&quot;$1_$2&quot;;&quot;g&quot;)); &quot;&quot;)" office:value-type="string" office:string-value="SIM_AMPLIFIER_CUP1_ELECTRODE2" calcext:value-type="string">
            <text:p>SIM_AMPLIFIER_CUP1_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91]=1; TYPE([.A191])=8); [.A191]+1; IF( OR([.A190]=1; TYPE([.A190])=8); [.A190]+1; 0))" office:value-type="float" office:value="1145" calcext:value-type="float">
            <text:p>114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3</text:p>
          </table:table-cell>
          <table:table-cell table:style-name="ce11" table:formula="of:=IF([.H192]&lt;&gt;&quot;&quot;; UPPER(ORG.LIBREOFFICE.REGEX([.H192];&quot;([a-z0-9])([A-Z])&quot;;&quot;$1_$2&quot;;&quot;g&quot;)); &quot;&quot;)" office:value-type="string" office:string-value="SIM_AMPLIFIER_CUP1_ELECTRODE3" calcext:value-type="string">
            <text:p>SIM_AMPLIFIER_CUP1_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92]=1; TYPE([.A192])=8); [.A192]+1; IF( OR([.A191]=1; TYPE([.A191])=8); [.A191]+1; 0))" office:value-type="float" office:value="1146" calcext:value-type="float">
            <text:p>114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4</text:p>
          </table:table-cell>
          <table:table-cell table:style-name="ce11" table:formula="of:=IF([.H193]&lt;&gt;&quot;&quot;; UPPER(ORG.LIBREOFFICE.REGEX([.H193];&quot;([a-z0-9])([A-Z])&quot;;&quot;$1_$2&quot;;&quot;g&quot;)); &quot;&quot;)" office:value-type="string" office:string-value="SIM_AMPLIFIER_CUP1_ELECTRODE4" calcext:value-type="string">
            <text:p>SIM_AMPLIFIER_CUP1_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93]=1; TYPE([.A193])=8); [.A193]+1; IF( OR([.A192]=1; TYPE([.A192])=8); [.A192]+1; 0))" office:value-type="float" office:value="1147" calcext:value-type="float">
            <text:p>114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1</text:p>
          </table:table-cell>
          <table:table-cell table:style-name="ce11" table:formula="of:=IF([.H194]&lt;&gt;&quot;&quot;; UPPER(ORG.LIBREOFFICE.REGEX([.H194];&quot;([a-z0-9])([A-Z])&quot;;&quot;$1_$2&quot;;&quot;g&quot;)); &quot;&quot;)" office:value-type="string" office:string-value="SIM_AMPLIFIER_CUP2_ELECTRODE1" calcext:value-type="string">
            <text:p>SIM_AMPLIFIER_CUP2_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94]=1; TYPE([.A194])=8); [.A194]+1; IF( OR([.A193]=1; TYPE([.A193])=8); [.A193]+1; 0))" office:value-type="float" office:value="1148" calcext:value-type="float">
            <text:p>114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2</text:p>
          </table:table-cell>
          <table:table-cell table:style-name="ce11" table:formula="of:=IF([.H195]&lt;&gt;&quot;&quot;; UPPER(ORG.LIBREOFFICE.REGEX([.H195];&quot;([a-z0-9])([A-Z])&quot;;&quot;$1_$2&quot;;&quot;g&quot;)); &quot;&quot;)" office:value-type="string" office:string-value="SIM_AMPLIFIER_CUP2_ELECTRODE2" calcext:value-type="string">
            <text:p>SIM_AMPLIFIER_CUP2_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95]=1; TYPE([.A195])=8); [.A195]+1; IF( OR([.A194]=1; TYPE([.A194])=8); [.A194]+1; 0))" office:value-type="float" office:value="1149" calcext:value-type="float">
            <text:p>114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3</text:p>
          </table:table-cell>
          <table:table-cell table:style-name="ce11" table:formula="of:=IF([.H196]&lt;&gt;&quot;&quot;; UPPER(ORG.LIBREOFFICE.REGEX([.H196];&quot;([a-z0-9])([A-Z])&quot;;&quot;$1_$2&quot;;&quot;g&quot;)); &quot;&quot;)" office:value-type="string" office:string-value="SIM_AMPLIFIER_CUP2_ELECTRODE3" calcext:value-type="string">
            <text:p>SIM_AMPLIFIER_CUP2_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96]=1; TYPE([.A196])=8); [.A196]+1; IF( OR([.A195]=1; TYPE([.A195])=8); [.A195]+1; 0))" office:value-type="float" office:value="1150" calcext:value-type="float">
            <text:p>115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4</text:p>
          </table:table-cell>
          <table:table-cell table:style-name="ce11" table:formula="of:=IF([.H197]&lt;&gt;&quot;&quot;; UPPER(ORG.LIBREOFFICE.REGEX([.H197];&quot;([a-z0-9])([A-Z])&quot;;&quot;$1_$2&quot;;&quot;g&quot;)); &quot;&quot;)" office:value-type="string" office:string-value="SIM_AMPLIFIER_CUP2_ELECTRODE4" calcext:value-type="string">
            <text:p>SIM_AMPLIFIER_CUP2_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97]=1; TYPE([.A197])=8); [.A197]+1; IF( OR([.A196]=1; TYPE([.A196])=8); [.A196]+1; 0))" office:value-type="float" office:value="1151" calcext:value-type="float">
            <text:p>115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1</text:p>
          </table:table-cell>
          <table:table-cell table:style-name="ce11" table:formula="of:=IF([.H198]&lt;&gt;&quot;&quot;; UPPER(ORG.LIBREOFFICE.REGEX([.H198];&quot;([a-z0-9])([A-Z])&quot;;&quot;$1_$2&quot;;&quot;g&quot;)); &quot;&quot;)" office:value-type="string" office:string-value="SIM_AMPLIFIER_CUP3_ELECTRODE1" calcext:value-type="string">
            <text:p>SIM_AMPLIFIER_CUP3_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98]=1; TYPE([.A198])=8); [.A198]+1; IF( OR([.A197]=1; TYPE([.A197])=8); [.A197]+1; 0))" office:value-type="float" office:value="1152" calcext:value-type="float">
            <text:p>115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2</text:p>
          </table:table-cell>
          <table:table-cell table:style-name="ce11" table:formula="of:=IF([.H199]&lt;&gt;&quot;&quot;; UPPER(ORG.LIBREOFFICE.REGEX([.H199];&quot;([a-z0-9])([A-Z])&quot;;&quot;$1_$2&quot;;&quot;g&quot;)); &quot;&quot;)" office:value-type="string" office:string-value="SIM_AMPLIFIER_CUP3_ELECTRODE2" calcext:value-type="string">
            <text:p>SIM_AMPLIFIER_CUP3_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99]=1; TYPE([.A199])=8); [.A199]+1; IF( OR([.A198]=1; TYPE([.A198])=8); [.A198]+1; 0))" office:value-type="float" office:value="1153" calcext:value-type="float">
            <text:p>115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3</text:p>
          </table:table-cell>
          <table:table-cell table:style-name="ce11" table:formula="of:=IF([.H200]&lt;&gt;&quot;&quot;; UPPER(ORG.LIBREOFFICE.REGEX([.H200];&quot;([a-z0-9])([A-Z])&quot;;&quot;$1_$2&quot;;&quot;g&quot;)); &quot;&quot;)" office:value-type="string" office:string-value="SIM_AMPLIFIER_CUP3_ELECTRODE3" calcext:value-type="string">
            <text:p>SIM_AMPLIFIER_CUP3_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00]=1; TYPE([.A200])=8); [.A200]+1; IF( OR([.A199]=1; TYPE([.A199])=8); [.A199]+1; 0))" office:value-type="float" office:value="1154" calcext:value-type="float">
            <text:p>115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4</text:p>
          </table:table-cell>
          <table:table-cell table:style-name="ce11" table:formula="of:=IF([.H201]&lt;&gt;&quot;&quot;; UPPER(ORG.LIBREOFFICE.REGEX([.H201];&quot;([a-z0-9])([A-Z])&quot;;&quot;$1_$2&quot;;&quot;g&quot;)); &quot;&quot;)" office:value-type="string" office:string-value="SIM_AMPLIFIER_CUP3_ELECTRODE4" calcext:value-type="string">
            <text:p>SIM_AMPLIFIER_CUP3_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202]&lt;&gt;&quot;&quot;; UPPER(ORG.LIBREOFFICE.REGEX([.H202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202]=1; TYPE([.A202])=8); [.A202]+1; IF( OR([.A201]=1; TYPE([.A201])=8); [.A201]+1; 0))" office:value-type="float" office:value="1155" calcext:value-type="float">
            <text:p>115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RandomRate</text:p>
          </table:table-cell>
          <table:table-cell table:style-name="ce11" table:formula="of:=IF([.H203]&lt;&gt;&quot;&quot;; UPPER(ORG.LIBREOFFICE.REGEX([.H203];&quot;([a-z0-9])([A-Z])&quot;;&quot;$1_$2&quot;;&quot;g&quot;)); &quot;&quot;)" office:value-type="string" office:string-value="SIM_AMPLIFIER_RANDOM_RATE" calcext:value-type="string">
            <text:p>SIM_AMPLIFIER_RANDOM_RAT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andom component of the SimAmplifierCupNElectrodeM signal - ratio coefficient</text:p>
          </table:table-cell>
          <table:table-cell table:number-columns-repeated="16372"/>
        </table:table-row>
        <table:table-row table:style-name="ro1">
          <table:table-cell table:style-name="ce3" table:formula="of:=IF( OR([.A203]=1; TYPE([.A203])=8); [.A203]+1; IF( OR([.A202]=1; TYPE([.A202])=8); [.A202]+1; 0))" office:value-type="float" office:value="1156" calcext:value-type="float">
            <text:p>115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RandomOffset</text:p>
          </table:table-cell>
          <table:table-cell table:style-name="ce11" table:formula="of:=IF([.H204]&lt;&gt;&quot;&quot;; UPPER(ORG.LIBREOFFICE.REGEX([.H204];&quot;([a-z0-9])([A-Z])&quot;;&quot;$1_$2&quot;;&quot;g&quot;)); &quot;&quot;)" office:value-type="string" office:string-value="SIM_AMPLIFIER_RANDOM_OFFSET" calcext:value-type="string">
            <text:p>SIM_AMPLIFIER_RANDOM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andom component of the SimAmplifierCupNElectrodeM signal - offset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205]&lt;&gt;&quot;&quot;; UPPER(ORG.LIBREOFFICE.REGEX([.H205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205]=1; TYPE([.A205])=8); [.A205]+1; IF( OR([.A204]=1; TYPE([.A204])=8); [.A204]+1; 0))" office:value-type="float" office:value="1157" calcext:value-type="float">
            <text:p>115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xternalLockPeriod</text:p>
          </table:table-cell>
          <table:table-cell table:style-name="ce11" table:formula="of:=IF([.H206]&lt;&gt;&quot;&quot;; UPPER(ORG.LIBREOFFICE.REGEX([.H206];&quot;([a-z0-9])([A-Z])&quot;;&quot;$1_$2&quot;;&quot;g&quot;)); &quot;&quot;)" office:value-type="string" office:string-value="SIM_EXTERNAL_LOCK_PERIOD" calcext:value-type="string">
            <text:p>SIM_EXTERNAL_LOCK_PERIO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period (in tics); if it is zero, a single event occurs</text:p>
          </table:table-cell>
          <table:table-cell table:number-columns-repeated="16372"/>
        </table:table-row>
        <table:table-row table:style-name="ro1">
          <table:table-cell table:style-name="ce3" table:formula="of:=IF( OR([.A206]=1; TYPE([.A206])=8); [.A206]+1; IF( OR([.A205]=1; TYPE([.A205])=8); [.A205]+1; 0))" office:value-type="float" office:value="1158" calcext:value-type="float">
            <text:p>115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xternalLockDuration</text:p>
          </table:table-cell>
          <table:table-cell table:style-name="ce11" table:formula="of:=IF([.H207]&lt;&gt;&quot;&quot;; UPPER(ORG.LIBREOFFICE.REGEX([.H207];&quot;([a-z0-9])([A-Z])&quot;;&quot;$1_$2&quot;;&quot;g&quot;)); &quot;&quot;)" office:value-type="string" office:string-value="SIM_EXTERNAL_LOCK_DURATION" calcext:value-type="string">
            <text:p>SIM_EXTERNAL_LOCK_DURA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duration (in tics); If the duration is 0xFFFF, the signal is set indefinitely; if the duration is zero, the signal is not generated;</text:p>
          </table:table-cell>
          <table:table-cell table:number-columns-repeated="16372"/>
        </table:table-row>
        <table:table-row table:style-name="ro1">
          <table:table-cell table:style-name="ce3" table:formula="of:=IF( OR([.A207]=1; TYPE([.A207])=8); [.A207]+1; IF( OR([.A206]=1; TYPE([.A206])=8); [.A206]+1; 0))" office:value-type="float" office:value="1159" calcext:value-type="float">
            <text:p>115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xternalLockDelay</text:p>
          </table:table-cell>
          <table:table-cell table:style-name="ce11" table:formula="of:=IF([.H208]&lt;&gt;&quot;&quot;; UPPER(ORG.LIBREOFFICE.REGEX([.H208];&quot;([a-z0-9])([A-Z])&quot;;&quot;$1_$2&quot;;&quot;g&quot;)); &quot;&quot;)" office:value-type="string" office:string-value="SIM_EXTERNAL_LOCK_DELAY" calcext:value-type="string">
            <text:p>SIM_EXTERNAL_LOCK_DELA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delay (in tic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209]&lt;&gt;&quot;&quot;; UPPER(ORG.LIBREOFFICE.REGEX([.H209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209]=1; TYPE([.A209])=8); [.A209]+1; IF( OR([.A208]=1; TYPE([.A208])=8); [.A208]+1; 0))" office:value-type="float" office:value="1160" calcext:value-type="float">
            <text:p>116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Code</text:p>
          </table:table-cell>
          <table:table-cell table:style-name="ce11" table:formula="of:=IF([.H210]&lt;&gt;&quot;&quot;; UPPER(ORG.LIBREOFFICE.REGEX([.H210];&quot;([a-z0-9])([A-Z])&quot;;&quot;$1_$2&quot;;&quot;g&quot;)); &quot;&quot;)" office:value-type="string" office:string-value="SIM_EVENT_CODE" calcext:value-type="string">
            <text:p>SIM_EVENT_COD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event type</text:p>
          </table:table-cell>
          <table:table-cell table:number-columns-repeated="16372"/>
        </table:table-row>
        <table:table-row table:style-name="ro1">
          <table:table-cell table:style-name="ce3" table:formula="of:=IF( OR([.A210]=1; TYPE([.A210])=8); [.A210]+1; IF( OR([.A209]=1; TYPE([.A209])=8); [.A209]+1; 0))" office:value-type="float" office:value="1161" calcext:value-type="float">
            <text:p>116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Period</text:p>
          </table:table-cell>
          <table:table-cell table:style-name="ce11" table:formula="of:=IF([.H211]&lt;&gt;&quot;&quot;; UPPER(ORG.LIBREOFFICE.REGEX([.H211];&quot;([a-z0-9])([A-Z])&quot;;&quot;$1_$2&quot;;&quot;g&quot;)); &quot;&quot;)" office:value-type="string" office:string-value="SIM_EVENT_PERIOD" calcext:value-type="string">
            <text:p>SIM_EVENT_PERIO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period (in tics); if it is zero, a single event occurs</text:p>
          </table:table-cell>
          <table:table-cell table:number-columns-repeated="16372"/>
        </table:table-row>
        <table:table-row table:style-name="ro1">
          <table:table-cell table:style-name="ce3" table:formula="of:=IF( OR([.A211]=1; TYPE([.A211])=8); [.A211]+1; IF( OR([.A210]=1; TYPE([.A210])=8); [.A210]+1; 0))" office:value-type="float" office:value="1162" calcext:value-type="float">
            <text:p>116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Duration</text:p>
          </table:table-cell>
          <table:table-cell table:style-name="ce11" table:formula="of:=IF([.H212]&lt;&gt;&quot;&quot;; UPPER(ORG.LIBREOFFICE.REGEX([.H212];&quot;([a-z0-9])([A-Z])&quot;;&quot;$1_$2&quot;;&quot;g&quot;)); &quot;&quot;)" office:value-type="string" office:string-value="SIM_EVENT_DURATION" calcext:value-type="string">
            <text:p>SIM_EVENT_DURA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duration (in tics); If the duration is 0xFFFF, the event lasts indefinitely; if the duration is zero, the event is not generated;</text:p>
          </table:table-cell>
          <table:table-cell table:number-columns-repeated="16372"/>
        </table:table-row>
        <table:table-row table:style-name="ro1">
          <table:table-cell table:style-name="ce3" table:formula="of:=IF( OR([.A212]=1; TYPE([.A212])=8); [.A212]+1; IF( OR([.A211]=1; TYPE([.A211])=8); [.A211]+1; 0))" office:value-type="float" office:value="1163" calcext:value-type="float">
            <text:p>116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Delay</text:p>
          </table:table-cell>
          <table:table-cell table:style-name="ce11" table:formula="of:=IF([.H213]&lt;&gt;&quot;&quot;; UPPER(ORG.LIBREOFFICE.REGEX([.H213];&quot;([a-z0-9])([A-Z])&quot;;&quot;$1_$2&quot;;&quot;g&quot;)); &quot;&quot;)" office:value-type="string" office:string-value="SIM_EVENT_DELAY" calcext:value-type="string">
            <text:p>SIM_EVENT_DELA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delay (in tic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214]&lt;&gt;&quot;&quot;; UPPER(ORG.LIBREOFFICE.REGEX([.H214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214]=1; TYPE([.A214])=8); [.A214]+1; IF( OR([.A213]=1; TYPE([.A213])=8); [.A213]+1; 0))" office:value-type="float" office:value="1164" calcext:value-type="float">
            <text:p>116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ebugPrintouts</text:p>
          </table:table-cell>
          <table:table-cell table:style-name="ce11" table:formula="of:=IF([.H215]&lt;&gt;&quot;&quot;; UPPER(ORG.LIBREOFFICE.REGEX([.H215];&quot;([a-z0-9])([A-Z])&quot;;&quot;$1_$2&quot;;&quot;g&quot;)); &quot;&quot;)" office:value-type="string" office:string-value="DEBUG_PRINTOUTS" calcext:value-type="string">
            <text:p>DEBUG_PRINTOUTS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Testing</text:p>
          </table:table-cell>
          <table:table-cell table:number-columns-repeated="16373"/>
        </table:table-row>
        <table:table-row table:style-name="ro1">
          <table:table-cell table:style-name="ce3" table:formula="of:=IF( OR([.A215]=1; TYPE([.A215])=8); [.A215]+1; IF( OR([.A214]=1; TYPE([.A214])=8); [.A214]+1; 0))" office:value-type="float" office:value="1165" calcext:value-type="float">
            <text:p>116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ebugArgument1</text:p>
          </table:table-cell>
          <table:table-cell table:style-name="ce11" table:formula="of:=IF([.H216]&lt;&gt;&quot;&quot;; UPPER(ORG.LIBREOFFICE.REGEX([.H216];&quot;([a-z0-9])([A-Z])&quot;;&quot;$1_$2&quot;;&quot;g&quot;)); &quot;&quot;)" office:value-type="string" office:string-value="DEBUG_ARGUMENT1" calcext:value-type="string">
            <text:p>DEBUG_ARGUME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Testing</text:p>
          </table:table-cell>
          <table:table-cell table:number-columns-repeated="16373"/>
        </table:table-row>
        <table:table-row table:style-name="ro1">
          <table:table-cell table:style-name="ce3"/>
          <table:table-cell table:number-columns-repeated="7"/>
          <table:table-cell table:style-name="ce11" table:formula="of:=IF([.H217]&lt;&gt;&quot;&quot;; UPPER(ORG.LIBREOFFICE.REGEX([.H217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/>
          <table:table-cell table:number-columns-repeated="7"/>
          <table:table-cell table:style-name="ce11" table:formula="of:=IF([.H218]&lt;&gt;&quot;&quot;; UPPER(ORG.LIBREOFFICE.REGEX([.H218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office:value-type="float" office:value="3001" calcext:value-type="float">
            <text:p>3001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Sample</text:p>
          </table:table-cell>
          <table:table-cell table:style-name="ce11" table:formula="of:=IF([.H219]&lt;&gt;&quot;&quot;; UPPER(ORG.LIBREOFFICE.REGEX([.H219];&quot;([a-z0-9])([A-Z])&quot;;&quot;$1_$2&quot;;&quot;g&quot;)); &quot;&quot;)" office:value-type="string" office:string-value="CUP1_CHANNEL1_SAMPLE" calcext:value-type="string">
            <text:p>CUP1_CHANNEL1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[.A219]+1" office:value-type="float" office:value="3002" calcext:value-type="float">
            <text:p>3002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Sample</text:p>
          </table:table-cell>
          <table:table-cell table:style-name="ce11" table:formula="of:=IF([.H220]&lt;&gt;&quot;&quot;; UPPER(ORG.LIBREOFFICE.REGEX([.H220];&quot;([a-z0-9])([A-Z])&quot;;&quot;$1_$2&quot;;&quot;g&quot;)); &quot;&quot;)" office:value-type="string" office:string-value="CUP1_CHANNEL2_SAMPLE" calcext:value-type="string">
            <text:p>CUP1_CHANNEL2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20]=1; TYPE([.A220])=8); [.A220]+1; IF( OR([.A219]=1; TYPE([.A219])=8); [.A219]+1; 0))" office:value-type="float" office:value="3003" calcext:value-type="float">
            <text:p>3003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Sample</text:p>
          </table:table-cell>
          <table:table-cell table:style-name="ce11" table:formula="of:=IF([.H221]&lt;&gt;&quot;&quot;; UPPER(ORG.LIBREOFFICE.REGEX([.H221];&quot;([a-z0-9])([A-Z])&quot;;&quot;$1_$2&quot;;&quot;g&quot;)); &quot;&quot;)" office:value-type="string" office:string-value="CUP1_CHANNEL3_SAMPLE" calcext:value-type="string">
            <text:p>CUP1_CHANNEL3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21]=1; TYPE([.A221])=8); [.A221]+1; IF( OR([.A220]=1; TYPE([.A220])=8); [.A220]+1; 0))" office:value-type="float" office:value="3004" calcext:value-type="float">
            <text:p>3004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Sample</text:p>
          </table:table-cell>
          <table:table-cell table:style-name="ce11" table:formula="of:=IF([.H222]&lt;&gt;&quot;&quot;; UPPER(ORG.LIBREOFFICE.REGEX([.H222];&quot;([a-z0-9])([A-Z])&quot;;&quot;$1_$2&quot;;&quot;g&quot;)); &quot;&quot;)" office:value-type="string" office:string-value="CUP1_CHANNEL4_SAMPLE" calcext:value-type="string">
            <text:p>CUP1_CHANNEL4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22]=1; TYPE([.A222])=8); [.A222]+1; IF( OR([.A221]=1; TYPE([.A221])=8); [.A221]+1; 0))" office:value-type="float" office:value="3005" calcext:value-type="float">
            <text:p>3005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Error</text:p>
          </table:table-cell>
          <table:table-cell table:style-name="ce11" table:formula="of:=IF([.H223]&lt;&gt;&quot;&quot;; UPPER(ORG.LIBREOFFICE.REGEX([.H223];&quot;([a-z0-9])([A-Z])&quot;;&quot;$1_$2&quot;;&quot;g&quot;)); &quot;&quot;)" office:value-type="string" office:string-value="CUP1_CHANNEL_ERROR" calcext:value-type="string">
            <text:p>CUP1_CHANNEL_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If the measured value exceeds the limit (Cup1Channel1LowerLimit ..., or Cup1Channel1UpperLimit ...), the corresponding bit is set: bit 0 for channel 1, bit 1 for channel 2, and so on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224]&lt;&gt;&quot;&quot;; UPPER(ORG.LIBREOFFICE.REGEX([.H224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224]=1; TYPE([.A224])=8); [.A224]+1; IF( OR([.A223]=1; TYPE([.A223])=8); [.A223]+1; 0))" office:value-type="float" office:value="3006" calcext:value-type="float">
            <text:p>3006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Sample</text:p>
          </table:table-cell>
          <table:table-cell table:style-name="ce11" table:formula="of:=IF([.H225]&lt;&gt;&quot;&quot;; UPPER(ORG.LIBREOFFICE.REGEX([.H225];&quot;([a-z0-9])([A-Z])&quot;;&quot;$1_$2&quot;;&quot;g&quot;)); &quot;&quot;)" office:value-type="string" office:string-value="CUP2_CHANNEL1_SAMPLE" calcext:value-type="string">
            <text:p>CUP2_CHANNEL1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25]=1; TYPE([.A225])=8); [.A225]+1; IF( OR([.A224]=1; TYPE([.A224])=8); [.A224]+1; 0))" office:value-type="float" office:value="3007" calcext:value-type="float">
            <text:p>3007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Sample</text:p>
          </table:table-cell>
          <table:table-cell table:style-name="ce11" table:formula="of:=IF([.H226]&lt;&gt;&quot;&quot;; UPPER(ORG.LIBREOFFICE.REGEX([.H226];&quot;([a-z0-9])([A-Z])&quot;;&quot;$1_$2&quot;;&quot;g&quot;)); &quot;&quot;)" office:value-type="string" office:string-value="CUP2_CHANNEL2_SAMPLE" calcext:value-type="string">
            <text:p>CUP2_CHANNEL2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26]=1; TYPE([.A226])=8); [.A226]+1; IF( OR([.A225]=1; TYPE([.A225])=8); [.A225]+1; 0))" office:value-type="float" office:value="3008" calcext:value-type="float">
            <text:p>3008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Sample</text:p>
          </table:table-cell>
          <table:table-cell table:style-name="ce11" table:formula="of:=IF([.H227]&lt;&gt;&quot;&quot;; UPPER(ORG.LIBREOFFICE.REGEX([.H227];&quot;([a-z0-9])([A-Z])&quot;;&quot;$1_$2&quot;;&quot;g&quot;)); &quot;&quot;)" office:value-type="string" office:string-value="CUP2_CHANNEL3_SAMPLE" calcext:value-type="string">
            <text:p>CUP2_CHANNEL3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27]=1; TYPE([.A227])=8); [.A227]+1; IF( OR([.A226]=1; TYPE([.A226])=8); [.A226]+1; 0))" office:value-type="float" office:value="3009" calcext:value-type="float">
            <text:p>3009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Sample</text:p>
          </table:table-cell>
          <table:table-cell table:style-name="ce11" table:formula="of:=IF([.H228]&lt;&gt;&quot;&quot;; UPPER(ORG.LIBREOFFICE.REGEX([.H228];&quot;([a-z0-9])([A-Z])&quot;;&quot;$1_$2&quot;;&quot;g&quot;)); &quot;&quot;)" office:value-type="string" office:string-value="CUP2_CHANNEL4_SAMPLE" calcext:value-type="string">
            <text:p>CUP2_CHANNEL4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28]=1; TYPE([.A228])=8); [.A228]+1; IF( OR([.A227]=1; TYPE([.A227])=8); [.A227]+1; 0))" office:value-type="float" office:value="3010" calcext:value-type="float">
            <text:p>3010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Error</text:p>
          </table:table-cell>
          <table:table-cell table:style-name="ce11" table:formula="of:=IF([.H229]&lt;&gt;&quot;&quot;; UPPER(ORG.LIBREOFFICE.REGEX([.H229];&quot;([a-z0-9])([A-Z])&quot;;&quot;$1_$2&quot;;&quot;g&quot;)); &quot;&quot;)" office:value-type="string" office:string-value="CUP2_CHANNEL_ERROR" calcext:value-type="string">
            <text:p>CUP2_CHANNEL_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230]&lt;&gt;&quot;&quot;; UPPER(ORG.LIBREOFFICE.REGEX([.H230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230]=1; TYPE([.A230])=8); [.A230]+1; IF( OR([.A229]=1; TYPE([.A229])=8); [.A229]+1; 0))" office:value-type="float" office:value="3011" calcext:value-type="float">
            <text:p>3011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Sample</text:p>
          </table:table-cell>
          <table:table-cell table:style-name="ce11" table:formula="of:=IF([.H231]&lt;&gt;&quot;&quot;; UPPER(ORG.LIBREOFFICE.REGEX([.H231];&quot;([a-z0-9])([A-Z])&quot;;&quot;$1_$2&quot;;&quot;g&quot;)); &quot;&quot;)" office:value-type="string" office:string-value="CUP3_CHANNEL1_SAMPLE" calcext:value-type="string">
            <text:p>CUP3_CHANNEL1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31]=1; TYPE([.A231])=8); [.A231]+1; IF( OR([.A230]=1; TYPE([.A230])=8); [.A230]+1; 0))" office:value-type="float" office:value="3012" calcext:value-type="float">
            <text:p>3012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Sample</text:p>
          </table:table-cell>
          <table:table-cell table:style-name="ce11" table:formula="of:=IF([.H232]&lt;&gt;&quot;&quot;; UPPER(ORG.LIBREOFFICE.REGEX([.H232];&quot;([a-z0-9])([A-Z])&quot;;&quot;$1_$2&quot;;&quot;g&quot;)); &quot;&quot;)" office:value-type="string" office:string-value="CUP3_CHANNEL2_SAMPLE" calcext:value-type="string">
            <text:p>CUP3_CHANNEL2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32]=1; TYPE([.A232])=8); [.A232]+1; IF( OR([.A231]=1; TYPE([.A231])=8); [.A231]+1; 0))" office:value-type="float" office:value="3013" calcext:value-type="float">
            <text:p>3013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Sample</text:p>
          </table:table-cell>
          <table:table-cell table:style-name="ce11" table:formula="of:=IF([.H233]&lt;&gt;&quot;&quot;; UPPER(ORG.LIBREOFFICE.REGEX([.H233];&quot;([a-z0-9])([A-Z])&quot;;&quot;$1_$2&quot;;&quot;g&quot;)); &quot;&quot;)" office:value-type="string" office:string-value="CUP3_CHANNEL3_SAMPLE" calcext:value-type="string">
            <text:p>CUP3_CHANNEL3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33]=1; TYPE([.A233])=8); [.A233]+1; IF( OR([.A232]=1; TYPE([.A232])=8); [.A232]+1; 0))" office:value-type="float" office:value="3014" calcext:value-type="float">
            <text:p>3014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Sample</text:p>
          </table:table-cell>
          <table:table-cell table:style-name="ce11" table:formula="of:=IF([.H234]&lt;&gt;&quot;&quot;; UPPER(ORG.LIBREOFFICE.REGEX([.H234];&quot;([a-z0-9])([A-Z])&quot;;&quot;$1_$2&quot;;&quot;g&quot;)); &quot;&quot;)" office:value-type="string" office:string-value="CUP3_CHANNEL4_SAMPLE" calcext:value-type="string">
            <text:p>CUP3_CHANNEL4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34]=1; TYPE([.A234])=8); [.A234]+1; IF( OR([.A233]=1; TYPE([.A233])=8); [.A233]+1; 0))" office:value-type="float" office:value="3015" calcext:value-type="float">
            <text:p>3015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Error</text:p>
          </table:table-cell>
          <table:table-cell table:style-name="ce11" table:formula="of:=IF([.H235]&lt;&gt;&quot;&quot;; UPPER(ORG.LIBREOFFICE.REGEX([.H235];&quot;([a-z0-9])([A-Z])&quot;;&quot;$1_$2&quot;;&quot;g&quot;)); &quot;&quot;)" office:value-type="string" office:string-value="CUP3_CHANNEL_ERROR" calcext:value-type="string">
            <text:p>CUP3_CHANNEL_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5"/>
          <table:table-cell table:style-name="ce7"/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table:style-name="ce7"/>
          <table:table-cell table:number-columns-repeated="16378"/>
        </table:table-row>
        <table:table-row table:style-name="ro1" table:number-rows-repeated="104833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finitions" table:style-name="ta1">
        <table:table-column table:style-name="co13" table:default-cell-style-name="ce13"/>
        <table:table-column table:style-name="co12" table:default-cell-style-name="ce16"/>
        <table:table-column table:style-name="co14" table:default-cell-style-name="ce13"/>
        <table:table-column table:style-name="co15" table:default-cell-style-name="ce13"/>
        <table:table-column table:style-name="co12" table:number-columns-repeated="16378" table:default-cell-style-name="ce13"/>
        <table:table-row table:style-name="ro1" table:number-rows-repeated="2">
          <table:table-cell table:number-columns-repeated="16382"/>
        </table:table-row>
        <table:table-row table:style-name="ro1">
          <table:table-cell table:formula="of:=IF([$List.A3] &lt;&gt;&quot;&quot;; [$List.I3]; &quot;&quot;)" office:value-type="string" office:string-value="CUP1_CONTROL" calcext:value-type="string">
            <text:p>CUP1_CONTROL</text:p>
          </table:table-cell>
          <table:table-cell table:formula="of:=IF([$List.A3] &lt;&gt;&quot;&quot;; [$List.A3]; &quot;&quot;)" office:value-type="float" office:value="1" calcext:value-type="float">
            <text:p>1</text:p>
          </table:table-cell>
          <table:table-cell/>
          <table:table-cell table:formula="of:=IF([.A3]&lt;&gt;&quot;&quot;; COM.MICROSOFT.CONCAT(&quot;#define MODBUS_ADDR_&quot;; [.A3]; &quot; &quot;; [.B3]); &quot;&quot;)" office:value-type="string" office:string-value="#define MODBUS_ADDR_CUP1_CONTROL 1" calcext:value-type="string">
            <text:p>#define MODBUS_ADDR_CUP1_CONTROL 1</text:p>
          </table:table-cell>
          <table:table-cell table:number-columns-repeated="16378"/>
        </table:table-row>
        <table:table-row table:style-name="ro1">
          <table:table-cell table:formula="of:=IF([$List.A4] &lt;&gt;&quot;&quot;; [$List.I4]; &quot;&quot;)" office:value-type="string" office:string-value="EXTERNAL_INHIBITION1" calcext:value-type="string">
            <text:p>EXTERNAL_INHIBITION1</text:p>
          </table:table-cell>
          <table:table-cell table:formula="of:=IF([$List.A4] &lt;&gt;&quot;&quot;; [$List.A4]; &quot;&quot;)" office:value-type="float" office:value="2" calcext:value-type="float">
            <text:p>2</text:p>
          </table:table-cell>
          <table:table-cell/>
          <table:table-cell table:formula="of:=IF([.A4]&lt;&gt;&quot;&quot;; COM.MICROSOFT.CONCAT(&quot;#define MODBUS_ADDR_&quot;; [.A4]; &quot; &quot;; [.B4]); &quot;&quot;)" office:value-type="string" office:string-value="#define MODBUS_ADDR_EXTERNAL_INHIBITION1 2" calcext:value-type="string">
            <text:p>#define MODBUS_ADDR_EXTERNAL_INHIBITION1 2</text:p>
          </table:table-cell>
          <table:table-cell table:number-columns-repeated="16378"/>
        </table:table-row>
        <table:table-row table:style-name="ro1">
          <table:table-cell table:formula="of:=IF([$List.A5] &lt;&gt;&quot;&quot;; [$List.I5]; &quot;&quot;)" office:value-type="string" office:string-value="CUP1_SWITCH" calcext:value-type="string">
            <text:p>CUP1_SWITCH</text:p>
          </table:table-cell>
          <table:table-cell table:formula="of:=IF([$List.A5] &lt;&gt;&quot;&quot;; [$List.A5]; &quot;&quot;)" office:value-type="float" office:value="3" calcext:value-type="float">
            <text:p>3</text:p>
          </table:table-cell>
          <table:table-cell/>
          <table:table-cell table:formula="of:=IF([.A5]&lt;&gt;&quot;&quot;; COM.MICROSOFT.CONCAT(&quot;#define MODBUS_ADDR_&quot;; [.A5]; &quot; &quot;; [.B5]); &quot;&quot;)" office:value-type="string" office:string-value="#define MODBUS_ADDR_CUP1_SWITCH 3" calcext:value-type="string">
            <text:p>#define MODBUS_ADDR_CUP1_SWITCH 3</text:p>
          </table:table-cell>
          <table:table-cell table:number-columns-repeated="16378"/>
        </table:table-row>
        <table:table-row table:style-name="ro1">
          <table:table-cell table:formula="of:=IF([$List.A6] &lt;&gt;&quot;&quot;; [$List.I6]; &quot;&quot;)">
            <text:p/>
          </table:table-cell>
          <table:table-cell table:formula="of:=IF([$List.A6] &lt;&gt;&quot;&quot;; [$List.A6]; &quot;&quot;)" office:value-type="float" office:value="4" calcext:value-type="float">
            <text:p>4</text:p>
          </table:table-cell>
          <table:table-cell/>
          <table:table-cell table:formula="of:=IF([.A6]&lt;&gt;&quot;&quot;; COM.MICROSOFT.CONCAT(&quot;#define MODBUS_ADDR_&quot;; [.A6]; &quot; &quot;; [.B6]); &quot;&quot;)">
            <text:p/>
          </table:table-cell>
          <table:table-cell table:number-columns-repeated="16378"/>
        </table:table-row>
        <table:table-row table:style-name="ro1">
          <table:table-cell table:formula="of:=IF([$List.A7] &lt;&gt;&quot;&quot;; [$List.I7]; &quot;&quot;)">
            <text:p/>
          </table:table-cell>
          <table:table-cell table:formula="of:=IF([$List.A7] &lt;&gt;&quot;&quot;; [$List.A7]; &quot;&quot;)">
            <text:p/>
          </table:table-cell>
          <table:table-cell/>
          <table:table-cell table:formula="of:=IF([.A7]&lt;&gt;&quot;&quot;; COM.MICROSOFT.CONCAT(&quot;#define MODBUS_ADDR_&quot;; [.A7]; &quot; &quot;; [.B7]); &quot;&quot;)">
            <text:p/>
          </table:table-cell>
          <table:table-cell table:number-columns-repeated="16378"/>
        </table:table-row>
        <table:table-row table:style-name="ro1">
          <table:table-cell table:formula="of:=IF([$List.A8] &lt;&gt;&quot;&quot;; [$List.I8]; &quot;&quot;)" office:value-type="string" office:string-value="CUP2_CONTROL" calcext:value-type="string">
            <text:p>CUP2_CONTROL</text:p>
          </table:table-cell>
          <table:table-cell table:formula="of:=IF([$List.A8] &lt;&gt;&quot;&quot;; [$List.A8]; &quot;&quot;)" office:value-type="float" office:value="5" calcext:value-type="float">
            <text:p>5</text:p>
          </table:table-cell>
          <table:table-cell/>
          <table:table-cell table:formula="of:=IF([.A8]&lt;&gt;&quot;&quot;; COM.MICROSOFT.CONCAT(&quot;#define MODBUS_ADDR_&quot;; [.A8]; &quot; &quot;; [.B8]); &quot;&quot;)" office:value-type="string" office:string-value="#define MODBUS_ADDR_CUP2_CONTROL 5" calcext:value-type="string">
            <text:p>#define MODBUS_ADDR_CUP2_CONTROL 5</text:p>
          </table:table-cell>
          <table:table-cell table:number-columns-repeated="16378"/>
        </table:table-row>
        <table:table-row table:style-name="ro1">
          <table:table-cell table:formula="of:=IF([$List.A9] &lt;&gt;&quot;&quot;; [$List.I9]; &quot;&quot;)" office:value-type="string" office:string-value="EXTERNAL_INHIBITION2" calcext:value-type="string">
            <text:p>EXTERNAL_INHIBITION2</text:p>
          </table:table-cell>
          <table:table-cell table:formula="of:=IF([$List.A9] &lt;&gt;&quot;&quot;; [$List.A9]; &quot;&quot;)" office:value-type="float" office:value="6" calcext:value-type="float">
            <text:p>6</text:p>
          </table:table-cell>
          <table:table-cell/>
          <table:table-cell table:formula="of:=IF([.A9]&lt;&gt;&quot;&quot;; COM.MICROSOFT.CONCAT(&quot;#define MODBUS_ADDR_&quot;; [.A9]; &quot; &quot;; [.B9]); &quot;&quot;)" office:value-type="string" office:string-value="#define MODBUS_ADDR_EXTERNAL_INHIBITION2 6" calcext:value-type="string">
            <text:p>#define MODBUS_ADDR_EXTERNAL_INHIBITION2 6</text:p>
          </table:table-cell>
          <table:table-cell table:number-columns-repeated="16378"/>
        </table:table-row>
        <table:table-row table:style-name="ro1">
          <table:table-cell table:formula="of:=IF([$List.A10] &lt;&gt;&quot;&quot;; [$List.I10]; &quot;&quot;)" office:value-type="string" office:string-value="CUP2_SWITCH" calcext:value-type="string">
            <text:p>CUP2_SWITCH</text:p>
          </table:table-cell>
          <table:table-cell table:formula="of:=IF([$List.A10] &lt;&gt;&quot;&quot;; [$List.A10]; &quot;&quot;)" office:value-type="float" office:value="7" calcext:value-type="float">
            <text:p>7</text:p>
          </table:table-cell>
          <table:table-cell/>
          <table:table-cell table:formula="of:=IF([.A10]&lt;&gt;&quot;&quot;; COM.MICROSOFT.CONCAT(&quot;#define MODBUS_ADDR_&quot;; [.A10]; &quot; &quot;; [.B10]); &quot;&quot;)" office:value-type="string" office:string-value="#define MODBUS_ADDR_CUP2_SWITCH 7" calcext:value-type="string">
            <text:p>#define MODBUS_ADDR_CUP2_SWITCH 7</text:p>
          </table:table-cell>
          <table:table-cell table:number-columns-repeated="16378"/>
        </table:table-row>
        <table:table-row table:style-name="ro1">
          <table:table-cell table:formula="of:=IF([$List.A11] &lt;&gt;&quot;&quot;; [$List.I11]; &quot;&quot;)">
            <text:p/>
          </table:table-cell>
          <table:table-cell table:formula="of:=IF([$List.A11] &lt;&gt;&quot;&quot;; [$List.A11]; &quot;&quot;)" office:value-type="float" office:value="8" calcext:value-type="float">
            <text:p>8</text:p>
          </table:table-cell>
          <table:table-cell/>
          <table:table-cell table:formula="of:=IF([.A11]&lt;&gt;&quot;&quot;; COM.MICROSOFT.CONCAT(&quot;#define MODBUS_ADDR_&quot;; [.A11]; &quot; &quot;; [.B11]); &quot;&quot;)">
            <text:p/>
          </table:table-cell>
          <table:table-cell table:number-columns-repeated="16378"/>
        </table:table-row>
        <table:table-row table:style-name="ro1">
          <table:table-cell table:formula="of:=IF([$List.A12] &lt;&gt;&quot;&quot;; [$List.I12]; &quot;&quot;)">
            <text:p/>
          </table:table-cell>
          <table:table-cell table:formula="of:=IF([$List.A12] &lt;&gt;&quot;&quot;; [$List.A12]; &quot;&quot;)">
            <text:p/>
          </table:table-cell>
          <table:table-cell/>
          <table:table-cell table:formula="of:=IF([.A12]&lt;&gt;&quot;&quot;; COM.MICROSOFT.CONCAT(&quot;#define MODBUS_ADDR_&quot;; [.A12]; &quot; &quot;; [.B12]); &quot;&quot;)">
            <text:p/>
          </table:table-cell>
          <table:table-cell table:number-columns-repeated="16378"/>
        </table:table-row>
        <table:table-row table:style-name="ro1">
          <table:table-cell table:formula="of:=IF([$List.A13] &lt;&gt;&quot;&quot;; [$List.I13]; &quot;&quot;)" office:value-type="string" office:string-value="CUP3_CONTROL" calcext:value-type="string">
            <text:p>CUP3_CONTROL</text:p>
          </table:table-cell>
          <table:table-cell table:formula="of:=IF([$List.A13] &lt;&gt;&quot;&quot;; [$List.A13]; &quot;&quot;)" office:value-type="float" office:value="9" calcext:value-type="float">
            <text:p>9</text:p>
          </table:table-cell>
          <table:table-cell/>
          <table:table-cell table:formula="of:=IF([.A13]&lt;&gt;&quot;&quot;; COM.MICROSOFT.CONCAT(&quot;#define MODBUS_ADDR_&quot;; [.A13]; &quot; &quot;; [.B13]); &quot;&quot;)" office:value-type="string" office:string-value="#define MODBUS_ADDR_CUP3_CONTROL 9" calcext:value-type="string">
            <text:p>#define MODBUS_ADDR_CUP3_CONTROL 9</text:p>
          </table:table-cell>
          <table:table-cell table:number-columns-repeated="16378"/>
        </table:table-row>
        <table:table-row table:style-name="ro1">
          <table:table-cell table:formula="of:=IF([$List.A14] &lt;&gt;&quot;&quot;; [$List.I14]; &quot;&quot;)" office:value-type="string" office:string-value="EXTERNAL_INHIBITION3" calcext:value-type="string">
            <text:p>EXTERNAL_INHIBITION3</text:p>
          </table:table-cell>
          <table:table-cell table:formula="of:=IF([$List.A14] &lt;&gt;&quot;&quot;; [$List.A14]; &quot;&quot;)" office:value-type="float" office:value="10" calcext:value-type="float">
            <text:p>10</text:p>
          </table:table-cell>
          <table:table-cell/>
          <table:table-cell table:formula="of:=IF([.A14]&lt;&gt;&quot;&quot;; COM.MICROSOFT.CONCAT(&quot;#define MODBUS_ADDR_&quot;; [.A14]; &quot; &quot;; [.B14]); &quot;&quot;)" office:value-type="string" office:string-value="#define MODBUS_ADDR_EXTERNAL_INHIBITION3 10" calcext:value-type="string">
            <text:p>#define MODBUS_ADDR_EXTERNAL_INHIBITION3 10</text:p>
          </table:table-cell>
          <table:table-cell table:number-columns-repeated="16378"/>
        </table:table-row>
        <table:table-row table:style-name="ro1">
          <table:table-cell table:formula="of:=IF([$List.A15] &lt;&gt;&quot;&quot;; [$List.I15]; &quot;&quot;)" office:value-type="string" office:string-value="CUP3_SWITCH_A" calcext:value-type="string">
            <text:p>CUP3_SWITCH_A</text:p>
          </table:table-cell>
          <table:table-cell table:formula="of:=IF([$List.A15] &lt;&gt;&quot;&quot;; [$List.A15]; &quot;&quot;)" office:value-type="float" office:value="11" calcext:value-type="float">
            <text:p>11</text:p>
          </table:table-cell>
          <table:table-cell/>
          <table:table-cell table:formula="of:=IF([.A15]&lt;&gt;&quot;&quot;; COM.MICROSOFT.CONCAT(&quot;#define MODBUS_ADDR_&quot;; [.A15]; &quot; &quot;; [.B15]); &quot;&quot;)" office:value-type="string" office:string-value="#define MODBUS_ADDR_CUP3_SWITCH_A 11" calcext:value-type="string">
            <text:p>#define MODBUS_ADDR_CUP3_SWITCH_A 11</text:p>
          </table:table-cell>
          <table:table-cell table:number-columns-repeated="16378"/>
        </table:table-row>
        <table:table-row table:style-name="ro1">
          <table:table-cell table:formula="of:=IF([$List.A16] &lt;&gt;&quot;&quot;; [$List.I16]; &quot;&quot;)" office:value-type="string" office:string-value="CUP3_SWITCH_B" calcext:value-type="string">
            <text:p>CUP3_SWITCH_B</text:p>
          </table:table-cell>
          <table:table-cell table:formula="of:=IF([$List.A16] &lt;&gt;&quot;&quot;; [$List.A16]; &quot;&quot;)" office:value-type="float" office:value="12" calcext:value-type="float">
            <text:p>12</text:p>
          </table:table-cell>
          <table:table-cell/>
          <table:table-cell table:formula="of:=IF([.A16]&lt;&gt;&quot;&quot;; COM.MICROSOFT.CONCAT(&quot;#define MODBUS_ADDR_&quot;; [.A16]; &quot; &quot;; [.B16]); &quot;&quot;)" office:value-type="string" office:string-value="#define MODBUS_ADDR_CUP3_SWITCH_B 12" calcext:value-type="string">
            <text:p>#define MODBUS_ADDR_CUP3_SWITCH_B 12</text:p>
          </table:table-cell>
          <table:table-cell table:number-columns-repeated="16378"/>
        </table:table-row>
        <table:table-row table:style-name="ro1">
          <table:table-cell table:formula="of:=IF([$List.A17] &lt;&gt;&quot;&quot;; [$List.I17]; &quot;&quot;)">
            <text:p/>
          </table:table-cell>
          <table:table-cell table:formula="of:=IF([$List.A17] &lt;&gt;&quot;&quot;; [$List.A17]; &quot;&quot;)">
            <text:p/>
          </table:table-cell>
          <table:table-cell/>
          <table:table-cell table:formula="of:=IF([.A17]&lt;&gt;&quot;&quot;; COM.MICROSOFT.CONCAT(&quot;#define MODBUS_ADDR_&quot;; [.A17]; &quot; &quot;; [.B17]); &quot;&quot;)">
            <text:p/>
          </table:table-cell>
          <table:table-cell table:number-columns-repeated="16378"/>
        </table:table-row>
        <table:table-row table:style-name="ro1">
          <table:table-cell table:formula="of:=IF([$List.A18] &lt;&gt;&quot;&quot;; [$List.I18]; &quot;&quot;)" office:value-type="string" office:string-value="CUP1_ERROR_RECOVERY" calcext:value-type="string">
            <text:p>CUP1_ERROR_RECOVERY</text:p>
          </table:table-cell>
          <table:table-cell table:formula="of:=IF([$List.A18] &lt;&gt;&quot;&quot;; [$List.A18]; &quot;&quot;)" office:value-type="float" office:value="13" calcext:value-type="float">
            <text:p>13</text:p>
          </table:table-cell>
          <table:table-cell/>
          <table:table-cell table:formula="of:=IF([.A18]&lt;&gt;&quot;&quot;; COM.MICROSOFT.CONCAT(&quot;#define MODBUS_ADDR_&quot;; [.A18]; &quot; &quot;; [.B18]); &quot;&quot;)" office:value-type="string" office:string-value="#define MODBUS_ADDR_CUP1_ERROR_RECOVERY 13" calcext:value-type="string">
            <text:p>#define MODBUS_ADDR_CUP1_ERROR_RECOVERY 13</text:p>
          </table:table-cell>
          <table:table-cell table:number-columns-repeated="16378"/>
        </table:table-row>
        <table:table-row table:style-name="ro1">
          <table:table-cell table:formula="of:=IF([$List.A19] &lt;&gt;&quot;&quot;; [$List.I19]; &quot;&quot;)" office:value-type="string" office:string-value="CUP2_ERROR_RECOVERY" calcext:value-type="string">
            <text:p>CUP2_ERROR_RECOVERY</text:p>
          </table:table-cell>
          <table:table-cell table:formula="of:=IF([$List.A19] &lt;&gt;&quot;&quot;; [$List.A19]; &quot;&quot;)" office:value-type="float" office:value="14" calcext:value-type="float">
            <text:p>14</text:p>
          </table:table-cell>
          <table:table-cell/>
          <table:table-cell table:formula="of:=IF([.A19]&lt;&gt;&quot;&quot;; COM.MICROSOFT.CONCAT(&quot;#define MODBUS_ADDR_&quot;; [.A19]; &quot; &quot;; [.B19]); &quot;&quot;)" office:value-type="string" office:string-value="#define MODBUS_ADDR_CUP2_ERROR_RECOVERY 14" calcext:value-type="string">
            <text:p>#define MODBUS_ADDR_CUP2_ERROR_RECOVERY 14</text:p>
          </table:table-cell>
          <table:table-cell table:number-columns-repeated="16378"/>
        </table:table-row>
        <table:table-row table:style-name="ro1">
          <table:table-cell table:formula="of:=IF([$List.A20] &lt;&gt;&quot;&quot;; [$List.I20]; &quot;&quot;)" office:value-type="string" office:string-value="CUP3_ERROR_RECOVERY" calcext:value-type="string">
            <text:p>CUP3_ERROR_RECOVERY</text:p>
          </table:table-cell>
          <table:table-cell table:formula="of:=IF([$List.A20] &lt;&gt;&quot;&quot;; [$List.A20]; &quot;&quot;)" office:value-type="float" office:value="15" calcext:value-type="float">
            <text:p>15</text:p>
          </table:table-cell>
          <table:table-cell/>
          <table:table-cell table:formula="of:=IF([.A20]&lt;&gt;&quot;&quot;; COM.MICROSOFT.CONCAT(&quot;#define MODBUS_ADDR_&quot;; [.A20]; &quot; &quot;; [.B20]); &quot;&quot;)" office:value-type="string" office:string-value="#define MODBUS_ADDR_CUP3_ERROR_RECOVERY 15" calcext:value-type="string">
            <text:p>#define MODBUS_ADDR_CUP3_ERROR_RECOVERY 15</text:p>
          </table:table-cell>
          <table:table-cell table:number-columns-repeated="16378"/>
        </table:table-row>
        <table:table-row table:style-name="ro1">
          <table:table-cell table:formula="of:=IF([$List.A21] &lt;&gt;&quot;&quot;; [$List.I21]; &quot;&quot;)">
            <text:p/>
          </table:table-cell>
          <table:table-cell table:formula="of:=IF([$List.A21] &lt;&gt;&quot;&quot;; [$List.A21]; &quot;&quot;)">
            <text:p/>
          </table:table-cell>
          <table:table-cell/>
          <table:table-cell table:formula="of:=IF([.A21]&lt;&gt;&quot;&quot;; COM.MICROSOFT.CONCAT(&quot;#define MODBUS_ADDR_&quot;; [.A21]; &quot; &quot;; [.B21]); &quot;&quot;)">
            <text:p/>
          </table:table-cell>
          <table:table-cell table:number-columns-repeated="16378"/>
        </table:table-row>
        <table:table-row table:style-name="ro1">
          <table:table-cell table:formula="of:=IF([$List.A22] &lt;&gt;&quot;&quot;; [$List.I22]; &quot;&quot;)" office:value-type="string" office:string-value="CUP1_REQUESTED_STATE" calcext:value-type="string">
            <text:p>CUP1_REQUESTED_STATE</text:p>
          </table:table-cell>
          <table:table-cell table:formula="of:=IF([$List.A22] &lt;&gt;&quot;&quot;; [$List.A22]; &quot;&quot;)" office:value-type="float" office:value="16" calcext:value-type="float">
            <text:p>16</text:p>
          </table:table-cell>
          <table:table-cell/>
          <table:table-cell table:formula="of:=IF([.A22]&lt;&gt;&quot;&quot;; COM.MICROSOFT.CONCAT(&quot;#define MODBUS_ADDR_&quot;; [.A22]; &quot; &quot;; [.B22]); &quot;&quot;)" office:value-type="string" office:string-value="#define MODBUS_ADDR_CUP1_REQUESTED_STATE 16" calcext:value-type="string">
            <text:p>#define MODBUS_ADDR_CUP1_REQUESTED_STATE 16</text:p>
          </table:table-cell>
          <table:table-cell table:number-columns-repeated="16378"/>
        </table:table-row>
        <table:table-row table:style-name="ro1">
          <table:table-cell table:formula="of:=IF([$List.A23] &lt;&gt;&quot;&quot;; [$List.I23]; &quot;&quot;)" office:value-type="string" office:string-value="CUP2_REQUESTED_STATE" calcext:value-type="string">
            <text:p>CUP2_REQUESTED_STATE</text:p>
          </table:table-cell>
          <table:table-cell table:formula="of:=IF([$List.A23] &lt;&gt;&quot;&quot;; [$List.A23]; &quot;&quot;)" office:value-type="float" office:value="17" calcext:value-type="float">
            <text:p>17</text:p>
          </table:table-cell>
          <table:table-cell/>
          <table:table-cell table:formula="of:=IF([.A23]&lt;&gt;&quot;&quot;; COM.MICROSOFT.CONCAT(&quot;#define MODBUS_ADDR_&quot;; [.A23]; &quot; &quot;; [.B23]); &quot;&quot;)" office:value-type="string" office:string-value="#define MODBUS_ADDR_CUP2_REQUESTED_STATE 17" calcext:value-type="string">
            <text:p>#define MODBUS_ADDR_CUP2_REQUESTED_STATE 17</text:p>
          </table:table-cell>
          <table:table-cell table:number-columns-repeated="16378"/>
        </table:table-row>
        <table:table-row table:style-name="ro1">
          <table:table-cell table:formula="of:=IF([$List.A24] &lt;&gt;&quot;&quot;; [$List.I24]; &quot;&quot;)" office:value-type="string" office:string-value="CUP3_REQUESTED_STATE" calcext:value-type="string">
            <text:p>CUP3_REQUESTED_STATE</text:p>
          </table:table-cell>
          <table:table-cell table:formula="of:=IF([$List.A24] &lt;&gt;&quot;&quot;; [$List.A24]; &quot;&quot;)" office:value-type="float" office:value="18" calcext:value-type="float">
            <text:p>18</text:p>
          </table:table-cell>
          <table:table-cell/>
          <table:table-cell table:formula="of:=IF([.A24]&lt;&gt;&quot;&quot;; COM.MICROSOFT.CONCAT(&quot;#define MODBUS_ADDR_&quot;; [.A24]; &quot; &quot;; [.B24]); &quot;&quot;)" office:value-type="string" office:string-value="#define MODBUS_ADDR_CUP3_REQUESTED_STATE 18" calcext:value-type="string">
            <text:p>#define MODBUS_ADDR_CUP3_REQUESTED_STATE 18</text:p>
          </table:table-cell>
          <table:table-cell table:number-columns-repeated="16378"/>
        </table:table-row>
        <table:table-row table:style-name="ro1">
          <table:table-cell table:formula="of:=IF([$List.A25] &lt;&gt;&quot;&quot;; [$List.I25]; &quot;&quot;)">
            <text:p/>
          </table:table-cell>
          <table:table-cell table:formula="of:=IF([$List.A25] &lt;&gt;&quot;&quot;; [$List.A25]; &quot;&quot;)">
            <text:p/>
          </table:table-cell>
          <table:table-cell/>
          <table:table-cell table:formula="of:=IF([.A25]&lt;&gt;&quot;&quot;; COM.MICROSOFT.CONCAT(&quot;#define MODBUS_ADDR_&quot;; [.A25]; &quot; &quot;; [.B25]); &quot;&quot;)">
            <text:p/>
          </table:table-cell>
          <table:table-cell table:number-columns-repeated="16378"/>
        </table:table-row>
        <table:table-row table:style-name="ro1">
          <table:table-cell table:formula="of:=IF([$List.A26] &lt;&gt;&quot;&quot;; [$List.I26]; &quot;&quot;)" office:value-type="string" office:string-value="ACTUATOR1_CONTROL" calcext:value-type="string">
            <text:p>ACTUATOR1_CONTROL</text:p>
          </table:table-cell>
          <table:table-cell table:formula="of:=IF([$List.A26] &lt;&gt;&quot;&quot;; [$List.A26]; &quot;&quot;)" office:value-type="float" office:value="19" calcext:value-type="float">
            <text:p>19</text:p>
          </table:table-cell>
          <table:table-cell/>
          <table:table-cell table:formula="of:=IF([.A26]&lt;&gt;&quot;&quot;; COM.MICROSOFT.CONCAT(&quot;#define MODBUS_ADDR_&quot;; [.A26]; &quot; &quot;; [.B26]); &quot;&quot;)" office:value-type="string" office:string-value="#define MODBUS_ADDR_ACTUATOR1_CONTROL 19" calcext:value-type="string">
            <text:p>#define MODBUS_ADDR_ACTUATOR1_CONTROL 19</text:p>
          </table:table-cell>
          <table:table-cell table:number-columns-repeated="16378"/>
        </table:table-row>
        <table:table-row table:style-name="ro1">
          <table:table-cell table:formula="of:=IF([$List.A27] &lt;&gt;&quot;&quot;; [$List.I27]; &quot;&quot;)" office:value-type="string" office:string-value="ACTUATOR2_CONTROL" calcext:value-type="string">
            <text:p>ACTUATOR2_CONTROL</text:p>
          </table:table-cell>
          <table:table-cell table:formula="of:=IF([$List.A27] &lt;&gt;&quot;&quot;; [$List.A27]; &quot;&quot;)" office:value-type="float" office:value="20" calcext:value-type="float">
            <text:p>20</text:p>
          </table:table-cell>
          <table:table-cell/>
          <table:table-cell table:formula="of:=IF([.A27]&lt;&gt;&quot;&quot;; COM.MICROSOFT.CONCAT(&quot;#define MODBUS_ADDR_&quot;; [.A27]; &quot; &quot;; [.B27]); &quot;&quot;)" office:value-type="string" office:string-value="#define MODBUS_ADDR_ACTUATOR2_CONTROL 20" calcext:value-type="string">
            <text:p>#define MODBUS_ADDR_ACTUATOR2_CONTROL 20</text:p>
          </table:table-cell>
          <table:table-cell table:number-columns-repeated="16378"/>
        </table:table-row>
        <table:table-row table:style-name="ro1">
          <table:table-cell table:formula="of:=IF([$List.A28] &lt;&gt;&quot;&quot;; [$List.I28]; &quot;&quot;)" office:value-type="string" office:string-value="ACTUATOR3_CONTROL_IN" calcext:value-type="string">
            <text:p>ACTUATOR3_CONTROL_IN</text:p>
          </table:table-cell>
          <table:table-cell table:formula="of:=IF([$List.A28] &lt;&gt;&quot;&quot;; [$List.A28]; &quot;&quot;)" office:value-type="float" office:value="21" calcext:value-type="float">
            <text:p>21</text:p>
          </table:table-cell>
          <table:table-cell/>
          <table:table-cell table:formula="of:=IF([.A28]&lt;&gt;&quot;&quot;; COM.MICROSOFT.CONCAT(&quot;#define MODBUS_ADDR_&quot;; [.A28]; &quot; &quot;; [.B28]); &quot;&quot;)" office:value-type="string" office:string-value="#define MODBUS_ADDR_ACTUATOR3_CONTROL_IN 21" calcext:value-type="string">
            <text:p>#define MODBUS_ADDR_ACTUATOR3_CONTROL_IN 21</text:p>
          </table:table-cell>
          <table:table-cell table:number-columns-repeated="16378"/>
        </table:table-row>
        <table:table-row table:style-name="ro1">
          <table:table-cell table:formula="of:=IF([$List.A29] &lt;&gt;&quot;&quot;; [$List.I29]; &quot;&quot;)" office:value-type="string" office:string-value="ACTUATOR3_CONTROL_OUT" calcext:value-type="string">
            <text:p>ACTUATOR3_CONTROL_OUT</text:p>
          </table:table-cell>
          <table:table-cell table:formula="of:=IF([$List.A29] &lt;&gt;&quot;&quot;; [$List.A29]; &quot;&quot;)" office:value-type="float" office:value="22" calcext:value-type="float">
            <text:p>22</text:p>
          </table:table-cell>
          <table:table-cell/>
          <table:table-cell table:formula="of:=IF([.A29]&lt;&gt;&quot;&quot;; COM.MICROSOFT.CONCAT(&quot;#define MODBUS_ADDR_&quot;; [.A29]; &quot; &quot;; [.B29]); &quot;&quot;)" office:value-type="string" office:string-value="#define MODBUS_ADDR_ACTUATOR3_CONTROL_OUT 22" calcext:value-type="string">
            <text:p>#define MODBUS_ADDR_ACTUATOR3_CONTROL_OUT 22</text:p>
          </table:table-cell>
          <table:table-cell table:number-columns-repeated="16378"/>
        </table:table-row>
        <table:table-row table:style-name="ro1">
          <table:table-cell table:formula="of:=IF([$List.A30] &lt;&gt;&quot;&quot;; [$List.I30]; &quot;&quot;)" office:value-type="string" office:string-value="ACTUATOR3_CONTROL_BRAKE" calcext:value-type="string">
            <text:p>ACTUATOR3_CONTROL_BRAKE</text:p>
          </table:table-cell>
          <table:table-cell table:formula="of:=IF([$List.A30] &lt;&gt;&quot;&quot;; [$List.A30]; &quot;&quot;)" office:value-type="float" office:value="23" calcext:value-type="float">
            <text:p>23</text:p>
          </table:table-cell>
          <table:table-cell/>
          <table:table-cell table:formula="of:=IF([.A30]&lt;&gt;&quot;&quot;; COM.MICROSOFT.CONCAT(&quot;#define MODBUS_ADDR_&quot;; [.A30]; &quot; &quot;; [.B30]); &quot;&quot;)" office:value-type="string" office:string-value="#define MODBUS_ADDR_ACTUATOR3_CONTROL_BRAKE 23" calcext:value-type="string">
            <text:p>#define MODBUS_ADDR_ACTUATOR3_CONTROL_BRAKE 23</text:p>
          </table:table-cell>
          <table:table-cell table:number-columns-repeated="16378"/>
        </table:table-row>
        <table:table-row table:style-name="ro1">
          <table:table-cell table:formula="of:=IF([$List.A31] &lt;&gt;&quot;&quot;; [$List.I31]; &quot;&quot;)">
            <text:p/>
          </table:table-cell>
          <table:table-cell table:formula="of:=IF([$List.A31] &lt;&gt;&quot;&quot;; [$List.A31]; &quot;&quot;)">
            <text:p/>
          </table:table-cell>
          <table:table-cell/>
          <table:table-cell table:formula="of:=IF([.A31]&lt;&gt;&quot;&quot;; COM.MICROSOFT.CONCAT(&quot;#define MODBUS_ADDR_&quot;; [.A31]; &quot; &quot;; [.B31]); &quot;&quot;)">
            <text:p/>
          </table:table-cell>
          <table:table-cell table:number-columns-repeated="16378"/>
        </table:table-row>
        <table:table-row table:style-name="ro1">
          <table:table-cell table:formula="of:=IF([$List.A32] &lt;&gt;&quot;&quot;; [$List.I32]; &quot;&quot;)">
            <text:p/>
          </table:table-cell>
          <table:table-cell table:formula="of:=IF([$List.A32] &lt;&gt;&quot;&quot;; [$List.A32]; &quot;&quot;)">
            <text:p/>
          </table:table-cell>
          <table:table-cell/>
          <table:table-cell table:formula="of:=IF([.A32]&lt;&gt;&quot;&quot;; COM.MICROSOFT.CONCAT(&quot;#define MODBUS_ADDR_&quot;; [.A32]; &quot; &quot;; [.B32]); &quot;&quot;)">
            <text:p/>
          </table:table-cell>
          <table:table-cell table:number-columns-repeated="16378"/>
        </table:table-row>
        <table:table-row table:style-name="ro1">
          <table:table-cell table:formula="of:=IF([$List.A33] &lt;&gt;&quot;&quot;; [$List.I33]; &quot;&quot;)" office:value-type="string" office:string-value="ERROR_CODE" calcext:value-type="string">
            <text:p>ERROR_CODE</text:p>
          </table:table-cell>
          <table:table-cell table:formula="of:=IF([$List.A33] &lt;&gt;&quot;&quot;; [$List.A33]; &quot;&quot;)" office:value-type="float" office:value="1000" calcext:value-type="float">
            <text:p>1000</text:p>
          </table:table-cell>
          <table:table-cell/>
          <table:table-cell table:formula="of:=IF([.A33]&lt;&gt;&quot;&quot;; COM.MICROSOFT.CONCAT(&quot;#define MODBUS_ADDR_&quot;; [.A33]; &quot; &quot;; [.B33]); &quot;&quot;)" office:value-type="string" office:string-value="#define MODBUS_ADDR_ERROR_CODE 1000" calcext:value-type="string">
            <text:p>#define MODBUS_ADDR_ERROR_CODE 1000</text:p>
          </table:table-cell>
          <table:table-cell table:number-columns-repeated="16378"/>
        </table:table-row>
        <table:table-row table:style-name="ro1">
          <table:table-cell table:formula="of:=IF([$List.A34] &lt;&gt;&quot;&quot;; [$List.I34]; &quot;&quot;)" office:value-type="string" office:string-value="LAST_ERROR" calcext:value-type="string">
            <text:p>LAST_ERROR</text:p>
          </table:table-cell>
          <table:table-cell table:formula="of:=IF([$List.A34] &lt;&gt;&quot;&quot;; [$List.A34]; &quot;&quot;)" office:value-type="float" office:value="1001" calcext:value-type="float">
            <text:p>1001</text:p>
          </table:table-cell>
          <table:table-cell/>
          <table:table-cell table:formula="of:=IF([.A34]&lt;&gt;&quot;&quot;; COM.MICROSOFT.CONCAT(&quot;#define MODBUS_ADDR_&quot;; [.A34]; &quot; &quot;; [.B34]); &quot;&quot;)" office:value-type="string" office:string-value="#define MODBUS_ADDR_LAST_ERROR 1001" calcext:value-type="string">
            <text:p>#define MODBUS_ADDR_LAST_ERROR 1001</text:p>
          </table:table-cell>
          <table:table-cell table:number-columns-repeated="16378"/>
        </table:table-row>
        <table:table-row table:style-name="ro1">
          <table:table-cell table:formula="of:=IF([$List.A35] &lt;&gt;&quot;&quot;; [$List.I35]; &quot;&quot;)" office:value-type="string" office:string-value="ERROR_STORAGE" calcext:value-type="string">
            <text:p>ERROR_STORAGE</text:p>
          </table:table-cell>
          <table:table-cell table:formula="of:=IF([$List.A35] &lt;&gt;&quot;&quot;; [$List.A35]; &quot;&quot;)" office:value-type="float" office:value="1002" calcext:value-type="float">
            <text:p>1002</text:p>
          </table:table-cell>
          <table:table-cell/>
          <table:table-cell table:formula="of:=IF([.A35]&lt;&gt;&quot;&quot;; COM.MICROSOFT.CONCAT(&quot;#define MODBUS_ADDR_&quot;; [.A35]; &quot; &quot;; [.B35]); &quot;&quot;)" office:value-type="string" office:string-value="#define MODBUS_ADDR_ERROR_STORAGE 1002" calcext:value-type="string">
            <text:p>#define MODBUS_ADDR_ERROR_STORAGE 1002</text:p>
          </table:table-cell>
          <table:table-cell table:number-columns-repeated="16378"/>
        </table:table-row>
        <table:table-row table:style-name="ro1">
          <table:table-cell table:formula="of:=IF([$List.A36] &lt;&gt;&quot;&quot;; [$List.I36]; &quot;&quot;)">
            <text:p/>
          </table:table-cell>
          <table:table-cell table:formula="of:=IF([$List.A36] &lt;&gt;&quot;&quot;; [$List.A36]; &quot;&quot;)">
            <text:p/>
          </table:table-cell>
          <table:table-cell/>
          <table:table-cell table:formula="of:=IF([.A36]&lt;&gt;&quot;&quot;; COM.MICROSOFT.CONCAT(&quot;#define MODBUS_ADDR_&quot;; [.A36]; &quot; &quot;; [.B36]); &quot;&quot;)">
            <text:p/>
          </table:table-cell>
          <table:table-cell table:number-columns-repeated="16378"/>
        </table:table-row>
        <table:table-row table:style-name="ro1">
          <table:table-cell table:formula="of:=IF([$List.A37] &lt;&gt;&quot;&quot;; [$List.I37]; &quot;&quot;)" office:value-type="string" office:string-value="TIME_LIMIT_INSERTING1" calcext:value-type="string">
            <text:p>TIME_LIMIT_INSERTING1</text:p>
          </table:table-cell>
          <table:table-cell table:formula="of:=IF([$List.A37] &lt;&gt;&quot;&quot;; [$List.A37]; &quot;&quot;)" office:value-type="float" office:value="1003" calcext:value-type="float">
            <text:p>1003</text:p>
          </table:table-cell>
          <table:table-cell/>
          <table:table-cell table:formula="of:=IF([.A37]&lt;&gt;&quot;&quot;; COM.MICROSOFT.CONCAT(&quot;#define MODBUS_ADDR_&quot;; [.A37]; &quot; &quot;; [.B37]); &quot;&quot;)" office:value-type="string" office:string-value="#define MODBUS_ADDR_TIME_LIMIT_INSERTING1 1003" calcext:value-type="string">
            <text:p>#define MODBUS_ADDR_TIME_LIMIT_INSERTING1 1003</text:p>
          </table:table-cell>
          <table:table-cell table:number-columns-repeated="16378"/>
        </table:table-row>
        <table:table-row table:style-name="ro1">
          <table:table-cell table:formula="of:=IF([$List.A38] &lt;&gt;&quot;&quot;; [$List.I38]; &quot;&quot;)" office:value-type="string" office:string-value="TIME_LIMIT_INSERTING2" calcext:value-type="string">
            <text:p>TIME_LIMIT_INSERTING2</text:p>
          </table:table-cell>
          <table:table-cell table:formula="of:=IF([$List.A38] &lt;&gt;&quot;&quot;; [$List.A38]; &quot;&quot;)" office:value-type="float" office:value="1004" calcext:value-type="float">
            <text:p>1004</text:p>
          </table:table-cell>
          <table:table-cell/>
          <table:table-cell table:formula="of:=IF([.A38]&lt;&gt;&quot;&quot;; COM.MICROSOFT.CONCAT(&quot;#define MODBUS_ADDR_&quot;; [.A38]; &quot; &quot;; [.B38]); &quot;&quot;)" office:value-type="string" office:string-value="#define MODBUS_ADDR_TIME_LIMIT_INSERTING2 1004" calcext:value-type="string">
            <text:p>#define MODBUS_ADDR_TIME_LIMIT_INSERTING2 1004</text:p>
          </table:table-cell>
          <table:table-cell table:number-columns-repeated="16378"/>
        </table:table-row>
        <table:table-row table:style-name="ro1">
          <table:table-cell table:formula="of:=IF([$List.A39] &lt;&gt;&quot;&quot;; [$List.I39]; &quot;&quot;)" office:value-type="string" office:string-value="TIME_LIMIT_INSERTING3" calcext:value-type="string">
            <text:p>TIME_LIMIT_INSERTING3</text:p>
          </table:table-cell>
          <table:table-cell table:formula="of:=IF([$List.A39] &lt;&gt;&quot;&quot;; [$List.A39]; &quot;&quot;)" office:value-type="float" office:value="1005" calcext:value-type="float">
            <text:p>1005</text:p>
          </table:table-cell>
          <table:table-cell/>
          <table:table-cell table:formula="of:=IF([.A39]&lt;&gt;&quot;&quot;; COM.MICROSOFT.CONCAT(&quot;#define MODBUS_ADDR_&quot;; [.A39]; &quot; &quot;; [.B39]); &quot;&quot;)" office:value-type="string" office:string-value="#define MODBUS_ADDR_TIME_LIMIT_INSERTING3 1005" calcext:value-type="string">
            <text:p>#define MODBUS_ADDR_TIME_LIMIT_INSERTING3 1005</text:p>
          </table:table-cell>
          <table:table-cell table:number-columns-repeated="16378"/>
        </table:table-row>
        <table:table-row table:style-name="ro1">
          <table:table-cell table:formula="of:=IF([$List.A40] &lt;&gt;&quot;&quot;; [$List.I40]; &quot;&quot;)" office:value-type="string" office:string-value="TIME_LIMIT_WITHDRAWING1" calcext:value-type="string">
            <text:p>TIME_LIMIT_WITHDRAWING1</text:p>
          </table:table-cell>
          <table:table-cell table:formula="of:=IF([$List.A40] &lt;&gt;&quot;&quot;; [$List.A40]; &quot;&quot;)" office:value-type="float" office:value="1006" calcext:value-type="float">
            <text:p>1006</text:p>
          </table:table-cell>
          <table:table-cell/>
          <table:table-cell table:formula="of:=IF([.A40]&lt;&gt;&quot;&quot;; COM.MICROSOFT.CONCAT(&quot;#define MODBUS_ADDR_&quot;; [.A40]; &quot; &quot;; [.B40]); &quot;&quot;)" office:value-type="string" office:string-value="#define MODBUS_ADDR_TIME_LIMIT_WITHDRAWING1 1006" calcext:value-type="string">
            <text:p>#define MODBUS_ADDR_TIME_LIMIT_WITHDRAWING1 1006</text:p>
          </table:table-cell>
          <table:table-cell table:number-columns-repeated="16378"/>
        </table:table-row>
        <table:table-row table:style-name="ro1">
          <table:table-cell table:formula="of:=IF([$List.A41] &lt;&gt;&quot;&quot;; [$List.I41]; &quot;&quot;)" office:value-type="string" office:string-value="TIME_LIMIT_WITHDRAWING2" calcext:value-type="string">
            <text:p>TIME_LIMIT_WITHDRAWING2</text:p>
          </table:table-cell>
          <table:table-cell table:formula="of:=IF([$List.A41] &lt;&gt;&quot;&quot;; [$List.A41]; &quot;&quot;)" office:value-type="float" office:value="1007" calcext:value-type="float">
            <text:p>1007</text:p>
          </table:table-cell>
          <table:table-cell/>
          <table:table-cell table:formula="of:=IF([.A41]&lt;&gt;&quot;&quot;; COM.MICROSOFT.CONCAT(&quot;#define MODBUS_ADDR_&quot;; [.A41]; &quot; &quot;; [.B41]); &quot;&quot;)" office:value-type="string" office:string-value="#define MODBUS_ADDR_TIME_LIMIT_WITHDRAWING2 1007" calcext:value-type="string">
            <text:p>#define MODBUS_ADDR_TIME_LIMIT_WITHDRAWING2 1007</text:p>
          </table:table-cell>
          <table:table-cell table:number-columns-repeated="16378"/>
        </table:table-row>
        <table:table-row table:style-name="ro1">
          <table:table-cell table:formula="of:=IF([$List.A42] &lt;&gt;&quot;&quot;; [$List.I42]; &quot;&quot;)" office:value-type="string" office:string-value="TIME_LIMIT_WITHDRAWING3" calcext:value-type="string">
            <text:p>TIME_LIMIT_WITHDRAWING3</text:p>
          </table:table-cell>
          <table:table-cell table:formula="of:=IF([$List.A42] &lt;&gt;&quot;&quot;; [$List.A42]; &quot;&quot;)" office:value-type="float" office:value="1008" calcext:value-type="float">
            <text:p>1008</text:p>
          </table:table-cell>
          <table:table-cell/>
          <table:table-cell table:formula="of:=IF([.A42]&lt;&gt;&quot;&quot;; COM.MICROSOFT.CONCAT(&quot;#define MODBUS_ADDR_&quot;; [.A42]; &quot; &quot;; [.B42]); &quot;&quot;)" office:value-type="string" office:string-value="#define MODBUS_ADDR_TIME_LIMIT_WITHDRAWING3 1008" calcext:value-type="string">
            <text:p>#define MODBUS_ADDR_TIME_LIMIT_WITHDRAWING3 1008</text:p>
          </table:table-cell>
          <table:table-cell table:number-columns-repeated="16378"/>
        </table:table-row>
        <table:table-row table:style-name="ro1">
          <table:table-cell table:formula="of:=IF([$List.A43] &lt;&gt;&quot;&quot;; [$List.I43]; &quot;&quot;)">
            <text:p/>
          </table:table-cell>
          <table:table-cell table:formula="of:=IF([$List.A43] &lt;&gt;&quot;&quot;; [$List.A43]; &quot;&quot;)">
            <text:p/>
          </table:table-cell>
          <table:table-cell/>
          <table:table-cell table:formula="of:=IF([.A43]&lt;&gt;&quot;&quot;; COM.MICROSOFT.CONCAT(&quot;#define MODBUS_ADDR_&quot;; [.A43]; &quot; &quot;; [.B43]); &quot;&quot;)">
            <text:p/>
          </table:table-cell>
          <table:table-cell table:number-columns-repeated="16378"/>
        </table:table-row>
        <table:table-row table:style-name="ro1">
          <table:table-cell table:formula="of:=IF([$List.A44] &lt;&gt;&quot;&quot;; [$List.I44]; &quot;&quot;)" office:value-type="string" office:string-value="ACTIVE_CUP" calcext:value-type="string">
            <text:p>ACTIVE_CUP</text:p>
          </table:table-cell>
          <table:table-cell table:formula="of:=IF([$List.A44] &lt;&gt;&quot;&quot;; [$List.A44]; &quot;&quot;)" office:value-type="float" office:value="1009" calcext:value-type="float">
            <text:p>1009</text:p>
          </table:table-cell>
          <table:table-cell/>
          <table:table-cell table:formula="of:=IF([.A44]&lt;&gt;&quot;&quot;; COM.MICROSOFT.CONCAT(&quot;#define MODBUS_ADDR_&quot;; [.A44]; &quot; &quot;; [.B44]); &quot;&quot;)" office:value-type="string" office:string-value="#define MODBUS_ADDR_ACTIVE_CUP 1009" calcext:value-type="string">
            <text:p>#define MODBUS_ADDR_ACTIVE_CUP 1009</text:p>
          </table:table-cell>
          <table:table-cell table:number-columns-repeated="16378"/>
        </table:table-row>
        <table:table-row table:style-name="ro1">
          <table:table-cell table:formula="of:=IF([$List.A45] &lt;&gt;&quot;&quot;; [$List.I45]; &quot;&quot;)">
            <text:p/>
          </table:table-cell>
          <table:table-cell table:formula="of:=IF([$List.A45] &lt;&gt;&quot;&quot;; [$List.A45]; &quot;&quot;)">
            <text:p/>
          </table:table-cell>
          <table:table-cell/>
          <table:table-cell table:formula="of:=IF([.A45]&lt;&gt;&quot;&quot;; COM.MICROSOFT.CONCAT(&quot;#define MODBUS_ADDR_&quot;; [.A45]; &quot; &quot;; [.B45]); &quot;&quot;)">
            <text:p/>
          </table:table-cell>
          <table:table-cell table:number-columns-repeated="16378"/>
        </table:table-row>
        <table:table-row table:style-name="ro1">
          <table:table-cell table:formula="of:=IF([$List.A46] &lt;&gt;&quot;&quot;; [$List.I46]; &quot;&quot;)" office:value-type="string" office:string-value="CUP1_FSM_STATE" calcext:value-type="string">
            <text:p>CUP1_FSM_STATE</text:p>
          </table:table-cell>
          <table:table-cell table:formula="of:=IF([$List.A46] &lt;&gt;&quot;&quot;; [$List.A46]; &quot;&quot;)" office:value-type="float" office:value="1010" calcext:value-type="float">
            <text:p>1010</text:p>
          </table:table-cell>
          <table:table-cell/>
          <table:table-cell table:formula="of:=IF([.A46]&lt;&gt;&quot;&quot;; COM.MICROSOFT.CONCAT(&quot;#define MODBUS_ADDR_&quot;; [.A46]; &quot; &quot;; [.B46]); &quot;&quot;)" office:value-type="string" office:string-value="#define MODBUS_ADDR_CUP1_FSM_STATE 1010" calcext:value-type="string">
            <text:p>#define MODBUS_ADDR_CUP1_FSM_STATE 1010</text:p>
          </table:table-cell>
          <table:table-cell table:number-columns-repeated="16378"/>
        </table:table-row>
        <table:table-row table:style-name="ro1">
          <table:table-cell table:formula="of:=IF([$List.A47] &lt;&gt;&quot;&quot;; [$List.I47]; &quot;&quot;)" office:value-type="string" office:string-value="CUP2_FSM_STATE" calcext:value-type="string">
            <text:p>CUP2_FSM_STATE</text:p>
          </table:table-cell>
          <table:table-cell table:formula="of:=IF([$List.A47] &lt;&gt;&quot;&quot;; [$List.A47]; &quot;&quot;)" office:value-type="float" office:value="1011" calcext:value-type="float">
            <text:p>1011</text:p>
          </table:table-cell>
          <table:table-cell/>
          <table:table-cell table:formula="of:=IF([.A47]&lt;&gt;&quot;&quot;; COM.MICROSOFT.CONCAT(&quot;#define MODBUS_ADDR_&quot;; [.A47]; &quot; &quot;; [.B47]); &quot;&quot;)" office:value-type="string" office:string-value="#define MODBUS_ADDR_CUP2_FSM_STATE 1011" calcext:value-type="string">
            <text:p>#define MODBUS_ADDR_CUP2_FSM_STATE 1011</text:p>
          </table:table-cell>
          <table:table-cell table:number-columns-repeated="16378"/>
        </table:table-row>
        <table:table-row table:style-name="ro1">
          <table:table-cell table:formula="of:=IF([$List.A48] &lt;&gt;&quot;&quot;; [$List.I48]; &quot;&quot;)" office:value-type="string" office:string-value="CUP3_FSM_STATE" calcext:value-type="string">
            <text:p>CUP3_FSM_STATE</text:p>
          </table:table-cell>
          <table:table-cell table:formula="of:=IF([$List.A48] &lt;&gt;&quot;&quot;; [$List.A48]; &quot;&quot;)" office:value-type="float" office:value="1012" calcext:value-type="float">
            <text:p>1012</text:p>
          </table:table-cell>
          <table:table-cell/>
          <table:table-cell table:formula="of:=IF([.A48]&lt;&gt;&quot;&quot;; COM.MICROSOFT.CONCAT(&quot;#define MODBUS_ADDR_&quot;; [.A48]; &quot; &quot;; [.B48]); &quot;&quot;)" office:value-type="string" office:string-value="#define MODBUS_ADDR_CUP3_FSM_STATE 1012" calcext:value-type="string">
            <text:p>#define MODBUS_ADDR_CUP3_FSM_STATE 1012</text:p>
          </table:table-cell>
          <table:table-cell table:number-columns-repeated="16378"/>
        </table:table-row>
        <table:table-row table:style-name="ro1">
          <table:table-cell table:formula="of:=IF([$List.A49] &lt;&gt;&quot;&quot;; [$List.I49]; &quot;&quot;)" office:value-type="string" office:string-value="CUP1_ERROR" calcext:value-type="string">
            <text:p>CUP1_ERROR</text:p>
          </table:table-cell>
          <table:table-cell table:formula="of:=IF([$List.A49] &lt;&gt;&quot;&quot;; [$List.A49]; &quot;&quot;)" office:value-type="float" office:value="1013" calcext:value-type="float">
            <text:p>1013</text:p>
          </table:table-cell>
          <table:table-cell/>
          <table:table-cell table:formula="of:=IF([.A49]&lt;&gt;&quot;&quot;; COM.MICROSOFT.CONCAT(&quot;#define MODBUS_ADDR_&quot;; [.A49]; &quot; &quot;; [.B49]); &quot;&quot;)" office:value-type="string" office:string-value="#define MODBUS_ADDR_CUP1_ERROR 1013" calcext:value-type="string">
            <text:p>#define MODBUS_ADDR_CUP1_ERROR 1013</text:p>
          </table:table-cell>
          <table:table-cell table:number-columns-repeated="16378"/>
        </table:table-row>
        <table:table-row table:style-name="ro1">
          <table:table-cell table:formula="of:=IF([$List.A50] &lt;&gt;&quot;&quot;; [$List.I50]; &quot;&quot;)" office:value-type="string" office:string-value="CUP2_ERROR" calcext:value-type="string">
            <text:p>CUP2_ERROR</text:p>
          </table:table-cell>
          <table:table-cell table:formula="of:=IF([$List.A50] &lt;&gt;&quot;&quot;; [$List.A50]; &quot;&quot;)" office:value-type="float" office:value="1014" calcext:value-type="float">
            <text:p>1014</text:p>
          </table:table-cell>
          <table:table-cell/>
          <table:table-cell table:formula="of:=IF([.A50]&lt;&gt;&quot;&quot;; COM.MICROSOFT.CONCAT(&quot;#define MODBUS_ADDR_&quot;; [.A50]; &quot; &quot;; [.B50]); &quot;&quot;)" office:value-type="string" office:string-value="#define MODBUS_ADDR_CUP2_ERROR 1014" calcext:value-type="string">
            <text:p>#define MODBUS_ADDR_CUP2_ERROR 1014</text:p>
          </table:table-cell>
          <table:table-cell table:number-columns-repeated="16378"/>
        </table:table-row>
        <table:table-row table:style-name="ro1">
          <table:table-cell table:formula="of:=IF([$List.A51] &lt;&gt;&quot;&quot;; [$List.I51]; &quot;&quot;)" office:value-type="string" office:string-value="CUP3_ERROR" calcext:value-type="string">
            <text:p>CUP3_ERROR</text:p>
          </table:table-cell>
          <table:table-cell table:formula="of:=IF([$List.A51] &lt;&gt;&quot;&quot;; [$List.A51]; &quot;&quot;)" office:value-type="float" office:value="1015" calcext:value-type="float">
            <text:p>1015</text:p>
          </table:table-cell>
          <table:table-cell/>
          <table:table-cell table:formula="of:=IF([.A51]&lt;&gt;&quot;&quot;; COM.MICROSOFT.CONCAT(&quot;#define MODBUS_ADDR_&quot;; [.A51]; &quot; &quot;; [.B51]); &quot;&quot;)" office:value-type="string" office:string-value="#define MODBUS_ADDR_CUP3_ERROR 1015" calcext:value-type="string">
            <text:p>#define MODBUS_ADDR_CUP3_ERROR 1015</text:p>
          </table:table-cell>
          <table:table-cell table:number-columns-repeated="16378"/>
        </table:table-row>
        <table:table-row table:style-name="ro1">
          <table:table-cell table:formula="of:=IF([$List.A52] &lt;&gt;&quot;&quot;; [$List.I52]; &quot;&quot;)" office:value-type="string" office:string-value="CUP1_LAST_ERROR" calcext:value-type="string">
            <text:p>CUP1_LAST_ERROR</text:p>
          </table:table-cell>
          <table:table-cell table:formula="of:=IF([$List.A52] &lt;&gt;&quot;&quot;; [$List.A52]; &quot;&quot;)" office:value-type="float" office:value="1016" calcext:value-type="float">
            <text:p>1016</text:p>
          </table:table-cell>
          <table:table-cell/>
          <table:table-cell table:formula="of:=IF([.A52]&lt;&gt;&quot;&quot;; COM.MICROSOFT.CONCAT(&quot;#define MODBUS_ADDR_&quot;; [.A52]; &quot; &quot;; [.B52]); &quot;&quot;)" office:value-type="string" office:string-value="#define MODBUS_ADDR_CUP1_LAST_ERROR 1016" calcext:value-type="string">
            <text:p>#define MODBUS_ADDR_CUP1_LAST_ERROR 1016</text:p>
          </table:table-cell>
          <table:table-cell table:number-columns-repeated="16378"/>
        </table:table-row>
        <table:table-row table:style-name="ro1">
          <table:table-cell table:formula="of:=IF([$List.A53] &lt;&gt;&quot;&quot;; [$List.I53]; &quot;&quot;)" office:value-type="string" office:string-value="CUP2_LAST_ERROR" calcext:value-type="string">
            <text:p>CUP2_LAST_ERROR</text:p>
          </table:table-cell>
          <table:table-cell table:formula="of:=IF([$List.A53] &lt;&gt;&quot;&quot;; [$List.A53]; &quot;&quot;)" office:value-type="float" office:value="1017" calcext:value-type="float">
            <text:p>1017</text:p>
          </table:table-cell>
          <table:table-cell/>
          <table:table-cell table:formula="of:=IF([.A53]&lt;&gt;&quot;&quot;; COM.MICROSOFT.CONCAT(&quot;#define MODBUS_ADDR_&quot;; [.A53]; &quot; &quot;; [.B53]); &quot;&quot;)" office:value-type="string" office:string-value="#define MODBUS_ADDR_CUP2_LAST_ERROR 1017" calcext:value-type="string">
            <text:p>#define MODBUS_ADDR_CUP2_LAST_ERROR 1017</text:p>
          </table:table-cell>
          <table:table-cell table:number-columns-repeated="16378"/>
        </table:table-row>
        <table:table-row table:style-name="ro1">
          <table:table-cell table:formula="of:=IF([$List.A54] &lt;&gt;&quot;&quot;; [$List.I54]; &quot;&quot;)" office:value-type="string" office:string-value="CUP3_LAST_ERROR" calcext:value-type="string">
            <text:p>CUP3_LAST_ERROR</text:p>
          </table:table-cell>
          <table:table-cell table:formula="of:=IF([$List.A54] &lt;&gt;&quot;&quot;; [$List.A54]; &quot;&quot;)" office:value-type="float" office:value="1018" calcext:value-type="float">
            <text:p>1018</text:p>
          </table:table-cell>
          <table:table-cell/>
          <table:table-cell table:formula="of:=IF([.A54]&lt;&gt;&quot;&quot;; COM.MICROSOFT.CONCAT(&quot;#define MODBUS_ADDR_&quot;; [.A54]; &quot; &quot;; [.B54]); &quot;&quot;)" office:value-type="string" office:string-value="#define MODBUS_ADDR_CUP3_LAST_ERROR 1018" calcext:value-type="string">
            <text:p>#define MODBUS_ADDR_CUP3_LAST_ERROR 1018</text:p>
          </table:table-cell>
          <table:table-cell table:number-columns-repeated="16378"/>
        </table:table-row>
        <table:table-row table:style-name="ro1">
          <table:table-cell table:formula="of:=IF([$List.A55] &lt;&gt;&quot;&quot;; [$List.I55]; &quot;&quot;)" office:value-type="string" office:string-value="CUP1_ERROR_STORAGE" calcext:value-type="string">
            <text:p>CUP1_ERROR_STORAGE</text:p>
          </table:table-cell>
          <table:table-cell table:formula="of:=IF([$List.A55] &lt;&gt;&quot;&quot;; [$List.A55]; &quot;&quot;)" office:value-type="float" office:value="1019" calcext:value-type="float">
            <text:p>1019</text:p>
          </table:table-cell>
          <table:table-cell/>
          <table:table-cell table:formula="of:=IF([.A55]&lt;&gt;&quot;&quot;; COM.MICROSOFT.CONCAT(&quot;#define MODBUS_ADDR_&quot;; [.A55]; &quot; &quot;; [.B55]); &quot;&quot;)" office:value-type="string" office:string-value="#define MODBUS_ADDR_CUP1_ERROR_STORAGE 1019" calcext:value-type="string">
            <text:p>#define MODBUS_ADDR_CUP1_ERROR_STORAGE 1019</text:p>
          </table:table-cell>
          <table:table-cell table:number-columns-repeated="16378"/>
        </table:table-row>
        <table:table-row table:style-name="ro1">
          <table:table-cell table:formula="of:=IF([$List.A56] &lt;&gt;&quot;&quot;; [$List.I56]; &quot;&quot;)" office:value-type="string" office:string-value="CUP2_ERROR_STORAGE" calcext:value-type="string">
            <text:p>CUP2_ERROR_STORAGE</text:p>
          </table:table-cell>
          <table:table-cell table:formula="of:=IF([$List.A56] &lt;&gt;&quot;&quot;; [$List.A56]; &quot;&quot;)" office:value-type="float" office:value="1020" calcext:value-type="float">
            <text:p>1020</text:p>
          </table:table-cell>
          <table:table-cell/>
          <table:table-cell table:formula="of:=IF([.A56]&lt;&gt;&quot;&quot;; COM.MICROSOFT.CONCAT(&quot;#define MODBUS_ADDR_&quot;; [.A56]; &quot; &quot;; [.B56]); &quot;&quot;)" office:value-type="string" office:string-value="#define MODBUS_ADDR_CUP2_ERROR_STORAGE 1020" calcext:value-type="string">
            <text:p>#define MODBUS_ADDR_CUP2_ERROR_STORAGE 1020</text:p>
          </table:table-cell>
          <table:table-cell table:number-columns-repeated="16378"/>
        </table:table-row>
        <table:table-row table:style-name="ro1">
          <table:table-cell table:formula="of:=IF([$List.A57] &lt;&gt;&quot;&quot;; [$List.I57]; &quot;&quot;)" office:value-type="string" office:string-value="CUP3_ERROR_STORAGE" calcext:value-type="string">
            <text:p>CUP3_ERROR_STORAGE</text:p>
          </table:table-cell>
          <table:table-cell table:formula="of:=IF([$List.A57] &lt;&gt;&quot;&quot;; [$List.A57]; &quot;&quot;)" office:value-type="float" office:value="1021" calcext:value-type="float">
            <text:p>1021</text:p>
          </table:table-cell>
          <table:table-cell/>
          <table:table-cell table:formula="of:=IF([.A57]&lt;&gt;&quot;&quot;; COM.MICROSOFT.CONCAT(&quot;#define MODBUS_ADDR_&quot;; [.A57]; &quot; &quot;; [.B57]); &quot;&quot;)" office:value-type="string" office:string-value="#define MODBUS_ADDR_CUP3_ERROR_STORAGE 1021" calcext:value-type="string">
            <text:p>#define MODBUS_ADDR_CUP3_ERROR_STORAGE 1021</text:p>
          </table:table-cell>
          <table:table-cell table:number-columns-repeated="16378"/>
        </table:table-row>
        <table:table-row table:style-name="ro1">
          <table:table-cell table:formula="of:=IF([$List.A58] &lt;&gt;&quot;&quot;; [$List.I58]; &quot;&quot;)">
            <text:p/>
          </table:table-cell>
          <table:table-cell table:formula="of:=IF([$List.A58] &lt;&gt;&quot;&quot;; [$List.A58]; &quot;&quot;)">
            <text:p/>
          </table:table-cell>
          <table:table-cell/>
          <table:table-cell table:formula="of:=IF([.A58]&lt;&gt;&quot;&quot;; COM.MICROSOFT.CONCAT(&quot;#define MODBUS_ADDR_&quot;; [.A58]; &quot; &quot;; [.B58]); &quot;&quot;)">
            <text:p/>
          </table:table-cell>
          <table:table-cell table:number-columns-repeated="16378"/>
        </table:table-row>
        <table:table-row table:style-name="ro1">
          <table:table-cell table:formula="of:=IF([$List.A59] &lt;&gt;&quot;&quot;; [$List.I59]; &quot;&quot;)" office:value-type="string" office:string-value="INSTALLED_CUPS" calcext:value-type="string">
            <text:p>INSTALLED_CUPS</text:p>
          </table:table-cell>
          <table:table-cell table:formula="of:=IF([$List.A59] &lt;&gt;&quot;&quot;; [$List.A59]; &quot;&quot;)" office:value-type="float" office:value="1022" calcext:value-type="float">
            <text:p>1022</text:p>
          </table:table-cell>
          <table:table-cell/>
          <table:table-cell table:formula="of:=IF([.A59]&lt;&gt;&quot;&quot;; COM.MICROSOFT.CONCAT(&quot;#define MODBUS_ADDR_&quot;; [.A59]; &quot; &quot;; [.B59]); &quot;&quot;)" office:value-type="string" office:string-value="#define MODBUS_ADDR_INSTALLED_CUPS 1022" calcext:value-type="string">
            <text:p>#define MODBUS_ADDR_INSTALLED_CUPS 1022</text:p>
          </table:table-cell>
          <table:table-cell table:number-columns-repeated="16378"/>
        </table:table-row>
        <table:table-row table:style-name="ro1">
          <table:table-cell table:formula="of:=IF([$List.A60] &lt;&gt;&quot;&quot;; [$List.I60]; &quot;&quot;)" office:value-type="string" office:string-value="ELECTRODES_CUP1" calcext:value-type="string">
            <text:p>ELECTRODES_CUP1</text:p>
          </table:table-cell>
          <table:table-cell table:formula="of:=IF([$List.A60] &lt;&gt;&quot;&quot;; [$List.A60]; &quot;&quot;)" office:value-type="float" office:value="1023" calcext:value-type="float">
            <text:p>1023</text:p>
          </table:table-cell>
          <table:table-cell/>
          <table:table-cell table:formula="of:=IF([.A60]&lt;&gt;&quot;&quot;; COM.MICROSOFT.CONCAT(&quot;#define MODBUS_ADDR_&quot;; [.A60]; &quot; &quot;; [.B60]); &quot;&quot;)" office:value-type="string" office:string-value="#define MODBUS_ADDR_ELECTRODES_CUP1 1023" calcext:value-type="string">
            <text:p>#define MODBUS_ADDR_ELECTRODES_CUP1 1023</text:p>
          </table:table-cell>
          <table:table-cell table:number-columns-repeated="16378"/>
        </table:table-row>
        <table:table-row table:style-name="ro1">
          <table:table-cell table:formula="of:=IF([$List.A61] &lt;&gt;&quot;&quot;; [$List.I61]; &quot;&quot;)" office:value-type="string" office:string-value="ELECTRODES_CUP2" calcext:value-type="string">
            <text:p>ELECTRODES_CUP2</text:p>
          </table:table-cell>
          <table:table-cell table:formula="of:=IF([$List.A61] &lt;&gt;&quot;&quot;; [$List.A61]; &quot;&quot;)" office:value-type="float" office:value="1024" calcext:value-type="float">
            <text:p>1024</text:p>
          </table:table-cell>
          <table:table-cell/>
          <table:table-cell table:formula="of:=IF([.A61]&lt;&gt;&quot;&quot;; COM.MICROSOFT.CONCAT(&quot;#define MODBUS_ADDR_&quot;; [.A61]; &quot; &quot;; [.B61]); &quot;&quot;)" office:value-type="string" office:string-value="#define MODBUS_ADDR_ELECTRODES_CUP2 1024" calcext:value-type="string">
            <text:p>#define MODBUS_ADDR_ELECTRODES_CUP2 1024</text:p>
          </table:table-cell>
          <table:table-cell table:number-columns-repeated="16378"/>
        </table:table-row>
        <table:table-row table:style-name="ro1">
          <table:table-cell table:formula="of:=IF([$List.A62] &lt;&gt;&quot;&quot;; [$List.I62]; &quot;&quot;)" office:value-type="string" office:string-value="ELECTRODES_CUP3" calcext:value-type="string">
            <text:p>ELECTRODES_CUP3</text:p>
          </table:table-cell>
          <table:table-cell table:formula="of:=IF([$List.A62] &lt;&gt;&quot;&quot;; [$List.A62]; &quot;&quot;)" office:value-type="float" office:value="1025" calcext:value-type="float">
            <text:p>1025</text:p>
          </table:table-cell>
          <table:table-cell/>
          <table:table-cell table:formula="of:=IF([.A62]&lt;&gt;&quot;&quot;; COM.MICROSOFT.CONCAT(&quot;#define MODBUS_ADDR_&quot;; [.A62]; &quot; &quot;; [.B62]); &quot;&quot;)" office:value-type="string" office:string-value="#define MODBUS_ADDR_ELECTRODES_CUP3 1025" calcext:value-type="string">
            <text:p>#define MODBUS_ADDR_ELECTRODES_CUP3 1025</text:p>
          </table:table-cell>
          <table:table-cell table:number-columns-repeated="16378"/>
        </table:table-row>
        <table:table-row table:style-name="ro1">
          <table:table-cell table:formula="of:=IF([$List.A63] &lt;&gt;&quot;&quot;; [$List.I63]; &quot;&quot;)" office:value-type="string" office:string-value="CUP1_TYPE" calcext:value-type="string">
            <text:p>CUP1_TYPE</text:p>
          </table:table-cell>
          <table:table-cell table:formula="of:=IF([$List.A63] &lt;&gt;&quot;&quot;; [$List.A63]; &quot;&quot;)" office:value-type="float" office:value="1026" calcext:value-type="float">
            <text:p>1026</text:p>
          </table:table-cell>
          <table:table-cell/>
          <table:table-cell table:formula="of:=IF([.A63]&lt;&gt;&quot;&quot;; COM.MICROSOFT.CONCAT(&quot;#define MODBUS_ADDR_&quot;; [.A63]; &quot; &quot;; [.B63]); &quot;&quot;)" office:value-type="string" office:string-value="#define MODBUS_ADDR_CUP1_TYPE 1026" calcext:value-type="string">
            <text:p>#define MODBUS_ADDR_CUP1_TYPE 1026</text:p>
          </table:table-cell>
          <table:table-cell table:number-columns-repeated="16378"/>
        </table:table-row>
        <table:table-row table:style-name="ro1">
          <table:table-cell table:formula="of:=IF([$List.A64] &lt;&gt;&quot;&quot;; [$List.I64]; &quot;&quot;)" office:value-type="string" office:string-value="CUP2_TYPE" calcext:value-type="string">
            <text:p>CUP2_TYPE</text:p>
          </table:table-cell>
          <table:table-cell table:formula="of:=IF([$List.A64] &lt;&gt;&quot;&quot;; [$List.A64]; &quot;&quot;)" office:value-type="float" office:value="1027" calcext:value-type="float">
            <text:p>1027</text:p>
          </table:table-cell>
          <table:table-cell/>
          <table:table-cell table:formula="of:=IF([.A64]&lt;&gt;&quot;&quot;; COM.MICROSOFT.CONCAT(&quot;#define MODBUS_ADDR_&quot;; [.A64]; &quot; &quot;; [.B64]); &quot;&quot;)" office:value-type="string" office:string-value="#define MODBUS_ADDR_CUP2_TYPE 1027" calcext:value-type="string">
            <text:p>#define MODBUS_ADDR_CUP2_TYPE 1027</text:p>
          </table:table-cell>
          <table:table-cell table:number-columns-repeated="16378"/>
        </table:table-row>
        <table:table-row table:style-name="ro1">
          <table:table-cell table:formula="of:=IF([$List.A65] &lt;&gt;&quot;&quot;; [$List.I65]; &quot;&quot;)" office:value-type="string" office:string-value="CUP3_TYPE" calcext:value-type="string">
            <text:p>CUP3_TYPE</text:p>
          </table:table-cell>
          <table:table-cell table:formula="of:=IF([$List.A65] &lt;&gt;&quot;&quot;; [$List.A65]; &quot;&quot;)" office:value-type="float" office:value="1028" calcext:value-type="float">
            <text:p>1028</text:p>
          </table:table-cell>
          <table:table-cell/>
          <table:table-cell table:formula="of:=IF([.A65]&lt;&gt;&quot;&quot;; COM.MICROSOFT.CONCAT(&quot;#define MODBUS_ADDR_&quot;; [.A65]; &quot; &quot;; [.B65]); &quot;&quot;)" office:value-type="string" office:string-value="#define MODBUS_ADDR_CUP3_TYPE 1028" calcext:value-type="string">
            <text:p>#define MODBUS_ADDR_CUP3_TYPE 1028</text:p>
          </table:table-cell>
          <table:table-cell table:number-columns-repeated="16378"/>
        </table:table-row>
        <table:table-row table:style-name="ro1">
          <table:table-cell table:formula="of:=IF([$List.A66] &lt;&gt;&quot;&quot;; [$List.I66]; &quot;&quot;)">
            <text:p/>
          </table:table-cell>
          <table:table-cell table:formula="of:=IF([$List.A66] &lt;&gt;&quot;&quot;; [$List.A66]; &quot;&quot;)">
            <text:p/>
          </table:table-cell>
          <table:table-cell/>
          <table:table-cell table:formula="of:=IF([.A66]&lt;&gt;&quot;&quot;; COM.MICROSOFT.CONCAT(&quot;#define MODBUS_ADDR_&quot;; [.A66]; &quot; &quot;; [.B66]); &quot;&quot;)">
            <text:p/>
          </table:table-cell>
          <table:table-cell table:number-columns-repeated="16378"/>
        </table:table-row>
        <table:table-row table:style-name="ro1">
          <table:table-cell table:formula="of:=IF([$List.A67] &lt;&gt;&quot;&quot;; [$List.I67]; &quot;&quot;)" office:value-type="string" office:string-value="CALIBRATION_CURRENT1" calcext:value-type="string">
            <text:p>CALIBRATION_CURRENT1</text:p>
          </table:table-cell>
          <table:table-cell table:formula="of:=IF([$List.A67] &lt;&gt;&quot;&quot;; [$List.A67]; &quot;&quot;)" office:value-type="float" office:value="1029" calcext:value-type="float">
            <text:p>1029</text:p>
          </table:table-cell>
          <table:table-cell/>
          <table:table-cell table:formula="of:=IF([.A67]&lt;&gt;&quot;&quot;; COM.MICROSOFT.CONCAT(&quot;#define MODBUS_ADDR_&quot;; [.A67]; &quot; &quot;; [.B67]); &quot;&quot;)" office:value-type="string" office:string-value="#define MODBUS_ADDR_CALIBRATION_CURRENT1 1029" calcext:value-type="string">
            <text:p>#define MODBUS_ADDR_CALIBRATION_CURRENT1 1029</text:p>
          </table:table-cell>
          <table:table-cell table:number-columns-repeated="16378"/>
        </table:table-row>
        <table:table-row table:style-name="ro1">
          <table:table-cell table:formula="of:=IF([$List.A68] &lt;&gt;&quot;&quot;; [$List.I68]; &quot;&quot;)" office:value-type="string" office:string-value="CALIBRATION_CURRENT2" calcext:value-type="string">
            <text:p>CALIBRATION_CURRENT2</text:p>
          </table:table-cell>
          <table:table-cell table:formula="of:=IF([$List.A68] &lt;&gt;&quot;&quot;; [$List.A68]; &quot;&quot;)" office:value-type="float" office:value="1030" calcext:value-type="float">
            <text:p>1030</text:p>
          </table:table-cell>
          <table:table-cell/>
          <table:table-cell table:formula="of:=IF([.A68]&lt;&gt;&quot;&quot;; COM.MICROSOFT.CONCAT(&quot;#define MODBUS_ADDR_&quot;; [.A68]; &quot; &quot;; [.B68]); &quot;&quot;)" office:value-type="string" office:string-value="#define MODBUS_ADDR_CALIBRATION_CURRENT2 1030" calcext:value-type="string">
            <text:p>#define MODBUS_ADDR_CALIBRATION_CURRENT2 1030</text:p>
          </table:table-cell>
          <table:table-cell table:number-columns-repeated="16378"/>
        </table:table-row>
        <table:table-row table:style-name="ro1">
          <table:table-cell table:formula="of:=IF([$List.A69] &lt;&gt;&quot;&quot;; [$List.I69]; &quot;&quot;)" office:value-type="string" office:string-value="CALIBRATION_CURRENT3" calcext:value-type="string">
            <text:p>CALIBRATION_CURRENT3</text:p>
          </table:table-cell>
          <table:table-cell table:formula="of:=IF([$List.A69] &lt;&gt;&quot;&quot;; [$List.A69]; &quot;&quot;)" office:value-type="float" office:value="1031" calcext:value-type="float">
            <text:p>1031</text:p>
          </table:table-cell>
          <table:table-cell/>
          <table:table-cell table:formula="of:=IF([.A69]&lt;&gt;&quot;&quot;; COM.MICROSOFT.CONCAT(&quot;#define MODBUS_ADDR_&quot;; [.A69]; &quot; &quot;; [.B69]); &quot;&quot;)" office:value-type="string" office:string-value="#define MODBUS_ADDR_CALIBRATION_CURRENT3 1031" calcext:value-type="string">
            <text:p>#define MODBUS_ADDR_CALIBRATION_CURRENT3 1031</text:p>
          </table:table-cell>
          <table:table-cell table:number-columns-repeated="16378"/>
        </table:table-row>
        <table:table-row table:style-name="ro1">
          <table:table-cell table:formula="of:=IF([$List.A70] &lt;&gt;&quot;&quot;; [$List.I70]; &quot;&quot;)" office:value-type="string" office:string-value="CALIBRATION_CURRENT4" calcext:value-type="string">
            <text:p>CALIBRATION_CURRENT4</text:p>
          </table:table-cell>
          <table:table-cell table:formula="of:=IF([$List.A70] &lt;&gt;&quot;&quot;; [$List.A70]; &quot;&quot;)" office:value-type="float" office:value="1032" calcext:value-type="float">
            <text:p>1032</text:p>
          </table:table-cell>
          <table:table-cell/>
          <table:table-cell table:formula="of:=IF([.A70]&lt;&gt;&quot;&quot;; COM.MICROSOFT.CONCAT(&quot;#define MODBUS_ADDR_&quot;; [.A70]; &quot; &quot;; [.B70]); &quot;&quot;)" office:value-type="string" office:string-value="#define MODBUS_ADDR_CALIBRATION_CURRENT4 1032" calcext:value-type="string">
            <text:p>#define MODBUS_ADDR_CALIBRATION_CURRENT4 1032</text:p>
          </table:table-cell>
          <table:table-cell table:number-columns-repeated="16378"/>
        </table:table-row>
        <table:table-row table:style-name="ro1">
          <table:table-cell table:formula="of:=IF([$List.A71] &lt;&gt;&quot;&quot;; [$List.I71]; &quot;&quot;)">
            <text:p/>
          </table:table-cell>
          <table:table-cell table:formula="of:=IF([$List.A71] &lt;&gt;&quot;&quot;; [$List.A71]; &quot;&quot;)">
            <text:p/>
          </table:table-cell>
          <table:table-cell/>
          <table:table-cell table:formula="of:=IF([.A71]&lt;&gt;&quot;&quot;; COM.MICROSOFT.CONCAT(&quot;#define MODBUS_ADDR_&quot;; [.A71]; &quot; &quot;; [.B71]); &quot;&quot;)">
            <text:p/>
          </table:table-cell>
          <table:table-cell table:number-columns-repeated="16378"/>
        </table:table-row>
        <table:table-row table:style-name="ro1">
          <table:table-cell table:formula="of:=IF([$List.A72] &lt;&gt;&quot;&quot;; [$List.I72]; &quot;&quot;)" office:value-type="string" office:string-value="CUP1_CHANNEL1_GAIN_LOW_POINT1" calcext:value-type="string">
            <text:p>CUP1_CHANNEL1_GAIN_LOW_POINT1</text:p>
          </table:table-cell>
          <table:table-cell table:formula="of:=IF([$List.A72] &lt;&gt;&quot;&quot;; [$List.A72]; &quot;&quot;)" office:value-type="float" office:value="1033" calcext:value-type="float">
            <text:p>1033</text:p>
          </table:table-cell>
          <table:table-cell/>
          <table:table-cell table:formula="of:=IF([.A72]&lt;&gt;&quot;&quot;; COM.MICROSOFT.CONCAT(&quot;#define MODBUS_ADDR_&quot;; [.A72]; &quot; &quot;; [.B72]); &quot;&quot;)" office:value-type="string" office:string-value="#define MODBUS_ADDR_CUP1_CHANNEL1_GAIN_LOW_POINT1 1033" calcext:value-type="string">
            <text:p>#define MODBUS_ADDR_CUP1_CHANNEL1_GAIN_LOW_POINT1 1033</text:p>
          </table:table-cell>
          <table:table-cell table:number-columns-repeated="16378"/>
        </table:table-row>
        <table:table-row table:style-name="ro1">
          <table:table-cell table:formula="of:=IF([$List.A73] &lt;&gt;&quot;&quot;; [$List.I73]; &quot;&quot;)" office:value-type="string" office:string-value="CUP1_CHANNEL1_GAIN_LOW_POINT2" calcext:value-type="string">
            <text:p>CUP1_CHANNEL1_GAIN_LOW_POINT2</text:p>
          </table:table-cell>
          <table:table-cell table:formula="of:=IF([$List.A73] &lt;&gt;&quot;&quot;; [$List.A73]; &quot;&quot;)" office:value-type="float" office:value="1034" calcext:value-type="float">
            <text:p>1034</text:p>
          </table:table-cell>
          <table:table-cell/>
          <table:table-cell table:formula="of:=IF([.A73]&lt;&gt;&quot;&quot;; COM.MICROSOFT.CONCAT(&quot;#define MODBUS_ADDR_&quot;; [.A73]; &quot; &quot;; [.B73]); &quot;&quot;)" office:value-type="string" office:string-value="#define MODBUS_ADDR_CUP1_CHANNEL1_GAIN_LOW_POINT2 1034" calcext:value-type="string">
            <text:p>#define MODBUS_ADDR_CUP1_CHANNEL1_GAIN_LOW_POINT2 1034</text:p>
          </table:table-cell>
          <table:table-cell table:number-columns-repeated="16378"/>
        </table:table-row>
        <table:table-row table:style-name="ro1">
          <table:table-cell table:formula="of:=IF([$List.A74] &lt;&gt;&quot;&quot;; [$List.I74]; &quot;&quot;)" office:value-type="string" office:string-value="CUP1_CHANNEL1_GAIN_LOW_POINT3" calcext:value-type="string">
            <text:p>CUP1_CHANNEL1_GAIN_LOW_POINT3</text:p>
          </table:table-cell>
          <table:table-cell table:formula="of:=IF([$List.A74] &lt;&gt;&quot;&quot;; [$List.A74]; &quot;&quot;)" office:value-type="float" office:value="1035" calcext:value-type="float">
            <text:p>1035</text:p>
          </table:table-cell>
          <table:table-cell/>
          <table:table-cell table:formula="of:=IF([.A74]&lt;&gt;&quot;&quot;; COM.MICROSOFT.CONCAT(&quot;#define MODBUS_ADDR_&quot;; [.A74]; &quot; &quot;; [.B74]); &quot;&quot;)" office:value-type="string" office:string-value="#define MODBUS_ADDR_CUP1_CHANNEL1_GAIN_LOW_POINT3 1035" calcext:value-type="string">
            <text:p>#define MODBUS_ADDR_CUP1_CHANNEL1_GAIN_LOW_POINT3 1035</text:p>
          </table:table-cell>
          <table:table-cell table:number-columns-repeated="16378"/>
        </table:table-row>
        <table:table-row table:style-name="ro1">
          <table:table-cell table:formula="of:=IF([$List.A75] &lt;&gt;&quot;&quot;; [$List.I75]; &quot;&quot;)" office:value-type="string" office:string-value="CUP1_CHANNEL1_GAIN_HIGH_POINT2" calcext:value-type="string">
            <text:p>CUP1_CHANNEL1_GAIN_HIGH_POINT2</text:p>
          </table:table-cell>
          <table:table-cell table:formula="of:=IF([$List.A75] &lt;&gt;&quot;&quot;; [$List.A75]; &quot;&quot;)" office:value-type="float" office:value="1036" calcext:value-type="float">
            <text:p>1036</text:p>
          </table:table-cell>
          <table:table-cell/>
          <table:table-cell table:formula="of:=IF([.A75]&lt;&gt;&quot;&quot;; COM.MICROSOFT.CONCAT(&quot;#define MODBUS_ADDR_&quot;; [.A75]; &quot; &quot;; [.B75]); &quot;&quot;)" office:value-type="string" office:string-value="#define MODBUS_ADDR_CUP1_CHANNEL1_GAIN_HIGH_POINT2 1036" calcext:value-type="string">
            <text:p>#define MODBUS_ADDR_CUP1_CHANNEL1_GAIN_HIGH_POINT2 1036</text:p>
          </table:table-cell>
          <table:table-cell table:number-columns-repeated="16378"/>
        </table:table-row>
        <table:table-row table:style-name="ro1">
          <table:table-cell table:formula="of:=IF([$List.A76] &lt;&gt;&quot;&quot;; [$List.I76]; &quot;&quot;)" office:value-type="string" office:string-value="CUP1_CHANNEL1_GAIN_HIGH_POINT3" calcext:value-type="string">
            <text:p>CUP1_CHANNEL1_GAIN_HIGH_POINT3</text:p>
          </table:table-cell>
          <table:table-cell table:formula="of:=IF([$List.A76] &lt;&gt;&quot;&quot;; [$List.A76]; &quot;&quot;)" office:value-type="float" office:value="1037" calcext:value-type="float">
            <text:p>1037</text:p>
          </table:table-cell>
          <table:table-cell/>
          <table:table-cell table:formula="of:=IF([.A76]&lt;&gt;&quot;&quot;; COM.MICROSOFT.CONCAT(&quot;#define MODBUS_ADDR_&quot;; [.A76]; &quot; &quot;; [.B76]); &quot;&quot;)" office:value-type="string" office:string-value="#define MODBUS_ADDR_CUP1_CHANNEL1_GAIN_HIGH_POINT3 1037" calcext:value-type="string">
            <text:p>#define MODBUS_ADDR_CUP1_CHANNEL1_GAIN_HIGH_POINT3 1037</text:p>
          </table:table-cell>
          <table:table-cell table:number-columns-repeated="16378"/>
        </table:table-row>
        <table:table-row table:style-name="ro1">
          <table:table-cell table:formula="of:=IF([$List.A77] &lt;&gt;&quot;&quot;; [$List.I77]; &quot;&quot;)" office:value-type="string" office:string-value="CUP1_CHANNEL1_GAIN_HIGH_POINT4" calcext:value-type="string">
            <text:p>CUP1_CHANNEL1_GAIN_HIGH_POINT4</text:p>
          </table:table-cell>
          <table:table-cell table:formula="of:=IF([$List.A77] &lt;&gt;&quot;&quot;; [$List.A77]; &quot;&quot;)" office:value-type="float" office:value="1038" calcext:value-type="float">
            <text:p>1038</text:p>
          </table:table-cell>
          <table:table-cell/>
          <table:table-cell table:formula="of:=IF([.A77]&lt;&gt;&quot;&quot;; COM.MICROSOFT.CONCAT(&quot;#define MODBUS_ADDR_&quot;; [.A77]; &quot; &quot;; [.B77]); &quot;&quot;)" office:value-type="string" office:string-value="#define MODBUS_ADDR_CUP1_CHANNEL1_GAIN_HIGH_POINT4 1038" calcext:value-type="string">
            <text:p>#define MODBUS_ADDR_CUP1_CHANNEL1_GAIN_HIGH_POINT4 1038</text:p>
          </table:table-cell>
          <table:table-cell table:number-columns-repeated="16378"/>
        </table:table-row>
        <table:table-row table:style-name="ro1">
          <table:table-cell table:formula="of:=IF([$List.A78] &lt;&gt;&quot;&quot;; [$List.I78]; &quot;&quot;)" office:value-type="string" office:string-value="CUP1_CHANNEL2_GAIN_LOW_POINT1" calcext:value-type="string">
            <text:p>CUP1_CHANNEL2_GAIN_LOW_POINT1</text:p>
          </table:table-cell>
          <table:table-cell table:formula="of:=IF([$List.A78] &lt;&gt;&quot;&quot;; [$List.A78]; &quot;&quot;)" office:value-type="float" office:value="1039" calcext:value-type="float">
            <text:p>1039</text:p>
          </table:table-cell>
          <table:table-cell/>
          <table:table-cell table:formula="of:=IF([.A78]&lt;&gt;&quot;&quot;; COM.MICROSOFT.CONCAT(&quot;#define MODBUS_ADDR_&quot;; [.A78]; &quot; &quot;; [.B78]); &quot;&quot;)" office:value-type="string" office:string-value="#define MODBUS_ADDR_CUP1_CHANNEL2_GAIN_LOW_POINT1 1039" calcext:value-type="string">
            <text:p>#define MODBUS_ADDR_CUP1_CHANNEL2_GAIN_LOW_POINT1 1039</text:p>
          </table:table-cell>
          <table:table-cell table:number-columns-repeated="16378"/>
        </table:table-row>
        <table:table-row table:style-name="ro1">
          <table:table-cell table:formula="of:=IF([$List.A79] &lt;&gt;&quot;&quot;; [$List.I79]; &quot;&quot;)" office:value-type="string" office:string-value="CUP1_CHANNEL2_GAIN_LOW_POINT2" calcext:value-type="string">
            <text:p>CUP1_CHANNEL2_GAIN_LOW_POINT2</text:p>
          </table:table-cell>
          <table:table-cell table:formula="of:=IF([$List.A79] &lt;&gt;&quot;&quot;; [$List.A79]; &quot;&quot;)" office:value-type="float" office:value="1040" calcext:value-type="float">
            <text:p>1040</text:p>
          </table:table-cell>
          <table:table-cell/>
          <table:table-cell table:formula="of:=IF([.A79]&lt;&gt;&quot;&quot;; COM.MICROSOFT.CONCAT(&quot;#define MODBUS_ADDR_&quot;; [.A79]; &quot; &quot;; [.B79]); &quot;&quot;)" office:value-type="string" office:string-value="#define MODBUS_ADDR_CUP1_CHANNEL2_GAIN_LOW_POINT2 1040" calcext:value-type="string">
            <text:p>#define MODBUS_ADDR_CUP1_CHANNEL2_GAIN_LOW_POINT2 1040</text:p>
          </table:table-cell>
          <table:table-cell table:number-columns-repeated="16378"/>
        </table:table-row>
        <table:table-row table:style-name="ro1">
          <table:table-cell table:formula="of:=IF([$List.A80] &lt;&gt;&quot;&quot;; [$List.I80]; &quot;&quot;)" office:value-type="string" office:string-value="CUP1_CHANNEL2_GAIN_LOW_POINT3" calcext:value-type="string">
            <text:p>CUP1_CHANNEL2_GAIN_LOW_POINT3</text:p>
          </table:table-cell>
          <table:table-cell table:formula="of:=IF([$List.A80] &lt;&gt;&quot;&quot;; [$List.A80]; &quot;&quot;)" office:value-type="float" office:value="1041" calcext:value-type="float">
            <text:p>1041</text:p>
          </table:table-cell>
          <table:table-cell/>
          <table:table-cell table:formula="of:=IF([.A80]&lt;&gt;&quot;&quot;; COM.MICROSOFT.CONCAT(&quot;#define MODBUS_ADDR_&quot;; [.A80]; &quot; &quot;; [.B80]); &quot;&quot;)" office:value-type="string" office:string-value="#define MODBUS_ADDR_CUP1_CHANNEL2_GAIN_LOW_POINT3 1041" calcext:value-type="string">
            <text:p>#define MODBUS_ADDR_CUP1_CHANNEL2_GAIN_LOW_POINT3 1041</text:p>
          </table:table-cell>
          <table:table-cell table:number-columns-repeated="16378"/>
        </table:table-row>
        <table:table-row table:style-name="ro1">
          <table:table-cell table:formula="of:=IF([$List.A81] &lt;&gt;&quot;&quot;; [$List.I81]; &quot;&quot;)" office:value-type="string" office:string-value="CUP1_CHANNEL2_GAIN_HIGH_POINT2" calcext:value-type="string">
            <text:p>CUP1_CHANNEL2_GAIN_HIGH_POINT2</text:p>
          </table:table-cell>
          <table:table-cell table:formula="of:=IF([$List.A81] &lt;&gt;&quot;&quot;; [$List.A81]; &quot;&quot;)" office:value-type="float" office:value="1042" calcext:value-type="float">
            <text:p>1042</text:p>
          </table:table-cell>
          <table:table-cell/>
          <table:table-cell table:formula="of:=IF([.A81]&lt;&gt;&quot;&quot;; COM.MICROSOFT.CONCAT(&quot;#define MODBUS_ADDR_&quot;; [.A81]; &quot; &quot;; [.B81]); &quot;&quot;)" office:value-type="string" office:string-value="#define MODBUS_ADDR_CUP1_CHANNEL2_GAIN_HIGH_POINT2 1042" calcext:value-type="string">
            <text:p>#define MODBUS_ADDR_CUP1_CHANNEL2_GAIN_HIGH_POINT2 1042</text:p>
          </table:table-cell>
          <table:table-cell table:number-columns-repeated="16378"/>
        </table:table-row>
        <table:table-row table:style-name="ro1">
          <table:table-cell table:formula="of:=IF([$List.A82] &lt;&gt;&quot;&quot;; [$List.I82]; &quot;&quot;)" office:value-type="string" office:string-value="CUP1_CHANNEL2_GAIN_HIGH_POINT3" calcext:value-type="string">
            <text:p>CUP1_CHANNEL2_GAIN_HIGH_POINT3</text:p>
          </table:table-cell>
          <table:table-cell table:formula="of:=IF([$List.A82] &lt;&gt;&quot;&quot;; [$List.A82]; &quot;&quot;)" office:value-type="float" office:value="1043" calcext:value-type="float">
            <text:p>1043</text:p>
          </table:table-cell>
          <table:table-cell/>
          <table:table-cell table:formula="of:=IF([.A82]&lt;&gt;&quot;&quot;; COM.MICROSOFT.CONCAT(&quot;#define MODBUS_ADDR_&quot;; [.A82]; &quot; &quot;; [.B82]); &quot;&quot;)" office:value-type="string" office:string-value="#define MODBUS_ADDR_CUP1_CHANNEL2_GAIN_HIGH_POINT3 1043" calcext:value-type="string">
            <text:p>#define MODBUS_ADDR_CUP1_CHANNEL2_GAIN_HIGH_POINT3 1043</text:p>
          </table:table-cell>
          <table:table-cell table:number-columns-repeated="16378"/>
        </table:table-row>
        <table:table-row table:style-name="ro1">
          <table:table-cell table:formula="of:=IF([$List.A83] &lt;&gt;&quot;&quot;; [$List.I83]; &quot;&quot;)" office:value-type="string" office:string-value="CUP1_CHANNEL2_GAIN_HIGH_POINT4" calcext:value-type="string">
            <text:p>CUP1_CHANNEL2_GAIN_HIGH_POINT4</text:p>
          </table:table-cell>
          <table:table-cell table:formula="of:=IF([$List.A83] &lt;&gt;&quot;&quot;; [$List.A83]; &quot;&quot;)" office:value-type="float" office:value="1044" calcext:value-type="float">
            <text:p>1044</text:p>
          </table:table-cell>
          <table:table-cell/>
          <table:table-cell table:formula="of:=IF([.A83]&lt;&gt;&quot;&quot;; COM.MICROSOFT.CONCAT(&quot;#define MODBUS_ADDR_&quot;; [.A83]; &quot; &quot;; [.B83]); &quot;&quot;)" office:value-type="string" office:string-value="#define MODBUS_ADDR_CUP1_CHANNEL2_GAIN_HIGH_POINT4 1044" calcext:value-type="string">
            <text:p>#define MODBUS_ADDR_CUP1_CHANNEL2_GAIN_HIGH_POINT4 1044</text:p>
          </table:table-cell>
          <table:table-cell table:number-columns-repeated="16378"/>
        </table:table-row>
        <table:table-row table:style-name="ro1">
          <table:table-cell table:formula="of:=IF([$List.A84] &lt;&gt;&quot;&quot;; [$List.I84]; &quot;&quot;)" office:value-type="string" office:string-value="CUP1_CHANNEL3_GAIN_LOW_POINT1" calcext:value-type="string">
            <text:p>CUP1_CHANNEL3_GAIN_LOW_POINT1</text:p>
          </table:table-cell>
          <table:table-cell table:formula="of:=IF([$List.A84] &lt;&gt;&quot;&quot;; [$List.A84]; &quot;&quot;)" office:value-type="float" office:value="1045" calcext:value-type="float">
            <text:p>1045</text:p>
          </table:table-cell>
          <table:table-cell/>
          <table:table-cell table:formula="of:=IF([.A84]&lt;&gt;&quot;&quot;; COM.MICROSOFT.CONCAT(&quot;#define MODBUS_ADDR_&quot;; [.A84]; &quot; &quot;; [.B84]); &quot;&quot;)" office:value-type="string" office:string-value="#define MODBUS_ADDR_CUP1_CHANNEL3_GAIN_LOW_POINT1 1045" calcext:value-type="string">
            <text:p>#define MODBUS_ADDR_CUP1_CHANNEL3_GAIN_LOW_POINT1 1045</text:p>
          </table:table-cell>
          <table:table-cell table:number-columns-repeated="16378"/>
        </table:table-row>
        <table:table-row table:style-name="ro1">
          <table:table-cell table:formula="of:=IF([$List.A85] &lt;&gt;&quot;&quot;; [$List.I85]; &quot;&quot;)" office:value-type="string" office:string-value="CUP1_CHANNEL3_GAIN_LOW_POINT2" calcext:value-type="string">
            <text:p>CUP1_CHANNEL3_GAIN_LOW_POINT2</text:p>
          </table:table-cell>
          <table:table-cell table:formula="of:=IF([$List.A85] &lt;&gt;&quot;&quot;; [$List.A85]; &quot;&quot;)" office:value-type="float" office:value="1046" calcext:value-type="float">
            <text:p>1046</text:p>
          </table:table-cell>
          <table:table-cell/>
          <table:table-cell table:formula="of:=IF([.A85]&lt;&gt;&quot;&quot;; COM.MICROSOFT.CONCAT(&quot;#define MODBUS_ADDR_&quot;; [.A85]; &quot; &quot;; [.B85]); &quot;&quot;)" office:value-type="string" office:string-value="#define MODBUS_ADDR_CUP1_CHANNEL3_GAIN_LOW_POINT2 1046" calcext:value-type="string">
            <text:p>#define MODBUS_ADDR_CUP1_CHANNEL3_GAIN_LOW_POINT2 1046</text:p>
          </table:table-cell>
          <table:table-cell table:number-columns-repeated="16378"/>
        </table:table-row>
        <table:table-row table:style-name="ro1">
          <table:table-cell table:formula="of:=IF([$List.A86] &lt;&gt;&quot;&quot;; [$List.I86]; &quot;&quot;)" office:value-type="string" office:string-value="CUP1_CHANNEL3_GAIN_LOW_POINT3" calcext:value-type="string">
            <text:p>CUP1_CHANNEL3_GAIN_LOW_POINT3</text:p>
          </table:table-cell>
          <table:table-cell table:formula="of:=IF([$List.A86] &lt;&gt;&quot;&quot;; [$List.A86]; &quot;&quot;)" office:value-type="float" office:value="1047" calcext:value-type="float">
            <text:p>1047</text:p>
          </table:table-cell>
          <table:table-cell/>
          <table:table-cell table:formula="of:=IF([.A86]&lt;&gt;&quot;&quot;; COM.MICROSOFT.CONCAT(&quot;#define MODBUS_ADDR_&quot;; [.A86]; &quot; &quot;; [.B86]); &quot;&quot;)" office:value-type="string" office:string-value="#define MODBUS_ADDR_CUP1_CHANNEL3_GAIN_LOW_POINT3 1047" calcext:value-type="string">
            <text:p>#define MODBUS_ADDR_CUP1_CHANNEL3_GAIN_LOW_POINT3 1047</text:p>
          </table:table-cell>
          <table:table-cell table:number-columns-repeated="16378"/>
        </table:table-row>
        <table:table-row table:style-name="ro1">
          <table:table-cell table:formula="of:=IF([$List.A87] &lt;&gt;&quot;&quot;; [$List.I87]; &quot;&quot;)" office:value-type="string" office:string-value="CUP1_CHANNEL3_GAIN_HIGH_POINT2" calcext:value-type="string">
            <text:p>CUP1_CHANNEL3_GAIN_HIGH_POINT2</text:p>
          </table:table-cell>
          <table:table-cell table:formula="of:=IF([$List.A87] &lt;&gt;&quot;&quot;; [$List.A87]; &quot;&quot;)" office:value-type="float" office:value="1048" calcext:value-type="float">
            <text:p>1048</text:p>
          </table:table-cell>
          <table:table-cell/>
          <table:table-cell table:formula="of:=IF([.A87]&lt;&gt;&quot;&quot;; COM.MICROSOFT.CONCAT(&quot;#define MODBUS_ADDR_&quot;; [.A87]; &quot; &quot;; [.B87]); &quot;&quot;)" office:value-type="string" office:string-value="#define MODBUS_ADDR_CUP1_CHANNEL3_GAIN_HIGH_POINT2 1048" calcext:value-type="string">
            <text:p>#define MODBUS_ADDR_CUP1_CHANNEL3_GAIN_HIGH_POINT2 1048</text:p>
          </table:table-cell>
          <table:table-cell table:number-columns-repeated="16378"/>
        </table:table-row>
        <table:table-row table:style-name="ro1">
          <table:table-cell table:formula="of:=IF([$List.A88] &lt;&gt;&quot;&quot;; [$List.I88]; &quot;&quot;)" office:value-type="string" office:string-value="CUP1_CHANNEL3_GAIN_HIGH_POINT3" calcext:value-type="string">
            <text:p>CUP1_CHANNEL3_GAIN_HIGH_POINT3</text:p>
          </table:table-cell>
          <table:table-cell table:formula="of:=IF([$List.A88] &lt;&gt;&quot;&quot;; [$List.A88]; &quot;&quot;)" office:value-type="float" office:value="1049" calcext:value-type="float">
            <text:p>1049</text:p>
          </table:table-cell>
          <table:table-cell/>
          <table:table-cell table:formula="of:=IF([.A88]&lt;&gt;&quot;&quot;; COM.MICROSOFT.CONCAT(&quot;#define MODBUS_ADDR_&quot;; [.A88]; &quot; &quot;; [.B88]); &quot;&quot;)" office:value-type="string" office:string-value="#define MODBUS_ADDR_CUP1_CHANNEL3_GAIN_HIGH_POINT3 1049" calcext:value-type="string">
            <text:p>#define MODBUS_ADDR_CUP1_CHANNEL3_GAIN_HIGH_POINT3 1049</text:p>
          </table:table-cell>
          <table:table-cell table:number-columns-repeated="16378"/>
        </table:table-row>
        <table:table-row table:style-name="ro1">
          <table:table-cell table:formula="of:=IF([$List.A89] &lt;&gt;&quot;&quot;; [$List.I89]; &quot;&quot;)" office:value-type="string" office:string-value="CUP1_CHANNEL3_GAIN_HIGH_POINT4" calcext:value-type="string">
            <text:p>CUP1_CHANNEL3_GAIN_HIGH_POINT4</text:p>
          </table:table-cell>
          <table:table-cell table:formula="of:=IF([$List.A89] &lt;&gt;&quot;&quot;; [$List.A89]; &quot;&quot;)" office:value-type="float" office:value="1050" calcext:value-type="float">
            <text:p>1050</text:p>
          </table:table-cell>
          <table:table-cell/>
          <table:table-cell table:formula="of:=IF([.A89]&lt;&gt;&quot;&quot;; COM.MICROSOFT.CONCAT(&quot;#define MODBUS_ADDR_&quot;; [.A89]; &quot; &quot;; [.B89]); &quot;&quot;)" office:value-type="string" office:string-value="#define MODBUS_ADDR_CUP1_CHANNEL3_GAIN_HIGH_POINT4 1050" calcext:value-type="string">
            <text:p>#define MODBUS_ADDR_CUP1_CHANNEL3_GAIN_HIGH_POINT4 1050</text:p>
          </table:table-cell>
          <table:table-cell table:number-columns-repeated="16378"/>
        </table:table-row>
        <table:table-row table:style-name="ro1">
          <table:table-cell table:formula="of:=IF([$List.A90] &lt;&gt;&quot;&quot;; [$List.I90]; &quot;&quot;)" office:value-type="string" office:string-value="CUP1_CHANNEL4_GAIN_LOW_POINT1" calcext:value-type="string">
            <text:p>CUP1_CHANNEL4_GAIN_LOW_POINT1</text:p>
          </table:table-cell>
          <table:table-cell table:formula="of:=IF([$List.A90] &lt;&gt;&quot;&quot;; [$List.A90]; &quot;&quot;)" office:value-type="float" office:value="1051" calcext:value-type="float">
            <text:p>1051</text:p>
          </table:table-cell>
          <table:table-cell/>
          <table:table-cell table:formula="of:=IF([.A90]&lt;&gt;&quot;&quot;; COM.MICROSOFT.CONCAT(&quot;#define MODBUS_ADDR_&quot;; [.A90]; &quot; &quot;; [.B90]); &quot;&quot;)" office:value-type="string" office:string-value="#define MODBUS_ADDR_CUP1_CHANNEL4_GAIN_LOW_POINT1 1051" calcext:value-type="string">
            <text:p>#define MODBUS_ADDR_CUP1_CHANNEL4_GAIN_LOW_POINT1 1051</text:p>
          </table:table-cell>
          <table:table-cell table:number-columns-repeated="16378"/>
        </table:table-row>
        <table:table-row table:style-name="ro1">
          <table:table-cell table:formula="of:=IF([$List.A91] &lt;&gt;&quot;&quot;; [$List.I91]; &quot;&quot;)" office:value-type="string" office:string-value="CUP1_CHANNEL4_GAIN_LOW_POINT2" calcext:value-type="string">
            <text:p>CUP1_CHANNEL4_GAIN_LOW_POINT2</text:p>
          </table:table-cell>
          <table:table-cell table:formula="of:=IF([$List.A91] &lt;&gt;&quot;&quot;; [$List.A91]; &quot;&quot;)" office:value-type="float" office:value="1052" calcext:value-type="float">
            <text:p>1052</text:p>
          </table:table-cell>
          <table:table-cell/>
          <table:table-cell table:formula="of:=IF([.A91]&lt;&gt;&quot;&quot;; COM.MICROSOFT.CONCAT(&quot;#define MODBUS_ADDR_&quot;; [.A91]; &quot; &quot;; [.B91]); &quot;&quot;)" office:value-type="string" office:string-value="#define MODBUS_ADDR_CUP1_CHANNEL4_GAIN_LOW_POINT2 1052" calcext:value-type="string">
            <text:p>#define MODBUS_ADDR_CUP1_CHANNEL4_GAIN_LOW_POINT2 1052</text:p>
          </table:table-cell>
          <table:table-cell table:number-columns-repeated="16378"/>
        </table:table-row>
        <table:table-row table:style-name="ro1">
          <table:table-cell table:formula="of:=IF([$List.A92] &lt;&gt;&quot;&quot;; [$List.I92]; &quot;&quot;)" office:value-type="string" office:string-value="CUP1_CHANNEL4_GAIN_LOW_POINT3" calcext:value-type="string">
            <text:p>CUP1_CHANNEL4_GAIN_LOW_POINT3</text:p>
          </table:table-cell>
          <table:table-cell table:formula="of:=IF([$List.A92] &lt;&gt;&quot;&quot;; [$List.A92]; &quot;&quot;)" office:value-type="float" office:value="1053" calcext:value-type="float">
            <text:p>1053</text:p>
          </table:table-cell>
          <table:table-cell/>
          <table:table-cell table:formula="of:=IF([.A92]&lt;&gt;&quot;&quot;; COM.MICROSOFT.CONCAT(&quot;#define MODBUS_ADDR_&quot;; [.A92]; &quot; &quot;; [.B92]); &quot;&quot;)" office:value-type="string" office:string-value="#define MODBUS_ADDR_CUP1_CHANNEL4_GAIN_LOW_POINT3 1053" calcext:value-type="string">
            <text:p>#define MODBUS_ADDR_CUP1_CHANNEL4_GAIN_LOW_POINT3 1053</text:p>
          </table:table-cell>
          <table:table-cell table:number-columns-repeated="16378"/>
        </table:table-row>
        <table:table-row table:style-name="ro1">
          <table:table-cell table:formula="of:=IF([$List.A93] &lt;&gt;&quot;&quot;; [$List.I93]; &quot;&quot;)" office:value-type="string" office:string-value="CUP1_CHANNEL4_GAIN_HIGH_POINT2" calcext:value-type="string">
            <text:p>CUP1_CHANNEL4_GAIN_HIGH_POINT2</text:p>
          </table:table-cell>
          <table:table-cell table:formula="of:=IF([$List.A93] &lt;&gt;&quot;&quot;; [$List.A93]; &quot;&quot;)" office:value-type="float" office:value="1054" calcext:value-type="float">
            <text:p>1054</text:p>
          </table:table-cell>
          <table:table-cell/>
          <table:table-cell table:formula="of:=IF([.A93]&lt;&gt;&quot;&quot;; COM.MICROSOFT.CONCAT(&quot;#define MODBUS_ADDR_&quot;; [.A93]; &quot; &quot;; [.B93]); &quot;&quot;)" office:value-type="string" office:string-value="#define MODBUS_ADDR_CUP1_CHANNEL4_GAIN_HIGH_POINT2 1054" calcext:value-type="string">
            <text:p>#define MODBUS_ADDR_CUP1_CHANNEL4_GAIN_HIGH_POINT2 1054</text:p>
          </table:table-cell>
          <table:table-cell table:number-columns-repeated="16378"/>
        </table:table-row>
        <table:table-row table:style-name="ro1">
          <table:table-cell table:formula="of:=IF([$List.A94] &lt;&gt;&quot;&quot;; [$List.I94]; &quot;&quot;)" office:value-type="string" office:string-value="CUP1_CHANNEL4_GAIN_HIGH_POINT3" calcext:value-type="string">
            <text:p>CUP1_CHANNEL4_GAIN_HIGH_POINT3</text:p>
          </table:table-cell>
          <table:table-cell table:formula="of:=IF([$List.A94] &lt;&gt;&quot;&quot;; [$List.A94]; &quot;&quot;)" office:value-type="float" office:value="1055" calcext:value-type="float">
            <text:p>1055</text:p>
          </table:table-cell>
          <table:table-cell/>
          <table:table-cell table:formula="of:=IF([.A94]&lt;&gt;&quot;&quot;; COM.MICROSOFT.CONCAT(&quot;#define MODBUS_ADDR_&quot;; [.A94]; &quot; &quot;; [.B94]); &quot;&quot;)" office:value-type="string" office:string-value="#define MODBUS_ADDR_CUP1_CHANNEL4_GAIN_HIGH_POINT3 1055" calcext:value-type="string">
            <text:p>#define MODBUS_ADDR_CUP1_CHANNEL4_GAIN_HIGH_POINT3 1055</text:p>
          </table:table-cell>
          <table:table-cell table:number-columns-repeated="16378"/>
        </table:table-row>
        <table:table-row table:style-name="ro1">
          <table:table-cell table:formula="of:=IF([$List.A95] &lt;&gt;&quot;&quot;; [$List.I95]; &quot;&quot;)" office:value-type="string" office:string-value="CUP1_CHANNEL4_GAIN_HIGH_POINT4" calcext:value-type="string">
            <text:p>CUP1_CHANNEL4_GAIN_HIGH_POINT4</text:p>
          </table:table-cell>
          <table:table-cell table:formula="of:=IF([$List.A95] &lt;&gt;&quot;&quot;; [$List.A95]; &quot;&quot;)" office:value-type="float" office:value="1056" calcext:value-type="float">
            <text:p>1056</text:p>
          </table:table-cell>
          <table:table-cell/>
          <table:table-cell table:formula="of:=IF([.A95]&lt;&gt;&quot;&quot;; COM.MICROSOFT.CONCAT(&quot;#define MODBUS_ADDR_&quot;; [.A95]; &quot; &quot;; [.B95]); &quot;&quot;)" office:value-type="string" office:string-value="#define MODBUS_ADDR_CUP1_CHANNEL4_GAIN_HIGH_POINT4 1056" calcext:value-type="string">
            <text:p>#define MODBUS_ADDR_CUP1_CHANNEL4_GAIN_HIGH_POINT4 1056</text:p>
          </table:table-cell>
          <table:table-cell table:number-columns-repeated="16378"/>
        </table:table-row>
        <table:table-row table:style-name="ro1">
          <table:table-cell table:formula="of:=IF([$List.A96] &lt;&gt;&quot;&quot;; [$List.I96]; &quot;&quot;)">
            <text:p/>
          </table:table-cell>
          <table:table-cell table:formula="of:=IF([$List.A96] &lt;&gt;&quot;&quot;; [$List.A96]; &quot;&quot;)">
            <text:p/>
          </table:table-cell>
          <table:table-cell/>
          <table:table-cell table:formula="of:=IF([.A96]&lt;&gt;&quot;&quot;; COM.MICROSOFT.CONCAT(&quot;#define MODBUS_ADDR_&quot;; [.A96]; &quot; &quot;; [.B96]); &quot;&quot;)">
            <text:p/>
          </table:table-cell>
          <table:table-cell table:number-columns-repeated="16378"/>
        </table:table-row>
        <table:table-row table:style-name="ro1">
          <table:table-cell table:formula="of:=IF([$List.A97] &lt;&gt;&quot;&quot;; [$List.I97]; &quot;&quot;)" office:value-type="string" office:string-value="CUP2_CHANNEL1_GAIN_LOW_POINT1" calcext:value-type="string">
            <text:p>CUP2_CHANNEL1_GAIN_LOW_POINT1</text:p>
          </table:table-cell>
          <table:table-cell table:formula="of:=IF([$List.A97] &lt;&gt;&quot;&quot;; [$List.A97]; &quot;&quot;)" office:value-type="float" office:value="1057" calcext:value-type="float">
            <text:p>1057</text:p>
          </table:table-cell>
          <table:table-cell/>
          <table:table-cell table:formula="of:=IF([.A97]&lt;&gt;&quot;&quot;; COM.MICROSOFT.CONCAT(&quot;#define MODBUS_ADDR_&quot;; [.A97]; &quot; &quot;; [.B97]); &quot;&quot;)" office:value-type="string" office:string-value="#define MODBUS_ADDR_CUP2_CHANNEL1_GAIN_LOW_POINT1 1057" calcext:value-type="string">
            <text:p>#define MODBUS_ADDR_CUP2_CHANNEL1_GAIN_LOW_POINT1 1057</text:p>
          </table:table-cell>
          <table:table-cell table:number-columns-repeated="16378"/>
        </table:table-row>
        <table:table-row table:style-name="ro1">
          <table:table-cell table:formula="of:=IF([$List.A98] &lt;&gt;&quot;&quot;; [$List.I98]; &quot;&quot;)" office:value-type="string" office:string-value="CUP2_CHANNEL1_GAIN_LOW_POINT2" calcext:value-type="string">
            <text:p>CUP2_CHANNEL1_GAIN_LOW_POINT2</text:p>
          </table:table-cell>
          <table:table-cell table:formula="of:=IF([$List.A98] &lt;&gt;&quot;&quot;; [$List.A98]; &quot;&quot;)" office:value-type="float" office:value="1058" calcext:value-type="float">
            <text:p>1058</text:p>
          </table:table-cell>
          <table:table-cell/>
          <table:table-cell table:formula="of:=IF([.A98]&lt;&gt;&quot;&quot;; COM.MICROSOFT.CONCAT(&quot;#define MODBUS_ADDR_&quot;; [.A98]; &quot; &quot;; [.B98]); &quot;&quot;)" office:value-type="string" office:string-value="#define MODBUS_ADDR_CUP2_CHANNEL1_GAIN_LOW_POINT2 1058" calcext:value-type="string">
            <text:p>#define MODBUS_ADDR_CUP2_CHANNEL1_GAIN_LOW_POINT2 1058</text:p>
          </table:table-cell>
          <table:table-cell table:number-columns-repeated="16378"/>
        </table:table-row>
        <table:table-row table:style-name="ro1">
          <table:table-cell table:formula="of:=IF([$List.A99] &lt;&gt;&quot;&quot;; [$List.I99]; &quot;&quot;)" office:value-type="string" office:string-value="CUP2_CHANNEL1_GAIN_LOW_POINT3" calcext:value-type="string">
            <text:p>CUP2_CHANNEL1_GAIN_LOW_POINT3</text:p>
          </table:table-cell>
          <table:table-cell table:formula="of:=IF([$List.A99] &lt;&gt;&quot;&quot;; [$List.A99]; &quot;&quot;)" office:value-type="float" office:value="1059" calcext:value-type="float">
            <text:p>1059</text:p>
          </table:table-cell>
          <table:table-cell/>
          <table:table-cell table:formula="of:=IF([.A99]&lt;&gt;&quot;&quot;; COM.MICROSOFT.CONCAT(&quot;#define MODBUS_ADDR_&quot;; [.A99]; &quot; &quot;; [.B99]); &quot;&quot;)" office:value-type="string" office:string-value="#define MODBUS_ADDR_CUP2_CHANNEL1_GAIN_LOW_POINT3 1059" calcext:value-type="string">
            <text:p>#define MODBUS_ADDR_CUP2_CHANNEL1_GAIN_LOW_POINT3 1059</text:p>
          </table:table-cell>
          <table:table-cell table:number-columns-repeated="16378"/>
        </table:table-row>
        <table:table-row table:style-name="ro1">
          <table:table-cell table:formula="of:=IF([$List.A100] &lt;&gt;&quot;&quot;; [$List.I100]; &quot;&quot;)" office:value-type="string" office:string-value="CUP2_CHANNEL1_GAIN_HIGH_POINT2" calcext:value-type="string">
            <text:p>CUP2_CHANNEL1_GAIN_HIGH_POINT2</text:p>
          </table:table-cell>
          <table:table-cell table:formula="of:=IF([$List.A100] &lt;&gt;&quot;&quot;; [$List.A100]; &quot;&quot;)" office:value-type="float" office:value="1060" calcext:value-type="float">
            <text:p>1060</text:p>
          </table:table-cell>
          <table:table-cell/>
          <table:table-cell table:formula="of:=IF([.A100]&lt;&gt;&quot;&quot;; COM.MICROSOFT.CONCAT(&quot;#define MODBUS_ADDR_&quot;; [.A100]; &quot; &quot;; [.B100]); &quot;&quot;)" office:value-type="string" office:string-value="#define MODBUS_ADDR_CUP2_CHANNEL1_GAIN_HIGH_POINT2 1060" calcext:value-type="string">
            <text:p>#define MODBUS_ADDR_CUP2_CHANNEL1_GAIN_HIGH_POINT2 1060</text:p>
          </table:table-cell>
          <table:table-cell table:number-columns-repeated="16378"/>
        </table:table-row>
        <table:table-row table:style-name="ro1">
          <table:table-cell table:formula="of:=IF([$List.A101] &lt;&gt;&quot;&quot;; [$List.I101]; &quot;&quot;)" office:value-type="string" office:string-value="CUP2_CHANNEL1_GAIN_HIGH_POINT3" calcext:value-type="string">
            <text:p>CUP2_CHANNEL1_GAIN_HIGH_POINT3</text:p>
          </table:table-cell>
          <table:table-cell table:formula="of:=IF([$List.A101] &lt;&gt;&quot;&quot;; [$List.A101]; &quot;&quot;)" office:value-type="float" office:value="1061" calcext:value-type="float">
            <text:p>1061</text:p>
          </table:table-cell>
          <table:table-cell/>
          <table:table-cell table:formula="of:=IF([.A101]&lt;&gt;&quot;&quot;; COM.MICROSOFT.CONCAT(&quot;#define MODBUS_ADDR_&quot;; [.A101]; &quot; &quot;; [.B101]); &quot;&quot;)" office:value-type="string" office:string-value="#define MODBUS_ADDR_CUP2_CHANNEL1_GAIN_HIGH_POINT3 1061" calcext:value-type="string">
            <text:p>#define MODBUS_ADDR_CUP2_CHANNEL1_GAIN_HIGH_POINT3 1061</text:p>
          </table:table-cell>
          <table:table-cell table:number-columns-repeated="16378"/>
        </table:table-row>
        <table:table-row table:style-name="ro1">
          <table:table-cell table:formula="of:=IF([$List.A102] &lt;&gt;&quot;&quot;; [$List.I102]; &quot;&quot;)" office:value-type="string" office:string-value="CUP2_CHANNEL1_GAIN_HIGH_POINT4" calcext:value-type="string">
            <text:p>CUP2_CHANNEL1_GAIN_HIGH_POINT4</text:p>
          </table:table-cell>
          <table:table-cell table:formula="of:=IF([$List.A102] &lt;&gt;&quot;&quot;; [$List.A102]; &quot;&quot;)" office:value-type="float" office:value="1062" calcext:value-type="float">
            <text:p>1062</text:p>
          </table:table-cell>
          <table:table-cell/>
          <table:table-cell table:formula="of:=IF([.A102]&lt;&gt;&quot;&quot;; COM.MICROSOFT.CONCAT(&quot;#define MODBUS_ADDR_&quot;; [.A102]; &quot; &quot;; [.B102]); &quot;&quot;)" office:value-type="string" office:string-value="#define MODBUS_ADDR_CUP2_CHANNEL1_GAIN_HIGH_POINT4 1062" calcext:value-type="string">
            <text:p>#define MODBUS_ADDR_CUP2_CHANNEL1_GAIN_HIGH_POINT4 1062</text:p>
          </table:table-cell>
          <table:table-cell table:number-columns-repeated="16378"/>
        </table:table-row>
        <table:table-row table:style-name="ro1">
          <table:table-cell table:formula="of:=IF([$List.A103] &lt;&gt;&quot;&quot;; [$List.I103]; &quot;&quot;)" office:value-type="string" office:string-value="CUP2_CHANNEL2_GAIN_LOW_POINT1" calcext:value-type="string">
            <text:p>CUP2_CHANNEL2_GAIN_LOW_POINT1</text:p>
          </table:table-cell>
          <table:table-cell table:formula="of:=IF([$List.A103] &lt;&gt;&quot;&quot;; [$List.A103]; &quot;&quot;)" office:value-type="float" office:value="1063" calcext:value-type="float">
            <text:p>1063</text:p>
          </table:table-cell>
          <table:table-cell/>
          <table:table-cell table:formula="of:=IF([.A103]&lt;&gt;&quot;&quot;; COM.MICROSOFT.CONCAT(&quot;#define MODBUS_ADDR_&quot;; [.A103]; &quot; &quot;; [.B103]); &quot;&quot;)" office:value-type="string" office:string-value="#define MODBUS_ADDR_CUP2_CHANNEL2_GAIN_LOW_POINT1 1063" calcext:value-type="string">
            <text:p>#define MODBUS_ADDR_CUP2_CHANNEL2_GAIN_LOW_POINT1 1063</text:p>
          </table:table-cell>
          <table:table-cell table:number-columns-repeated="16378"/>
        </table:table-row>
        <table:table-row table:style-name="ro1">
          <table:table-cell table:formula="of:=IF([$List.A104] &lt;&gt;&quot;&quot;; [$List.I104]; &quot;&quot;)" office:value-type="string" office:string-value="CUP2_CHANNEL2_GAIN_LOW_POINT2" calcext:value-type="string">
            <text:p>CUP2_CHANNEL2_GAIN_LOW_POINT2</text:p>
          </table:table-cell>
          <table:table-cell table:formula="of:=IF([$List.A104] &lt;&gt;&quot;&quot;; [$List.A104]; &quot;&quot;)" office:value-type="float" office:value="1064" calcext:value-type="float">
            <text:p>1064</text:p>
          </table:table-cell>
          <table:table-cell/>
          <table:table-cell table:formula="of:=IF([.A104]&lt;&gt;&quot;&quot;; COM.MICROSOFT.CONCAT(&quot;#define MODBUS_ADDR_&quot;; [.A104]; &quot; &quot;; [.B104]); &quot;&quot;)" office:value-type="string" office:string-value="#define MODBUS_ADDR_CUP2_CHANNEL2_GAIN_LOW_POINT2 1064" calcext:value-type="string">
            <text:p>#define MODBUS_ADDR_CUP2_CHANNEL2_GAIN_LOW_POINT2 1064</text:p>
          </table:table-cell>
          <table:table-cell table:number-columns-repeated="16378"/>
        </table:table-row>
        <table:table-row table:style-name="ro1">
          <table:table-cell table:formula="of:=IF([$List.A105] &lt;&gt;&quot;&quot;; [$List.I105]; &quot;&quot;)" office:value-type="string" office:string-value="CUP2_CHANNEL2_GAIN_LOW_POINT3" calcext:value-type="string">
            <text:p>CUP2_CHANNEL2_GAIN_LOW_POINT3</text:p>
          </table:table-cell>
          <table:table-cell table:formula="of:=IF([$List.A105] &lt;&gt;&quot;&quot;; [$List.A105]; &quot;&quot;)" office:value-type="float" office:value="1065" calcext:value-type="float">
            <text:p>1065</text:p>
          </table:table-cell>
          <table:table-cell/>
          <table:table-cell table:formula="of:=IF([.A105]&lt;&gt;&quot;&quot;; COM.MICROSOFT.CONCAT(&quot;#define MODBUS_ADDR_&quot;; [.A105]; &quot; &quot;; [.B105]); &quot;&quot;)" office:value-type="string" office:string-value="#define MODBUS_ADDR_CUP2_CHANNEL2_GAIN_LOW_POINT3 1065" calcext:value-type="string">
            <text:p>#define MODBUS_ADDR_CUP2_CHANNEL2_GAIN_LOW_POINT3 1065</text:p>
          </table:table-cell>
          <table:table-cell table:number-columns-repeated="16378"/>
        </table:table-row>
        <table:table-row table:style-name="ro1">
          <table:table-cell table:formula="of:=IF([$List.A106] &lt;&gt;&quot;&quot;; [$List.I106]; &quot;&quot;)" office:value-type="string" office:string-value="CUP2_CHANNEL2_GAIN_HIGH_POINT2" calcext:value-type="string">
            <text:p>CUP2_CHANNEL2_GAIN_HIGH_POINT2</text:p>
          </table:table-cell>
          <table:table-cell table:formula="of:=IF([$List.A106] &lt;&gt;&quot;&quot;; [$List.A106]; &quot;&quot;)" office:value-type="float" office:value="1066" calcext:value-type="float">
            <text:p>1066</text:p>
          </table:table-cell>
          <table:table-cell/>
          <table:table-cell table:formula="of:=IF([.A106]&lt;&gt;&quot;&quot;; COM.MICROSOFT.CONCAT(&quot;#define MODBUS_ADDR_&quot;; [.A106]; &quot; &quot;; [.B106]); &quot;&quot;)" office:value-type="string" office:string-value="#define MODBUS_ADDR_CUP2_CHANNEL2_GAIN_HIGH_POINT2 1066" calcext:value-type="string">
            <text:p>#define MODBUS_ADDR_CUP2_CHANNEL2_GAIN_HIGH_POINT2 1066</text:p>
          </table:table-cell>
          <table:table-cell table:number-columns-repeated="16378"/>
        </table:table-row>
        <table:table-row table:style-name="ro1">
          <table:table-cell table:formula="of:=IF([$List.A107] &lt;&gt;&quot;&quot;; [$List.I107]; &quot;&quot;)" office:value-type="string" office:string-value="CUP2_CHANNEL2_GAIN_HIGH_POINT3" calcext:value-type="string">
            <text:p>CUP2_CHANNEL2_GAIN_HIGH_POINT3</text:p>
          </table:table-cell>
          <table:table-cell table:formula="of:=IF([$List.A107] &lt;&gt;&quot;&quot;; [$List.A107]; &quot;&quot;)" office:value-type="float" office:value="1067" calcext:value-type="float">
            <text:p>1067</text:p>
          </table:table-cell>
          <table:table-cell/>
          <table:table-cell table:formula="of:=IF([.A107]&lt;&gt;&quot;&quot;; COM.MICROSOFT.CONCAT(&quot;#define MODBUS_ADDR_&quot;; [.A107]; &quot; &quot;; [.B107]); &quot;&quot;)" office:value-type="string" office:string-value="#define MODBUS_ADDR_CUP2_CHANNEL2_GAIN_HIGH_POINT3 1067" calcext:value-type="string">
            <text:p>#define MODBUS_ADDR_CUP2_CHANNEL2_GAIN_HIGH_POINT3 1067</text:p>
          </table:table-cell>
          <table:table-cell table:number-columns-repeated="16378"/>
        </table:table-row>
        <table:table-row table:style-name="ro1">
          <table:table-cell table:formula="of:=IF([$List.A108] &lt;&gt;&quot;&quot;; [$List.I108]; &quot;&quot;)" office:value-type="string" office:string-value="CUP2_CHANNEL2_GAIN_HIGH_POINT4" calcext:value-type="string">
            <text:p>CUP2_CHANNEL2_GAIN_HIGH_POINT4</text:p>
          </table:table-cell>
          <table:table-cell table:formula="of:=IF([$List.A108] &lt;&gt;&quot;&quot;; [$List.A108]; &quot;&quot;)" office:value-type="float" office:value="1068" calcext:value-type="float">
            <text:p>1068</text:p>
          </table:table-cell>
          <table:table-cell/>
          <table:table-cell table:formula="of:=IF([.A108]&lt;&gt;&quot;&quot;; COM.MICROSOFT.CONCAT(&quot;#define MODBUS_ADDR_&quot;; [.A108]; &quot; &quot;; [.B108]); &quot;&quot;)" office:value-type="string" office:string-value="#define MODBUS_ADDR_CUP2_CHANNEL2_GAIN_HIGH_POINT4 1068" calcext:value-type="string">
            <text:p>#define MODBUS_ADDR_CUP2_CHANNEL2_GAIN_HIGH_POINT4 1068</text:p>
          </table:table-cell>
          <table:table-cell table:number-columns-repeated="16378"/>
        </table:table-row>
        <table:table-row table:style-name="ro1">
          <table:table-cell table:formula="of:=IF([$List.A109] &lt;&gt;&quot;&quot;; [$List.I109]; &quot;&quot;)" office:value-type="string" office:string-value="CUP2_CHANNEL3_GAIN_LOW_POINT1" calcext:value-type="string">
            <text:p>CUP2_CHANNEL3_GAIN_LOW_POINT1</text:p>
          </table:table-cell>
          <table:table-cell table:formula="of:=IF([$List.A109] &lt;&gt;&quot;&quot;; [$List.A109]; &quot;&quot;)" office:value-type="float" office:value="1069" calcext:value-type="float">
            <text:p>1069</text:p>
          </table:table-cell>
          <table:table-cell/>
          <table:table-cell table:formula="of:=IF([.A109]&lt;&gt;&quot;&quot;; COM.MICROSOFT.CONCAT(&quot;#define MODBUS_ADDR_&quot;; [.A109]; &quot; &quot;; [.B109]); &quot;&quot;)" office:value-type="string" office:string-value="#define MODBUS_ADDR_CUP2_CHANNEL3_GAIN_LOW_POINT1 1069" calcext:value-type="string">
            <text:p>#define MODBUS_ADDR_CUP2_CHANNEL3_GAIN_LOW_POINT1 1069</text:p>
          </table:table-cell>
          <table:table-cell table:number-columns-repeated="16378"/>
        </table:table-row>
        <table:table-row table:style-name="ro1">
          <table:table-cell table:formula="of:=IF([$List.A110] &lt;&gt;&quot;&quot;; [$List.I110]; &quot;&quot;)" office:value-type="string" office:string-value="CUP2_CHANNEL3_GAIN_LOW_POINT2" calcext:value-type="string">
            <text:p>CUP2_CHANNEL3_GAIN_LOW_POINT2</text:p>
          </table:table-cell>
          <table:table-cell table:formula="of:=IF([$List.A110] &lt;&gt;&quot;&quot;; [$List.A110]; &quot;&quot;)" office:value-type="float" office:value="1070" calcext:value-type="float">
            <text:p>1070</text:p>
          </table:table-cell>
          <table:table-cell/>
          <table:table-cell table:formula="of:=IF([.A110]&lt;&gt;&quot;&quot;; COM.MICROSOFT.CONCAT(&quot;#define MODBUS_ADDR_&quot;; [.A110]; &quot; &quot;; [.B110]); &quot;&quot;)" office:value-type="string" office:string-value="#define MODBUS_ADDR_CUP2_CHANNEL3_GAIN_LOW_POINT2 1070" calcext:value-type="string">
            <text:p>#define MODBUS_ADDR_CUP2_CHANNEL3_GAIN_LOW_POINT2 1070</text:p>
          </table:table-cell>
          <table:table-cell table:number-columns-repeated="16378"/>
        </table:table-row>
        <table:table-row table:style-name="ro1">
          <table:table-cell table:formula="of:=IF([$List.A111] &lt;&gt;&quot;&quot;; [$List.I111]; &quot;&quot;)" office:value-type="string" office:string-value="CUP2_CHANNEL3_GAIN_LOW_POINT3" calcext:value-type="string">
            <text:p>CUP2_CHANNEL3_GAIN_LOW_POINT3</text:p>
          </table:table-cell>
          <table:table-cell table:formula="of:=IF([$List.A111] &lt;&gt;&quot;&quot;; [$List.A111]; &quot;&quot;)" office:value-type="float" office:value="1071" calcext:value-type="float">
            <text:p>1071</text:p>
          </table:table-cell>
          <table:table-cell/>
          <table:table-cell table:formula="of:=IF([.A111]&lt;&gt;&quot;&quot;; COM.MICROSOFT.CONCAT(&quot;#define MODBUS_ADDR_&quot;; [.A111]; &quot; &quot;; [.B111]); &quot;&quot;)" office:value-type="string" office:string-value="#define MODBUS_ADDR_CUP2_CHANNEL3_GAIN_LOW_POINT3 1071" calcext:value-type="string">
            <text:p>#define MODBUS_ADDR_CUP2_CHANNEL3_GAIN_LOW_POINT3 1071</text:p>
          </table:table-cell>
          <table:table-cell table:number-columns-repeated="16378"/>
        </table:table-row>
        <table:table-row table:style-name="ro1">
          <table:table-cell table:formula="of:=IF([$List.A112] &lt;&gt;&quot;&quot;; [$List.I112]; &quot;&quot;)" office:value-type="string" office:string-value="CUP2_CHANNEL3_GAIN_HIGH_POINT2" calcext:value-type="string">
            <text:p>CUP2_CHANNEL3_GAIN_HIGH_POINT2</text:p>
          </table:table-cell>
          <table:table-cell table:formula="of:=IF([$List.A112] &lt;&gt;&quot;&quot;; [$List.A112]; &quot;&quot;)" office:value-type="float" office:value="1072" calcext:value-type="float">
            <text:p>1072</text:p>
          </table:table-cell>
          <table:table-cell/>
          <table:table-cell table:formula="of:=IF([.A112]&lt;&gt;&quot;&quot;; COM.MICROSOFT.CONCAT(&quot;#define MODBUS_ADDR_&quot;; [.A112]; &quot; &quot;; [.B112]); &quot;&quot;)" office:value-type="string" office:string-value="#define MODBUS_ADDR_CUP2_CHANNEL3_GAIN_HIGH_POINT2 1072" calcext:value-type="string">
            <text:p>#define MODBUS_ADDR_CUP2_CHANNEL3_GAIN_HIGH_POINT2 1072</text:p>
          </table:table-cell>
          <table:table-cell table:number-columns-repeated="16378"/>
        </table:table-row>
        <table:table-row table:style-name="ro1">
          <table:table-cell table:formula="of:=IF([$List.A113] &lt;&gt;&quot;&quot;; [$List.I113]; &quot;&quot;)" office:value-type="string" office:string-value="CUP2_CHANNEL3_GAIN_HIGH_POINT3" calcext:value-type="string">
            <text:p>CUP2_CHANNEL3_GAIN_HIGH_POINT3</text:p>
          </table:table-cell>
          <table:table-cell table:formula="of:=IF([$List.A113] &lt;&gt;&quot;&quot;; [$List.A113]; &quot;&quot;)" office:value-type="float" office:value="1073" calcext:value-type="float">
            <text:p>1073</text:p>
          </table:table-cell>
          <table:table-cell/>
          <table:table-cell table:formula="of:=IF([.A113]&lt;&gt;&quot;&quot;; COM.MICROSOFT.CONCAT(&quot;#define MODBUS_ADDR_&quot;; [.A113]; &quot; &quot;; [.B113]); &quot;&quot;)" office:value-type="string" office:string-value="#define MODBUS_ADDR_CUP2_CHANNEL3_GAIN_HIGH_POINT3 1073" calcext:value-type="string">
            <text:p>#define MODBUS_ADDR_CUP2_CHANNEL3_GAIN_HIGH_POINT3 1073</text:p>
          </table:table-cell>
          <table:table-cell table:number-columns-repeated="16378"/>
        </table:table-row>
        <table:table-row table:style-name="ro1">
          <table:table-cell table:formula="of:=IF([$List.A114] &lt;&gt;&quot;&quot;; [$List.I114]; &quot;&quot;)" office:value-type="string" office:string-value="CUP2_CHANNEL3_GAIN_HIGH_POINT4" calcext:value-type="string">
            <text:p>CUP2_CHANNEL3_GAIN_HIGH_POINT4</text:p>
          </table:table-cell>
          <table:table-cell table:formula="of:=IF([$List.A114] &lt;&gt;&quot;&quot;; [$List.A114]; &quot;&quot;)" office:value-type="float" office:value="1074" calcext:value-type="float">
            <text:p>1074</text:p>
          </table:table-cell>
          <table:table-cell/>
          <table:table-cell table:formula="of:=IF([.A114]&lt;&gt;&quot;&quot;; COM.MICROSOFT.CONCAT(&quot;#define MODBUS_ADDR_&quot;; [.A114]; &quot; &quot;; [.B114]); &quot;&quot;)" office:value-type="string" office:string-value="#define MODBUS_ADDR_CUP2_CHANNEL3_GAIN_HIGH_POINT4 1074" calcext:value-type="string">
            <text:p>#define MODBUS_ADDR_CUP2_CHANNEL3_GAIN_HIGH_POINT4 1074</text:p>
          </table:table-cell>
          <table:table-cell table:number-columns-repeated="16378"/>
        </table:table-row>
        <table:table-row table:style-name="ro1">
          <table:table-cell table:formula="of:=IF([$List.A115] &lt;&gt;&quot;&quot;; [$List.I115]; &quot;&quot;)" office:value-type="string" office:string-value="CUP2_CHANNEL4_GAIN_LOW_POINT1" calcext:value-type="string">
            <text:p>CUP2_CHANNEL4_GAIN_LOW_POINT1</text:p>
          </table:table-cell>
          <table:table-cell table:formula="of:=IF([$List.A115] &lt;&gt;&quot;&quot;; [$List.A115]; &quot;&quot;)" office:value-type="float" office:value="1075" calcext:value-type="float">
            <text:p>1075</text:p>
          </table:table-cell>
          <table:table-cell/>
          <table:table-cell table:formula="of:=IF([.A115]&lt;&gt;&quot;&quot;; COM.MICROSOFT.CONCAT(&quot;#define MODBUS_ADDR_&quot;; [.A115]; &quot; &quot;; [.B115]); &quot;&quot;)" office:value-type="string" office:string-value="#define MODBUS_ADDR_CUP2_CHANNEL4_GAIN_LOW_POINT1 1075" calcext:value-type="string">
            <text:p>#define MODBUS_ADDR_CUP2_CHANNEL4_GAIN_LOW_POINT1 1075</text:p>
          </table:table-cell>
          <table:table-cell table:number-columns-repeated="16378"/>
        </table:table-row>
        <table:table-row table:style-name="ro1">
          <table:table-cell table:formula="of:=IF([$List.A116] &lt;&gt;&quot;&quot;; [$List.I116]; &quot;&quot;)" office:value-type="string" office:string-value="CUP2_CHANNEL4_GAIN_LOW_POINT2" calcext:value-type="string">
            <text:p>CUP2_CHANNEL4_GAIN_LOW_POINT2</text:p>
          </table:table-cell>
          <table:table-cell table:formula="of:=IF([$List.A116] &lt;&gt;&quot;&quot;; [$List.A116]; &quot;&quot;)" office:value-type="float" office:value="1076" calcext:value-type="float">
            <text:p>1076</text:p>
          </table:table-cell>
          <table:table-cell/>
          <table:table-cell table:formula="of:=IF([.A116]&lt;&gt;&quot;&quot;; COM.MICROSOFT.CONCAT(&quot;#define MODBUS_ADDR_&quot;; [.A116]; &quot; &quot;; [.B116]); &quot;&quot;)" office:value-type="string" office:string-value="#define MODBUS_ADDR_CUP2_CHANNEL4_GAIN_LOW_POINT2 1076" calcext:value-type="string">
            <text:p>#define MODBUS_ADDR_CUP2_CHANNEL4_GAIN_LOW_POINT2 1076</text:p>
          </table:table-cell>
          <table:table-cell table:number-columns-repeated="16378"/>
        </table:table-row>
        <table:table-row table:style-name="ro1">
          <table:table-cell table:formula="of:=IF([$List.A117] &lt;&gt;&quot;&quot;; [$List.I117]; &quot;&quot;)" office:value-type="string" office:string-value="CUP2_CHANNEL4_GAIN_LOW_POINT3" calcext:value-type="string">
            <text:p>CUP2_CHANNEL4_GAIN_LOW_POINT3</text:p>
          </table:table-cell>
          <table:table-cell table:formula="of:=IF([$List.A117] &lt;&gt;&quot;&quot;; [$List.A117]; &quot;&quot;)" office:value-type="float" office:value="1077" calcext:value-type="float">
            <text:p>1077</text:p>
          </table:table-cell>
          <table:table-cell/>
          <table:table-cell table:formula="of:=IF([.A117]&lt;&gt;&quot;&quot;; COM.MICROSOFT.CONCAT(&quot;#define MODBUS_ADDR_&quot;; [.A117]; &quot; &quot;; [.B117]); &quot;&quot;)" office:value-type="string" office:string-value="#define MODBUS_ADDR_CUP2_CHANNEL4_GAIN_LOW_POINT3 1077" calcext:value-type="string">
            <text:p>#define MODBUS_ADDR_CUP2_CHANNEL4_GAIN_LOW_POINT3 1077</text:p>
          </table:table-cell>
          <table:table-cell table:number-columns-repeated="16378"/>
        </table:table-row>
        <table:table-row table:style-name="ro1">
          <table:table-cell table:formula="of:=IF([$List.A118] &lt;&gt;&quot;&quot;; [$List.I118]; &quot;&quot;)" office:value-type="string" office:string-value="CUP2_CHANNEL4_GAIN_HIGH_POINT2" calcext:value-type="string">
            <text:p>CUP2_CHANNEL4_GAIN_HIGH_POINT2</text:p>
          </table:table-cell>
          <table:table-cell table:formula="of:=IF([$List.A118] &lt;&gt;&quot;&quot;; [$List.A118]; &quot;&quot;)" office:value-type="float" office:value="1078" calcext:value-type="float">
            <text:p>1078</text:p>
          </table:table-cell>
          <table:table-cell/>
          <table:table-cell table:formula="of:=IF([.A118]&lt;&gt;&quot;&quot;; COM.MICROSOFT.CONCAT(&quot;#define MODBUS_ADDR_&quot;; [.A118]; &quot; &quot;; [.B118]); &quot;&quot;)" office:value-type="string" office:string-value="#define MODBUS_ADDR_CUP2_CHANNEL4_GAIN_HIGH_POINT2 1078" calcext:value-type="string">
            <text:p>#define MODBUS_ADDR_CUP2_CHANNEL4_GAIN_HIGH_POINT2 1078</text:p>
          </table:table-cell>
          <table:table-cell table:number-columns-repeated="16378"/>
        </table:table-row>
        <table:table-row table:style-name="ro1">
          <table:table-cell table:formula="of:=IF([$List.A119] &lt;&gt;&quot;&quot;; [$List.I119]; &quot;&quot;)" office:value-type="string" office:string-value="CUP2_CHANNEL4_GAIN_HIGH_POINT3" calcext:value-type="string">
            <text:p>CUP2_CHANNEL4_GAIN_HIGH_POINT3</text:p>
          </table:table-cell>
          <table:table-cell table:formula="of:=IF([$List.A119] &lt;&gt;&quot;&quot;; [$List.A119]; &quot;&quot;)" office:value-type="float" office:value="1079" calcext:value-type="float">
            <text:p>1079</text:p>
          </table:table-cell>
          <table:table-cell/>
          <table:table-cell table:formula="of:=IF([.A119]&lt;&gt;&quot;&quot;; COM.MICROSOFT.CONCAT(&quot;#define MODBUS_ADDR_&quot;; [.A119]; &quot; &quot;; [.B119]); &quot;&quot;)" office:value-type="string" office:string-value="#define MODBUS_ADDR_CUP2_CHANNEL4_GAIN_HIGH_POINT3 1079" calcext:value-type="string">
            <text:p>#define MODBUS_ADDR_CUP2_CHANNEL4_GAIN_HIGH_POINT3 1079</text:p>
          </table:table-cell>
          <table:table-cell table:number-columns-repeated="16378"/>
        </table:table-row>
        <table:table-row table:style-name="ro1">
          <table:table-cell table:formula="of:=IF([$List.A120] &lt;&gt;&quot;&quot;; [$List.I120]; &quot;&quot;)" office:value-type="string" office:string-value="CUP2_CHANNEL4_GAIN_HIGH_POINT4" calcext:value-type="string">
            <text:p>CUP2_CHANNEL4_GAIN_HIGH_POINT4</text:p>
          </table:table-cell>
          <table:table-cell table:formula="of:=IF([$List.A120] &lt;&gt;&quot;&quot;; [$List.A120]; &quot;&quot;)" office:value-type="float" office:value="1080" calcext:value-type="float">
            <text:p>1080</text:p>
          </table:table-cell>
          <table:table-cell/>
          <table:table-cell table:formula="of:=IF([.A120]&lt;&gt;&quot;&quot;; COM.MICROSOFT.CONCAT(&quot;#define MODBUS_ADDR_&quot;; [.A120]; &quot; &quot;; [.B120]); &quot;&quot;)" office:value-type="string" office:string-value="#define MODBUS_ADDR_CUP2_CHANNEL4_GAIN_HIGH_POINT4 1080" calcext:value-type="string">
            <text:p>#define MODBUS_ADDR_CUP2_CHANNEL4_GAIN_HIGH_POINT4 1080</text:p>
          </table:table-cell>
          <table:table-cell table:number-columns-repeated="16378"/>
        </table:table-row>
        <table:table-row table:style-name="ro1">
          <table:table-cell table:formula="of:=IF([$List.A121] &lt;&gt;&quot;&quot;; [$List.I121]; &quot;&quot;)">
            <text:p/>
          </table:table-cell>
          <table:table-cell table:formula="of:=IF([$List.A121] &lt;&gt;&quot;&quot;; [$List.A121]; &quot;&quot;)">
            <text:p/>
          </table:table-cell>
          <table:table-cell/>
          <table:table-cell table:formula="of:=IF([.A121]&lt;&gt;&quot;&quot;; COM.MICROSOFT.CONCAT(&quot;#define MODBUS_ADDR_&quot;; [.A121]; &quot; &quot;; [.B121]); &quot;&quot;)">
            <text:p/>
          </table:table-cell>
          <table:table-cell table:number-columns-repeated="16378"/>
        </table:table-row>
        <table:table-row table:style-name="ro1">
          <table:table-cell table:formula="of:=IF([$List.A122] &lt;&gt;&quot;&quot;; [$List.I122]; &quot;&quot;)" office:value-type="string" office:string-value="CUP3_CHANNEL1_GAIN_LOW_POINT1" calcext:value-type="string">
            <text:p>CUP3_CHANNEL1_GAIN_LOW_POINT1</text:p>
          </table:table-cell>
          <table:table-cell table:formula="of:=IF([$List.A122] &lt;&gt;&quot;&quot;; [$List.A122]; &quot;&quot;)" office:value-type="float" office:value="1081" calcext:value-type="float">
            <text:p>1081</text:p>
          </table:table-cell>
          <table:table-cell/>
          <table:table-cell table:formula="of:=IF([.A122]&lt;&gt;&quot;&quot;; COM.MICROSOFT.CONCAT(&quot;#define MODBUS_ADDR_&quot;; [.A122]; &quot; &quot;; [.B122]); &quot;&quot;)" office:value-type="string" office:string-value="#define MODBUS_ADDR_CUP3_CHANNEL1_GAIN_LOW_POINT1 1081" calcext:value-type="string">
            <text:p>#define MODBUS_ADDR_CUP3_CHANNEL1_GAIN_LOW_POINT1 1081</text:p>
          </table:table-cell>
          <table:table-cell table:number-columns-repeated="16378"/>
        </table:table-row>
        <table:table-row table:style-name="ro1">
          <table:table-cell table:formula="of:=IF([$List.A123] &lt;&gt;&quot;&quot;; [$List.I123]; &quot;&quot;)" office:value-type="string" office:string-value="CUP3_CHANNEL1_GAIN_LOW_POINT2" calcext:value-type="string">
            <text:p>CUP3_CHANNEL1_GAIN_LOW_POINT2</text:p>
          </table:table-cell>
          <table:table-cell table:formula="of:=IF([$List.A123] &lt;&gt;&quot;&quot;; [$List.A123]; &quot;&quot;)" office:value-type="float" office:value="1082" calcext:value-type="float">
            <text:p>1082</text:p>
          </table:table-cell>
          <table:table-cell/>
          <table:table-cell table:formula="of:=IF([.A123]&lt;&gt;&quot;&quot;; COM.MICROSOFT.CONCAT(&quot;#define MODBUS_ADDR_&quot;; [.A123]; &quot; &quot;; [.B123]); &quot;&quot;)" office:value-type="string" office:string-value="#define MODBUS_ADDR_CUP3_CHANNEL1_GAIN_LOW_POINT2 1082" calcext:value-type="string">
            <text:p>#define MODBUS_ADDR_CUP3_CHANNEL1_GAIN_LOW_POINT2 1082</text:p>
          </table:table-cell>
          <table:table-cell table:number-columns-repeated="16378"/>
        </table:table-row>
        <table:table-row table:style-name="ro1">
          <table:table-cell table:formula="of:=IF([$List.A124] &lt;&gt;&quot;&quot;; [$List.I124]; &quot;&quot;)" office:value-type="string" office:string-value="CUP3_CHANNEL1_GAIN_LOW_POINT3" calcext:value-type="string">
            <text:p>CUP3_CHANNEL1_GAIN_LOW_POINT3</text:p>
          </table:table-cell>
          <table:table-cell table:formula="of:=IF([$List.A124] &lt;&gt;&quot;&quot;; [$List.A124]; &quot;&quot;)" office:value-type="float" office:value="1083" calcext:value-type="float">
            <text:p>1083</text:p>
          </table:table-cell>
          <table:table-cell/>
          <table:table-cell table:formula="of:=IF([.A124]&lt;&gt;&quot;&quot;; COM.MICROSOFT.CONCAT(&quot;#define MODBUS_ADDR_&quot;; [.A124]; &quot; &quot;; [.B124]); &quot;&quot;)" office:value-type="string" office:string-value="#define MODBUS_ADDR_CUP3_CHANNEL1_GAIN_LOW_POINT3 1083" calcext:value-type="string">
            <text:p>#define MODBUS_ADDR_CUP3_CHANNEL1_GAIN_LOW_POINT3 1083</text:p>
          </table:table-cell>
          <table:table-cell table:number-columns-repeated="16378"/>
        </table:table-row>
        <table:table-row table:style-name="ro1">
          <table:table-cell table:formula="of:=IF([$List.A125] &lt;&gt;&quot;&quot;; [$List.I125]; &quot;&quot;)" office:value-type="string" office:string-value="CUP3_CHANNEL1_GAIN_HIGH_POINT2" calcext:value-type="string">
            <text:p>CUP3_CHANNEL1_GAIN_HIGH_POINT2</text:p>
          </table:table-cell>
          <table:table-cell table:formula="of:=IF([$List.A125] &lt;&gt;&quot;&quot;; [$List.A125]; &quot;&quot;)" office:value-type="float" office:value="1084" calcext:value-type="float">
            <text:p>1084</text:p>
          </table:table-cell>
          <table:table-cell/>
          <table:table-cell table:formula="of:=IF([.A125]&lt;&gt;&quot;&quot;; COM.MICROSOFT.CONCAT(&quot;#define MODBUS_ADDR_&quot;; [.A125]; &quot; &quot;; [.B125]); &quot;&quot;)" office:value-type="string" office:string-value="#define MODBUS_ADDR_CUP3_CHANNEL1_GAIN_HIGH_POINT2 1084" calcext:value-type="string">
            <text:p>#define MODBUS_ADDR_CUP3_CHANNEL1_GAIN_HIGH_POINT2 1084</text:p>
          </table:table-cell>
          <table:table-cell table:number-columns-repeated="16378"/>
        </table:table-row>
        <table:table-row table:style-name="ro1">
          <table:table-cell table:formula="of:=IF([$List.A126] &lt;&gt;&quot;&quot;; [$List.I126]; &quot;&quot;)" office:value-type="string" office:string-value="CUP3_CHANNEL1_GAIN_HIGH_POINT3" calcext:value-type="string">
            <text:p>CUP3_CHANNEL1_GAIN_HIGH_POINT3</text:p>
          </table:table-cell>
          <table:table-cell table:formula="of:=IF([$List.A126] &lt;&gt;&quot;&quot;; [$List.A126]; &quot;&quot;)" office:value-type="float" office:value="1085" calcext:value-type="float">
            <text:p>1085</text:p>
          </table:table-cell>
          <table:table-cell/>
          <table:table-cell table:formula="of:=IF([.A126]&lt;&gt;&quot;&quot;; COM.MICROSOFT.CONCAT(&quot;#define MODBUS_ADDR_&quot;; [.A126]; &quot; &quot;; [.B126]); &quot;&quot;)" office:value-type="string" office:string-value="#define MODBUS_ADDR_CUP3_CHANNEL1_GAIN_HIGH_POINT3 1085" calcext:value-type="string">
            <text:p>#define MODBUS_ADDR_CUP3_CHANNEL1_GAIN_HIGH_POINT3 1085</text:p>
          </table:table-cell>
          <table:table-cell table:number-columns-repeated="16378"/>
        </table:table-row>
        <table:table-row table:style-name="ro1">
          <table:table-cell table:formula="of:=IF([$List.A127] &lt;&gt;&quot;&quot;; [$List.I127]; &quot;&quot;)" office:value-type="string" office:string-value="CUP3_CHANNEL1_GAIN_HIGH_POINT4" calcext:value-type="string">
            <text:p>CUP3_CHANNEL1_GAIN_HIGH_POINT4</text:p>
          </table:table-cell>
          <table:table-cell table:formula="of:=IF([$List.A127] &lt;&gt;&quot;&quot;; [$List.A127]; &quot;&quot;)" office:value-type="float" office:value="1086" calcext:value-type="float">
            <text:p>1086</text:p>
          </table:table-cell>
          <table:table-cell/>
          <table:table-cell table:formula="of:=IF([.A127]&lt;&gt;&quot;&quot;; COM.MICROSOFT.CONCAT(&quot;#define MODBUS_ADDR_&quot;; [.A127]; &quot; &quot;; [.B127]); &quot;&quot;)" office:value-type="string" office:string-value="#define MODBUS_ADDR_CUP3_CHANNEL1_GAIN_HIGH_POINT4 1086" calcext:value-type="string">
            <text:p>#define MODBUS_ADDR_CUP3_CHANNEL1_GAIN_HIGH_POINT4 1086</text:p>
          </table:table-cell>
          <table:table-cell table:number-columns-repeated="16378"/>
        </table:table-row>
        <table:table-row table:style-name="ro1">
          <table:table-cell table:formula="of:=IF([$List.A128] &lt;&gt;&quot;&quot;; [$List.I128]; &quot;&quot;)" office:value-type="string" office:string-value="CUP3_CHANNEL2_GAIN_LOW_POINT1" calcext:value-type="string">
            <text:p>CUP3_CHANNEL2_GAIN_LOW_POINT1</text:p>
          </table:table-cell>
          <table:table-cell table:formula="of:=IF([$List.A128] &lt;&gt;&quot;&quot;; [$List.A128]; &quot;&quot;)" office:value-type="float" office:value="1087" calcext:value-type="float">
            <text:p>1087</text:p>
          </table:table-cell>
          <table:table-cell/>
          <table:table-cell table:formula="of:=IF([.A128]&lt;&gt;&quot;&quot;; COM.MICROSOFT.CONCAT(&quot;#define MODBUS_ADDR_&quot;; [.A128]; &quot; &quot;; [.B128]); &quot;&quot;)" office:value-type="string" office:string-value="#define MODBUS_ADDR_CUP3_CHANNEL2_GAIN_LOW_POINT1 1087" calcext:value-type="string">
            <text:p>#define MODBUS_ADDR_CUP3_CHANNEL2_GAIN_LOW_POINT1 1087</text:p>
          </table:table-cell>
          <table:table-cell table:number-columns-repeated="16378"/>
        </table:table-row>
        <table:table-row table:style-name="ro1">
          <table:table-cell table:formula="of:=IF([$List.A129] &lt;&gt;&quot;&quot;; [$List.I129]; &quot;&quot;)" office:value-type="string" office:string-value="CUP3_CHANNEL2_GAIN_LOW_POINT2" calcext:value-type="string">
            <text:p>CUP3_CHANNEL2_GAIN_LOW_POINT2</text:p>
          </table:table-cell>
          <table:table-cell table:formula="of:=IF([$List.A129] &lt;&gt;&quot;&quot;; [$List.A129]; &quot;&quot;)" office:value-type="float" office:value="1088" calcext:value-type="float">
            <text:p>1088</text:p>
          </table:table-cell>
          <table:table-cell/>
          <table:table-cell table:formula="of:=IF([.A129]&lt;&gt;&quot;&quot;; COM.MICROSOFT.CONCAT(&quot;#define MODBUS_ADDR_&quot;; [.A129]; &quot; &quot;; [.B129]); &quot;&quot;)" office:value-type="string" office:string-value="#define MODBUS_ADDR_CUP3_CHANNEL2_GAIN_LOW_POINT2 1088" calcext:value-type="string">
            <text:p>#define MODBUS_ADDR_CUP3_CHANNEL2_GAIN_LOW_POINT2 1088</text:p>
          </table:table-cell>
          <table:table-cell table:number-columns-repeated="16378"/>
        </table:table-row>
        <table:table-row table:style-name="ro1">
          <table:table-cell table:formula="of:=IF([$List.A130] &lt;&gt;&quot;&quot;; [$List.I130]; &quot;&quot;)" office:value-type="string" office:string-value="CUP3_CHANNEL2_GAIN_LOW_POINT3" calcext:value-type="string">
            <text:p>CUP3_CHANNEL2_GAIN_LOW_POINT3</text:p>
          </table:table-cell>
          <table:table-cell table:formula="of:=IF([$List.A130] &lt;&gt;&quot;&quot;; [$List.A130]; &quot;&quot;)" office:value-type="float" office:value="1089" calcext:value-type="float">
            <text:p>1089</text:p>
          </table:table-cell>
          <table:table-cell/>
          <table:table-cell table:formula="of:=IF([.A130]&lt;&gt;&quot;&quot;; COM.MICROSOFT.CONCAT(&quot;#define MODBUS_ADDR_&quot;; [.A130]; &quot; &quot;; [.B130]); &quot;&quot;)" office:value-type="string" office:string-value="#define MODBUS_ADDR_CUP3_CHANNEL2_GAIN_LOW_POINT3 1089" calcext:value-type="string">
            <text:p>#define MODBUS_ADDR_CUP3_CHANNEL2_GAIN_LOW_POINT3 1089</text:p>
          </table:table-cell>
          <table:table-cell table:number-columns-repeated="16378"/>
        </table:table-row>
        <table:table-row table:style-name="ro1">
          <table:table-cell table:formula="of:=IF([$List.A131] &lt;&gt;&quot;&quot;; [$List.I131]; &quot;&quot;)" office:value-type="string" office:string-value="CUP3_CHANNEL2_GAIN_HIGH_POINT2" calcext:value-type="string">
            <text:p>CUP3_CHANNEL2_GAIN_HIGH_POINT2</text:p>
          </table:table-cell>
          <table:table-cell table:formula="of:=IF([$List.A131] &lt;&gt;&quot;&quot;; [$List.A131]; &quot;&quot;)" office:value-type="float" office:value="1090" calcext:value-type="float">
            <text:p>1090</text:p>
          </table:table-cell>
          <table:table-cell/>
          <table:table-cell table:formula="of:=IF([.A131]&lt;&gt;&quot;&quot;; COM.MICROSOFT.CONCAT(&quot;#define MODBUS_ADDR_&quot;; [.A131]; &quot; &quot;; [.B131]); &quot;&quot;)" office:value-type="string" office:string-value="#define MODBUS_ADDR_CUP3_CHANNEL2_GAIN_HIGH_POINT2 1090" calcext:value-type="string">
            <text:p>#define MODBUS_ADDR_CUP3_CHANNEL2_GAIN_HIGH_POINT2 1090</text:p>
          </table:table-cell>
          <table:table-cell table:number-columns-repeated="16378"/>
        </table:table-row>
        <table:table-row table:style-name="ro1">
          <table:table-cell table:formula="of:=IF([$List.A132] &lt;&gt;&quot;&quot;; [$List.I132]; &quot;&quot;)" office:value-type="string" office:string-value="CUP3_CHANNEL2_GAIN_HIGH_POINT3" calcext:value-type="string">
            <text:p>CUP3_CHANNEL2_GAIN_HIGH_POINT3</text:p>
          </table:table-cell>
          <table:table-cell table:formula="of:=IF([$List.A132] &lt;&gt;&quot;&quot;; [$List.A132]; &quot;&quot;)" office:value-type="float" office:value="1091" calcext:value-type="float">
            <text:p>1091</text:p>
          </table:table-cell>
          <table:table-cell/>
          <table:table-cell table:formula="of:=IF([.A132]&lt;&gt;&quot;&quot;; COM.MICROSOFT.CONCAT(&quot;#define MODBUS_ADDR_&quot;; [.A132]; &quot; &quot;; [.B132]); &quot;&quot;)" office:value-type="string" office:string-value="#define MODBUS_ADDR_CUP3_CHANNEL2_GAIN_HIGH_POINT3 1091" calcext:value-type="string">
            <text:p>#define MODBUS_ADDR_CUP3_CHANNEL2_GAIN_HIGH_POINT3 1091</text:p>
          </table:table-cell>
          <table:table-cell table:number-columns-repeated="16378"/>
        </table:table-row>
        <table:table-row table:style-name="ro1">
          <table:table-cell table:formula="of:=IF([$List.A133] &lt;&gt;&quot;&quot;; [$List.I133]; &quot;&quot;)" office:value-type="string" office:string-value="CUP3_CHANNEL2_GAIN_HIGH_POINT4" calcext:value-type="string">
            <text:p>CUP3_CHANNEL2_GAIN_HIGH_POINT4</text:p>
          </table:table-cell>
          <table:table-cell table:formula="of:=IF([$List.A133] &lt;&gt;&quot;&quot;; [$List.A133]; &quot;&quot;)" office:value-type="float" office:value="1092" calcext:value-type="float">
            <text:p>1092</text:p>
          </table:table-cell>
          <table:table-cell/>
          <table:table-cell table:formula="of:=IF([.A133]&lt;&gt;&quot;&quot;; COM.MICROSOFT.CONCAT(&quot;#define MODBUS_ADDR_&quot;; [.A133]; &quot; &quot;; [.B133]); &quot;&quot;)" office:value-type="string" office:string-value="#define MODBUS_ADDR_CUP3_CHANNEL2_GAIN_HIGH_POINT4 1092" calcext:value-type="string">
            <text:p>#define MODBUS_ADDR_CUP3_CHANNEL2_GAIN_HIGH_POINT4 1092</text:p>
          </table:table-cell>
          <table:table-cell table:number-columns-repeated="16378"/>
        </table:table-row>
        <table:table-row table:style-name="ro1">
          <table:table-cell table:formula="of:=IF([$List.A134] &lt;&gt;&quot;&quot;; [$List.I134]; &quot;&quot;)" office:value-type="string" office:string-value="CUP3_CHANNEL3_GAIN_LOW_POINT1" calcext:value-type="string">
            <text:p>CUP3_CHANNEL3_GAIN_LOW_POINT1</text:p>
          </table:table-cell>
          <table:table-cell table:formula="of:=IF([$List.A134] &lt;&gt;&quot;&quot;; [$List.A134]; &quot;&quot;)" office:value-type="float" office:value="1093" calcext:value-type="float">
            <text:p>1093</text:p>
          </table:table-cell>
          <table:table-cell/>
          <table:table-cell table:formula="of:=IF([.A134]&lt;&gt;&quot;&quot;; COM.MICROSOFT.CONCAT(&quot;#define MODBUS_ADDR_&quot;; [.A134]; &quot; &quot;; [.B134]); &quot;&quot;)" office:value-type="string" office:string-value="#define MODBUS_ADDR_CUP3_CHANNEL3_GAIN_LOW_POINT1 1093" calcext:value-type="string">
            <text:p>#define MODBUS_ADDR_CUP3_CHANNEL3_GAIN_LOW_POINT1 1093</text:p>
          </table:table-cell>
          <table:table-cell table:number-columns-repeated="16378"/>
        </table:table-row>
        <table:table-row table:style-name="ro1">
          <table:table-cell table:formula="of:=IF([$List.A135] &lt;&gt;&quot;&quot;; [$List.I135]; &quot;&quot;)" office:value-type="string" office:string-value="CUP3_CHANNEL3_GAIN_LOW_POINT2" calcext:value-type="string">
            <text:p>CUP3_CHANNEL3_GAIN_LOW_POINT2</text:p>
          </table:table-cell>
          <table:table-cell table:formula="of:=IF([$List.A135] &lt;&gt;&quot;&quot;; [$List.A135]; &quot;&quot;)" office:value-type="float" office:value="1094" calcext:value-type="float">
            <text:p>1094</text:p>
          </table:table-cell>
          <table:table-cell/>
          <table:table-cell table:formula="of:=IF([.A135]&lt;&gt;&quot;&quot;; COM.MICROSOFT.CONCAT(&quot;#define MODBUS_ADDR_&quot;; [.A135]; &quot; &quot;; [.B135]); &quot;&quot;)" office:value-type="string" office:string-value="#define MODBUS_ADDR_CUP3_CHANNEL3_GAIN_LOW_POINT2 1094" calcext:value-type="string">
            <text:p>#define MODBUS_ADDR_CUP3_CHANNEL3_GAIN_LOW_POINT2 1094</text:p>
          </table:table-cell>
          <table:table-cell table:number-columns-repeated="16378"/>
        </table:table-row>
        <table:table-row table:style-name="ro1">
          <table:table-cell table:formula="of:=IF([$List.A136] &lt;&gt;&quot;&quot;; [$List.I136]; &quot;&quot;)" office:value-type="string" office:string-value="CUP3_CHANNEL3_GAIN_LOW_POINT3" calcext:value-type="string">
            <text:p>CUP3_CHANNEL3_GAIN_LOW_POINT3</text:p>
          </table:table-cell>
          <table:table-cell table:formula="of:=IF([$List.A136] &lt;&gt;&quot;&quot;; [$List.A136]; &quot;&quot;)" office:value-type="float" office:value="1095" calcext:value-type="float">
            <text:p>1095</text:p>
          </table:table-cell>
          <table:table-cell/>
          <table:table-cell table:formula="of:=IF([.A136]&lt;&gt;&quot;&quot;; COM.MICROSOFT.CONCAT(&quot;#define MODBUS_ADDR_&quot;; [.A136]; &quot; &quot;; [.B136]); &quot;&quot;)" office:value-type="string" office:string-value="#define MODBUS_ADDR_CUP3_CHANNEL3_GAIN_LOW_POINT3 1095" calcext:value-type="string">
            <text:p>#define MODBUS_ADDR_CUP3_CHANNEL3_GAIN_LOW_POINT3 1095</text:p>
          </table:table-cell>
          <table:table-cell table:number-columns-repeated="16378"/>
        </table:table-row>
        <table:table-row table:style-name="ro1">
          <table:table-cell table:formula="of:=IF([$List.A137] &lt;&gt;&quot;&quot;; [$List.I137]; &quot;&quot;)" office:value-type="string" office:string-value="CUP3_CHANNEL3_GAIN_HIGH_POINT2" calcext:value-type="string">
            <text:p>CUP3_CHANNEL3_GAIN_HIGH_POINT2</text:p>
          </table:table-cell>
          <table:table-cell table:formula="of:=IF([$List.A137] &lt;&gt;&quot;&quot;; [$List.A137]; &quot;&quot;)" office:value-type="float" office:value="1096" calcext:value-type="float">
            <text:p>1096</text:p>
          </table:table-cell>
          <table:table-cell/>
          <table:table-cell table:formula="of:=IF([.A137]&lt;&gt;&quot;&quot;; COM.MICROSOFT.CONCAT(&quot;#define MODBUS_ADDR_&quot;; [.A137]; &quot; &quot;; [.B137]); &quot;&quot;)" office:value-type="string" office:string-value="#define MODBUS_ADDR_CUP3_CHANNEL3_GAIN_HIGH_POINT2 1096" calcext:value-type="string">
            <text:p>#define MODBUS_ADDR_CUP3_CHANNEL3_GAIN_HIGH_POINT2 1096</text:p>
          </table:table-cell>
          <table:table-cell table:number-columns-repeated="16378"/>
        </table:table-row>
        <table:table-row table:style-name="ro1">
          <table:table-cell table:formula="of:=IF([$List.A138] &lt;&gt;&quot;&quot;; [$List.I138]; &quot;&quot;)" office:value-type="string" office:string-value="CUP3_CHANNEL3_GAIN_HIGH_POINT3" calcext:value-type="string">
            <text:p>CUP3_CHANNEL3_GAIN_HIGH_POINT3</text:p>
          </table:table-cell>
          <table:table-cell table:formula="of:=IF([$List.A138] &lt;&gt;&quot;&quot;; [$List.A138]; &quot;&quot;)" office:value-type="float" office:value="1097" calcext:value-type="float">
            <text:p>1097</text:p>
          </table:table-cell>
          <table:table-cell/>
          <table:table-cell table:formula="of:=IF([.A138]&lt;&gt;&quot;&quot;; COM.MICROSOFT.CONCAT(&quot;#define MODBUS_ADDR_&quot;; [.A138]; &quot; &quot;; [.B138]); &quot;&quot;)" office:value-type="string" office:string-value="#define MODBUS_ADDR_CUP3_CHANNEL3_GAIN_HIGH_POINT3 1097" calcext:value-type="string">
            <text:p>#define MODBUS_ADDR_CUP3_CHANNEL3_GAIN_HIGH_POINT3 1097</text:p>
          </table:table-cell>
          <table:table-cell table:number-columns-repeated="16378"/>
        </table:table-row>
        <table:table-row table:style-name="ro1">
          <table:table-cell table:formula="of:=IF([$List.A139] &lt;&gt;&quot;&quot;; [$List.I139]; &quot;&quot;)" office:value-type="string" office:string-value="CUP3_CHANNEL3_GAIN_HIGH_POINT4" calcext:value-type="string">
            <text:p>CUP3_CHANNEL3_GAIN_HIGH_POINT4</text:p>
          </table:table-cell>
          <table:table-cell table:formula="of:=IF([$List.A139] &lt;&gt;&quot;&quot;; [$List.A139]; &quot;&quot;)" office:value-type="float" office:value="1098" calcext:value-type="float">
            <text:p>1098</text:p>
          </table:table-cell>
          <table:table-cell/>
          <table:table-cell table:formula="of:=IF([.A139]&lt;&gt;&quot;&quot;; COM.MICROSOFT.CONCAT(&quot;#define MODBUS_ADDR_&quot;; [.A139]; &quot; &quot;; [.B139]); &quot;&quot;)" office:value-type="string" office:string-value="#define MODBUS_ADDR_CUP3_CHANNEL3_GAIN_HIGH_POINT4 1098" calcext:value-type="string">
            <text:p>#define MODBUS_ADDR_CUP3_CHANNEL3_GAIN_HIGH_POINT4 1098</text:p>
          </table:table-cell>
          <table:table-cell table:number-columns-repeated="16378"/>
        </table:table-row>
        <table:table-row table:style-name="ro1">
          <table:table-cell table:formula="of:=IF([$List.A140] &lt;&gt;&quot;&quot;; [$List.I140]; &quot;&quot;)" office:value-type="string" office:string-value="CUP3_CHANNEL4_GAIN_LOW_POINT1" calcext:value-type="string">
            <text:p>CUP3_CHANNEL4_GAIN_LOW_POINT1</text:p>
          </table:table-cell>
          <table:table-cell table:formula="of:=IF([$List.A140] &lt;&gt;&quot;&quot;; [$List.A140]; &quot;&quot;)" office:value-type="float" office:value="1099" calcext:value-type="float">
            <text:p>1099</text:p>
          </table:table-cell>
          <table:table-cell/>
          <table:table-cell table:formula="of:=IF([.A140]&lt;&gt;&quot;&quot;; COM.MICROSOFT.CONCAT(&quot;#define MODBUS_ADDR_&quot;; [.A140]; &quot; &quot;; [.B140]); &quot;&quot;)" office:value-type="string" office:string-value="#define MODBUS_ADDR_CUP3_CHANNEL4_GAIN_LOW_POINT1 1099" calcext:value-type="string">
            <text:p>#define MODBUS_ADDR_CUP3_CHANNEL4_GAIN_LOW_POINT1 1099</text:p>
          </table:table-cell>
          <table:table-cell table:number-columns-repeated="16378"/>
        </table:table-row>
        <table:table-row table:style-name="ro1">
          <table:table-cell table:formula="of:=IF([$List.A141] &lt;&gt;&quot;&quot;; [$List.I141]; &quot;&quot;)" office:value-type="string" office:string-value="CUP3_CHANNEL4_GAIN_LOW_POINT2" calcext:value-type="string">
            <text:p>CUP3_CHANNEL4_GAIN_LOW_POINT2</text:p>
          </table:table-cell>
          <table:table-cell table:formula="of:=IF([$List.A141] &lt;&gt;&quot;&quot;; [$List.A141]; &quot;&quot;)" office:value-type="float" office:value="1100" calcext:value-type="float">
            <text:p>1100</text:p>
          </table:table-cell>
          <table:table-cell/>
          <table:table-cell table:formula="of:=IF([.A141]&lt;&gt;&quot;&quot;; COM.MICROSOFT.CONCAT(&quot;#define MODBUS_ADDR_&quot;; [.A141]; &quot; &quot;; [.B141]); &quot;&quot;)" office:value-type="string" office:string-value="#define MODBUS_ADDR_CUP3_CHANNEL4_GAIN_LOW_POINT2 1100" calcext:value-type="string">
            <text:p>#define MODBUS_ADDR_CUP3_CHANNEL4_GAIN_LOW_POINT2 1100</text:p>
          </table:table-cell>
          <table:table-cell table:number-columns-repeated="16378"/>
        </table:table-row>
        <table:table-row table:style-name="ro1">
          <table:table-cell table:formula="of:=IF([$List.A142] &lt;&gt;&quot;&quot;; [$List.I142]; &quot;&quot;)" office:value-type="string" office:string-value="CUP3_CHANNEL4_GAIN_LOW_POINT3" calcext:value-type="string">
            <text:p>CUP3_CHANNEL4_GAIN_LOW_POINT3</text:p>
          </table:table-cell>
          <table:table-cell table:formula="of:=IF([$List.A142] &lt;&gt;&quot;&quot;; [$List.A142]; &quot;&quot;)" office:value-type="float" office:value="1101" calcext:value-type="float">
            <text:p>1101</text:p>
          </table:table-cell>
          <table:table-cell/>
          <table:table-cell table:formula="of:=IF([.A142]&lt;&gt;&quot;&quot;; COM.MICROSOFT.CONCAT(&quot;#define MODBUS_ADDR_&quot;; [.A142]; &quot; &quot;; [.B142]); &quot;&quot;)" office:value-type="string" office:string-value="#define MODBUS_ADDR_CUP3_CHANNEL4_GAIN_LOW_POINT3 1101" calcext:value-type="string">
            <text:p>#define MODBUS_ADDR_CUP3_CHANNEL4_GAIN_LOW_POINT3 1101</text:p>
          </table:table-cell>
          <table:table-cell table:number-columns-repeated="16378"/>
        </table:table-row>
        <table:table-row table:style-name="ro1">
          <table:table-cell table:formula="of:=IF([$List.A143] &lt;&gt;&quot;&quot;; [$List.I143]; &quot;&quot;)" office:value-type="string" office:string-value="CUP3_CHANNEL4_GAIN_HIGH_POINT2" calcext:value-type="string">
            <text:p>CUP3_CHANNEL4_GAIN_HIGH_POINT2</text:p>
          </table:table-cell>
          <table:table-cell table:formula="of:=IF([$List.A143] &lt;&gt;&quot;&quot;; [$List.A143]; &quot;&quot;)" office:value-type="float" office:value="1102" calcext:value-type="float">
            <text:p>1102</text:p>
          </table:table-cell>
          <table:table-cell/>
          <table:table-cell table:formula="of:=IF([.A143]&lt;&gt;&quot;&quot;; COM.MICROSOFT.CONCAT(&quot;#define MODBUS_ADDR_&quot;; [.A143]; &quot; &quot;; [.B143]); &quot;&quot;)" office:value-type="string" office:string-value="#define MODBUS_ADDR_CUP3_CHANNEL4_GAIN_HIGH_POINT2 1102" calcext:value-type="string">
            <text:p>#define MODBUS_ADDR_CUP3_CHANNEL4_GAIN_HIGH_POINT2 1102</text:p>
          </table:table-cell>
          <table:table-cell table:number-columns-repeated="16378"/>
        </table:table-row>
        <table:table-row table:style-name="ro1">
          <table:table-cell table:formula="of:=IF([$List.A144] &lt;&gt;&quot;&quot;; [$List.I144]; &quot;&quot;)" office:value-type="string" office:string-value="CUP3_CHANNEL4_GAIN_HIGH_POINT3" calcext:value-type="string">
            <text:p>CUP3_CHANNEL4_GAIN_HIGH_POINT3</text:p>
          </table:table-cell>
          <table:table-cell table:formula="of:=IF([$List.A144] &lt;&gt;&quot;&quot;; [$List.A144]; &quot;&quot;)" office:value-type="float" office:value="1103" calcext:value-type="float">
            <text:p>1103</text:p>
          </table:table-cell>
          <table:table-cell/>
          <table:table-cell table:formula="of:=IF([.A144]&lt;&gt;&quot;&quot;; COM.MICROSOFT.CONCAT(&quot;#define MODBUS_ADDR_&quot;; [.A144]; &quot; &quot;; [.B144]); &quot;&quot;)" office:value-type="string" office:string-value="#define MODBUS_ADDR_CUP3_CHANNEL4_GAIN_HIGH_POINT3 1103" calcext:value-type="string">
            <text:p>#define MODBUS_ADDR_CUP3_CHANNEL4_GAIN_HIGH_POINT3 1103</text:p>
          </table:table-cell>
          <table:table-cell table:number-columns-repeated="16378"/>
        </table:table-row>
        <table:table-row table:style-name="ro1">
          <table:table-cell table:formula="of:=IF([$List.A145] &lt;&gt;&quot;&quot;; [$List.I145]; &quot;&quot;)" office:value-type="string" office:string-value="CUP3_CHANNEL4_GAIN_HIGH_POINT4" calcext:value-type="string">
            <text:p>CUP3_CHANNEL4_GAIN_HIGH_POINT4</text:p>
          </table:table-cell>
          <table:table-cell table:formula="of:=IF([$List.A145] &lt;&gt;&quot;&quot;; [$List.A145]; &quot;&quot;)" office:value-type="float" office:value="1104" calcext:value-type="float">
            <text:p>1104</text:p>
          </table:table-cell>
          <table:table-cell/>
          <table:table-cell table:formula="of:=IF([.A145]&lt;&gt;&quot;&quot;; COM.MICROSOFT.CONCAT(&quot;#define MODBUS_ADDR_&quot;; [.A145]; &quot; &quot;; [.B145]); &quot;&quot;)" office:value-type="string" office:string-value="#define MODBUS_ADDR_CUP3_CHANNEL4_GAIN_HIGH_POINT4 1104" calcext:value-type="string">
            <text:p>#define MODBUS_ADDR_CUP3_CHANNEL4_GAIN_HIGH_POINT4 1104</text:p>
          </table:table-cell>
          <table:table-cell table:number-columns-repeated="16378"/>
        </table:table-row>
        <table:table-row table:style-name="ro1">
          <table:table-cell table:formula="of:=IF([$List.A146] &lt;&gt;&quot;&quot;; [$List.I146]; &quot;&quot;)">
            <text:p/>
          </table:table-cell>
          <table:table-cell table:formula="of:=IF([$List.A146] &lt;&gt;&quot;&quot;; [$List.A146]; &quot;&quot;)">
            <text:p/>
          </table:table-cell>
          <table:table-cell/>
          <table:table-cell table:formula="of:=IF([.A146]&lt;&gt;&quot;&quot;; COM.MICROSOFT.CONCAT(&quot;#define MODBUS_ADDR_&quot;; [.A146]; &quot; &quot;; [.B146]); &quot;&quot;)">
            <text:p/>
          </table:table-cell>
          <table:table-cell table:number-columns-repeated="16378"/>
        </table:table-row>
        <table:table-row table:style-name="ro1">
          <table:table-cell table:formula="of:=IF([$List.A147] &lt;&gt;&quot;&quot;; [$List.I147]; &quot;&quot;)" office:value-type="string" office:string-value="CUP1_CHANNEL1_LOWER_LIMIT" calcext:value-type="string">
            <text:p>CUP1_CHANNEL1_LOWER_LIMIT</text:p>
          </table:table-cell>
          <table:table-cell table:formula="of:=IF([$List.A147] &lt;&gt;&quot;&quot;; [$List.A147]; &quot;&quot;)" office:value-type="float" office:value="1105" calcext:value-type="float">
            <text:p>1105</text:p>
          </table:table-cell>
          <table:table-cell/>
          <table:table-cell table:formula="of:=IF([.A147]&lt;&gt;&quot;&quot;; COM.MICROSOFT.CONCAT(&quot;#define MODBUS_ADDR_&quot;; [.A147]; &quot; &quot;; [.B147]); &quot;&quot;)" office:value-type="string" office:string-value="#define MODBUS_ADDR_CUP1_CHANNEL1_LOWER_LIMIT 1105" calcext:value-type="string">
            <text:p>#define MODBUS_ADDR_CUP1_CHANNEL1_LOWER_LIMIT 1105</text:p>
          </table:table-cell>
          <table:table-cell table:number-columns-repeated="16378"/>
        </table:table-row>
        <table:table-row table:style-name="ro1">
          <table:table-cell table:formula="of:=IF([$List.A148] &lt;&gt;&quot;&quot;; [$List.I148]; &quot;&quot;)" office:value-type="string" office:string-value="CUP1_CHANNEL2_LOWER_LIMIT" calcext:value-type="string">
            <text:p>CUP1_CHANNEL2_LOWER_LIMIT</text:p>
          </table:table-cell>
          <table:table-cell table:formula="of:=IF([$List.A148] &lt;&gt;&quot;&quot;; [$List.A148]; &quot;&quot;)" office:value-type="float" office:value="1106" calcext:value-type="float">
            <text:p>1106</text:p>
          </table:table-cell>
          <table:table-cell/>
          <table:table-cell table:formula="of:=IF([.A148]&lt;&gt;&quot;&quot;; COM.MICROSOFT.CONCAT(&quot;#define MODBUS_ADDR_&quot;; [.A148]; &quot; &quot;; [.B148]); &quot;&quot;)" office:value-type="string" office:string-value="#define MODBUS_ADDR_CUP1_CHANNEL2_LOWER_LIMIT 1106" calcext:value-type="string">
            <text:p>#define MODBUS_ADDR_CUP1_CHANNEL2_LOWER_LIMIT 1106</text:p>
          </table:table-cell>
          <table:table-cell table:number-columns-repeated="16378"/>
        </table:table-row>
        <table:table-row table:style-name="ro1">
          <table:table-cell table:formula="of:=IF([$List.A149] &lt;&gt;&quot;&quot;; [$List.I149]; &quot;&quot;)" office:value-type="string" office:string-value="CUP1_CHANNEL3_LOWER_LIMIT" calcext:value-type="string">
            <text:p>CUP1_CHANNEL3_LOWER_LIMIT</text:p>
          </table:table-cell>
          <table:table-cell table:formula="of:=IF([$List.A149] &lt;&gt;&quot;&quot;; [$List.A149]; &quot;&quot;)" office:value-type="float" office:value="1107" calcext:value-type="float">
            <text:p>1107</text:p>
          </table:table-cell>
          <table:table-cell/>
          <table:table-cell table:formula="of:=IF([.A149]&lt;&gt;&quot;&quot;; COM.MICROSOFT.CONCAT(&quot;#define MODBUS_ADDR_&quot;; [.A149]; &quot; &quot;; [.B149]); &quot;&quot;)" office:value-type="string" office:string-value="#define MODBUS_ADDR_CUP1_CHANNEL3_LOWER_LIMIT 1107" calcext:value-type="string">
            <text:p>#define MODBUS_ADDR_CUP1_CHANNEL3_LOWER_LIMIT 1107</text:p>
          </table:table-cell>
          <table:table-cell table:number-columns-repeated="16378"/>
        </table:table-row>
        <table:table-row table:style-name="ro1">
          <table:table-cell table:formula="of:=IF([$List.A150] &lt;&gt;&quot;&quot;; [$List.I150]; &quot;&quot;)" office:value-type="string" office:string-value="CUP1_CHANNEL4_LOWER_LIMIT" calcext:value-type="string">
            <text:p>CUP1_CHANNEL4_LOWER_LIMIT</text:p>
          </table:table-cell>
          <table:table-cell table:formula="of:=IF([$List.A150] &lt;&gt;&quot;&quot;; [$List.A150]; &quot;&quot;)" office:value-type="float" office:value="1108" calcext:value-type="float">
            <text:p>1108</text:p>
          </table:table-cell>
          <table:table-cell/>
          <table:table-cell table:formula="of:=IF([.A150]&lt;&gt;&quot;&quot;; COM.MICROSOFT.CONCAT(&quot;#define MODBUS_ADDR_&quot;; [.A150]; &quot; &quot;; [.B150]); &quot;&quot;)" office:value-type="string" office:string-value="#define MODBUS_ADDR_CUP1_CHANNEL4_LOWER_LIMIT 1108" calcext:value-type="string">
            <text:p>#define MODBUS_ADDR_CUP1_CHANNEL4_LOWER_LIMIT 1108</text:p>
          </table:table-cell>
          <table:table-cell table:number-columns-repeated="16378"/>
        </table:table-row>
        <table:table-row table:style-name="ro1">
          <table:table-cell table:formula="of:=IF([$List.A151] &lt;&gt;&quot;&quot;; [$List.I151]; &quot;&quot;)" office:value-type="string" office:string-value="CUP2_CHANNEL1_LOWER_LIMIT" calcext:value-type="string">
            <text:p>CUP2_CHANNEL1_LOWER_LIMIT</text:p>
          </table:table-cell>
          <table:table-cell table:formula="of:=IF([$List.A151] &lt;&gt;&quot;&quot;; [$List.A151]; &quot;&quot;)" office:value-type="float" office:value="1109" calcext:value-type="float">
            <text:p>1109</text:p>
          </table:table-cell>
          <table:table-cell/>
          <table:table-cell table:formula="of:=IF([.A151]&lt;&gt;&quot;&quot;; COM.MICROSOFT.CONCAT(&quot;#define MODBUS_ADDR_&quot;; [.A151]; &quot; &quot;; [.B151]); &quot;&quot;)" office:value-type="string" office:string-value="#define MODBUS_ADDR_CUP2_CHANNEL1_LOWER_LIMIT 1109" calcext:value-type="string">
            <text:p>#define MODBUS_ADDR_CUP2_CHANNEL1_LOWER_LIMIT 1109</text:p>
          </table:table-cell>
          <table:table-cell table:number-columns-repeated="16378"/>
        </table:table-row>
        <table:table-row table:style-name="ro1">
          <table:table-cell table:formula="of:=IF([$List.A152] &lt;&gt;&quot;&quot;; [$List.I152]; &quot;&quot;)" office:value-type="string" office:string-value="CUP2_CHANNEL2_LOWER_LIMIT" calcext:value-type="string">
            <text:p>CUP2_CHANNEL2_LOWER_LIMIT</text:p>
          </table:table-cell>
          <table:table-cell table:formula="of:=IF([$List.A152] &lt;&gt;&quot;&quot;; [$List.A152]; &quot;&quot;)" office:value-type="float" office:value="1110" calcext:value-type="float">
            <text:p>1110</text:p>
          </table:table-cell>
          <table:table-cell/>
          <table:table-cell table:formula="of:=IF([.A152]&lt;&gt;&quot;&quot;; COM.MICROSOFT.CONCAT(&quot;#define MODBUS_ADDR_&quot;; [.A152]; &quot; &quot;; [.B152]); &quot;&quot;)" office:value-type="string" office:string-value="#define MODBUS_ADDR_CUP2_CHANNEL2_LOWER_LIMIT 1110" calcext:value-type="string">
            <text:p>#define MODBUS_ADDR_CUP2_CHANNEL2_LOWER_LIMIT 1110</text:p>
          </table:table-cell>
          <table:table-cell table:number-columns-repeated="16378"/>
        </table:table-row>
        <table:table-row table:style-name="ro1">
          <table:table-cell table:formula="of:=IF([$List.A153] &lt;&gt;&quot;&quot;; [$List.I153]; &quot;&quot;)" office:value-type="string" office:string-value="CUP2_CHANNEL3_LOWER_LIMIT" calcext:value-type="string">
            <text:p>CUP2_CHANNEL3_LOWER_LIMIT</text:p>
          </table:table-cell>
          <table:table-cell table:formula="of:=IF([$List.A153] &lt;&gt;&quot;&quot;; [$List.A153]; &quot;&quot;)" office:value-type="float" office:value="1111" calcext:value-type="float">
            <text:p>1111</text:p>
          </table:table-cell>
          <table:table-cell/>
          <table:table-cell table:formula="of:=IF([.A153]&lt;&gt;&quot;&quot;; COM.MICROSOFT.CONCAT(&quot;#define MODBUS_ADDR_&quot;; [.A153]; &quot; &quot;; [.B153]); &quot;&quot;)" office:value-type="string" office:string-value="#define MODBUS_ADDR_CUP2_CHANNEL3_LOWER_LIMIT 1111" calcext:value-type="string">
            <text:p>#define MODBUS_ADDR_CUP2_CHANNEL3_LOWER_LIMIT 1111</text:p>
          </table:table-cell>
          <table:table-cell table:number-columns-repeated="16378"/>
        </table:table-row>
        <table:table-row table:style-name="ro1">
          <table:table-cell table:formula="of:=IF([$List.A154] &lt;&gt;&quot;&quot;; [$List.I154]; &quot;&quot;)" office:value-type="string" office:string-value="CUP2_CHANNEL4_LOWER_LIMIT" calcext:value-type="string">
            <text:p>CUP2_CHANNEL4_LOWER_LIMIT</text:p>
          </table:table-cell>
          <table:table-cell table:formula="of:=IF([$List.A154] &lt;&gt;&quot;&quot;; [$List.A154]; &quot;&quot;)" office:value-type="float" office:value="1112" calcext:value-type="float">
            <text:p>1112</text:p>
          </table:table-cell>
          <table:table-cell/>
          <table:table-cell table:formula="of:=IF([.A154]&lt;&gt;&quot;&quot;; COM.MICROSOFT.CONCAT(&quot;#define MODBUS_ADDR_&quot;; [.A154]; &quot; &quot;; [.B154]); &quot;&quot;)" office:value-type="string" office:string-value="#define MODBUS_ADDR_CUP2_CHANNEL4_LOWER_LIMIT 1112" calcext:value-type="string">
            <text:p>#define MODBUS_ADDR_CUP2_CHANNEL4_LOWER_LIMIT 1112</text:p>
          </table:table-cell>
          <table:table-cell table:number-columns-repeated="16378"/>
        </table:table-row>
        <table:table-row table:style-name="ro1">
          <table:table-cell table:formula="of:=IF([$List.A155] &lt;&gt;&quot;&quot;; [$List.I155]; &quot;&quot;)" office:value-type="string" office:string-value="CUP3_CHANNEL1_LOWER_LIMIT" calcext:value-type="string">
            <text:p>CUP3_CHANNEL1_LOWER_LIMIT</text:p>
          </table:table-cell>
          <table:table-cell table:formula="of:=IF([$List.A155] &lt;&gt;&quot;&quot;; [$List.A155]; &quot;&quot;)" office:value-type="float" office:value="1113" calcext:value-type="float">
            <text:p>1113</text:p>
          </table:table-cell>
          <table:table-cell/>
          <table:table-cell table:formula="of:=IF([.A155]&lt;&gt;&quot;&quot;; COM.MICROSOFT.CONCAT(&quot;#define MODBUS_ADDR_&quot;; [.A155]; &quot; &quot;; [.B155]); &quot;&quot;)" office:value-type="string" office:string-value="#define MODBUS_ADDR_CUP3_CHANNEL1_LOWER_LIMIT 1113" calcext:value-type="string">
            <text:p>#define MODBUS_ADDR_CUP3_CHANNEL1_LOWER_LIMIT 1113</text:p>
          </table:table-cell>
          <table:table-cell table:number-columns-repeated="16378"/>
        </table:table-row>
        <table:table-row table:style-name="ro1">
          <table:table-cell table:formula="of:=IF([$List.A156] &lt;&gt;&quot;&quot;; [$List.I156]; &quot;&quot;)" office:value-type="string" office:string-value="CUP3_CHANNEL2_LOWER_LIMIT" calcext:value-type="string">
            <text:p>CUP3_CHANNEL2_LOWER_LIMIT</text:p>
          </table:table-cell>
          <table:table-cell table:formula="of:=IF([$List.A156] &lt;&gt;&quot;&quot;; [$List.A156]; &quot;&quot;)" office:value-type="float" office:value="1114" calcext:value-type="float">
            <text:p>1114</text:p>
          </table:table-cell>
          <table:table-cell/>
          <table:table-cell table:formula="of:=IF([.A156]&lt;&gt;&quot;&quot;; COM.MICROSOFT.CONCAT(&quot;#define MODBUS_ADDR_&quot;; [.A156]; &quot; &quot;; [.B156]); &quot;&quot;)" office:value-type="string" office:string-value="#define MODBUS_ADDR_CUP3_CHANNEL2_LOWER_LIMIT 1114" calcext:value-type="string">
            <text:p>#define MODBUS_ADDR_CUP3_CHANNEL2_LOWER_LIMIT 1114</text:p>
          </table:table-cell>
          <table:table-cell table:number-columns-repeated="16378"/>
        </table:table-row>
        <table:table-row table:style-name="ro1">
          <table:table-cell table:formula="of:=IF([$List.A157] &lt;&gt;&quot;&quot;; [$List.I157]; &quot;&quot;)" office:value-type="string" office:string-value="CUP3_CHANNEL3_LOWER_LIMIT" calcext:value-type="string">
            <text:p>CUP3_CHANNEL3_LOWER_LIMIT</text:p>
          </table:table-cell>
          <table:table-cell table:formula="of:=IF([$List.A157] &lt;&gt;&quot;&quot;; [$List.A157]; &quot;&quot;)" office:value-type="float" office:value="1115" calcext:value-type="float">
            <text:p>1115</text:p>
          </table:table-cell>
          <table:table-cell/>
          <table:table-cell table:formula="of:=IF([.A157]&lt;&gt;&quot;&quot;; COM.MICROSOFT.CONCAT(&quot;#define MODBUS_ADDR_&quot;; [.A157]; &quot; &quot;; [.B157]); &quot;&quot;)" office:value-type="string" office:string-value="#define MODBUS_ADDR_CUP3_CHANNEL3_LOWER_LIMIT 1115" calcext:value-type="string">
            <text:p>#define MODBUS_ADDR_CUP3_CHANNEL3_LOWER_LIMIT 1115</text:p>
          </table:table-cell>
          <table:table-cell table:number-columns-repeated="16378"/>
        </table:table-row>
        <table:table-row table:style-name="ro1">
          <table:table-cell table:formula="of:=IF([$List.A158] &lt;&gt;&quot;&quot;; [$List.I158]; &quot;&quot;)" office:value-type="string" office:string-value="CUP3_CHANNEL4_LOWER_LIMIT" calcext:value-type="string">
            <text:p>CUP3_CHANNEL4_LOWER_LIMIT</text:p>
          </table:table-cell>
          <table:table-cell table:formula="of:=IF([$List.A158] &lt;&gt;&quot;&quot;; [$List.A158]; &quot;&quot;)" office:value-type="float" office:value="1116" calcext:value-type="float">
            <text:p>1116</text:p>
          </table:table-cell>
          <table:table-cell/>
          <table:table-cell table:formula="of:=IF([.A158]&lt;&gt;&quot;&quot;; COM.MICROSOFT.CONCAT(&quot;#define MODBUS_ADDR_&quot;; [.A158]; &quot; &quot;; [.B158]); &quot;&quot;)" office:value-type="string" office:string-value="#define MODBUS_ADDR_CUP3_CHANNEL4_LOWER_LIMIT 1116" calcext:value-type="string">
            <text:p>#define MODBUS_ADDR_CUP3_CHANNEL4_LOWER_LIMIT 1116</text:p>
          </table:table-cell>
          <table:table-cell table:number-columns-repeated="16378"/>
        </table:table-row>
        <table:table-row table:style-name="ro1">
          <table:table-cell table:formula="of:=IF([$List.A159] &lt;&gt;&quot;&quot;; [$List.I159]; &quot;&quot;)">
            <text:p/>
          </table:table-cell>
          <table:table-cell table:formula="of:=IF([$List.A159] &lt;&gt;&quot;&quot;; [$List.A159]; &quot;&quot;)">
            <text:p/>
          </table:table-cell>
          <table:table-cell/>
          <table:table-cell table:formula="of:=IF([.A159]&lt;&gt;&quot;&quot;; COM.MICROSOFT.CONCAT(&quot;#define MODBUS_ADDR_&quot;; [.A159]; &quot; &quot;; [.B159]); &quot;&quot;)">
            <text:p/>
          </table:table-cell>
          <table:table-cell table:number-columns-repeated="16378"/>
        </table:table-row>
        <table:table-row table:style-name="ro1">
          <table:table-cell table:formula="of:=IF([$List.A160] &lt;&gt;&quot;&quot;; [$List.I160]; &quot;&quot;)" office:value-type="string" office:string-value="CUP1_CHANNEL1_UPPER_LIMIT" calcext:value-type="string">
            <text:p>CUP1_CHANNEL1_UPPER_LIMIT</text:p>
          </table:table-cell>
          <table:table-cell table:formula="of:=IF([$List.A160] &lt;&gt;&quot;&quot;; [$List.A160]; &quot;&quot;)" office:value-type="float" office:value="1117" calcext:value-type="float">
            <text:p>1117</text:p>
          </table:table-cell>
          <table:table-cell/>
          <table:table-cell table:formula="of:=IF([.A160]&lt;&gt;&quot;&quot;; COM.MICROSOFT.CONCAT(&quot;#define MODBUS_ADDR_&quot;; [.A160]; &quot; &quot;; [.B160]); &quot;&quot;)" office:value-type="string" office:string-value="#define MODBUS_ADDR_CUP1_CHANNEL1_UPPER_LIMIT 1117" calcext:value-type="string">
            <text:p>#define MODBUS_ADDR_CUP1_CHANNEL1_UPPER_LIMIT 1117</text:p>
          </table:table-cell>
          <table:table-cell table:number-columns-repeated="16378"/>
        </table:table-row>
        <table:table-row table:style-name="ro1">
          <table:table-cell table:formula="of:=IF([$List.A161] &lt;&gt;&quot;&quot;; [$List.I161]; &quot;&quot;)" office:value-type="string" office:string-value="CUP1_CHANNEL2_UPPER_LIMIT" calcext:value-type="string">
            <text:p>CUP1_CHANNEL2_UPPER_LIMIT</text:p>
          </table:table-cell>
          <table:table-cell table:formula="of:=IF([$List.A161] &lt;&gt;&quot;&quot;; [$List.A161]; &quot;&quot;)" office:value-type="float" office:value="1118" calcext:value-type="float">
            <text:p>1118</text:p>
          </table:table-cell>
          <table:table-cell/>
          <table:table-cell table:formula="of:=IF([.A161]&lt;&gt;&quot;&quot;; COM.MICROSOFT.CONCAT(&quot;#define MODBUS_ADDR_&quot;; [.A161]; &quot; &quot;; [.B161]); &quot;&quot;)" office:value-type="string" office:string-value="#define MODBUS_ADDR_CUP1_CHANNEL2_UPPER_LIMIT 1118" calcext:value-type="string">
            <text:p>#define MODBUS_ADDR_CUP1_CHANNEL2_UPPER_LIMIT 1118</text:p>
          </table:table-cell>
          <table:table-cell table:number-columns-repeated="16378"/>
        </table:table-row>
        <table:table-row table:style-name="ro1">
          <table:table-cell table:formula="of:=IF([$List.A162] &lt;&gt;&quot;&quot;; [$List.I162]; &quot;&quot;)" office:value-type="string" office:string-value="CUP1_CHANNEL3_UPPER_LIMIT" calcext:value-type="string">
            <text:p>CUP1_CHANNEL3_UPPER_LIMIT</text:p>
          </table:table-cell>
          <table:table-cell table:formula="of:=IF([$List.A162] &lt;&gt;&quot;&quot;; [$List.A162]; &quot;&quot;)" office:value-type="float" office:value="1119" calcext:value-type="float">
            <text:p>1119</text:p>
          </table:table-cell>
          <table:table-cell/>
          <table:table-cell table:formula="of:=IF([.A162]&lt;&gt;&quot;&quot;; COM.MICROSOFT.CONCAT(&quot;#define MODBUS_ADDR_&quot;; [.A162]; &quot; &quot;; [.B162]); &quot;&quot;)" office:value-type="string" office:string-value="#define MODBUS_ADDR_CUP1_CHANNEL3_UPPER_LIMIT 1119" calcext:value-type="string">
            <text:p>#define MODBUS_ADDR_CUP1_CHANNEL3_UPPER_LIMIT 1119</text:p>
          </table:table-cell>
          <table:table-cell table:number-columns-repeated="16378"/>
        </table:table-row>
        <table:table-row table:style-name="ro1">
          <table:table-cell table:formula="of:=IF([$List.A163] &lt;&gt;&quot;&quot;; [$List.I163]; &quot;&quot;)" office:value-type="string" office:string-value="CUP1_CHANNEL4_UPPER_LIMIT" calcext:value-type="string">
            <text:p>CUP1_CHANNEL4_UPPER_LIMIT</text:p>
          </table:table-cell>
          <table:table-cell table:formula="of:=IF([$List.A163] &lt;&gt;&quot;&quot;; [$List.A163]; &quot;&quot;)" office:value-type="float" office:value="1120" calcext:value-type="float">
            <text:p>1120</text:p>
          </table:table-cell>
          <table:table-cell/>
          <table:table-cell table:formula="of:=IF([.A163]&lt;&gt;&quot;&quot;; COM.MICROSOFT.CONCAT(&quot;#define MODBUS_ADDR_&quot;; [.A163]; &quot; &quot;; [.B163]); &quot;&quot;)" office:value-type="string" office:string-value="#define MODBUS_ADDR_CUP1_CHANNEL4_UPPER_LIMIT 1120" calcext:value-type="string">
            <text:p>#define MODBUS_ADDR_CUP1_CHANNEL4_UPPER_LIMIT 1120</text:p>
          </table:table-cell>
          <table:table-cell table:number-columns-repeated="16378"/>
        </table:table-row>
        <table:table-row table:style-name="ro1">
          <table:table-cell table:formula="of:=IF([$List.A164] &lt;&gt;&quot;&quot;; [$List.I164]; &quot;&quot;)" office:value-type="string" office:string-value="CUP2_CHANNEL1_UPPER_LIMIT" calcext:value-type="string">
            <text:p>CUP2_CHANNEL1_UPPER_LIMIT</text:p>
          </table:table-cell>
          <table:table-cell table:formula="of:=IF([$List.A164] &lt;&gt;&quot;&quot;; [$List.A164]; &quot;&quot;)" office:value-type="float" office:value="1121" calcext:value-type="float">
            <text:p>1121</text:p>
          </table:table-cell>
          <table:table-cell/>
          <table:table-cell table:formula="of:=IF([.A164]&lt;&gt;&quot;&quot;; COM.MICROSOFT.CONCAT(&quot;#define MODBUS_ADDR_&quot;; [.A164]; &quot; &quot;; [.B164]); &quot;&quot;)" office:value-type="string" office:string-value="#define MODBUS_ADDR_CUP2_CHANNEL1_UPPER_LIMIT 1121" calcext:value-type="string">
            <text:p>#define MODBUS_ADDR_CUP2_CHANNEL1_UPPER_LIMIT 1121</text:p>
          </table:table-cell>
          <table:table-cell table:number-columns-repeated="16378"/>
        </table:table-row>
        <table:table-row table:style-name="ro1">
          <table:table-cell table:formula="of:=IF([$List.A165] &lt;&gt;&quot;&quot;; [$List.I165]; &quot;&quot;)" office:value-type="string" office:string-value="CUP2_CHANNEL2_UPPER_LIMIT" calcext:value-type="string">
            <text:p>CUP2_CHANNEL2_UPPER_LIMIT</text:p>
          </table:table-cell>
          <table:table-cell table:formula="of:=IF([$List.A165] &lt;&gt;&quot;&quot;; [$List.A165]; &quot;&quot;)" office:value-type="float" office:value="1122" calcext:value-type="float">
            <text:p>1122</text:p>
          </table:table-cell>
          <table:table-cell/>
          <table:table-cell table:formula="of:=IF([.A165]&lt;&gt;&quot;&quot;; COM.MICROSOFT.CONCAT(&quot;#define MODBUS_ADDR_&quot;; [.A165]; &quot; &quot;; [.B165]); &quot;&quot;)" office:value-type="string" office:string-value="#define MODBUS_ADDR_CUP2_CHANNEL2_UPPER_LIMIT 1122" calcext:value-type="string">
            <text:p>#define MODBUS_ADDR_CUP2_CHANNEL2_UPPER_LIMIT 1122</text:p>
          </table:table-cell>
          <table:table-cell table:number-columns-repeated="16378"/>
        </table:table-row>
        <table:table-row table:style-name="ro1">
          <table:table-cell table:formula="of:=IF([$List.A166] &lt;&gt;&quot;&quot;; [$List.I166]; &quot;&quot;)" office:value-type="string" office:string-value="CUP2_CHANNEL3_UPPER_LIMIT" calcext:value-type="string">
            <text:p>CUP2_CHANNEL3_UPPER_LIMIT</text:p>
          </table:table-cell>
          <table:table-cell table:formula="of:=IF([$List.A166] &lt;&gt;&quot;&quot;; [$List.A166]; &quot;&quot;)" office:value-type="float" office:value="1123" calcext:value-type="float">
            <text:p>1123</text:p>
          </table:table-cell>
          <table:table-cell/>
          <table:table-cell table:formula="of:=IF([.A166]&lt;&gt;&quot;&quot;; COM.MICROSOFT.CONCAT(&quot;#define MODBUS_ADDR_&quot;; [.A166]; &quot; &quot;; [.B166]); &quot;&quot;)" office:value-type="string" office:string-value="#define MODBUS_ADDR_CUP2_CHANNEL3_UPPER_LIMIT 1123" calcext:value-type="string">
            <text:p>#define MODBUS_ADDR_CUP2_CHANNEL3_UPPER_LIMIT 1123</text:p>
          </table:table-cell>
          <table:table-cell table:number-columns-repeated="16378"/>
        </table:table-row>
        <table:table-row table:style-name="ro1">
          <table:table-cell table:formula="of:=IF([$List.A167] &lt;&gt;&quot;&quot;; [$List.I167]; &quot;&quot;)" office:value-type="string" office:string-value="CUP2_CHANNEL4_UPPER_LIMIT" calcext:value-type="string">
            <text:p>CUP2_CHANNEL4_UPPER_LIMIT</text:p>
          </table:table-cell>
          <table:table-cell table:formula="of:=IF([$List.A167] &lt;&gt;&quot;&quot;; [$List.A167]; &quot;&quot;)" office:value-type="float" office:value="1124" calcext:value-type="float">
            <text:p>1124</text:p>
          </table:table-cell>
          <table:table-cell/>
          <table:table-cell table:formula="of:=IF([.A167]&lt;&gt;&quot;&quot;; COM.MICROSOFT.CONCAT(&quot;#define MODBUS_ADDR_&quot;; [.A167]; &quot; &quot;; [.B167]); &quot;&quot;)" office:value-type="string" office:string-value="#define MODBUS_ADDR_CUP2_CHANNEL4_UPPER_LIMIT 1124" calcext:value-type="string">
            <text:p>#define MODBUS_ADDR_CUP2_CHANNEL4_UPPER_LIMIT 1124</text:p>
          </table:table-cell>
          <table:table-cell table:number-columns-repeated="16378"/>
        </table:table-row>
        <table:table-row table:style-name="ro1">
          <table:table-cell table:formula="of:=IF([$List.A168] &lt;&gt;&quot;&quot;; [$List.I168]; &quot;&quot;)" office:value-type="string" office:string-value="CUP3_CHANNEL1_UPPER_LIMIT" calcext:value-type="string">
            <text:p>CUP3_CHANNEL1_UPPER_LIMIT</text:p>
          </table:table-cell>
          <table:table-cell table:formula="of:=IF([$List.A168] &lt;&gt;&quot;&quot;; [$List.A168]; &quot;&quot;)" office:value-type="float" office:value="1125" calcext:value-type="float">
            <text:p>1125</text:p>
          </table:table-cell>
          <table:table-cell/>
          <table:table-cell table:formula="of:=IF([.A168]&lt;&gt;&quot;&quot;; COM.MICROSOFT.CONCAT(&quot;#define MODBUS_ADDR_&quot;; [.A168]; &quot; &quot;; [.B168]); &quot;&quot;)" office:value-type="string" office:string-value="#define MODBUS_ADDR_CUP3_CHANNEL1_UPPER_LIMIT 1125" calcext:value-type="string">
            <text:p>#define MODBUS_ADDR_CUP3_CHANNEL1_UPPER_LIMIT 1125</text:p>
          </table:table-cell>
          <table:table-cell table:number-columns-repeated="16378"/>
        </table:table-row>
        <table:table-row table:style-name="ro1">
          <table:table-cell table:formula="of:=IF([$List.A169] &lt;&gt;&quot;&quot;; [$List.I169]; &quot;&quot;)" office:value-type="string" office:string-value="CUP3_CHANNEL2_UPPER_LIMIT" calcext:value-type="string">
            <text:p>CUP3_CHANNEL2_UPPER_LIMIT</text:p>
          </table:table-cell>
          <table:table-cell table:formula="of:=IF([$List.A169] &lt;&gt;&quot;&quot;; [$List.A169]; &quot;&quot;)" office:value-type="float" office:value="1126" calcext:value-type="float">
            <text:p>1126</text:p>
          </table:table-cell>
          <table:table-cell/>
          <table:table-cell table:formula="of:=IF([.A169]&lt;&gt;&quot;&quot;; COM.MICROSOFT.CONCAT(&quot;#define MODBUS_ADDR_&quot;; [.A169]; &quot; &quot;; [.B169]); &quot;&quot;)" office:value-type="string" office:string-value="#define MODBUS_ADDR_CUP3_CHANNEL2_UPPER_LIMIT 1126" calcext:value-type="string">
            <text:p>#define MODBUS_ADDR_CUP3_CHANNEL2_UPPER_LIMIT 1126</text:p>
          </table:table-cell>
          <table:table-cell table:number-columns-repeated="16378"/>
        </table:table-row>
        <table:table-row table:style-name="ro1">
          <table:table-cell table:formula="of:=IF([$List.A170] &lt;&gt;&quot;&quot;; [$List.I170]; &quot;&quot;)" office:value-type="string" office:string-value="CUP3_CHANNEL3_UPPER_LIMIT" calcext:value-type="string">
            <text:p>CUP3_CHANNEL3_UPPER_LIMIT</text:p>
          </table:table-cell>
          <table:table-cell table:formula="of:=IF([$List.A170] &lt;&gt;&quot;&quot;; [$List.A170]; &quot;&quot;)" office:value-type="float" office:value="1127" calcext:value-type="float">
            <text:p>1127</text:p>
          </table:table-cell>
          <table:table-cell/>
          <table:table-cell table:formula="of:=IF([.A170]&lt;&gt;&quot;&quot;; COM.MICROSOFT.CONCAT(&quot;#define MODBUS_ADDR_&quot;; [.A170]; &quot; &quot;; [.B170]); &quot;&quot;)" office:value-type="string" office:string-value="#define MODBUS_ADDR_CUP3_CHANNEL3_UPPER_LIMIT 1127" calcext:value-type="string">
            <text:p>#define MODBUS_ADDR_CUP3_CHANNEL3_UPPER_LIMIT 1127</text:p>
          </table:table-cell>
          <table:table-cell table:number-columns-repeated="16378"/>
        </table:table-row>
        <table:table-row table:style-name="ro1">
          <table:table-cell table:formula="of:=IF([$List.A171] &lt;&gt;&quot;&quot;; [$List.I171]; &quot;&quot;)" office:value-type="string" office:string-value="CUP3_CHANNEL4_UPPER_LIMIT" calcext:value-type="string">
            <text:p>CUP3_CHANNEL4_UPPER_LIMIT</text:p>
          </table:table-cell>
          <table:table-cell table:formula="of:=IF([$List.A171] &lt;&gt;&quot;&quot;; [$List.A171]; &quot;&quot;)" office:value-type="float" office:value="1128" calcext:value-type="float">
            <text:p>1128</text:p>
          </table:table-cell>
          <table:table-cell/>
          <table:table-cell table:formula="of:=IF([.A171]&lt;&gt;&quot;&quot;; COM.MICROSOFT.CONCAT(&quot;#define MODBUS_ADDR_&quot;; [.A171]; &quot; &quot;; [.B171]); &quot;&quot;)" office:value-type="string" office:string-value="#define MODBUS_ADDR_CUP3_CHANNEL4_UPPER_LIMIT 1128" calcext:value-type="string">
            <text:p>#define MODBUS_ADDR_CUP3_CHANNEL4_UPPER_LIMIT 1128</text:p>
          </table:table-cell>
          <table:table-cell table:number-columns-repeated="16378"/>
        </table:table-row>
        <table:table-row table:style-name="ro1">
          <table:table-cell table:formula="of:=IF([$List.A172] &lt;&gt;&quot;&quot;; [$List.I172]; &quot;&quot;)">
            <text:p/>
          </table:table-cell>
          <table:table-cell table:formula="of:=IF([$List.A172] &lt;&gt;&quot;&quot;; [$List.A172]; &quot;&quot;)">
            <text:p/>
          </table:table-cell>
          <table:table-cell/>
          <table:table-cell table:formula="of:=IF([.A172]&lt;&gt;&quot;&quot;; COM.MICROSOFT.CONCAT(&quot;#define MODBUS_ADDR_&quot;; [.A172]; &quot; &quot;; [.B172]); &quot;&quot;)">
            <text:p/>
          </table:table-cell>
          <table:table-cell table:number-columns-repeated="16378"/>
        </table:table-row>
        <table:table-row table:style-name="ro1">
          <table:table-cell table:formula="of:=IF([$List.A173] &lt;&gt;&quot;&quot;; [$List.I173]; &quot;&quot;)" office:value-type="string" office:string-value="SIM_MECHANISM_PROPAGATION1_IN" calcext:value-type="string">
            <text:p>SIM_MECHANISM_PROPAGATION1_IN</text:p>
          </table:table-cell>
          <table:table-cell table:formula="of:=IF([$List.A173] &lt;&gt;&quot;&quot;; [$List.A173]; &quot;&quot;)" office:value-type="float" office:value="1129" calcext:value-type="float">
            <text:p>1129</text:p>
          </table:table-cell>
          <table:table-cell/>
          <table:table-cell table:formula="of:=IF([.A173]&lt;&gt;&quot;&quot;; COM.MICROSOFT.CONCAT(&quot;#define MODBUS_ADDR_&quot;; [.A173]; &quot; &quot;; [.B173]); &quot;&quot;)" office:value-type="string" office:string-value="#define MODBUS_ADDR_SIM_MECHANISM_PROPAGATION1_IN 1129" calcext:value-type="string">
            <text:p>#define MODBUS_ADDR_SIM_MECHANISM_PROPAGATION1_IN 1129</text:p>
          </table:table-cell>
          <table:table-cell table:number-columns-repeated="16378"/>
        </table:table-row>
        <table:table-row table:style-name="ro1">
          <table:table-cell table:formula="of:=IF([$List.A174] &lt;&gt;&quot;&quot;; [$List.I174]; &quot;&quot;)" office:value-type="string" office:string-value="SIM_MECHANISM_PROPAGATION1_IN_RAND" calcext:value-type="string">
            <text:p>SIM_MECHANISM_PROPAGATION1_IN_RAND</text:p>
          </table:table-cell>
          <table:table-cell table:formula="of:=IF([$List.A174] &lt;&gt;&quot;&quot;; [$List.A174]; &quot;&quot;)" office:value-type="float" office:value="1130" calcext:value-type="float">
            <text:p>1130</text:p>
          </table:table-cell>
          <table:table-cell/>
          <table:table-cell table:formula="of:=IF([.A174]&lt;&gt;&quot;&quot;; COM.MICROSOFT.CONCAT(&quot;#define MODBUS_ADDR_&quot;; [.A174]; &quot; &quot;; [.B174]); &quot;&quot;)" office:value-type="string" office:string-value="#define MODBUS_ADDR_SIM_MECHANISM_PROPAGATION1_IN_RAND 1130" calcext:value-type="string">
            <text:p>#define MODBUS_ADDR_SIM_MECHANISM_PROPAGATION1_IN_RAND 1130</text:p>
          </table:table-cell>
          <table:table-cell table:number-columns-repeated="16378"/>
        </table:table-row>
        <table:table-row table:style-name="ro1">
          <table:table-cell table:formula="of:=IF([$List.A175] &lt;&gt;&quot;&quot;; [$List.I175]; &quot;&quot;)" office:value-type="string" office:string-value="SIM_MECHANISM_PROPAGATION1_OUT" calcext:value-type="string">
            <text:p>SIM_MECHANISM_PROPAGATION1_OUT</text:p>
          </table:table-cell>
          <table:table-cell table:formula="of:=IF([$List.A175] &lt;&gt;&quot;&quot;; [$List.A175]; &quot;&quot;)" office:value-type="float" office:value="1131" calcext:value-type="float">
            <text:p>1131</text:p>
          </table:table-cell>
          <table:table-cell/>
          <table:table-cell table:formula="of:=IF([.A175]&lt;&gt;&quot;&quot;; COM.MICROSOFT.CONCAT(&quot;#define MODBUS_ADDR_&quot;; [.A175]; &quot; &quot;; [.B175]); &quot;&quot;)" office:value-type="string" office:string-value="#define MODBUS_ADDR_SIM_MECHANISM_PROPAGATION1_OUT 1131" calcext:value-type="string">
            <text:p>#define MODBUS_ADDR_SIM_MECHANISM_PROPAGATION1_OUT 1131</text:p>
          </table:table-cell>
          <table:table-cell table:number-columns-repeated="16378"/>
        </table:table-row>
        <table:table-row table:style-name="ro1">
          <table:table-cell table:formula="of:=IF([$List.A176] &lt;&gt;&quot;&quot;; [$List.I176]; &quot;&quot;)" office:value-type="string" office:string-value="SIM_MECHANISM_PROPAGATION1_OUT_RAND" calcext:value-type="string">
            <text:p>SIM_MECHANISM_PROPAGATION1_OUT_RAND</text:p>
          </table:table-cell>
          <table:table-cell table:formula="of:=IF([$List.A176] &lt;&gt;&quot;&quot;; [$List.A176]; &quot;&quot;)" office:value-type="float" office:value="1132" calcext:value-type="float">
            <text:p>1132</text:p>
          </table:table-cell>
          <table:table-cell/>
          <table:table-cell table:formula="of:=IF([.A176]&lt;&gt;&quot;&quot;; COM.MICROSOFT.CONCAT(&quot;#define MODBUS_ADDR_&quot;; [.A176]; &quot; &quot;; [.B176]); &quot;&quot;)" office:value-type="string" office:string-value="#define MODBUS_ADDR_SIM_MECHANISM_PROPAGATION1_OUT_RAND 1132" calcext:value-type="string">
            <text:p>#define MODBUS_ADDR_SIM_MECHANISM_PROPAGATION1_OUT_RAND 1132</text:p>
          </table:table-cell>
          <table:table-cell table:number-columns-repeated="16378"/>
        </table:table-row>
        <table:table-row table:style-name="ro1">
          <table:table-cell table:formula="of:=IF([$List.A177] &lt;&gt;&quot;&quot;; [$List.I177]; &quot;&quot;)">
            <text:p/>
          </table:table-cell>
          <table:table-cell table:formula="of:=IF([$List.A177] &lt;&gt;&quot;&quot;; [$List.A177]; &quot;&quot;)">
            <text:p/>
          </table:table-cell>
          <table:table-cell/>
          <table:table-cell table:formula="of:=IF([.A177]&lt;&gt;&quot;&quot;; COM.MICROSOFT.CONCAT(&quot;#define MODBUS_ADDR_&quot;; [.A177]; &quot; &quot;; [.B177]); &quot;&quot;)">
            <text:p/>
          </table:table-cell>
          <table:table-cell table:number-columns-repeated="16378"/>
        </table:table-row>
        <table:table-row table:style-name="ro1">
          <table:table-cell table:formula="of:=IF([$List.A178] &lt;&gt;&quot;&quot;; [$List.I178]; &quot;&quot;)" office:value-type="string" office:string-value="SIM_MECHANISM_PROPAGATION2_IN" calcext:value-type="string">
            <text:p>SIM_MECHANISM_PROPAGATION2_IN</text:p>
          </table:table-cell>
          <table:table-cell table:formula="of:=IF([$List.A178] &lt;&gt;&quot;&quot;; [$List.A178]; &quot;&quot;)" office:value-type="float" office:value="1133" calcext:value-type="float">
            <text:p>1133</text:p>
          </table:table-cell>
          <table:table-cell/>
          <table:table-cell table:formula="of:=IF([.A178]&lt;&gt;&quot;&quot;; COM.MICROSOFT.CONCAT(&quot;#define MODBUS_ADDR_&quot;; [.A178]; &quot; &quot;; [.B178]); &quot;&quot;)" office:value-type="string" office:string-value="#define MODBUS_ADDR_SIM_MECHANISM_PROPAGATION2_IN 1133" calcext:value-type="string">
            <text:p>#define MODBUS_ADDR_SIM_MECHANISM_PROPAGATION2_IN 1133</text:p>
          </table:table-cell>
          <table:table-cell table:number-columns-repeated="16378"/>
        </table:table-row>
        <table:table-row table:style-name="ro1">
          <table:table-cell table:formula="of:=IF([$List.A179] &lt;&gt;&quot;&quot;; [$List.I179]; &quot;&quot;)" office:value-type="string" office:string-value="SIM_MECHANISM_PROPAGATION2_IN_RAND" calcext:value-type="string">
            <text:p>SIM_MECHANISM_PROPAGATION2_IN_RAND</text:p>
          </table:table-cell>
          <table:table-cell table:formula="of:=IF([$List.A179] &lt;&gt;&quot;&quot;; [$List.A179]; &quot;&quot;)" office:value-type="float" office:value="1134" calcext:value-type="float">
            <text:p>1134</text:p>
          </table:table-cell>
          <table:table-cell/>
          <table:table-cell table:formula="of:=IF([.A179]&lt;&gt;&quot;&quot;; COM.MICROSOFT.CONCAT(&quot;#define MODBUS_ADDR_&quot;; [.A179]; &quot; &quot;; [.B179]); &quot;&quot;)" office:value-type="string" office:string-value="#define MODBUS_ADDR_SIM_MECHANISM_PROPAGATION2_IN_RAND 1134" calcext:value-type="string">
            <text:p>#define MODBUS_ADDR_SIM_MECHANISM_PROPAGATION2_IN_RAND 1134</text:p>
          </table:table-cell>
          <table:table-cell table:number-columns-repeated="16378"/>
        </table:table-row>
        <table:table-row table:style-name="ro1">
          <table:table-cell table:formula="of:=IF([$List.A180] &lt;&gt;&quot;&quot;; [$List.I180]; &quot;&quot;)" office:value-type="string" office:string-value="SIM_MECHANISM_PROPAGATION2_OUT" calcext:value-type="string">
            <text:p>SIM_MECHANISM_PROPAGATION2_OUT</text:p>
          </table:table-cell>
          <table:table-cell table:formula="of:=IF([$List.A180] &lt;&gt;&quot;&quot;; [$List.A180]; &quot;&quot;)" office:value-type="float" office:value="1135" calcext:value-type="float">
            <text:p>1135</text:p>
          </table:table-cell>
          <table:table-cell/>
          <table:table-cell table:formula="of:=IF([.A180]&lt;&gt;&quot;&quot;; COM.MICROSOFT.CONCAT(&quot;#define MODBUS_ADDR_&quot;; [.A180]; &quot; &quot;; [.B180]); &quot;&quot;)" office:value-type="string" office:string-value="#define MODBUS_ADDR_SIM_MECHANISM_PROPAGATION2_OUT 1135" calcext:value-type="string">
            <text:p>#define MODBUS_ADDR_SIM_MECHANISM_PROPAGATION2_OUT 1135</text:p>
          </table:table-cell>
          <table:table-cell table:number-columns-repeated="16378"/>
        </table:table-row>
        <table:table-row table:style-name="ro1">
          <table:table-cell table:formula="of:=IF([$List.A181] &lt;&gt;&quot;&quot;; [$List.I181]; &quot;&quot;)" office:value-type="string" office:string-value="SIM_MECHANISM_PROPAGATION2_OUT_RAND" calcext:value-type="string">
            <text:p>SIM_MECHANISM_PROPAGATION2_OUT_RAND</text:p>
          </table:table-cell>
          <table:table-cell table:formula="of:=IF([$List.A181] &lt;&gt;&quot;&quot;; [$List.A181]; &quot;&quot;)" office:value-type="float" office:value="1136" calcext:value-type="float">
            <text:p>1136</text:p>
          </table:table-cell>
          <table:table-cell/>
          <table:table-cell table:formula="of:=IF([.A181]&lt;&gt;&quot;&quot;; COM.MICROSOFT.CONCAT(&quot;#define MODBUS_ADDR_&quot;; [.A181]; &quot; &quot;; [.B181]); &quot;&quot;)" office:value-type="string" office:string-value="#define MODBUS_ADDR_SIM_MECHANISM_PROPAGATION2_OUT_RAND 1136" calcext:value-type="string">
            <text:p>#define MODBUS_ADDR_SIM_MECHANISM_PROPAGATION2_OUT_RAND 1136</text:p>
          </table:table-cell>
          <table:table-cell table:number-columns-repeated="16378"/>
        </table:table-row>
        <table:table-row table:style-name="ro1">
          <table:table-cell table:formula="of:=IF([$List.A182] &lt;&gt;&quot;&quot;; [$List.I182]; &quot;&quot;)">
            <text:p/>
          </table:table-cell>
          <table:table-cell table:formula="of:=IF([$List.A182] &lt;&gt;&quot;&quot;; [$List.A182]; &quot;&quot;)">
            <text:p/>
          </table:table-cell>
          <table:table-cell/>
          <table:table-cell table:formula="of:=IF([.A182]&lt;&gt;&quot;&quot;; COM.MICROSOFT.CONCAT(&quot;#define MODBUS_ADDR_&quot;; [.A182]; &quot; &quot;; [.B182]); &quot;&quot;)">
            <text:p/>
          </table:table-cell>
          <table:table-cell table:number-columns-repeated="16378"/>
        </table:table-row>
        <table:table-row table:style-name="ro1">
          <table:table-cell table:formula="of:=IF([$List.A183] &lt;&gt;&quot;&quot;; [$List.I183]; &quot;&quot;)" office:value-type="string" office:string-value="SIM_MECHANISM_PROPAGATION3_IN" calcext:value-type="string">
            <text:p>SIM_MECHANISM_PROPAGATION3_IN</text:p>
          </table:table-cell>
          <table:table-cell table:formula="of:=IF([$List.A183] &lt;&gt;&quot;&quot;; [$List.A183]; &quot;&quot;)" office:value-type="float" office:value="1137" calcext:value-type="float">
            <text:p>1137</text:p>
          </table:table-cell>
          <table:table-cell/>
          <table:table-cell table:formula="of:=IF([.A183]&lt;&gt;&quot;&quot;; COM.MICROSOFT.CONCAT(&quot;#define MODBUS_ADDR_&quot;; [.A183]; &quot; &quot;; [.B183]); &quot;&quot;)" office:value-type="string" office:string-value="#define MODBUS_ADDR_SIM_MECHANISM_PROPAGATION3_IN 1137" calcext:value-type="string">
            <text:p>#define MODBUS_ADDR_SIM_MECHANISM_PROPAGATION3_IN 1137</text:p>
          </table:table-cell>
          <table:table-cell table:number-columns-repeated="16378"/>
        </table:table-row>
        <table:table-row table:style-name="ro1">
          <table:table-cell table:formula="of:=IF([$List.A184] &lt;&gt;&quot;&quot;; [$List.I184]; &quot;&quot;)" office:value-type="string" office:string-value="SIM_MECHANISM_PROPAGATION3_IN_RAND" calcext:value-type="string">
            <text:p>SIM_MECHANISM_PROPAGATION3_IN_RAND</text:p>
          </table:table-cell>
          <table:table-cell table:formula="of:=IF([$List.A184] &lt;&gt;&quot;&quot;; [$List.A184]; &quot;&quot;)" office:value-type="float" office:value="1138" calcext:value-type="float">
            <text:p>1138</text:p>
          </table:table-cell>
          <table:table-cell/>
          <table:table-cell table:formula="of:=IF([.A184]&lt;&gt;&quot;&quot;; COM.MICROSOFT.CONCAT(&quot;#define MODBUS_ADDR_&quot;; [.A184]; &quot; &quot;; [.B184]); &quot;&quot;)" office:value-type="string" office:string-value="#define MODBUS_ADDR_SIM_MECHANISM_PROPAGATION3_IN_RAND 1138" calcext:value-type="string">
            <text:p>#define MODBUS_ADDR_SIM_MECHANISM_PROPAGATION3_IN_RAND 1138</text:p>
          </table:table-cell>
          <table:table-cell table:number-columns-repeated="16378"/>
        </table:table-row>
        <table:table-row table:style-name="ro1">
          <table:table-cell table:formula="of:=IF([$List.A185] &lt;&gt;&quot;&quot;; [$List.I185]; &quot;&quot;)" office:value-type="string" office:string-value="SIM_MECHANISM_PROPAGATION3_OUT" calcext:value-type="string">
            <text:p>SIM_MECHANISM_PROPAGATION3_OUT</text:p>
          </table:table-cell>
          <table:table-cell table:formula="of:=IF([$List.A185] &lt;&gt;&quot;&quot;; [$List.A185]; &quot;&quot;)" office:value-type="float" office:value="1139" calcext:value-type="float">
            <text:p>1139</text:p>
          </table:table-cell>
          <table:table-cell/>
          <table:table-cell table:formula="of:=IF([.A185]&lt;&gt;&quot;&quot;; COM.MICROSOFT.CONCAT(&quot;#define MODBUS_ADDR_&quot;; [.A185]; &quot; &quot;; [.B185]); &quot;&quot;)" office:value-type="string" office:string-value="#define MODBUS_ADDR_SIM_MECHANISM_PROPAGATION3_OUT 1139" calcext:value-type="string">
            <text:p>#define MODBUS_ADDR_SIM_MECHANISM_PROPAGATION3_OUT 1139</text:p>
          </table:table-cell>
          <table:table-cell table:number-columns-repeated="16378"/>
        </table:table-row>
        <table:table-row table:style-name="ro1">
          <table:table-cell table:formula="of:=IF([$List.A186] &lt;&gt;&quot;&quot;; [$List.I186]; &quot;&quot;)" office:value-type="string" office:string-value="SIM_MECHANISM_PROPAGATION3_OUT_RAND" calcext:value-type="string">
            <text:p>SIM_MECHANISM_PROPAGATION3_OUT_RAND</text:p>
          </table:table-cell>
          <table:table-cell table:formula="of:=IF([$List.A186] &lt;&gt;&quot;&quot;; [$List.A186]; &quot;&quot;)" office:value-type="float" office:value="1140" calcext:value-type="float">
            <text:p>1140</text:p>
          </table:table-cell>
          <table:table-cell/>
          <table:table-cell table:formula="of:=IF([.A186]&lt;&gt;&quot;&quot;; COM.MICROSOFT.CONCAT(&quot;#define MODBUS_ADDR_&quot;; [.A186]; &quot; &quot;; [.B186]); &quot;&quot;)" office:value-type="string" office:string-value="#define MODBUS_ADDR_SIM_MECHANISM_PROPAGATION3_OUT_RAND 1140" calcext:value-type="string">
            <text:p>#define MODBUS_ADDR_SIM_MECHANISM_PROPAGATION3_OUT_RAND 1140</text:p>
          </table:table-cell>
          <table:table-cell table:number-columns-repeated="16378"/>
        </table:table-row>
        <table:table-row table:style-name="ro1">
          <table:table-cell table:formula="of:=IF([$List.A187] &lt;&gt;&quot;&quot;; [$List.I187]; &quot;&quot;)" office:value-type="string" office:string-value="SIM_MECHANISM3_INERTIAL_MOTION" calcext:value-type="string">
            <text:p>SIM_MECHANISM3_INERTIAL_MOTION</text:p>
          </table:table-cell>
          <table:table-cell table:formula="of:=IF([$List.A187] &lt;&gt;&quot;&quot;; [$List.A187]; &quot;&quot;)" office:value-type="float" office:value="1141" calcext:value-type="float">
            <text:p>1141</text:p>
          </table:table-cell>
          <table:table-cell/>
          <table:table-cell table:formula="of:=IF([.A187]&lt;&gt;&quot;&quot;; COM.MICROSOFT.CONCAT(&quot;#define MODBUS_ADDR_&quot;; [.A187]; &quot; &quot;; [.B187]); &quot;&quot;)" office:value-type="string" office:string-value="#define MODBUS_ADDR_SIM_MECHANISM3_INERTIAL_MOTION 1141" calcext:value-type="string">
            <text:p>#define MODBUS_ADDR_SIM_MECHANISM3_INERTIAL_MOTION 1141</text:p>
          </table:table-cell>
          <table:table-cell table:number-columns-repeated="16378"/>
        </table:table-row>
        <table:table-row table:style-name="ro1">
          <table:table-cell table:formula="of:=IF([$List.A188] &lt;&gt;&quot;&quot;; [$List.I188]; &quot;&quot;)" office:value-type="string" office:string-value="SIM_MECHANISM3_BRAKED_MOTION" calcext:value-type="string">
            <text:p>SIM_MECHANISM3_BRAKED_MOTION</text:p>
          </table:table-cell>
          <table:table-cell table:formula="of:=IF([$List.A188] &lt;&gt;&quot;&quot;; [$List.A188]; &quot;&quot;)" office:value-type="float" office:value="1142" calcext:value-type="float">
            <text:p>1142</text:p>
          </table:table-cell>
          <table:table-cell/>
          <table:table-cell table:formula="of:=IF([.A188]&lt;&gt;&quot;&quot;; COM.MICROSOFT.CONCAT(&quot;#define MODBUS_ADDR_&quot;; [.A188]; &quot; &quot;; [.B188]); &quot;&quot;)" office:value-type="string" office:string-value="#define MODBUS_ADDR_SIM_MECHANISM3_BRAKED_MOTION 1142" calcext:value-type="string">
            <text:p>#define MODBUS_ADDR_SIM_MECHANISM3_BRAKED_MOTION 1142</text:p>
          </table:table-cell>
          <table:table-cell table:number-columns-repeated="16378"/>
        </table:table-row>
        <table:table-row table:style-name="ro1">
          <table:table-cell table:formula="of:=IF([$List.A189] &lt;&gt;&quot;&quot;; [$List.I189]; &quot;&quot;)">
            <text:p/>
          </table:table-cell>
          <table:table-cell table:formula="of:=IF([$List.A189] &lt;&gt;&quot;&quot;; [$List.A189]; &quot;&quot;)">
            <text:p/>
          </table:table-cell>
          <table:table-cell/>
          <table:table-cell table:formula="of:=IF([.A189]&lt;&gt;&quot;&quot;; COM.MICROSOFT.CONCAT(&quot;#define MODBUS_ADDR_&quot;; [.A189]; &quot; &quot;; [.B189]); &quot;&quot;)">
            <text:p/>
          </table:table-cell>
          <table:table-cell table:number-columns-repeated="16378"/>
        </table:table-row>
        <table:table-row table:style-name="ro1">
          <table:table-cell table:formula="of:=IF([$List.A190] &lt;&gt;&quot;&quot;; [$List.I190]; &quot;&quot;)" office:value-type="string" office:string-value="SIM_AMPLIFIER_CUP1_ELECTRODE1" calcext:value-type="string">
            <text:p>SIM_AMPLIFIER_CUP1_ELECTRODE1</text:p>
          </table:table-cell>
          <table:table-cell table:formula="of:=IF([$List.A190] &lt;&gt;&quot;&quot;; [$List.A190]; &quot;&quot;)" office:value-type="float" office:value="1143" calcext:value-type="float">
            <text:p>1143</text:p>
          </table:table-cell>
          <table:table-cell/>
          <table:table-cell table:formula="of:=IF([.A190]&lt;&gt;&quot;&quot;; COM.MICROSOFT.CONCAT(&quot;#define MODBUS_ADDR_&quot;; [.A190]; &quot; &quot;; [.B190]); &quot;&quot;)" office:value-type="string" office:string-value="#define MODBUS_ADDR_SIM_AMPLIFIER_CUP1_ELECTRODE1 1143" calcext:value-type="string">
            <text:p>#define MODBUS_ADDR_SIM_AMPLIFIER_CUP1_ELECTRODE1 1143</text:p>
          </table:table-cell>
          <table:table-cell table:number-columns-repeated="16378"/>
        </table:table-row>
        <table:table-row table:style-name="ro1">
          <table:table-cell table:formula="of:=IF([$List.A191] &lt;&gt;&quot;&quot;; [$List.I191]; &quot;&quot;)" office:value-type="string" office:string-value="SIM_AMPLIFIER_CUP1_ELECTRODE2" calcext:value-type="string">
            <text:p>SIM_AMPLIFIER_CUP1_ELECTRODE2</text:p>
          </table:table-cell>
          <table:table-cell table:formula="of:=IF([$List.A191] &lt;&gt;&quot;&quot;; [$List.A191]; &quot;&quot;)" office:value-type="float" office:value="1144" calcext:value-type="float">
            <text:p>1144</text:p>
          </table:table-cell>
          <table:table-cell/>
          <table:table-cell table:formula="of:=IF([.A191]&lt;&gt;&quot;&quot;; COM.MICROSOFT.CONCAT(&quot;#define MODBUS_ADDR_&quot;; [.A191]; &quot; &quot;; [.B191]); &quot;&quot;)" office:value-type="string" office:string-value="#define MODBUS_ADDR_SIM_AMPLIFIER_CUP1_ELECTRODE2 1144" calcext:value-type="string">
            <text:p>#define MODBUS_ADDR_SIM_AMPLIFIER_CUP1_ELECTRODE2 1144</text:p>
          </table:table-cell>
          <table:table-cell table:number-columns-repeated="16378"/>
        </table:table-row>
        <table:table-row table:style-name="ro1">
          <table:table-cell table:formula="of:=IF([$List.A192] &lt;&gt;&quot;&quot;; [$List.I192]; &quot;&quot;)" office:value-type="string" office:string-value="SIM_AMPLIFIER_CUP1_ELECTRODE3" calcext:value-type="string">
            <text:p>SIM_AMPLIFIER_CUP1_ELECTRODE3</text:p>
          </table:table-cell>
          <table:table-cell table:formula="of:=IF([$List.A192] &lt;&gt;&quot;&quot;; [$List.A192]; &quot;&quot;)" office:value-type="float" office:value="1145" calcext:value-type="float">
            <text:p>1145</text:p>
          </table:table-cell>
          <table:table-cell/>
          <table:table-cell table:formula="of:=IF([.A192]&lt;&gt;&quot;&quot;; COM.MICROSOFT.CONCAT(&quot;#define MODBUS_ADDR_&quot;; [.A192]; &quot; &quot;; [.B192]); &quot;&quot;)" office:value-type="string" office:string-value="#define MODBUS_ADDR_SIM_AMPLIFIER_CUP1_ELECTRODE3 1145" calcext:value-type="string">
            <text:p>#define MODBUS_ADDR_SIM_AMPLIFIER_CUP1_ELECTRODE3 1145</text:p>
          </table:table-cell>
          <table:table-cell table:number-columns-repeated="16378"/>
        </table:table-row>
        <table:table-row table:style-name="ro1">
          <table:table-cell table:formula="of:=IF([$List.A193] &lt;&gt;&quot;&quot;; [$List.I193]; &quot;&quot;)" office:value-type="string" office:string-value="SIM_AMPLIFIER_CUP1_ELECTRODE4" calcext:value-type="string">
            <text:p>SIM_AMPLIFIER_CUP1_ELECTRODE4</text:p>
          </table:table-cell>
          <table:table-cell table:formula="of:=IF([$List.A193] &lt;&gt;&quot;&quot;; [$List.A193]; &quot;&quot;)" office:value-type="float" office:value="1146" calcext:value-type="float">
            <text:p>1146</text:p>
          </table:table-cell>
          <table:table-cell/>
          <table:table-cell table:formula="of:=IF([.A193]&lt;&gt;&quot;&quot;; COM.MICROSOFT.CONCAT(&quot;#define MODBUS_ADDR_&quot;; [.A193]; &quot; &quot;; [.B193]); &quot;&quot;)" office:value-type="string" office:string-value="#define MODBUS_ADDR_SIM_AMPLIFIER_CUP1_ELECTRODE4 1146" calcext:value-type="string">
            <text:p>#define MODBUS_ADDR_SIM_AMPLIFIER_CUP1_ELECTRODE4 1146</text:p>
          </table:table-cell>
          <table:table-cell table:number-columns-repeated="16378"/>
        </table:table-row>
        <table:table-row table:style-name="ro1">
          <table:table-cell table:formula="of:=IF([$List.A194] &lt;&gt;&quot;&quot;; [$List.I194]; &quot;&quot;)" office:value-type="string" office:string-value="SIM_AMPLIFIER_CUP2_ELECTRODE1" calcext:value-type="string">
            <text:p>SIM_AMPLIFIER_CUP2_ELECTRODE1</text:p>
          </table:table-cell>
          <table:table-cell table:formula="of:=IF([$List.A194] &lt;&gt;&quot;&quot;; [$List.A194]; &quot;&quot;)" office:value-type="float" office:value="1147" calcext:value-type="float">
            <text:p>1147</text:p>
          </table:table-cell>
          <table:table-cell/>
          <table:table-cell table:formula="of:=IF([.A194]&lt;&gt;&quot;&quot;; COM.MICROSOFT.CONCAT(&quot;#define MODBUS_ADDR_&quot;; [.A194]; &quot; &quot;; [.B194]); &quot;&quot;)" office:value-type="string" office:string-value="#define MODBUS_ADDR_SIM_AMPLIFIER_CUP2_ELECTRODE1 1147" calcext:value-type="string">
            <text:p>#define MODBUS_ADDR_SIM_AMPLIFIER_CUP2_ELECTRODE1 1147</text:p>
          </table:table-cell>
          <table:table-cell table:number-columns-repeated="16378"/>
        </table:table-row>
        <table:table-row table:style-name="ro1">
          <table:table-cell table:formula="of:=IF([$List.A195] &lt;&gt;&quot;&quot;; [$List.I195]; &quot;&quot;)" office:value-type="string" office:string-value="SIM_AMPLIFIER_CUP2_ELECTRODE2" calcext:value-type="string">
            <text:p>SIM_AMPLIFIER_CUP2_ELECTRODE2</text:p>
          </table:table-cell>
          <table:table-cell table:formula="of:=IF([$List.A195] &lt;&gt;&quot;&quot;; [$List.A195]; &quot;&quot;)" office:value-type="float" office:value="1148" calcext:value-type="float">
            <text:p>1148</text:p>
          </table:table-cell>
          <table:table-cell/>
          <table:table-cell table:formula="of:=IF([.A195]&lt;&gt;&quot;&quot;; COM.MICROSOFT.CONCAT(&quot;#define MODBUS_ADDR_&quot;; [.A195]; &quot; &quot;; [.B195]); &quot;&quot;)" office:value-type="string" office:string-value="#define MODBUS_ADDR_SIM_AMPLIFIER_CUP2_ELECTRODE2 1148" calcext:value-type="string">
            <text:p>#define MODBUS_ADDR_SIM_AMPLIFIER_CUP2_ELECTRODE2 1148</text:p>
          </table:table-cell>
          <table:table-cell table:number-columns-repeated="16378"/>
        </table:table-row>
        <table:table-row table:style-name="ro1">
          <table:table-cell table:formula="of:=IF([$List.A196] &lt;&gt;&quot;&quot;; [$List.I196]; &quot;&quot;)" office:value-type="string" office:string-value="SIM_AMPLIFIER_CUP2_ELECTRODE3" calcext:value-type="string">
            <text:p>SIM_AMPLIFIER_CUP2_ELECTRODE3</text:p>
          </table:table-cell>
          <table:table-cell table:formula="of:=IF([$List.A196] &lt;&gt;&quot;&quot;; [$List.A196]; &quot;&quot;)" office:value-type="float" office:value="1149" calcext:value-type="float">
            <text:p>1149</text:p>
          </table:table-cell>
          <table:table-cell/>
          <table:table-cell table:formula="of:=IF([.A196]&lt;&gt;&quot;&quot;; COM.MICROSOFT.CONCAT(&quot;#define MODBUS_ADDR_&quot;; [.A196]; &quot; &quot;; [.B196]); &quot;&quot;)" office:value-type="string" office:string-value="#define MODBUS_ADDR_SIM_AMPLIFIER_CUP2_ELECTRODE3 1149" calcext:value-type="string">
            <text:p>#define MODBUS_ADDR_SIM_AMPLIFIER_CUP2_ELECTRODE3 1149</text:p>
          </table:table-cell>
          <table:table-cell table:number-columns-repeated="16378"/>
        </table:table-row>
        <table:table-row table:style-name="ro1">
          <table:table-cell table:formula="of:=IF([$List.A197] &lt;&gt;&quot;&quot;; [$List.I197]; &quot;&quot;)" office:value-type="string" office:string-value="SIM_AMPLIFIER_CUP2_ELECTRODE4" calcext:value-type="string">
            <text:p>SIM_AMPLIFIER_CUP2_ELECTRODE4</text:p>
          </table:table-cell>
          <table:table-cell table:formula="of:=IF([$List.A197] &lt;&gt;&quot;&quot;; [$List.A197]; &quot;&quot;)" office:value-type="float" office:value="1150" calcext:value-type="float">
            <text:p>1150</text:p>
          </table:table-cell>
          <table:table-cell/>
          <table:table-cell table:formula="of:=IF([.A197]&lt;&gt;&quot;&quot;; COM.MICROSOFT.CONCAT(&quot;#define MODBUS_ADDR_&quot;; [.A197]; &quot; &quot;; [.B197]); &quot;&quot;)" office:value-type="string" office:string-value="#define MODBUS_ADDR_SIM_AMPLIFIER_CUP2_ELECTRODE4 1150" calcext:value-type="string">
            <text:p>#define MODBUS_ADDR_SIM_AMPLIFIER_CUP2_ELECTRODE4 1150</text:p>
          </table:table-cell>
          <table:table-cell table:number-columns-repeated="16378"/>
        </table:table-row>
        <table:table-row table:style-name="ro1">
          <table:table-cell table:formula="of:=IF([$List.A198] &lt;&gt;&quot;&quot;; [$List.I198]; &quot;&quot;)" office:value-type="string" office:string-value="SIM_AMPLIFIER_CUP3_ELECTRODE1" calcext:value-type="string">
            <text:p>SIM_AMPLIFIER_CUP3_ELECTRODE1</text:p>
          </table:table-cell>
          <table:table-cell table:formula="of:=IF([$List.A198] &lt;&gt;&quot;&quot;; [$List.A198]; &quot;&quot;)" office:value-type="float" office:value="1151" calcext:value-type="float">
            <text:p>1151</text:p>
          </table:table-cell>
          <table:table-cell/>
          <table:table-cell table:formula="of:=IF([.A198]&lt;&gt;&quot;&quot;; COM.MICROSOFT.CONCAT(&quot;#define MODBUS_ADDR_&quot;; [.A198]; &quot; &quot;; [.B198]); &quot;&quot;)" office:value-type="string" office:string-value="#define MODBUS_ADDR_SIM_AMPLIFIER_CUP3_ELECTRODE1 1151" calcext:value-type="string">
            <text:p>#define MODBUS_ADDR_SIM_AMPLIFIER_CUP3_ELECTRODE1 1151</text:p>
          </table:table-cell>
          <table:table-cell table:number-columns-repeated="16378"/>
        </table:table-row>
        <table:table-row table:style-name="ro1">
          <table:table-cell table:formula="of:=IF([$List.A199] &lt;&gt;&quot;&quot;; [$List.I199]; &quot;&quot;)" office:value-type="string" office:string-value="SIM_AMPLIFIER_CUP3_ELECTRODE2" calcext:value-type="string">
            <text:p>SIM_AMPLIFIER_CUP3_ELECTRODE2</text:p>
          </table:table-cell>
          <table:table-cell table:formula="of:=IF([$List.A199] &lt;&gt;&quot;&quot;; [$List.A199]; &quot;&quot;)" office:value-type="float" office:value="1152" calcext:value-type="float">
            <text:p>1152</text:p>
          </table:table-cell>
          <table:table-cell/>
          <table:table-cell table:formula="of:=IF([.A199]&lt;&gt;&quot;&quot;; COM.MICROSOFT.CONCAT(&quot;#define MODBUS_ADDR_&quot;; [.A199]; &quot; &quot;; [.B199]); &quot;&quot;)" office:value-type="string" office:string-value="#define MODBUS_ADDR_SIM_AMPLIFIER_CUP3_ELECTRODE2 1152" calcext:value-type="string">
            <text:p>#define MODBUS_ADDR_SIM_AMPLIFIER_CUP3_ELECTRODE2 1152</text:p>
          </table:table-cell>
          <table:table-cell table:number-columns-repeated="16378"/>
        </table:table-row>
        <table:table-row table:style-name="ro1">
          <table:table-cell table:formula="of:=IF([$List.A200] &lt;&gt;&quot;&quot;; [$List.I200]; &quot;&quot;)" office:value-type="string" office:string-value="SIM_AMPLIFIER_CUP3_ELECTRODE3" calcext:value-type="string">
            <text:p>SIM_AMPLIFIER_CUP3_ELECTRODE3</text:p>
          </table:table-cell>
          <table:table-cell table:formula="of:=IF([$List.A200] &lt;&gt;&quot;&quot;; [$List.A200]; &quot;&quot;)" office:value-type="float" office:value="1153" calcext:value-type="float">
            <text:p>1153</text:p>
          </table:table-cell>
          <table:table-cell/>
          <table:table-cell table:formula="of:=IF([.A200]&lt;&gt;&quot;&quot;; COM.MICROSOFT.CONCAT(&quot;#define MODBUS_ADDR_&quot;; [.A200]; &quot; &quot;; [.B200]); &quot;&quot;)" office:value-type="string" office:string-value="#define MODBUS_ADDR_SIM_AMPLIFIER_CUP3_ELECTRODE3 1153" calcext:value-type="string">
            <text:p>#define MODBUS_ADDR_SIM_AMPLIFIER_CUP3_ELECTRODE3 1153</text:p>
          </table:table-cell>
          <table:table-cell table:number-columns-repeated="16378"/>
        </table:table-row>
        <table:table-row table:style-name="ro1">
          <table:table-cell table:formula="of:=IF([$List.A201] &lt;&gt;&quot;&quot;; [$List.I201]; &quot;&quot;)" office:value-type="string" office:string-value="SIM_AMPLIFIER_CUP3_ELECTRODE4" calcext:value-type="string">
            <text:p>SIM_AMPLIFIER_CUP3_ELECTRODE4</text:p>
          </table:table-cell>
          <table:table-cell table:formula="of:=IF([$List.A201] &lt;&gt;&quot;&quot;; [$List.A201]; &quot;&quot;)" office:value-type="float" office:value="1154" calcext:value-type="float">
            <text:p>1154</text:p>
          </table:table-cell>
          <table:table-cell/>
          <table:table-cell table:formula="of:=IF([.A201]&lt;&gt;&quot;&quot;; COM.MICROSOFT.CONCAT(&quot;#define MODBUS_ADDR_&quot;; [.A201]; &quot; &quot;; [.B201]); &quot;&quot;)" office:value-type="string" office:string-value="#define MODBUS_ADDR_SIM_AMPLIFIER_CUP3_ELECTRODE4 1154" calcext:value-type="string">
            <text:p>#define MODBUS_ADDR_SIM_AMPLIFIER_CUP3_ELECTRODE4 1154</text:p>
          </table:table-cell>
          <table:table-cell table:number-columns-repeated="16378"/>
        </table:table-row>
        <table:table-row table:style-name="ro1">
          <table:table-cell table:formula="of:=IF([$List.A202] &lt;&gt;&quot;&quot;; [$List.I202]; &quot;&quot;)">
            <text:p/>
          </table:table-cell>
          <table:table-cell table:formula="of:=IF([$List.A202] &lt;&gt;&quot;&quot;; [$List.A202]; &quot;&quot;)">
            <text:p/>
          </table:table-cell>
          <table:table-cell/>
          <table:table-cell table:formula="of:=IF([.A202]&lt;&gt;&quot;&quot;; COM.MICROSOFT.CONCAT(&quot;#define MODBUS_ADDR_&quot;; [.A202]; &quot; &quot;; [.B202]); &quot;&quot;)">
            <text:p/>
          </table:table-cell>
          <table:table-cell table:number-columns-repeated="16378"/>
        </table:table-row>
        <table:table-row table:style-name="ro1">
          <table:table-cell table:formula="of:=IF([$List.A203] &lt;&gt;&quot;&quot;; [$List.I203]; &quot;&quot;)" office:value-type="string" office:string-value="SIM_AMPLIFIER_RANDOM_RATE" calcext:value-type="string">
            <text:p>SIM_AMPLIFIER_RANDOM_RATE</text:p>
          </table:table-cell>
          <table:table-cell table:formula="of:=IF([$List.A203] &lt;&gt;&quot;&quot;; [$List.A203]; &quot;&quot;)" office:value-type="float" office:value="1155" calcext:value-type="float">
            <text:p>1155</text:p>
          </table:table-cell>
          <table:table-cell/>
          <table:table-cell table:formula="of:=IF([.A203]&lt;&gt;&quot;&quot;; COM.MICROSOFT.CONCAT(&quot;#define MODBUS_ADDR_&quot;; [.A203]; &quot; &quot;; [.B203]); &quot;&quot;)" office:value-type="string" office:string-value="#define MODBUS_ADDR_SIM_AMPLIFIER_RANDOM_RATE 1155" calcext:value-type="string">
            <text:p>#define MODBUS_ADDR_SIM_AMPLIFIER_RANDOM_RATE 1155</text:p>
          </table:table-cell>
          <table:table-cell table:number-columns-repeated="16378"/>
        </table:table-row>
        <table:table-row table:style-name="ro1">
          <table:table-cell table:formula="of:=IF([$List.A204] &lt;&gt;&quot;&quot;; [$List.I204]; &quot;&quot;)" office:value-type="string" office:string-value="SIM_AMPLIFIER_RANDOM_OFFSET" calcext:value-type="string">
            <text:p>SIM_AMPLIFIER_RANDOM_OFFSET</text:p>
          </table:table-cell>
          <table:table-cell table:formula="of:=IF([$List.A204] &lt;&gt;&quot;&quot;; [$List.A204]; &quot;&quot;)" office:value-type="float" office:value="1156" calcext:value-type="float">
            <text:p>1156</text:p>
          </table:table-cell>
          <table:table-cell/>
          <table:table-cell table:formula="of:=IF([.A204]&lt;&gt;&quot;&quot;; COM.MICROSOFT.CONCAT(&quot;#define MODBUS_ADDR_&quot;; [.A204]; &quot; &quot;; [.B204]); &quot;&quot;)" office:value-type="string" office:string-value="#define MODBUS_ADDR_SIM_AMPLIFIER_RANDOM_OFFSET 1156" calcext:value-type="string">
            <text:p>#define MODBUS_ADDR_SIM_AMPLIFIER_RANDOM_OFFSET 1156</text:p>
          </table:table-cell>
          <table:table-cell table:number-columns-repeated="16378"/>
        </table:table-row>
        <table:table-row table:style-name="ro1">
          <table:table-cell table:formula="of:=IF([$List.A205] &lt;&gt;&quot;&quot;; [$List.I205]; &quot;&quot;)">
            <text:p/>
          </table:table-cell>
          <table:table-cell table:formula="of:=IF([$List.A205] &lt;&gt;&quot;&quot;; [$List.A205]; &quot;&quot;)">
            <text:p/>
          </table:table-cell>
          <table:table-cell/>
          <table:table-cell table:formula="of:=IF([.A205]&lt;&gt;&quot;&quot;; COM.MICROSOFT.CONCAT(&quot;#define MODBUS_ADDR_&quot;; [.A205]; &quot; &quot;; [.B205]); &quot;&quot;)">
            <text:p/>
          </table:table-cell>
          <table:table-cell table:number-columns-repeated="16378"/>
        </table:table-row>
        <table:table-row table:style-name="ro1">
          <table:table-cell table:formula="of:=IF([$List.A206] &lt;&gt;&quot;&quot;; [$List.I206]; &quot;&quot;)" office:value-type="string" office:string-value="SIM_EXTERNAL_LOCK_PERIOD" calcext:value-type="string">
            <text:p>SIM_EXTERNAL_LOCK_PERIOD</text:p>
          </table:table-cell>
          <table:table-cell table:formula="of:=IF([$List.A206] &lt;&gt;&quot;&quot;; [$List.A206]; &quot;&quot;)" office:value-type="float" office:value="1157" calcext:value-type="float">
            <text:p>1157</text:p>
          </table:table-cell>
          <table:table-cell/>
          <table:table-cell table:formula="of:=IF([.A206]&lt;&gt;&quot;&quot;; COM.MICROSOFT.CONCAT(&quot;#define MODBUS_ADDR_&quot;; [.A206]; &quot; &quot;; [.B206]); &quot;&quot;)" office:value-type="string" office:string-value="#define MODBUS_ADDR_SIM_EXTERNAL_LOCK_PERIOD 1157" calcext:value-type="string">
            <text:p>#define MODBUS_ADDR_SIM_EXTERNAL_LOCK_PERIOD 1157</text:p>
          </table:table-cell>
          <table:table-cell table:number-columns-repeated="16378"/>
        </table:table-row>
        <table:table-row table:style-name="ro1">
          <table:table-cell table:formula="of:=IF([$List.A207] &lt;&gt;&quot;&quot;; [$List.I207]; &quot;&quot;)" office:value-type="string" office:string-value="SIM_EXTERNAL_LOCK_DURATION" calcext:value-type="string">
            <text:p>SIM_EXTERNAL_LOCK_DURATION</text:p>
          </table:table-cell>
          <table:table-cell table:formula="of:=IF([$List.A207] &lt;&gt;&quot;&quot;; [$List.A207]; &quot;&quot;)" office:value-type="float" office:value="1158" calcext:value-type="float">
            <text:p>1158</text:p>
          </table:table-cell>
          <table:table-cell/>
          <table:table-cell table:formula="of:=IF([.A207]&lt;&gt;&quot;&quot;; COM.MICROSOFT.CONCAT(&quot;#define MODBUS_ADDR_&quot;; [.A207]; &quot; &quot;; [.B207]); &quot;&quot;)" office:value-type="string" office:string-value="#define MODBUS_ADDR_SIM_EXTERNAL_LOCK_DURATION 1158" calcext:value-type="string">
            <text:p>#define MODBUS_ADDR_SIM_EXTERNAL_LOCK_DURATION 1158</text:p>
          </table:table-cell>
          <table:table-cell table:number-columns-repeated="16378"/>
        </table:table-row>
        <table:table-row table:style-name="ro1">
          <table:table-cell table:formula="of:=IF([$List.A208] &lt;&gt;&quot;&quot;; [$List.I208]; &quot;&quot;)" office:value-type="string" office:string-value="SIM_EXTERNAL_LOCK_DELAY" calcext:value-type="string">
            <text:p>SIM_EXTERNAL_LOCK_DELAY</text:p>
          </table:table-cell>
          <table:table-cell table:formula="of:=IF([$List.A208] &lt;&gt;&quot;&quot;; [$List.A208]; &quot;&quot;)" office:value-type="float" office:value="1159" calcext:value-type="float">
            <text:p>1159</text:p>
          </table:table-cell>
          <table:table-cell/>
          <table:table-cell table:formula="of:=IF([.A208]&lt;&gt;&quot;&quot;; COM.MICROSOFT.CONCAT(&quot;#define MODBUS_ADDR_&quot;; [.A208]; &quot; &quot;; [.B208]); &quot;&quot;)" office:value-type="string" office:string-value="#define MODBUS_ADDR_SIM_EXTERNAL_LOCK_DELAY 1159" calcext:value-type="string">
            <text:p>#define MODBUS_ADDR_SIM_EXTERNAL_LOCK_DELAY 1159</text:p>
          </table:table-cell>
          <table:table-cell table:number-columns-repeated="16378"/>
        </table:table-row>
        <table:table-row table:style-name="ro1">
          <table:table-cell table:formula="of:=IF([$List.A209] &lt;&gt;&quot;&quot;; [$List.I209]; &quot;&quot;)">
            <text:p/>
          </table:table-cell>
          <table:table-cell table:formula="of:=IF([$List.A209] &lt;&gt;&quot;&quot;; [$List.A209]; &quot;&quot;)">
            <text:p/>
          </table:table-cell>
          <table:table-cell/>
          <table:table-cell table:formula="of:=IF([.A209]&lt;&gt;&quot;&quot;; COM.MICROSOFT.CONCAT(&quot;#define MODBUS_ADDR_&quot;; [.A209]; &quot; &quot;; [.B209]); &quot;&quot;)">
            <text:p/>
          </table:table-cell>
          <table:table-cell table:number-columns-repeated="16378"/>
        </table:table-row>
        <table:table-row table:style-name="ro1">
          <table:table-cell table:formula="of:=IF([$List.A210] &lt;&gt;&quot;&quot;; [$List.I210]; &quot;&quot;)" office:value-type="string" office:string-value="SIM_EVENT_CODE" calcext:value-type="string">
            <text:p>SIM_EVENT_CODE</text:p>
          </table:table-cell>
          <table:table-cell table:formula="of:=IF([$List.A210] &lt;&gt;&quot;&quot;; [$List.A210]; &quot;&quot;)" office:value-type="float" office:value="1160" calcext:value-type="float">
            <text:p>1160</text:p>
          </table:table-cell>
          <table:table-cell/>
          <table:table-cell table:formula="of:=IF([.A210]&lt;&gt;&quot;&quot;; COM.MICROSOFT.CONCAT(&quot;#define MODBUS_ADDR_&quot;; [.A210]; &quot; &quot;; [.B210]); &quot;&quot;)" office:value-type="string" office:string-value="#define MODBUS_ADDR_SIM_EVENT_CODE 1160" calcext:value-type="string">
            <text:p>#define MODBUS_ADDR_SIM_EVENT_CODE 1160</text:p>
          </table:table-cell>
          <table:table-cell table:number-columns-repeated="16378"/>
        </table:table-row>
        <table:table-row table:style-name="ro1">
          <table:table-cell table:formula="of:=IF([$List.A211] &lt;&gt;&quot;&quot;; [$List.I211]; &quot;&quot;)" office:value-type="string" office:string-value="SIM_EVENT_PERIOD" calcext:value-type="string">
            <text:p>SIM_EVENT_PERIOD</text:p>
          </table:table-cell>
          <table:table-cell table:formula="of:=IF([$List.A211] &lt;&gt;&quot;&quot;; [$List.A211]; &quot;&quot;)" office:value-type="float" office:value="1161" calcext:value-type="float">
            <text:p>1161</text:p>
          </table:table-cell>
          <table:table-cell/>
          <table:table-cell table:formula="of:=IF([.A211]&lt;&gt;&quot;&quot;; COM.MICROSOFT.CONCAT(&quot;#define MODBUS_ADDR_&quot;; [.A211]; &quot; &quot;; [.B211]); &quot;&quot;)" office:value-type="string" office:string-value="#define MODBUS_ADDR_SIM_EVENT_PERIOD 1161" calcext:value-type="string">
            <text:p>#define MODBUS_ADDR_SIM_EVENT_PERIOD 1161</text:p>
          </table:table-cell>
          <table:table-cell table:number-columns-repeated="16378"/>
        </table:table-row>
        <table:table-row table:style-name="ro1">
          <table:table-cell table:formula="of:=IF([$List.A212] &lt;&gt;&quot;&quot;; [$List.I212]; &quot;&quot;)" office:value-type="string" office:string-value="SIM_EVENT_DURATION" calcext:value-type="string">
            <text:p>SIM_EVENT_DURATION</text:p>
          </table:table-cell>
          <table:table-cell table:formula="of:=IF([$List.A212] &lt;&gt;&quot;&quot;; [$List.A212]; &quot;&quot;)" office:value-type="float" office:value="1162" calcext:value-type="float">
            <text:p>1162</text:p>
          </table:table-cell>
          <table:table-cell/>
          <table:table-cell table:formula="of:=IF([.A212]&lt;&gt;&quot;&quot;; COM.MICROSOFT.CONCAT(&quot;#define MODBUS_ADDR_&quot;; [.A212]; &quot; &quot;; [.B212]); &quot;&quot;)" office:value-type="string" office:string-value="#define MODBUS_ADDR_SIM_EVENT_DURATION 1162" calcext:value-type="string">
            <text:p>#define MODBUS_ADDR_SIM_EVENT_DURATION 1162</text:p>
          </table:table-cell>
          <table:table-cell table:number-columns-repeated="16378"/>
        </table:table-row>
        <table:table-row table:style-name="ro1">
          <table:table-cell table:formula="of:=IF([$List.A213] &lt;&gt;&quot;&quot;; [$List.I213]; &quot;&quot;)" office:value-type="string" office:string-value="SIM_EVENT_DELAY" calcext:value-type="string">
            <text:p>SIM_EVENT_DELAY</text:p>
          </table:table-cell>
          <table:table-cell table:formula="of:=IF([$List.A213] &lt;&gt;&quot;&quot;; [$List.A213]; &quot;&quot;)" office:value-type="float" office:value="1163" calcext:value-type="float">
            <text:p>1163</text:p>
          </table:table-cell>
          <table:table-cell/>
          <table:table-cell table:formula="of:=IF([.A213]&lt;&gt;&quot;&quot;; COM.MICROSOFT.CONCAT(&quot;#define MODBUS_ADDR_&quot;; [.A213]; &quot; &quot;; [.B213]); &quot;&quot;)" office:value-type="string" office:string-value="#define MODBUS_ADDR_SIM_EVENT_DELAY 1163" calcext:value-type="string">
            <text:p>#define MODBUS_ADDR_SIM_EVENT_DELAY 1163</text:p>
          </table:table-cell>
          <table:table-cell table:number-columns-repeated="16378"/>
        </table:table-row>
        <table:table-row table:style-name="ro1">
          <table:table-cell table:formula="of:=IF([$List.A214] &lt;&gt;&quot;&quot;; [$List.I214]; &quot;&quot;)">
            <text:p/>
          </table:table-cell>
          <table:table-cell table:formula="of:=IF([$List.A214] &lt;&gt;&quot;&quot;; [$List.A214]; &quot;&quot;)">
            <text:p/>
          </table:table-cell>
          <table:table-cell/>
          <table:table-cell table:formula="of:=IF([.A214]&lt;&gt;&quot;&quot;; COM.MICROSOFT.CONCAT(&quot;#define MODBUS_ADDR_&quot;; [.A214]; &quot; &quot;; [.B214]); &quot;&quot;)">
            <text:p/>
          </table:table-cell>
          <table:table-cell table:number-columns-repeated="16378"/>
        </table:table-row>
        <table:table-row table:style-name="ro1">
          <table:table-cell table:formula="of:=IF([$List.A215] &lt;&gt;&quot;&quot;; [$List.I215]; &quot;&quot;)" office:value-type="string" office:string-value="DEBUG_PRINTOUTS" calcext:value-type="string">
            <text:p>DEBUG_PRINTOUTS</text:p>
          </table:table-cell>
          <table:table-cell table:formula="of:=IF([$List.A215] &lt;&gt;&quot;&quot;; [$List.A215]; &quot;&quot;)" office:value-type="float" office:value="1164" calcext:value-type="float">
            <text:p>1164</text:p>
          </table:table-cell>
          <table:table-cell/>
          <table:table-cell table:formula="of:=IF([.A215]&lt;&gt;&quot;&quot;; COM.MICROSOFT.CONCAT(&quot;#define MODBUS_ADDR_&quot;; [.A215]; &quot; &quot;; [.B215]); &quot;&quot;)" office:value-type="string" office:string-value="#define MODBUS_ADDR_DEBUG_PRINTOUTS 1164" calcext:value-type="string">
            <text:p>#define MODBUS_ADDR_DEBUG_PRINTOUTS 1164</text:p>
          </table:table-cell>
          <table:table-cell table:number-columns-repeated="16378"/>
        </table:table-row>
        <table:table-row table:style-name="ro1">
          <table:table-cell table:formula="of:=IF([$List.A216] &lt;&gt;&quot;&quot;; [$List.I216]; &quot;&quot;)" office:value-type="string" office:string-value="DEBUG_ARGUMENT1" calcext:value-type="string">
            <text:p>DEBUG_ARGUMENT1</text:p>
          </table:table-cell>
          <table:table-cell table:formula="of:=IF([$List.A216] &lt;&gt;&quot;&quot;; [$List.A216]; &quot;&quot;)" office:value-type="float" office:value="1165" calcext:value-type="float">
            <text:p>1165</text:p>
          </table:table-cell>
          <table:table-cell/>
          <table:table-cell table:formula="of:=IF([.A216]&lt;&gt;&quot;&quot;; COM.MICROSOFT.CONCAT(&quot;#define MODBUS_ADDR_&quot;; [.A216]; &quot; &quot;; [.B216]); &quot;&quot;)" office:value-type="string" office:string-value="#define MODBUS_ADDR_DEBUG_ARGUMENT1 1165" calcext:value-type="string">
            <text:p>#define MODBUS_ADDR_DEBUG_ARGUMENT1 1165</text:p>
          </table:table-cell>
          <table:table-cell table:number-columns-repeated="16378"/>
        </table:table-row>
        <table:table-row table:style-name="ro1">
          <table:table-cell table:formula="of:=IF([$List.A217] &lt;&gt;&quot;&quot;; [$List.I217]; &quot;&quot;)">
            <text:p/>
          </table:table-cell>
          <table:table-cell table:formula="of:=IF([$List.A217] &lt;&gt;&quot;&quot;; [$List.A217]; &quot;&quot;)">
            <text:p/>
          </table:table-cell>
          <table:table-cell/>
          <table:table-cell table:formula="of:=IF([.A217]&lt;&gt;&quot;&quot;; COM.MICROSOFT.CONCAT(&quot;#define MODBUS_ADDR_&quot;; [.A217]; &quot; &quot;; [.B217]); &quot;&quot;)">
            <text:p/>
          </table:table-cell>
          <table:table-cell table:number-columns-repeated="16378"/>
        </table:table-row>
        <table:table-row table:style-name="ro1">
          <table:table-cell table:formula="of:=IF([$List.A218] &lt;&gt;&quot;&quot;; [$List.I218]; &quot;&quot;)">
            <text:p/>
          </table:table-cell>
          <table:table-cell table:formula="of:=IF([$List.A218] &lt;&gt;&quot;&quot;; [$List.A218]; &quot;&quot;)">
            <text:p/>
          </table:table-cell>
          <table:table-cell/>
          <table:table-cell table:formula="of:=IF([.A218]&lt;&gt;&quot;&quot;; COM.MICROSOFT.CONCAT(&quot;#define MODBUS_ADDR_&quot;; [.A218]; &quot; &quot;; [.B218]); &quot;&quot;)">
            <text:p/>
          </table:table-cell>
          <table:table-cell table:number-columns-repeated="16378"/>
        </table:table-row>
        <table:table-row table:style-name="ro1">
          <table:table-cell table:formula="of:=IF([$List.A219] &lt;&gt;&quot;&quot;; [$List.I219]; &quot;&quot;)" office:value-type="string" office:string-value="CUP1_CHANNEL1_SAMPLE" calcext:value-type="string">
            <text:p>CUP1_CHANNEL1_SAMPLE</text:p>
          </table:table-cell>
          <table:table-cell table:formula="of:=IF([$List.A219] &lt;&gt;&quot;&quot;; [$List.A219]; &quot;&quot;)" office:value-type="float" office:value="3001" calcext:value-type="float">
            <text:p>3001</text:p>
          </table:table-cell>
          <table:table-cell/>
          <table:table-cell table:formula="of:=IF([.A219]&lt;&gt;&quot;&quot;; COM.MICROSOFT.CONCAT(&quot;#define MODBUS_ADDR_&quot;; [.A219]; &quot; &quot;; [.B219]); &quot;&quot;)" office:value-type="string" office:string-value="#define MODBUS_ADDR_CUP1_CHANNEL1_SAMPLE 3001" calcext:value-type="string">
            <text:p>#define MODBUS_ADDR_CUP1_CHANNEL1_SAMPLE 3001</text:p>
          </table:table-cell>
          <table:table-cell table:number-columns-repeated="16378"/>
        </table:table-row>
        <table:table-row table:style-name="ro1">
          <table:table-cell table:formula="of:=IF([$List.A220] &lt;&gt;&quot;&quot;; [$List.I220]; &quot;&quot;)" office:value-type="string" office:string-value="CUP1_CHANNEL2_SAMPLE" calcext:value-type="string">
            <text:p>CUP1_CHANNEL2_SAMPLE</text:p>
          </table:table-cell>
          <table:table-cell table:formula="of:=IF([$List.A220] &lt;&gt;&quot;&quot;; [$List.A220]; &quot;&quot;)" office:value-type="float" office:value="3002" calcext:value-type="float">
            <text:p>3002</text:p>
          </table:table-cell>
          <table:table-cell/>
          <table:table-cell table:formula="of:=IF([.A220]&lt;&gt;&quot;&quot;; COM.MICROSOFT.CONCAT(&quot;#define MODBUS_ADDR_&quot;; [.A220]; &quot; &quot;; [.B220]); &quot;&quot;)" office:value-type="string" office:string-value="#define MODBUS_ADDR_CUP1_CHANNEL2_SAMPLE 3002" calcext:value-type="string">
            <text:p>#define MODBUS_ADDR_CUP1_CHANNEL2_SAMPLE 3002</text:p>
          </table:table-cell>
          <table:table-cell table:number-columns-repeated="16378"/>
        </table:table-row>
        <table:table-row table:style-name="ro1">
          <table:table-cell table:formula="of:=IF([$List.A221] &lt;&gt;&quot;&quot;; [$List.I221]; &quot;&quot;)" office:value-type="string" office:string-value="CUP1_CHANNEL3_SAMPLE" calcext:value-type="string">
            <text:p>CUP1_CHANNEL3_SAMPLE</text:p>
          </table:table-cell>
          <table:table-cell table:formula="of:=IF([$List.A221] &lt;&gt;&quot;&quot;; [$List.A221]; &quot;&quot;)" office:value-type="float" office:value="3003" calcext:value-type="float">
            <text:p>3003</text:p>
          </table:table-cell>
          <table:table-cell/>
          <table:table-cell table:formula="of:=IF([.A221]&lt;&gt;&quot;&quot;; COM.MICROSOFT.CONCAT(&quot;#define MODBUS_ADDR_&quot;; [.A221]; &quot; &quot;; [.B221]); &quot;&quot;)" office:value-type="string" office:string-value="#define MODBUS_ADDR_CUP1_CHANNEL3_SAMPLE 3003" calcext:value-type="string">
            <text:p>#define MODBUS_ADDR_CUP1_CHANNEL3_SAMPLE 3003</text:p>
          </table:table-cell>
          <table:table-cell table:number-columns-repeated="16378"/>
        </table:table-row>
        <table:table-row table:style-name="ro1">
          <table:table-cell table:formula="of:=IF([$List.A222] &lt;&gt;&quot;&quot;; [$List.I222]; &quot;&quot;)" office:value-type="string" office:string-value="CUP1_CHANNEL4_SAMPLE" calcext:value-type="string">
            <text:p>CUP1_CHANNEL4_SAMPLE</text:p>
          </table:table-cell>
          <table:table-cell table:formula="of:=IF([$List.A222] &lt;&gt;&quot;&quot;; [$List.A222]; &quot;&quot;)" office:value-type="float" office:value="3004" calcext:value-type="float">
            <text:p>3004</text:p>
          </table:table-cell>
          <table:table-cell/>
          <table:table-cell table:formula="of:=IF([.A222]&lt;&gt;&quot;&quot;; COM.MICROSOFT.CONCAT(&quot;#define MODBUS_ADDR_&quot;; [.A222]; &quot; &quot;; [.B222]); &quot;&quot;)" office:value-type="string" office:string-value="#define MODBUS_ADDR_CUP1_CHANNEL4_SAMPLE 3004" calcext:value-type="string">
            <text:p>#define MODBUS_ADDR_CUP1_CHANNEL4_SAMPLE 3004</text:p>
          </table:table-cell>
          <table:table-cell table:number-columns-repeated="16378"/>
        </table:table-row>
        <table:table-row table:style-name="ro1">
          <table:table-cell table:formula="of:=IF([$List.A223] &lt;&gt;&quot;&quot;; [$List.I223]; &quot;&quot;)" office:value-type="string" office:string-value="CUP1_CHANNEL_ERROR" calcext:value-type="string">
            <text:p>CUP1_CHANNEL_ERROR</text:p>
          </table:table-cell>
          <table:table-cell table:formula="of:=IF([$List.A223] &lt;&gt;&quot;&quot;; [$List.A223]; &quot;&quot;)" office:value-type="float" office:value="3005" calcext:value-type="float">
            <text:p>3005</text:p>
          </table:table-cell>
          <table:table-cell/>
          <table:table-cell table:formula="of:=IF([.A223]&lt;&gt;&quot;&quot;; COM.MICROSOFT.CONCAT(&quot;#define MODBUS_ADDR_&quot;; [.A223]; &quot; &quot;; [.B223]); &quot;&quot;)" office:value-type="string" office:string-value="#define MODBUS_ADDR_CUP1_CHANNEL_ERROR 3005" calcext:value-type="string">
            <text:p>#define MODBUS_ADDR_CUP1_CHANNEL_ERROR 3005</text:p>
          </table:table-cell>
          <table:table-cell table:number-columns-repeated="16378"/>
        </table:table-row>
        <table:table-row table:style-name="ro1">
          <table:table-cell table:formula="of:=IF([$List.A224] &lt;&gt;&quot;&quot;; [$List.I224]; &quot;&quot;)">
            <text:p/>
          </table:table-cell>
          <table:table-cell table:formula="of:=IF([$List.A224] &lt;&gt;&quot;&quot;; [$List.A224]; &quot;&quot;)">
            <text:p/>
          </table:table-cell>
          <table:table-cell/>
          <table:table-cell table:formula="of:=IF([.A224]&lt;&gt;&quot;&quot;; COM.MICROSOFT.CONCAT(&quot;#define MODBUS_ADDR_&quot;; [.A224]; &quot; &quot;; [.B224]); &quot;&quot;)">
            <text:p/>
          </table:table-cell>
          <table:table-cell table:number-columns-repeated="16378"/>
        </table:table-row>
        <table:table-row table:style-name="ro1">
          <table:table-cell table:formula="of:=IF([$List.A225] &lt;&gt;&quot;&quot;; [$List.I225]; &quot;&quot;)" office:value-type="string" office:string-value="CUP2_CHANNEL1_SAMPLE" calcext:value-type="string">
            <text:p>CUP2_CHANNEL1_SAMPLE</text:p>
          </table:table-cell>
          <table:table-cell table:formula="of:=IF([$List.A225] &lt;&gt;&quot;&quot;; [$List.A225]; &quot;&quot;)" office:value-type="float" office:value="3006" calcext:value-type="float">
            <text:p>3006</text:p>
          </table:table-cell>
          <table:table-cell/>
          <table:table-cell table:formula="of:=IF([.A225]&lt;&gt;&quot;&quot;; COM.MICROSOFT.CONCAT(&quot;#define MODBUS_ADDR_&quot;; [.A225]; &quot; &quot;; [.B225]); &quot;&quot;)" office:value-type="string" office:string-value="#define MODBUS_ADDR_CUP2_CHANNEL1_SAMPLE 3006" calcext:value-type="string">
            <text:p>#define MODBUS_ADDR_CUP2_CHANNEL1_SAMPLE 3006</text:p>
          </table:table-cell>
          <table:table-cell table:number-columns-repeated="16378"/>
        </table:table-row>
        <table:table-row table:style-name="ro1">
          <table:table-cell table:formula="of:=IF([$List.A226] &lt;&gt;&quot;&quot;; [$List.I226]; &quot;&quot;)" office:value-type="string" office:string-value="CUP2_CHANNEL2_SAMPLE" calcext:value-type="string">
            <text:p>CUP2_CHANNEL2_SAMPLE</text:p>
          </table:table-cell>
          <table:table-cell table:formula="of:=IF([$List.A226] &lt;&gt;&quot;&quot;; [$List.A226]; &quot;&quot;)" office:value-type="float" office:value="3007" calcext:value-type="float">
            <text:p>3007</text:p>
          </table:table-cell>
          <table:table-cell/>
          <table:table-cell table:formula="of:=IF([.A226]&lt;&gt;&quot;&quot;; COM.MICROSOFT.CONCAT(&quot;#define MODBUS_ADDR_&quot;; [.A226]; &quot; &quot;; [.B226]); &quot;&quot;)" office:value-type="string" office:string-value="#define MODBUS_ADDR_CUP2_CHANNEL2_SAMPLE 3007" calcext:value-type="string">
            <text:p>#define MODBUS_ADDR_CUP2_CHANNEL2_SAMPLE 3007</text:p>
          </table:table-cell>
          <table:table-cell table:number-columns-repeated="16378"/>
        </table:table-row>
        <table:table-row table:style-name="ro1">
          <table:table-cell table:formula="of:=IF([$List.A227] &lt;&gt;&quot;&quot;; [$List.I227]; &quot;&quot;)" office:value-type="string" office:string-value="CUP2_CHANNEL3_SAMPLE" calcext:value-type="string">
            <text:p>CUP2_CHANNEL3_SAMPLE</text:p>
          </table:table-cell>
          <table:table-cell table:formula="of:=IF([$List.A227] &lt;&gt;&quot;&quot;; [$List.A227]; &quot;&quot;)" office:value-type="float" office:value="3008" calcext:value-type="float">
            <text:p>3008</text:p>
          </table:table-cell>
          <table:table-cell/>
          <table:table-cell table:formula="of:=IF([.A227]&lt;&gt;&quot;&quot;; COM.MICROSOFT.CONCAT(&quot;#define MODBUS_ADDR_&quot;; [.A227]; &quot; &quot;; [.B227]); &quot;&quot;)" office:value-type="string" office:string-value="#define MODBUS_ADDR_CUP2_CHANNEL3_SAMPLE 3008" calcext:value-type="string">
            <text:p>#define MODBUS_ADDR_CUP2_CHANNEL3_SAMPLE 3008</text:p>
          </table:table-cell>
          <table:table-cell table:number-columns-repeated="16378"/>
        </table:table-row>
        <table:table-row table:style-name="ro1">
          <table:table-cell table:formula="of:=IF([$List.A228] &lt;&gt;&quot;&quot;; [$List.I228]; &quot;&quot;)" office:value-type="string" office:string-value="CUP2_CHANNEL4_SAMPLE" calcext:value-type="string">
            <text:p>CUP2_CHANNEL4_SAMPLE</text:p>
          </table:table-cell>
          <table:table-cell table:formula="of:=IF([$List.A228] &lt;&gt;&quot;&quot;; [$List.A228]; &quot;&quot;)" office:value-type="float" office:value="3009" calcext:value-type="float">
            <text:p>3009</text:p>
          </table:table-cell>
          <table:table-cell/>
          <table:table-cell table:formula="of:=IF([.A228]&lt;&gt;&quot;&quot;; COM.MICROSOFT.CONCAT(&quot;#define MODBUS_ADDR_&quot;; [.A228]; &quot; &quot;; [.B228]); &quot;&quot;)" office:value-type="string" office:string-value="#define MODBUS_ADDR_CUP2_CHANNEL4_SAMPLE 3009" calcext:value-type="string">
            <text:p>#define MODBUS_ADDR_CUP2_CHANNEL4_SAMPLE 3009</text:p>
          </table:table-cell>
          <table:table-cell table:number-columns-repeated="16378"/>
        </table:table-row>
        <table:table-row table:style-name="ro1">
          <table:table-cell table:formula="of:=IF([$List.A229] &lt;&gt;&quot;&quot;; [$List.I229]; &quot;&quot;)" office:value-type="string" office:string-value="CUP2_CHANNEL_ERROR" calcext:value-type="string">
            <text:p>CUP2_CHANNEL_ERROR</text:p>
          </table:table-cell>
          <table:table-cell table:formula="of:=IF([$List.A229] &lt;&gt;&quot;&quot;; [$List.A229]; &quot;&quot;)" office:value-type="float" office:value="3010" calcext:value-type="float">
            <text:p>3010</text:p>
          </table:table-cell>
          <table:table-cell/>
          <table:table-cell table:formula="of:=IF([.A229]&lt;&gt;&quot;&quot;; COM.MICROSOFT.CONCAT(&quot;#define MODBUS_ADDR_&quot;; [.A229]; &quot; &quot;; [.B229]); &quot;&quot;)" office:value-type="string" office:string-value="#define MODBUS_ADDR_CUP2_CHANNEL_ERROR 3010" calcext:value-type="string">
            <text:p>#define MODBUS_ADDR_CUP2_CHANNEL_ERROR 3010</text:p>
          </table:table-cell>
          <table:table-cell table:number-columns-repeated="16378"/>
        </table:table-row>
        <table:table-row table:style-name="ro1">
          <table:table-cell table:formula="of:=IF([$List.A230] &lt;&gt;&quot;&quot;; [$List.I230]; &quot;&quot;)">
            <text:p/>
          </table:table-cell>
          <table:table-cell table:formula="of:=IF([$List.A230] &lt;&gt;&quot;&quot;; [$List.A230]; &quot;&quot;)">
            <text:p/>
          </table:table-cell>
          <table:table-cell/>
          <table:table-cell table:formula="of:=IF([.A230]&lt;&gt;&quot;&quot;; COM.MICROSOFT.CONCAT(&quot;#define MODBUS_ADDR_&quot;; [.A230]; &quot; &quot;; [.B230]); &quot;&quot;)">
            <text:p/>
          </table:table-cell>
          <table:table-cell table:number-columns-repeated="16378"/>
        </table:table-row>
        <table:table-row table:style-name="ro1">
          <table:table-cell table:formula="of:=IF([$List.A231] &lt;&gt;&quot;&quot;; [$List.I231]; &quot;&quot;)" office:value-type="string" office:string-value="CUP3_CHANNEL1_SAMPLE" calcext:value-type="string">
            <text:p>CUP3_CHANNEL1_SAMPLE</text:p>
          </table:table-cell>
          <table:table-cell table:formula="of:=IF([$List.A231] &lt;&gt;&quot;&quot;; [$List.A231]; &quot;&quot;)" office:value-type="float" office:value="3011" calcext:value-type="float">
            <text:p>3011</text:p>
          </table:table-cell>
          <table:table-cell/>
          <table:table-cell table:formula="of:=IF([.A231]&lt;&gt;&quot;&quot;; COM.MICROSOFT.CONCAT(&quot;#define MODBUS_ADDR_&quot;; [.A231]; &quot; &quot;; [.B231]); &quot;&quot;)" office:value-type="string" office:string-value="#define MODBUS_ADDR_CUP3_CHANNEL1_SAMPLE 3011" calcext:value-type="string">
            <text:p>#define MODBUS_ADDR_CUP3_CHANNEL1_SAMPLE 3011</text:p>
          </table:table-cell>
          <table:table-cell table:number-columns-repeated="16378"/>
        </table:table-row>
        <table:table-row table:style-name="ro1">
          <table:table-cell table:formula="of:=IF([$List.A232] &lt;&gt;&quot;&quot;; [$List.I232]; &quot;&quot;)" office:value-type="string" office:string-value="CUP3_CHANNEL2_SAMPLE" calcext:value-type="string">
            <text:p>CUP3_CHANNEL2_SAMPLE</text:p>
          </table:table-cell>
          <table:table-cell table:formula="of:=IF([$List.A232] &lt;&gt;&quot;&quot;; [$List.A232]; &quot;&quot;)" office:value-type="float" office:value="3012" calcext:value-type="float">
            <text:p>3012</text:p>
          </table:table-cell>
          <table:table-cell/>
          <table:table-cell table:formula="of:=IF([.A232]&lt;&gt;&quot;&quot;; COM.MICROSOFT.CONCAT(&quot;#define MODBUS_ADDR_&quot;; [.A232]; &quot; &quot;; [.B232]); &quot;&quot;)" office:value-type="string" office:string-value="#define MODBUS_ADDR_CUP3_CHANNEL2_SAMPLE 3012" calcext:value-type="string">
            <text:p>#define MODBUS_ADDR_CUP3_CHANNEL2_SAMPLE 3012</text:p>
          </table:table-cell>
          <table:table-cell table:number-columns-repeated="16378"/>
        </table:table-row>
        <table:table-row table:style-name="ro1">
          <table:table-cell table:formula="of:=IF([$List.A233] &lt;&gt;&quot;&quot;; [$List.I233]; &quot;&quot;)" office:value-type="string" office:string-value="CUP3_CHANNEL3_SAMPLE" calcext:value-type="string">
            <text:p>CUP3_CHANNEL3_SAMPLE</text:p>
          </table:table-cell>
          <table:table-cell table:formula="of:=IF([$List.A233] &lt;&gt;&quot;&quot;; [$List.A233]; &quot;&quot;)" office:value-type="float" office:value="3013" calcext:value-type="float">
            <text:p>3013</text:p>
          </table:table-cell>
          <table:table-cell/>
          <table:table-cell table:formula="of:=IF([.A233]&lt;&gt;&quot;&quot;; COM.MICROSOFT.CONCAT(&quot;#define MODBUS_ADDR_&quot;; [.A233]; &quot; &quot;; [.B233]); &quot;&quot;)" office:value-type="string" office:string-value="#define MODBUS_ADDR_CUP3_CHANNEL3_SAMPLE 3013" calcext:value-type="string">
            <text:p>#define MODBUS_ADDR_CUP3_CHANNEL3_SAMPLE 3013</text:p>
          </table:table-cell>
          <table:table-cell table:number-columns-repeated="16378"/>
        </table:table-row>
        <table:table-row table:style-name="ro1">
          <table:table-cell table:formula="of:=IF([$List.A234] &lt;&gt;&quot;&quot;; [$List.I234]; &quot;&quot;)" office:value-type="string" office:string-value="CUP3_CHANNEL4_SAMPLE" calcext:value-type="string">
            <text:p>CUP3_CHANNEL4_SAMPLE</text:p>
          </table:table-cell>
          <table:table-cell table:formula="of:=IF([$List.A234] &lt;&gt;&quot;&quot;; [$List.A234]; &quot;&quot;)" office:value-type="float" office:value="3014" calcext:value-type="float">
            <text:p>3014</text:p>
          </table:table-cell>
          <table:table-cell/>
          <table:table-cell table:formula="of:=IF([.A234]&lt;&gt;&quot;&quot;; COM.MICROSOFT.CONCAT(&quot;#define MODBUS_ADDR_&quot;; [.A234]; &quot; &quot;; [.B234]); &quot;&quot;)" office:value-type="string" office:string-value="#define MODBUS_ADDR_CUP3_CHANNEL4_SAMPLE 3014" calcext:value-type="string">
            <text:p>#define MODBUS_ADDR_CUP3_CHANNEL4_SAMPLE 3014</text:p>
          </table:table-cell>
          <table:table-cell table:number-columns-repeated="16378"/>
        </table:table-row>
        <table:table-row table:style-name="ro1">
          <table:table-cell table:formula="of:=IF([$List.A235] &lt;&gt;&quot;&quot;; [$List.I235]; &quot;&quot;)" office:value-type="string" office:string-value="CUP3_CHANNEL_ERROR" calcext:value-type="string">
            <text:p>CUP3_CHANNEL_ERROR</text:p>
          </table:table-cell>
          <table:table-cell table:formula="of:=IF([$List.A235] &lt;&gt;&quot;&quot;; [$List.A235]; &quot;&quot;)" office:value-type="float" office:value="3015" calcext:value-type="float">
            <text:p>3015</text:p>
          </table:table-cell>
          <table:table-cell/>
          <table:table-cell table:formula="of:=IF([.A235]&lt;&gt;&quot;&quot;; COM.MICROSOFT.CONCAT(&quot;#define MODBUS_ADDR_&quot;; [.A235]; &quot; &quot;; [.B235]); &quot;&quot;)" office:value-type="string" office:string-value="#define MODBUS_ADDR_CUP3_CHANNEL_ERROR 3015" calcext:value-type="string">
            <text:p>#define MODBUS_ADDR_CUP3_CHANNEL_ERROR 3015</text:p>
          </table:table-cell>
          <table:table-cell table:number-columns-repeated="16378"/>
        </table:table-row>
        <table:table-row table:style-name="ro1">
          <table:table-cell table:formula="of:=IF([$List.A236] &lt;&gt;&quot;&quot;; [$List.I236]; &quot;&quot;)">
            <text:p/>
          </table:table-cell>
          <table:table-cell table:formula="of:=IF([$List.A236] &lt;&gt;&quot;&quot;; [$List.A236]; &quot;&quot;)">
            <text:p/>
          </table:table-cell>
          <table:table-cell/>
          <table:table-cell table:formula="of:=IF([.A236]&lt;&gt;&quot;&quot;; COM.MICROSOFT.CONCAT(&quot;#define MODBUS_ADDR_&quot;; [.A236]; &quot; &quot;; [.B236]); &quot;&quot;)">
            <text:p/>
          </table:table-cell>
          <table:table-cell table:number-columns-repeated="16378"/>
        </table:table-row>
        <table:table-row table:style-name="ro1">
          <table:table-cell table:formula="of:=IF([$List.A237] &lt;&gt;&quot;&quot;; [$List.I237]; &quot;&quot;)">
            <text:p/>
          </table:table-cell>
          <table:table-cell table:formula="of:=IF([$List.A237] &lt;&gt;&quot;&quot;; [$List.A237]; &quot;&quot;)">
            <text:p/>
          </table:table-cell>
          <table:table-cell/>
          <table:table-cell table:formula="of:=IF([.A237]&lt;&gt;&quot;&quot;; COM.MICROSOFT.CONCAT(&quot;#define MODBUS_ADDR_&quot;; [.A237]; &quot; &quot;; [.B237]); &quot;&quot;)">
            <text:p/>
          </table:table-cell>
          <table:table-cell table:number-columns-repeated="16378"/>
        </table:table-row>
        <table:table-row table:style-name="ro1">
          <table:table-cell table:formula="of:=IF([$List.A238] &lt;&gt;&quot;&quot;; [$List.I238]; &quot;&quot;)">
            <text:p/>
          </table:table-cell>
          <table:table-cell table:formula="of:=IF([$List.A238] &lt;&gt;&quot;&quot;; [$List.A238]; &quot;&quot;)">
            <text:p/>
          </table:table-cell>
          <table:table-cell/>
          <table:table-cell table:formula="of:=IF([.A238]&lt;&gt;&quot;&quot;; COM.MICROSOFT.CONCAT(&quot;#define MODBUS_ADDR_&quot;; [.A238]; &quot; &quot;; [.B238]); &quot;&quot;)">
            <text:p/>
          </table:table-cell>
          <table:table-cell table:number-columns-repeated="16378"/>
        </table:table-row>
        <table:table-row table:style-name="ro1">
          <table:table-cell table:formula="of:=IF([$List.A239] &lt;&gt;&quot;&quot;; [$List.I239]; &quot;&quot;)">
            <text:p/>
          </table:table-cell>
          <table:table-cell table:formula="of:=IF([$List.A239] &lt;&gt;&quot;&quot;; [$List.A239]; &quot;&quot;)">
            <text:p/>
          </table:table-cell>
          <table:table-cell/>
          <table:table-cell table:formula="of:=IF([.A239]&lt;&gt;&quot;&quot;; COM.MICROSOFT.CONCAT(&quot;#define MODBUS_ADDR_&quot;; [.A239]; &quot; &quot;; [.B239]); &quot;&quot;)">
            <text:p/>
          </table:table-cell>
          <table:table-cell table:number-columns-repeated="16378"/>
        </table:table-row>
        <table:table-row table:style-name="ro1">
          <table:table-cell table:formula="of:=IF([$List.A240] &lt;&gt;&quot;&quot;; [$List.I240]; &quot;&quot;)">
            <text:p/>
          </table:table-cell>
          <table:table-cell table:formula="of:=IF([$List.A240] &lt;&gt;&quot;&quot;; [$List.A240]; &quot;&quot;)">
            <text:p/>
          </table:table-cell>
          <table:table-cell/>
          <table:table-cell table:formula="of:=IF([.A240]&lt;&gt;&quot;&quot;; COM.MICROSOFT.CONCAT(&quot;#define MODBUS_ADDR_&quot;; [.A240]; &quot; &quot;; [.B240]); &quot;&quot;)">
            <text:p/>
          </table:table-cell>
          <table:table-cell table:number-columns-repeated="16378"/>
        </table:table-row>
        <table:table-row table:style-name="ro1">
          <table:table-cell table:formula="of:=IF([$List.A241] &lt;&gt;&quot;&quot;; [$List.I241]; &quot;&quot;)">
            <text:p/>
          </table:table-cell>
          <table:table-cell table:formula="of:=IF([$List.A241] &lt;&gt;&quot;&quot;; [$List.A241]; &quot;&quot;)">
            <text:p/>
          </table:table-cell>
          <table:table-cell/>
          <table:table-cell table:formula="of:=IF([.A241]&lt;&gt;&quot;&quot;; COM.MICROSOFT.CONCAT(&quot;#define MODBUS_ADDR_&quot;; [.A241]; &quot; &quot;; [.B241]); &quot;&quot;)">
            <text:p/>
          </table:table-cell>
          <table:table-cell table:number-columns-repeated="16378"/>
        </table:table-row>
        <table:table-row table:style-name="ro1">
          <table:table-cell table:formula="of:=IF([$List.A242] &lt;&gt;&quot;&quot;; [$List.I242]; &quot;&quot;)">
            <text:p/>
          </table:table-cell>
          <table:table-cell table:formula="of:=IF([$List.A242] &lt;&gt;&quot;&quot;; [$List.A242]; &quot;&quot;)">
            <text:p/>
          </table:table-cell>
          <table:table-cell/>
          <table:table-cell table:formula="of:=IF([.A242]&lt;&gt;&quot;&quot;; COM.MICROSOFT.CONCAT(&quot;#define MODBUS_ADDR_&quot;; [.A242]; &quot; &quot;; [.B242]); &quot;&quot;)">
            <text:p/>
          </table:table-cell>
          <table:table-cell table:number-columns-repeated="16378"/>
        </table:table-row>
        <table:table-row table:style-name="ro1">
          <table:table-cell table:formula="of:=IF([$List.A243] &lt;&gt;&quot;&quot;; [$List.I243]; &quot;&quot;)">
            <text:p/>
          </table:table-cell>
          <table:table-cell table:formula="of:=IF([$List.A243] &lt;&gt;&quot;&quot;; [$List.A243]; &quot;&quot;)">
            <text:p/>
          </table:table-cell>
          <table:table-cell/>
          <table:table-cell table:formula="of:=IF([.A243]&lt;&gt;&quot;&quot;; COM.MICROSOFT.CONCAT(&quot;#define MODBUS_ADDR_&quot;; [.A243]; &quot; &quot;; [.B243]); &quot;&quot;)">
            <text:p/>
          </table:table-cell>
          <table:table-cell table:number-columns-repeated="16378"/>
        </table:table-row>
        <table:table-row table:style-name="ro1">
          <table:table-cell table:formula="of:=IF([$List.A244] &lt;&gt;&quot;&quot;; [$List.I244]; &quot;&quot;)">
            <text:p/>
          </table:table-cell>
          <table:table-cell table:formula="of:=IF([$List.A244] &lt;&gt;&quot;&quot;; [$List.A244]; &quot;&quot;)">
            <text:p/>
          </table:table-cell>
          <table:table-cell/>
          <table:table-cell table:formula="of:=IF([.A244]&lt;&gt;&quot;&quot;; COM.MICROSOFT.CONCAT(&quot;#define MODBUS_ADDR_&quot;; [.A244]; &quot; &quot;; [.B244]); &quot;&quot;)">
            <text:p/>
          </table:table-cell>
          <table:table-cell table:number-columns-repeated="16378"/>
        </table:table-row>
        <table:table-row table:style-name="ro1">
          <table:table-cell table:formula="of:=IF([$List.A245] &lt;&gt;&quot;&quot;; [$List.I245]; &quot;&quot;)">
            <text:p/>
          </table:table-cell>
          <table:table-cell table:formula="of:=IF([$List.A245] &lt;&gt;&quot;&quot;; [$List.A245]; &quot;&quot;)">
            <text:p/>
          </table:table-cell>
          <table:table-cell/>
          <table:table-cell table:formula="of:=IF([.A245]&lt;&gt;&quot;&quot;; COM.MICROSOFT.CONCAT(&quot;#define MODBUS_ADDR_&quot;; [.A245]; &quot; &quot;; [.B245]); &quot;&quot;)">
            <text:p/>
          </table:table-cell>
          <table:table-cell table:number-columns-repeated="16378"/>
        </table:table-row>
        <table:table-row table:style-name="ro1">
          <table:table-cell table:formula="of:=IF([$List.A246] &lt;&gt;&quot;&quot;; [$List.I246]; &quot;&quot;)">
            <text:p/>
          </table:table-cell>
          <table:table-cell table:formula="of:=IF([$List.A246] &lt;&gt;&quot;&quot;; [$List.A246]; &quot;&quot;)">
            <text:p/>
          </table:table-cell>
          <table:table-cell/>
          <table:table-cell table:formula="of:=IF([.A246]&lt;&gt;&quot;&quot;; COM.MICROSOFT.CONCAT(&quot;#define MODBUS_ADDR_&quot;; [.A246]; &quot; &quot;; [.B246]); &quot;&quot;)">
            <text:p/>
          </table:table-cell>
          <table:table-cell table:number-columns-repeated="16378"/>
        </table:table-row>
        <table:table-row table:style-name="ro1">
          <table:table-cell table:formula="of:=IF([$List.A247] &lt;&gt;&quot;&quot;; [$List.I247]; &quot;&quot;)">
            <text:p/>
          </table:table-cell>
          <table:table-cell table:formula="of:=IF([$List.A247] &lt;&gt;&quot;&quot;; [$List.A247]; &quot;&quot;)">
            <text:p/>
          </table:table-cell>
          <table:table-cell/>
          <table:table-cell table:formula="of:=IF([.A247]&lt;&gt;&quot;&quot;; COM.MICROSOFT.CONCAT(&quot;#define MODBUS_ADDR_&quot;; [.A247]; &quot; &quot;; [.B247]); &quot;&quot;)">
            <text:p/>
          </table:table-cell>
          <table:table-cell table:number-columns-repeated="16378"/>
        </table:table-row>
        <table:table-row table:style-name="ro1">
          <table:table-cell table:formula="of:=IF([$List.A248] &lt;&gt;&quot;&quot;; [$List.I248]; &quot;&quot;)">
            <text:p/>
          </table:table-cell>
          <table:table-cell table:formula="of:=IF([$List.A248] &lt;&gt;&quot;&quot;; [$List.A248]; &quot;&quot;)">
            <text:p/>
          </table:table-cell>
          <table:table-cell/>
          <table:table-cell table:formula="of:=IF([.A248]&lt;&gt;&quot;&quot;; COM.MICROSOFT.CONCAT(&quot;#define MODBUS_ADDR_&quot;; [.A248]; &quot; &quot;; [.B248]); &quot;&quot;)">
            <text:p/>
          </table:table-cell>
          <table:table-cell table:number-columns-repeated="16378"/>
        </table:table-row>
        <table:table-row table:style-name="ro1">
          <table:table-cell table:formula="of:=IF([$List.A249] &lt;&gt;&quot;&quot;; [$List.I249]; &quot;&quot;)">
            <text:p/>
          </table:table-cell>
          <table:table-cell table:formula="of:=IF([$List.A249] &lt;&gt;&quot;&quot;; [$List.A249]; &quot;&quot;)">
            <text:p/>
          </table:table-cell>
          <table:table-cell/>
          <table:table-cell table:formula="of:=IF([.A249]&lt;&gt;&quot;&quot;; COM.MICROSOFT.CONCAT(&quot;#define MODBUS_ADDR_&quot;; [.A249]; &quot; &quot;; [.B249]); &quot;&quot;)">
            <text:p/>
          </table:table-cell>
          <table:table-cell table:number-columns-repeated="16378"/>
        </table:table-row>
        <table:table-row table:style-name="ro1">
          <table:table-cell table:formula="of:=IF([$List.A250] &lt;&gt;&quot;&quot;; [$List.I250]; &quot;&quot;)">
            <text:p/>
          </table:table-cell>
          <table:table-cell table:formula="of:=IF([$List.A250] &lt;&gt;&quot;&quot;; [$List.A250]; &quot;&quot;)">
            <text:p/>
          </table:table-cell>
          <table:table-cell/>
          <table:table-cell table:formula="of:=IF([.A250]&lt;&gt;&quot;&quot;; COM.MICROSOFT.CONCAT(&quot;#define MODBUS_ADDR_&quot;; [.A250]; &quot; &quot;; [.B250]); &quot;&quot;)">
            <text:p/>
          </table:table-cell>
          <table:table-cell table:number-columns-repeated="16378"/>
        </table:table-row>
        <table:table-row table:style-name="ro1" table:number-rows-repeated="1048325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Initializations" table:style-name="ta1"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ce17"/>
        <table:table-column table:style-name="co19" table:default-cell-style-name="Default"/>
        <table:table-column table:style-name="co20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style-name="ce17" table:formula="of:=[$List.B3]" office:value-type="string" office:string-value="coil" calcext:value-type="string">
            <text:p>coil</text:p>
          </table:table-cell>
          <table:table-cell table:style-name="ce17" table:formula="of:=[$List.I3]" office:value-type="string" office:string-value="CUP1_CONTROL" calcext:value-type="string">
            <text:p>CUP1_CONTROL</text:p>
          </table:table-cell>
          <table:table-cell table:style-name="ce17" table:formula="of:=[$List.G3]" office:value-type="string" office:string-value="true" calcext:value-type="string">
            <text:p>true</text:p>
          </table:table-cell>
          <table:table-cell table:formula="of:=IF(AND(([.A3]=&quot;coil&quot;);([.C3]=&quot;true&quot;)); 1; &quot;&quot;)" office:value-type="float" office:value="1" calcext:value-type="float">
            <text:p>1</text:p>
          </table:table-cell>
          <table:table-cell table:formula="of:=IF(AND(([.A3]=&quot;holding reg.&quot;);([.C3] &lt;&gt; 0)); 1; &quot;&quot;)">
            <text:p/>
          </table:table-cell>
          <table:table-cell/>
          <table:table-cell table:formula="of:=IF([.D3]=1; COM.MICROSOFT.CONCAT(&quot;ModbusCoils[coilIndexFromAddress(MODBUS_ADDR_&quot;; [.B3]; &quot;)] = &quot;; [.C3]; &quot;;&quot;); IF([.E3]=1; COM.MICROSOFT.CONCAT(&quot;ModbusHoldingRegisters[holdingIndexFromAddress(MODBUS_ADDR_&quot;; [.B3]; &quot;)] = &quot;; [.C3]; &quot;u;&quot;); &quot;&quot;))" office:value-type="string" office:string-value="ModbusCoils[coilIndexFromAddress(MODBUS_ADDR_CUP1_CONTROL)] = true;" calcext:value-type="string">
            <text:p>ModbusCoils[coilIndexFromAddress(MODBUS_ADDR_CUP1_CONTROL)] = true;</text:p>
          </table:table-cell>
        </table:table-row>
        <table:table-row table:style-name="ro1">
          <table:table-cell table:style-name="ce17" table:formula="of:=[$List.B4]" office:value-type="string" office:string-value="coil" calcext:value-type="string">
            <text:p>coil</text:p>
          </table:table-cell>
          <table:table-cell table:style-name="ce17" table:formula="of:=[$List.I4]" office:value-type="string" office:string-value="EXTERNAL_INHIBITION1" calcext:value-type="string">
            <text:p>EXTERNAL_INHIBITION1</text:p>
          </table:table-cell>
          <table:table-cell table:style-name="ce17" table:formula="of:=[$List.G4]" office:value-type="string" office:string-value="false" calcext:value-type="string">
            <text:p>false</text:p>
          </table:table-cell>
          <table:table-cell table:formula="of:=IF(AND(([.A4]=&quot;coil&quot;);([.C4]=&quot;true&quot;)); 1; &quot;&quot;)">
            <text:p/>
          </table:table-cell>
          <table:table-cell table:formula="of:=IF(AND(([.A4]=&quot;holding reg.&quot;);([.C4] &lt;&gt; 0)); 1; &quot;&quot;)">
            <text:p/>
          </table:table-cell>
          <table:table-cell/>
          <table:table-cell table:formula="of:=IF([.D4]=1; COM.MICROSOFT.CONCAT(&quot;ModbusCoils[coilIndexFromAddress(MODBUS_ADDR_&quot;; [.B4]; &quot;)] = &quot;; [.C4]; &quot;;&quot;); IF([.E4]=1; COM.MICROSOFT.CONCAT(&quot;ModbusHoldingRegisters[holdingIndexFromAddress(MODBUS_ADDR_&quot;; [.B4]; &quot;)] = &quot;; [.C4]; &quot;u;&quot;); &quot;&quot;))">
            <text:p/>
          </table:table-cell>
        </table:table-row>
        <table:table-row table:style-name="ro1">
          <table:table-cell table:style-name="ce17" table:formula="of:=[$List.B5]" office:value-type="string" office:string-value="coil" calcext:value-type="string">
            <text:p>coil</text:p>
          </table:table-cell>
          <table:table-cell table:style-name="ce17" table:formula="of:=[$List.I5]" office:value-type="string" office:string-value="CUP1_SWITCH" calcext:value-type="string">
            <text:p>CUP1_SWITCH</text:p>
          </table:table-cell>
          <table:table-cell table:style-name="ce17" table:formula="of:=[$List.G5]" office:value-type="string" office:string-value="true" calcext:value-type="string">
            <text:p>true</text:p>
          </table:table-cell>
          <table:table-cell table:formula="of:=IF(AND(([.A5]=&quot;coil&quot;);([.C5]=&quot;true&quot;)); 1; &quot;&quot;)" office:value-type="float" office:value="1" calcext:value-type="float">
            <text:p>1</text:p>
          </table:table-cell>
          <table:table-cell table:formula="of:=IF(AND(([.A5]=&quot;holding reg.&quot;);([.C5] &lt;&gt; 0)); 1; &quot;&quot;)">
            <text:p/>
          </table:table-cell>
          <table:table-cell/>
          <table:table-cell table:formula="of:=IF([.D5]=1; COM.MICROSOFT.CONCAT(&quot;ModbusCoils[coilIndexFromAddress(MODBUS_ADDR_&quot;; [.B5]; &quot;)] = &quot;; [.C5]; &quot;;&quot;); IF([.E5]=1; COM.MICROSOFT.CONCAT(&quot;ModbusHoldingRegisters[holdingIndexFromAddress(MODBUS_ADDR_&quot;; [.B5]; &quot;)] = &quot;; [.C5]; &quot;u;&quot;); &quot;&quot;))" office:value-type="string" office:string-value="ModbusCoils[coilIndexFromAddress(MODBUS_ADDR_CUP1_SWITCH)] = true;" calcext:value-type="string">
            <text:p>ModbusCoils[coilIndexFromAddress(MODBUS_ADDR_CUP1_SWITCH)] = true;</text:p>
          </table:table-cell>
        </table:table-row>
        <table:table-row table:style-name="ro1">
          <table:table-cell table:style-name="ce17" table:formula="of:=[$List.B6]" office:value-type="string" office:string-value="coil" calcext:value-type="string">
            <text:p>coil</text:p>
          </table:table-cell>
          <table:table-cell table:style-name="ce17" table:formula="of:=[$List.I6]">
            <text:p/>
          </table:table-cell>
          <table:table-cell table:style-name="ce17" table:formula="of:=[$List.G6]" office:value-type="string" office:string-value="false" calcext:value-type="string">
            <text:p>false</text:p>
          </table:table-cell>
          <table:table-cell table:formula="of:=IF(AND(([.A6]=&quot;coil&quot;);([.C6]=&quot;true&quot;)); 1; &quot;&quot;)">
            <text:p/>
          </table:table-cell>
          <table:table-cell table:formula="of:=IF(AND(([.A6]=&quot;holding reg.&quot;);([.C6] &lt;&gt; 0)); 1; &quot;&quot;)">
            <text:p/>
          </table:table-cell>
          <table:table-cell/>
          <table:table-cell table:formula="of:=IF([.D6]=1; COM.MICROSOFT.CONCAT(&quot;ModbusCoils[coilIndexFromAddress(MODBUS_ADDR_&quot;; [.B6]; &quot;)] = &quot;; [.C6]; &quot;;&quot;); IF([.E6]=1; COM.MICROSOFT.CONCAT(&quot;ModbusHoldingRegisters[holdingIndexFromAddress(MODBUS_ADDR_&quot;; [.B6]; &quot;)] = &quot;; [.C6]; &quot;u;&quot;); &quot;&quot;))">
            <text:p/>
          </table:table-cell>
        </table:table-row>
        <table:table-row table:style-name="ro1">
          <table:table-cell table:style-name="ce17" table:formula="of:=[$List.B7]" office:value-type="float" office:value="0" calcext:value-type="float">
            <text:p>0</text:p>
          </table:table-cell>
          <table:table-cell table:style-name="ce17" table:formula="of:=[$List.I7]">
            <text:p/>
          </table:table-cell>
          <table:table-cell table:style-name="ce17" table:formula="of:=[$List.G7]" office:value-type="float" office:value="0" calcext:value-type="float">
            <text:p>0</text:p>
          </table:table-cell>
          <table:table-cell table:formula="of:=IF(AND(([.A7]=&quot;coil&quot;);([.C7]=&quot;true&quot;)); 1; &quot;&quot;)">
            <text:p/>
          </table:table-cell>
          <table:table-cell table:formula="of:=IF(AND(([.A7]=&quot;holding reg.&quot;);([.C7] &lt;&gt; 0)); 1; &quot;&quot;)">
            <text:p/>
          </table:table-cell>
          <table:table-cell/>
          <table:table-cell table:formula="of:=IF([.D7]=1; COM.MICROSOFT.CONCAT(&quot;ModbusCoils[coilIndexFromAddress(MODBUS_ADDR_&quot;; [.B7]; &quot;)] = &quot;; [.C7]; &quot;;&quot;); IF([.E7]=1; COM.MICROSOFT.CONCAT(&quot;ModbusHoldingRegisters[holdingIndexFromAddress(MODBUS_ADDR_&quot;; [.B7]; &quot;)] = &quot;; [.C7]; &quot;u;&quot;); &quot;&quot;))">
            <text:p/>
          </table:table-cell>
        </table:table-row>
        <table:table-row table:style-name="ro1">
          <table:table-cell table:style-name="ce17" table:formula="of:=[$List.B8]" office:value-type="string" office:string-value="coil" calcext:value-type="string">
            <text:p>coil</text:p>
          </table:table-cell>
          <table:table-cell table:style-name="ce17" table:formula="of:=[$List.I8]" office:value-type="string" office:string-value="CUP2_CONTROL" calcext:value-type="string">
            <text:p>CUP2_CONTROL</text:p>
          </table:table-cell>
          <table:table-cell table:style-name="ce17" table:formula="of:=[$List.G8]" office:value-type="string" office:string-value="true" calcext:value-type="string">
            <text:p>true</text:p>
          </table:table-cell>
          <table:table-cell table:formula="of:=IF(AND(([.A8]=&quot;coil&quot;);([.C8]=&quot;true&quot;)); 1; &quot;&quot;)" office:value-type="float" office:value="1" calcext:value-type="float">
            <text:p>1</text:p>
          </table:table-cell>
          <table:table-cell table:formula="of:=IF(AND(([.A8]=&quot;holding reg.&quot;);([.C8] &lt;&gt; 0)); 1; &quot;&quot;)">
            <text:p/>
          </table:table-cell>
          <table:table-cell/>
          <table:table-cell table:formula="of:=IF([.D8]=1; COM.MICROSOFT.CONCAT(&quot;ModbusCoils[coilIndexFromAddress(MODBUS_ADDR_&quot;; [.B8]; &quot;)] = &quot;; [.C8]; &quot;;&quot;); IF([.E8]=1; COM.MICROSOFT.CONCAT(&quot;ModbusHoldingRegisters[holdingIndexFromAddress(MODBUS_ADDR_&quot;; [.B8]; &quot;)] = &quot;; [.C8]; &quot;u;&quot;); &quot;&quot;))" office:value-type="string" office:string-value="ModbusCoils[coilIndexFromAddress(MODBUS_ADDR_CUP2_CONTROL)] = true;" calcext:value-type="string">
            <text:p>ModbusCoils[coilIndexFromAddress(MODBUS_ADDR_CUP2_CONTROL)] = true;</text:p>
          </table:table-cell>
        </table:table-row>
        <table:table-row table:style-name="ro1">
          <table:table-cell table:style-name="ce17" table:formula="of:=[$List.B9]" office:value-type="string" office:string-value="coil" calcext:value-type="string">
            <text:p>coil</text:p>
          </table:table-cell>
          <table:table-cell table:style-name="ce17" table:formula="of:=[$List.I9]" office:value-type="string" office:string-value="EXTERNAL_INHIBITION2" calcext:value-type="string">
            <text:p>EXTERNAL_INHIBITION2</text:p>
          </table:table-cell>
          <table:table-cell table:style-name="ce17" table:formula="of:=[$List.G9]" office:value-type="string" office:string-value="false" calcext:value-type="string">
            <text:p>false</text:p>
          </table:table-cell>
          <table:table-cell table:formula="of:=IF(AND(([.A9]=&quot;coil&quot;);([.C9]=&quot;true&quot;)); 1; &quot;&quot;)">
            <text:p/>
          </table:table-cell>
          <table:table-cell table:formula="of:=IF(AND(([.A9]=&quot;holding reg.&quot;);([.C9] &lt;&gt; 0)); 1; &quot;&quot;)">
            <text:p/>
          </table:table-cell>
          <table:table-cell/>
          <table:table-cell table:formula="of:=IF([.D9]=1; COM.MICROSOFT.CONCAT(&quot;ModbusCoils[coilIndexFromAddress(MODBUS_ADDR_&quot;; [.B9]; &quot;)] = &quot;; [.C9]; &quot;;&quot;); IF([.E9]=1; COM.MICROSOFT.CONCAT(&quot;ModbusHoldingRegisters[holdingIndexFromAddress(MODBUS_ADDR_&quot;; [.B9]; &quot;)] = &quot;; [.C9]; &quot;u;&quot;); &quot;&quot;))">
            <text:p/>
          </table:table-cell>
        </table:table-row>
        <table:table-row table:style-name="ro1">
          <table:table-cell table:style-name="ce17" table:formula="of:=[$List.B10]" office:value-type="string" office:string-value="coil" calcext:value-type="string">
            <text:p>coil</text:p>
          </table:table-cell>
          <table:table-cell table:style-name="ce17" table:formula="of:=[$List.I10]" office:value-type="string" office:string-value="CUP2_SWITCH" calcext:value-type="string">
            <text:p>CUP2_SWITCH</text:p>
          </table:table-cell>
          <table:table-cell table:style-name="ce17" table:formula="of:=[$List.G10]" office:value-type="string" office:string-value="true" calcext:value-type="string">
            <text:p>true</text:p>
          </table:table-cell>
          <table:table-cell table:formula="of:=IF(AND(([.A10]=&quot;coil&quot;);([.C10]=&quot;true&quot;)); 1; &quot;&quot;)" office:value-type="float" office:value="1" calcext:value-type="float">
            <text:p>1</text:p>
          </table:table-cell>
          <table:table-cell table:formula="of:=IF(AND(([.A10]=&quot;holding reg.&quot;);([.C10] &lt;&gt; 0)); 1; &quot;&quot;)">
            <text:p/>
          </table:table-cell>
          <table:table-cell/>
          <table:table-cell table:formula="of:=IF([.D10]=1; COM.MICROSOFT.CONCAT(&quot;ModbusCoils[coilIndexFromAddress(MODBUS_ADDR_&quot;; [.B10]; &quot;)] = &quot;; [.C10]; &quot;;&quot;); IF([.E10]=1; COM.MICROSOFT.CONCAT(&quot;ModbusHoldingRegisters[holdingIndexFromAddress(MODBUS_ADDR_&quot;; [.B10]; &quot;)] = &quot;; [.C10]; &quot;u;&quot;); &quot;&quot;))" office:value-type="string" office:string-value="ModbusCoils[coilIndexFromAddress(MODBUS_ADDR_CUP2_SWITCH)] = true;" calcext:value-type="string">
            <text:p>ModbusCoils[coilIndexFromAddress(MODBUS_ADDR_CUP2_SWITCH)] = true;</text:p>
          </table:table-cell>
        </table:table-row>
        <table:table-row table:style-name="ro1">
          <table:table-cell table:style-name="ce17" table:formula="of:=[$List.B11]" office:value-type="string" office:string-value="coil" calcext:value-type="string">
            <text:p>coil</text:p>
          </table:table-cell>
          <table:table-cell table:style-name="ce17" table:formula="of:=[$List.I11]">
            <text:p/>
          </table:table-cell>
          <table:table-cell table:style-name="ce17" table:formula="of:=[$List.G11]" office:value-type="string" office:string-value="false" calcext:value-type="string">
            <text:p>false</text:p>
          </table:table-cell>
          <table:table-cell table:formula="of:=IF(AND(([.A11]=&quot;coil&quot;);([.C11]=&quot;true&quot;)); 1; &quot;&quot;)">
            <text:p/>
          </table:table-cell>
          <table:table-cell table:formula="of:=IF(AND(([.A11]=&quot;holding reg.&quot;);([.C11] &lt;&gt; 0)); 1; &quot;&quot;)">
            <text:p/>
          </table:table-cell>
          <table:table-cell/>
          <table:table-cell table:formula="of:=IF([.D11]=1; COM.MICROSOFT.CONCAT(&quot;ModbusCoils[coilIndexFromAddress(MODBUS_ADDR_&quot;; [.B11]; &quot;)] = &quot;; [.C11]; &quot;;&quot;); IF([.E11]=1; COM.MICROSOFT.CONCAT(&quot;ModbusHoldingRegisters[holdingIndexFromAddress(MODBUS_ADDR_&quot;; [.B11]; &quot;)] = &quot;; [.C11]; &quot;u;&quot;); &quot;&quot;))">
            <text:p/>
          </table:table-cell>
        </table:table-row>
        <table:table-row table:style-name="ro1">
          <table:table-cell table:style-name="ce17" table:formula="of:=[$List.B12]" office:value-type="float" office:value="0" calcext:value-type="float">
            <text:p>0</text:p>
          </table:table-cell>
          <table:table-cell table:style-name="ce17" table:formula="of:=[$List.I12]">
            <text:p/>
          </table:table-cell>
          <table:table-cell table:style-name="ce17" table:formula="of:=[$List.G12]" office:value-type="float" office:value="0" calcext:value-type="float">
            <text:p>0</text:p>
          </table:table-cell>
          <table:table-cell table:formula="of:=IF(AND(([.A12]=&quot;coil&quot;);([.C12]=&quot;true&quot;)); 1; &quot;&quot;)">
            <text:p/>
          </table:table-cell>
          <table:table-cell table:formula="of:=IF(AND(([.A12]=&quot;holding reg.&quot;);([.C12] &lt;&gt; 0)); 1; &quot;&quot;)">
            <text:p/>
          </table:table-cell>
          <table:table-cell/>
          <table:table-cell table:formula="of:=IF([.D12]=1; COM.MICROSOFT.CONCAT(&quot;ModbusCoils[coilIndexFromAddress(MODBUS_ADDR_&quot;; [.B12]; &quot;)] = &quot;; [.C12]; &quot;;&quot;); IF([.E12]=1; COM.MICROSOFT.CONCAT(&quot;ModbusHoldingRegisters[holdingIndexFromAddress(MODBUS_ADDR_&quot;; [.B12]; &quot;)] = &quot;; [.C12]; &quot;u;&quot;); &quot;&quot;))">
            <text:p/>
          </table:table-cell>
        </table:table-row>
        <table:table-row table:style-name="ro1">
          <table:table-cell table:style-name="ce17" table:formula="of:=[$List.B13]" office:value-type="string" office:string-value="coil" calcext:value-type="string">
            <text:p>coil</text:p>
          </table:table-cell>
          <table:table-cell table:style-name="ce17" table:formula="of:=[$List.I13]" office:value-type="string" office:string-value="CUP3_CONTROL" calcext:value-type="string">
            <text:p>CUP3_CONTROL</text:p>
          </table:table-cell>
          <table:table-cell table:style-name="ce17" table:formula="of:=[$List.G13]" office:value-type="string" office:string-value="true" calcext:value-type="string">
            <text:p>true</text:p>
          </table:table-cell>
          <table:table-cell table:formula="of:=IF(AND(([.A13]=&quot;coil&quot;);([.C13]=&quot;true&quot;)); 1; &quot;&quot;)" office:value-type="float" office:value="1" calcext:value-type="float">
            <text:p>1</text:p>
          </table:table-cell>
          <table:table-cell table:formula="of:=IF(AND(([.A13]=&quot;holding reg.&quot;);([.C13] &lt;&gt; 0)); 1; &quot;&quot;)">
            <text:p/>
          </table:table-cell>
          <table:table-cell/>
          <table:table-cell table:formula="of:=IF([.D13]=1; COM.MICROSOFT.CONCAT(&quot;ModbusCoils[coilIndexFromAddress(MODBUS_ADDR_&quot;; [.B13]; &quot;)] = &quot;; [.C13]; &quot;;&quot;); IF([.E13]=1; COM.MICROSOFT.CONCAT(&quot;ModbusHoldingRegisters[holdingIndexFromAddress(MODBUS_ADDR_&quot;; [.B13]; &quot;)] = &quot;; [.C13]; &quot;u;&quot;); &quot;&quot;))" office:value-type="string" office:string-value="ModbusCoils[coilIndexFromAddress(MODBUS_ADDR_CUP3_CONTROL)] = true;" calcext:value-type="string">
            <text:p>ModbusCoils[coilIndexFromAddress(MODBUS_ADDR_CUP3_CONTROL)] = true;</text:p>
          </table:table-cell>
        </table:table-row>
        <table:table-row table:style-name="ro1">
          <table:table-cell table:style-name="ce17" table:formula="of:=[$List.B14]" office:value-type="string" office:string-value="coil" calcext:value-type="string">
            <text:p>coil</text:p>
          </table:table-cell>
          <table:table-cell table:style-name="ce17" table:formula="of:=[$List.I14]" office:value-type="string" office:string-value="EXTERNAL_INHIBITION3" calcext:value-type="string">
            <text:p>EXTERNAL_INHIBITION3</text:p>
          </table:table-cell>
          <table:table-cell table:style-name="ce17" table:formula="of:=[$List.G14]" office:value-type="string" office:string-value="false" calcext:value-type="string">
            <text:p>false</text:p>
          </table:table-cell>
          <table:table-cell table:formula="of:=IF(AND(([.A14]=&quot;coil&quot;);([.C14]=&quot;true&quot;)); 1; &quot;&quot;)">
            <text:p/>
          </table:table-cell>
          <table:table-cell table:formula="of:=IF(AND(([.A14]=&quot;holding reg.&quot;);([.C14] &lt;&gt; 0)); 1; &quot;&quot;)">
            <text:p/>
          </table:table-cell>
          <table:table-cell/>
          <table:table-cell table:formula="of:=IF([.D14]=1; COM.MICROSOFT.CONCAT(&quot;ModbusCoils[coilIndexFromAddress(MODBUS_ADDR_&quot;; [.B14]; &quot;)] = &quot;; [.C14]; &quot;;&quot;); IF([.E14]=1; COM.MICROSOFT.CONCAT(&quot;ModbusHoldingRegisters[holdingIndexFromAddress(MODBUS_ADDR_&quot;; [.B14]; &quot;)] = &quot;; [.C14]; &quot;u;&quot;); &quot;&quot;))">
            <text:p/>
          </table:table-cell>
        </table:table-row>
        <table:table-row table:style-name="ro1">
          <table:table-cell table:style-name="ce17" table:formula="of:=[$List.B15]" office:value-type="string" office:string-value="coil" calcext:value-type="string">
            <text:p>coil</text:p>
          </table:table-cell>
          <table:table-cell table:style-name="ce17" table:formula="of:=[$List.I15]" office:value-type="string" office:string-value="CUP3_SWITCH_A" calcext:value-type="string">
            <text:p>CUP3_SWITCH_A</text:p>
          </table:table-cell>
          <table:table-cell table:style-name="ce17" table:formula="of:=[$List.G15]" office:value-type="string" office:string-value="false" calcext:value-type="string">
            <text:p>false</text:p>
          </table:table-cell>
          <table:table-cell table:formula="of:=IF(AND(([.A15]=&quot;coil&quot;);([.C15]=&quot;true&quot;)); 1; &quot;&quot;)">
            <text:p/>
          </table:table-cell>
          <table:table-cell table:formula="of:=IF(AND(([.A15]=&quot;holding reg.&quot;);([.C15] &lt;&gt; 0)); 1; &quot;&quot;)">
            <text:p/>
          </table:table-cell>
          <table:table-cell/>
          <table:table-cell table:formula="of:=IF([.D15]=1; COM.MICROSOFT.CONCAT(&quot;ModbusCoils[coilIndexFromAddress(MODBUS_ADDR_&quot;; [.B15]; &quot;)] = &quot;; [.C15]; &quot;;&quot;); IF([.E15]=1; COM.MICROSOFT.CONCAT(&quot;ModbusHoldingRegisters[holdingIndexFromAddress(MODBUS_ADDR_&quot;; [.B15]; &quot;)] = &quot;; [.C15]; &quot;u;&quot;); &quot;&quot;))">
            <text:p/>
          </table:table-cell>
        </table:table-row>
        <table:table-row table:style-name="ro1">
          <table:table-cell table:style-name="ce17" table:formula="of:=[$List.B16]" office:value-type="string" office:string-value="coil" calcext:value-type="string">
            <text:p>coil</text:p>
          </table:table-cell>
          <table:table-cell table:style-name="ce17" table:formula="of:=[$List.I16]" office:value-type="string" office:string-value="CUP3_SWITCH_B" calcext:value-type="string">
            <text:p>CUP3_SWITCH_B</text:p>
          </table:table-cell>
          <table:table-cell table:style-name="ce17" table:formula="of:=[$List.G16]" office:value-type="string" office:string-value="false" calcext:value-type="string">
            <text:p>false</text:p>
          </table:table-cell>
          <table:table-cell table:formula="of:=IF(AND(([.A16]=&quot;coil&quot;);([.C16]=&quot;true&quot;)); 1; &quot;&quot;)">
            <text:p/>
          </table:table-cell>
          <table:table-cell table:formula="of:=IF(AND(([.A16]=&quot;holding reg.&quot;);([.C16] &lt;&gt; 0)); 1; &quot;&quot;)">
            <text:p/>
          </table:table-cell>
          <table:table-cell/>
          <table:table-cell table:formula="of:=IF([.D16]=1; COM.MICROSOFT.CONCAT(&quot;ModbusCoils[coilIndexFromAddress(MODBUS_ADDR_&quot;; [.B16]; &quot;)] = &quot;; [.C16]; &quot;;&quot;); IF([.E16]=1; COM.MICROSOFT.CONCAT(&quot;ModbusHoldingRegisters[holdingIndexFromAddress(MODBUS_ADDR_&quot;; [.B16]; &quot;)] = &quot;; [.C16]; &quot;u;&quot;); &quot;&quot;))">
            <text:p/>
          </table:table-cell>
        </table:table-row>
        <table:table-row table:style-name="ro1">
          <table:table-cell table:style-name="ce17" table:formula="of:=[$List.B17]" office:value-type="float" office:value="0" calcext:value-type="float">
            <text:p>0</text:p>
          </table:table-cell>
          <table:table-cell table:style-name="ce17" table:formula="of:=[$List.I17]">
            <text:p/>
          </table:table-cell>
          <table:table-cell table:style-name="ce17" table:formula="of:=[$List.G17]" office:value-type="float" office:value="0" calcext:value-type="float">
            <text:p>0</text:p>
          </table:table-cell>
          <table:table-cell table:formula="of:=IF(AND(([.A17]=&quot;coil&quot;);([.C17]=&quot;true&quot;)); 1; &quot;&quot;)">
            <text:p/>
          </table:table-cell>
          <table:table-cell table:formula="of:=IF(AND(([.A17]=&quot;holding reg.&quot;);([.C17] &lt;&gt; 0)); 1; &quot;&quot;)">
            <text:p/>
          </table:table-cell>
          <table:table-cell/>
          <table:table-cell table:formula="of:=IF([.D17]=1; COM.MICROSOFT.CONCAT(&quot;ModbusCoils[coilIndexFromAddress(MODBUS_ADDR_&quot;; [.B17]; &quot;)] = &quot;; [.C17]; &quot;;&quot;); IF([.E17]=1; COM.MICROSOFT.CONCAT(&quot;ModbusHoldingRegisters[holdingIndexFromAddress(MODBUS_ADDR_&quot;; [.B17]; &quot;)] = &quot;; [.C17]; &quot;u;&quot;); &quot;&quot;))">
            <text:p/>
          </table:table-cell>
        </table:table-row>
        <table:table-row table:style-name="ro1">
          <table:table-cell table:style-name="ce17" table:formula="of:=[$List.B18]" office:value-type="string" office:string-value="coil" calcext:value-type="string">
            <text:p>coil</text:p>
          </table:table-cell>
          <table:table-cell table:style-name="ce17" table:formula="of:=[$List.I18]" office:value-type="string" office:string-value="CUP1_ERROR_RECOVERY" calcext:value-type="string">
            <text:p>CUP1_ERROR_RECOVERY</text:p>
          </table:table-cell>
          <table:table-cell table:style-name="ce17" table:formula="of:=[$List.G18]" office:value-type="string" office:string-value="false" calcext:value-type="string">
            <text:p>false</text:p>
          </table:table-cell>
          <table:table-cell table:formula="of:=IF(AND(([.A18]=&quot;coil&quot;);([.C18]=&quot;true&quot;)); 1; &quot;&quot;)">
            <text:p/>
          </table:table-cell>
          <table:table-cell table:formula="of:=IF(AND(([.A18]=&quot;holding reg.&quot;);([.C18] &lt;&gt; 0)); 1; &quot;&quot;)">
            <text:p/>
          </table:table-cell>
          <table:table-cell/>
          <table:table-cell table:formula="of:=IF([.D18]=1; COM.MICROSOFT.CONCAT(&quot;ModbusCoils[coilIndexFromAddress(MODBUS_ADDR_&quot;; [.B18]; &quot;)] = &quot;; [.C18]; &quot;;&quot;); IF([.E18]=1; COM.MICROSOFT.CONCAT(&quot;ModbusHoldingRegisters[holdingIndexFromAddress(MODBUS_ADDR_&quot;; [.B18]; &quot;)] = &quot;; [.C18]; &quot;u;&quot;); &quot;&quot;))">
            <text:p/>
          </table:table-cell>
        </table:table-row>
        <table:table-row table:style-name="ro1">
          <table:table-cell table:style-name="ce17" table:formula="of:=[$List.B19]" office:value-type="string" office:string-value="coil" calcext:value-type="string">
            <text:p>coil</text:p>
          </table:table-cell>
          <table:table-cell table:style-name="ce17" table:formula="of:=[$List.I19]" office:value-type="string" office:string-value="CUP2_ERROR_RECOVERY" calcext:value-type="string">
            <text:p>CUP2_ERROR_RECOVERY</text:p>
          </table:table-cell>
          <table:table-cell table:style-name="ce17" table:formula="of:=[$List.G19]" office:value-type="string" office:string-value="false" calcext:value-type="string">
            <text:p>false</text:p>
          </table:table-cell>
          <table:table-cell table:formula="of:=IF(AND(([.A19]=&quot;coil&quot;);([.C19]=&quot;true&quot;)); 1; &quot;&quot;)">
            <text:p/>
          </table:table-cell>
          <table:table-cell table:formula="of:=IF(AND(([.A19]=&quot;holding reg.&quot;);([.C19] &lt;&gt; 0)); 1; &quot;&quot;)">
            <text:p/>
          </table:table-cell>
          <table:table-cell/>
          <table:table-cell table:formula="of:=IF([.D19]=1; COM.MICROSOFT.CONCAT(&quot;ModbusCoils[coilIndexFromAddress(MODBUS_ADDR_&quot;; [.B19]; &quot;)] = &quot;; [.C19]; &quot;;&quot;); IF([.E19]=1; COM.MICROSOFT.CONCAT(&quot;ModbusHoldingRegisters[holdingIndexFromAddress(MODBUS_ADDR_&quot;; [.B19]; &quot;)] = &quot;; [.C19]; &quot;u;&quot;); &quot;&quot;))">
            <text:p/>
          </table:table-cell>
        </table:table-row>
        <table:table-row table:style-name="ro1">
          <table:table-cell table:style-name="ce17" table:formula="of:=[$List.B20]" office:value-type="string" office:string-value="coil" calcext:value-type="string">
            <text:p>coil</text:p>
          </table:table-cell>
          <table:table-cell table:style-name="ce17" table:formula="of:=[$List.I20]" office:value-type="string" office:string-value="CUP3_ERROR_RECOVERY" calcext:value-type="string">
            <text:p>CUP3_ERROR_RECOVERY</text:p>
          </table:table-cell>
          <table:table-cell table:style-name="ce17" table:formula="of:=[$List.G20]" office:value-type="string" office:string-value="false" calcext:value-type="string">
            <text:p>false</text:p>
          </table:table-cell>
          <table:table-cell table:formula="of:=IF(AND(([.A20]=&quot;coil&quot;);([.C20]=&quot;true&quot;)); 1; &quot;&quot;)">
            <text:p/>
          </table:table-cell>
          <table:table-cell table:formula="of:=IF(AND(([.A20]=&quot;holding reg.&quot;);([.C20] &lt;&gt; 0)); 1; &quot;&quot;)">
            <text:p/>
          </table:table-cell>
          <table:table-cell/>
          <table:table-cell table:formula="of:=IF([.D20]=1; COM.MICROSOFT.CONCAT(&quot;ModbusCoils[coilIndexFromAddress(MODBUS_ADDR_&quot;; [.B20]; &quot;)] = &quot;; [.C20]; &quot;;&quot;); IF([.E20]=1; COM.MICROSOFT.CONCAT(&quot;ModbusHoldingRegisters[holdingIndexFromAddress(MODBUS_ADDR_&quot;; [.B20]; &quot;)] = &quot;; [.C20]; &quot;u;&quot;); &quot;&quot;))">
            <text:p/>
          </table:table-cell>
        </table:table-row>
        <table:table-row table:style-name="ro1">
          <table:table-cell table:style-name="ce17" table:formula="of:=[$List.B21]" office:value-type="float" office:value="0" calcext:value-type="float">
            <text:p>0</text:p>
          </table:table-cell>
          <table:table-cell table:style-name="ce17" table:formula="of:=[$List.I21]" office:value-type="float" office:value="0" calcext:value-type="float">
            <text:p>0</text:p>
          </table:table-cell>
          <table:table-cell table:style-name="ce17" table:formula="of:=[$List.G21]" office:value-type="float" office:value="0" calcext:value-type="float">
            <text:p>0</text:p>
          </table:table-cell>
          <table:table-cell table:formula="of:=IF(AND(([.A21]=&quot;coil&quot;);([.C21]=&quot;true&quot;)); 1; &quot;&quot;)">
            <text:p/>
          </table:table-cell>
          <table:table-cell table:formula="of:=IF(AND(([.A21]=&quot;holding reg.&quot;);([.C21] &lt;&gt; 0)); 1; &quot;&quot;)">
            <text:p/>
          </table:table-cell>
          <table:table-cell/>
          <table:table-cell table:formula="of:=IF([.D21]=1; COM.MICROSOFT.CONCAT(&quot;ModbusCoils[coilIndexFromAddress(MODBUS_ADDR_&quot;; [.B21]; &quot;)] = &quot;; [.C21]; &quot;;&quot;); IF([.E21]=1; COM.MICROSOFT.CONCAT(&quot;ModbusHoldingRegisters[holdingIndexFromAddress(MODBUS_ADDR_&quot;; [.B21]; &quot;)] = &quot;; [.C21]; &quot;u;&quot;); &quot;&quot;))">
            <text:p/>
          </table:table-cell>
        </table:table-row>
        <table:table-row table:style-name="ro1">
          <table:table-cell table:style-name="ce17" table:formula="of:=[$List.B22]" office:value-type="string" office:string-value="coil" calcext:value-type="string">
            <text:p>coil</text:p>
          </table:table-cell>
          <table:table-cell table:style-name="ce17" table:formula="of:=[$List.I22]" office:value-type="string" office:string-value="CUP1_REQUESTED_STATE" calcext:value-type="string">
            <text:p>CUP1_REQUESTED_STATE</text:p>
          </table:table-cell>
          <table:table-cell table:style-name="ce17" table:formula="of:=[$List.G22]" office:value-type="string" office:string-value="true" calcext:value-type="string">
            <text:p>true</text:p>
          </table:table-cell>
          <table:table-cell table:formula="of:=IF(AND(([.A22]=&quot;coil&quot;);([.C22]=&quot;true&quot;)); 1; &quot;&quot;)" office:value-type="float" office:value="1" calcext:value-type="float">
            <text:p>1</text:p>
          </table:table-cell>
          <table:table-cell table:formula="of:=IF(AND(([.A22]=&quot;holding reg.&quot;);([.C22] &lt;&gt; 0)); 1; &quot;&quot;)">
            <text:p/>
          </table:table-cell>
          <table:table-cell/>
          <table:table-cell table:formula="of:=IF([.D22]=1; COM.MICROSOFT.CONCAT(&quot;ModbusCoils[coilIndexFromAddress(MODBUS_ADDR_&quot;; [.B22]; &quot;)] = &quot;; [.C22]; &quot;;&quot;); IF([.E22]=1; COM.MICROSOFT.CONCAT(&quot;ModbusHoldingRegisters[holdingIndexFromAddress(MODBUS_ADDR_&quot;; [.B22]; &quot;)] = &quot;; [.C22]; &quot;u;&quot;); &quot;&quot;))" office:value-type="string" office:string-value="ModbusCoils[coilIndexFromAddress(MODBUS_ADDR_CUP1_REQUESTED_STATE)] = true;" calcext:value-type="string">
            <text:p>ModbusCoils[coilIndexFromAddress(MODBUS_ADDR_CUP1_REQUESTED_STATE)] = true;</text:p>
          </table:table-cell>
        </table:table-row>
        <table:table-row table:style-name="ro1">
          <table:table-cell table:style-name="ce17" table:formula="of:=[$List.B23]" office:value-type="string" office:string-value="coil" calcext:value-type="string">
            <text:p>coil</text:p>
          </table:table-cell>
          <table:table-cell table:style-name="ce17" table:formula="of:=[$List.I23]" office:value-type="string" office:string-value="CUP2_REQUESTED_STATE" calcext:value-type="string">
            <text:p>CUP2_REQUESTED_STATE</text:p>
          </table:table-cell>
          <table:table-cell table:style-name="ce17" table:formula="of:=[$List.G23]" office:value-type="string" office:string-value="true" calcext:value-type="string">
            <text:p>true</text:p>
          </table:table-cell>
          <table:table-cell table:formula="of:=IF(AND(([.A23]=&quot;coil&quot;);([.C23]=&quot;true&quot;)); 1; &quot;&quot;)" office:value-type="float" office:value="1" calcext:value-type="float">
            <text:p>1</text:p>
          </table:table-cell>
          <table:table-cell table:formula="of:=IF(AND(([.A23]=&quot;holding reg.&quot;);([.C23] &lt;&gt; 0)); 1; &quot;&quot;)">
            <text:p/>
          </table:table-cell>
          <table:table-cell/>
          <table:table-cell table:formula="of:=IF([.D23]=1; COM.MICROSOFT.CONCAT(&quot;ModbusCoils[coilIndexFromAddress(MODBUS_ADDR_&quot;; [.B23]; &quot;)] = &quot;; [.C23]; &quot;;&quot;); IF([.E23]=1; COM.MICROSOFT.CONCAT(&quot;ModbusHoldingRegisters[holdingIndexFromAddress(MODBUS_ADDR_&quot;; [.B23]; &quot;)] = &quot;; [.C23]; &quot;u;&quot;); &quot;&quot;))" office:value-type="string" office:string-value="ModbusCoils[coilIndexFromAddress(MODBUS_ADDR_CUP2_REQUESTED_STATE)] = true;" calcext:value-type="string">
            <text:p>ModbusCoils[coilIndexFromAddress(MODBUS_ADDR_CUP2_REQUESTED_STATE)] = true;</text:p>
          </table:table-cell>
        </table:table-row>
        <table:table-row table:style-name="ro1">
          <table:table-cell table:style-name="ce17" table:formula="of:=[$List.B24]" office:value-type="string" office:string-value="coil" calcext:value-type="string">
            <text:p>coil</text:p>
          </table:table-cell>
          <table:table-cell table:style-name="ce17" table:formula="of:=[$List.I24]" office:value-type="string" office:string-value="CUP3_REQUESTED_STATE" calcext:value-type="string">
            <text:p>CUP3_REQUESTED_STATE</text:p>
          </table:table-cell>
          <table:table-cell table:style-name="ce17" table:formula="of:=[$List.G24]" office:value-type="string" office:string-value="true" calcext:value-type="string">
            <text:p>true</text:p>
          </table:table-cell>
          <table:table-cell table:formula="of:=IF(AND(([.A24]=&quot;coil&quot;);([.C24]=&quot;true&quot;)); 1; &quot;&quot;)" office:value-type="float" office:value="1" calcext:value-type="float">
            <text:p>1</text:p>
          </table:table-cell>
          <table:table-cell table:formula="of:=IF(AND(([.A24]=&quot;holding reg.&quot;);([.C24] &lt;&gt; 0)); 1; &quot;&quot;)">
            <text:p/>
          </table:table-cell>
          <table:table-cell/>
          <table:table-cell table:formula="of:=IF([.D24]=1; COM.MICROSOFT.CONCAT(&quot;ModbusCoils[coilIndexFromAddress(MODBUS_ADDR_&quot;; [.B24]; &quot;)] = &quot;; [.C24]; &quot;;&quot;); IF([.E24]=1; COM.MICROSOFT.CONCAT(&quot;ModbusHoldingRegisters[holdingIndexFromAddress(MODBUS_ADDR_&quot;; [.B24]; &quot;)] = &quot;; [.C24]; &quot;u;&quot;); &quot;&quot;))" office:value-type="string" office:string-value="ModbusCoils[coilIndexFromAddress(MODBUS_ADDR_CUP3_REQUESTED_STATE)] = true;" calcext:value-type="string">
            <text:p>ModbusCoils[coilIndexFromAddress(MODBUS_ADDR_CUP3_REQUESTED_STATE)] = true;</text:p>
          </table:table-cell>
        </table:table-row>
        <table:table-row table:style-name="ro1">
          <table:table-cell table:style-name="ce17" table:formula="of:=[$List.B25]" office:value-type="float" office:value="0" calcext:value-type="float">
            <text:p>0</text:p>
          </table:table-cell>
          <table:table-cell table:style-name="ce17" table:formula="of:=[$List.I25]" office:value-type="float" office:value="0" calcext:value-type="float">
            <text:p>0</text:p>
          </table:table-cell>
          <table:table-cell table:style-name="ce17" table:formula="of:=[$List.G25]" office:value-type="float" office:value="0" calcext:value-type="float">
            <text:p>0</text:p>
          </table:table-cell>
          <table:table-cell table:formula="of:=IF(AND(([.A25]=&quot;coil&quot;);([.C25]=&quot;true&quot;)); 1; &quot;&quot;)">
            <text:p/>
          </table:table-cell>
          <table:table-cell table:formula="of:=IF(AND(([.A25]=&quot;holding reg.&quot;);([.C25] &lt;&gt; 0)); 1; &quot;&quot;)">
            <text:p/>
          </table:table-cell>
          <table:table-cell/>
          <table:table-cell table:formula="of:=IF([.D25]=1; COM.MICROSOFT.CONCAT(&quot;ModbusCoils[coilIndexFromAddress(MODBUS_ADDR_&quot;; [.B25]; &quot;)] = &quot;; [.C25]; &quot;;&quot;); IF([.E25]=1; COM.MICROSOFT.CONCAT(&quot;ModbusHoldingRegisters[holdingIndexFromAddress(MODBUS_ADDR_&quot;; [.B25]; &quot;)] = &quot;; [.C25]; &quot;u;&quot;); &quot;&quot;))">
            <text:p/>
          </table:table-cell>
        </table:table-row>
        <table:table-row table:style-name="ro1">
          <table:table-cell table:style-name="ce17" table:formula="of:=[$List.B26]" office:value-type="string" office:string-value="coil" calcext:value-type="string">
            <text:p>coil</text:p>
          </table:table-cell>
          <table:table-cell table:style-name="ce17" table:formula="of:=[$List.I26]" office:value-type="string" office:string-value="ACTUATOR1_CONTROL" calcext:value-type="string">
            <text:p>ACTUATOR1_CONTROL</text:p>
          </table:table-cell>
          <table:table-cell table:style-name="ce17" table:formula="of:=[$List.G26]" office:value-type="string" office:string-value="true" calcext:value-type="string">
            <text:p>true</text:p>
          </table:table-cell>
          <table:table-cell table:formula="of:=IF(AND(([.A26]=&quot;coil&quot;);([.C26]=&quot;true&quot;)); 1; &quot;&quot;)" office:value-type="float" office:value="1" calcext:value-type="float">
            <text:p>1</text:p>
          </table:table-cell>
          <table:table-cell table:formula="of:=IF(AND(([.A26]=&quot;holding reg.&quot;);([.C26] &lt;&gt; 0)); 1; &quot;&quot;)">
            <text:p/>
          </table:table-cell>
          <table:table-cell/>
          <table:table-cell table:formula="of:=IF([.D26]=1; COM.MICROSOFT.CONCAT(&quot;ModbusCoils[coilIndexFromAddress(MODBUS_ADDR_&quot;; [.B26]; &quot;)] = &quot;; [.C26]; &quot;;&quot;); IF([.E26]=1; COM.MICROSOFT.CONCAT(&quot;ModbusHoldingRegisters[holdingIndexFromAddress(MODBUS_ADDR_&quot;; [.B26]; &quot;)] = &quot;; [.C26]; &quot;u;&quot;); &quot;&quot;))" office:value-type="string" office:string-value="ModbusCoils[coilIndexFromAddress(MODBUS_ADDR_ACTUATOR1_CONTROL)] = true;" calcext:value-type="string">
            <text:p>ModbusCoils[coilIndexFromAddress(MODBUS_ADDR_ACTUATOR1_CONTROL)] = true;</text:p>
          </table:table-cell>
        </table:table-row>
        <table:table-row table:style-name="ro1">
          <table:table-cell table:style-name="ce17" table:formula="of:=[$List.B27]" office:value-type="string" office:string-value="coil" calcext:value-type="string">
            <text:p>coil</text:p>
          </table:table-cell>
          <table:table-cell table:style-name="ce17" table:formula="of:=[$List.I27]" office:value-type="string" office:string-value="ACTUATOR2_CONTROL" calcext:value-type="string">
            <text:p>ACTUATOR2_CONTROL</text:p>
          </table:table-cell>
          <table:table-cell table:style-name="ce17" table:formula="of:=[$List.G27]" office:value-type="string" office:string-value="true" calcext:value-type="string">
            <text:p>true</text:p>
          </table:table-cell>
          <table:table-cell table:formula="of:=IF(AND(([.A27]=&quot;coil&quot;);([.C27]=&quot;true&quot;)); 1; &quot;&quot;)" office:value-type="float" office:value="1" calcext:value-type="float">
            <text:p>1</text:p>
          </table:table-cell>
          <table:table-cell table:formula="of:=IF(AND(([.A27]=&quot;holding reg.&quot;);([.C27] &lt;&gt; 0)); 1; &quot;&quot;)">
            <text:p/>
          </table:table-cell>
          <table:table-cell/>
          <table:table-cell table:formula="of:=IF([.D27]=1; COM.MICROSOFT.CONCAT(&quot;ModbusCoils[coilIndexFromAddress(MODBUS_ADDR_&quot;; [.B27]; &quot;)] = &quot;; [.C27]; &quot;;&quot;); IF([.E27]=1; COM.MICROSOFT.CONCAT(&quot;ModbusHoldingRegisters[holdingIndexFromAddress(MODBUS_ADDR_&quot;; [.B27]; &quot;)] = &quot;; [.C27]; &quot;u;&quot;); &quot;&quot;))" office:value-type="string" office:string-value="ModbusCoils[coilIndexFromAddress(MODBUS_ADDR_ACTUATOR2_CONTROL)] = true;" calcext:value-type="string">
            <text:p>ModbusCoils[coilIndexFromAddress(MODBUS_ADDR_ACTUATOR2_CONTROL)] = true;</text:p>
          </table:table-cell>
        </table:table-row>
        <table:table-row table:style-name="ro1">
          <table:table-cell table:style-name="ce17" table:formula="of:=[$List.B28]" office:value-type="string" office:string-value="coil" calcext:value-type="string">
            <text:p>coil</text:p>
          </table:table-cell>
          <table:table-cell table:style-name="ce17" table:formula="of:=[$List.I28]" office:value-type="string" office:string-value="ACTUATOR3_CONTROL_IN" calcext:value-type="string">
            <text:p>ACTUATOR3_CONTROL_IN</text:p>
          </table:table-cell>
          <table:table-cell table:style-name="ce17" table:formula="of:=[$List.G28]" office:value-type="string" office:string-value="false" calcext:value-type="string">
            <text:p>false</text:p>
          </table:table-cell>
          <table:table-cell table:formula="of:=IF(AND(([.A28]=&quot;coil&quot;);([.C28]=&quot;true&quot;)); 1; &quot;&quot;)">
            <text:p/>
          </table:table-cell>
          <table:table-cell table:formula="of:=IF(AND(([.A28]=&quot;holding reg.&quot;);([.C28] &lt;&gt; 0)); 1; &quot;&quot;)">
            <text:p/>
          </table:table-cell>
          <table:table-cell/>
          <table:table-cell table:formula="of:=IF([.D28]=1; COM.MICROSOFT.CONCAT(&quot;ModbusCoils[coilIndexFromAddress(MODBUS_ADDR_&quot;; [.B28]; &quot;)] = &quot;; [.C28]; &quot;;&quot;); IF([.E28]=1; COM.MICROSOFT.CONCAT(&quot;ModbusHoldingRegisters[holdingIndexFromAddress(MODBUS_ADDR_&quot;; [.B28]; &quot;)] = &quot;; [.C28]; &quot;u;&quot;); &quot;&quot;))">
            <text:p/>
          </table:table-cell>
        </table:table-row>
        <table:table-row table:style-name="ro1">
          <table:table-cell table:style-name="ce17" table:formula="of:=[$List.B29]" office:value-type="string" office:string-value="coil" calcext:value-type="string">
            <text:p>coil</text:p>
          </table:table-cell>
          <table:table-cell table:style-name="ce17" table:formula="of:=[$List.I29]" office:value-type="string" office:string-value="ACTUATOR3_CONTROL_OUT" calcext:value-type="string">
            <text:p>ACTUATOR3_CONTROL_OUT</text:p>
          </table:table-cell>
          <table:table-cell table:style-name="ce17" table:formula="of:=[$List.G29]" office:value-type="string" office:string-value="false" calcext:value-type="string">
            <text:p>false</text:p>
          </table:table-cell>
          <table:table-cell table:formula="of:=IF(AND(([.A29]=&quot;coil&quot;);([.C29]=&quot;true&quot;)); 1; &quot;&quot;)">
            <text:p/>
          </table:table-cell>
          <table:table-cell table:formula="of:=IF(AND(([.A29]=&quot;holding reg.&quot;);([.C29] &lt;&gt; 0)); 1; &quot;&quot;)">
            <text:p/>
          </table:table-cell>
          <table:table-cell/>
          <table:table-cell table:formula="of:=IF([.D29]=1; COM.MICROSOFT.CONCAT(&quot;ModbusCoils[coilIndexFromAddress(MODBUS_ADDR_&quot;; [.B29]; &quot;)] = &quot;; [.C29]; &quot;;&quot;); IF([.E29]=1; COM.MICROSOFT.CONCAT(&quot;ModbusHoldingRegisters[holdingIndexFromAddress(MODBUS_ADDR_&quot;; [.B29]; &quot;)] = &quot;; [.C29]; &quot;u;&quot;); &quot;&quot;))">
            <text:p/>
          </table:table-cell>
        </table:table-row>
        <table:table-row table:style-name="ro1">
          <table:table-cell table:style-name="ce17" table:formula="of:=[$List.B30]" office:value-type="string" office:string-value="coil" calcext:value-type="string">
            <text:p>coil</text:p>
          </table:table-cell>
          <table:table-cell table:style-name="ce17" table:formula="of:=[$List.I30]" office:value-type="string" office:string-value="ACTUATOR3_CONTROL_BRAKE" calcext:value-type="string">
            <text:p>ACTUATOR3_CONTROL_BRAKE</text:p>
          </table:table-cell>
          <table:table-cell table:style-name="ce17" table:formula="of:=[$List.G30]" office:value-type="string" office:string-value="false" calcext:value-type="string">
            <text:p>false</text:p>
          </table:table-cell>
          <table:table-cell table:formula="of:=IF(AND(([.A30]=&quot;coil&quot;);([.C30]=&quot;true&quot;)); 1; &quot;&quot;)">
            <text:p/>
          </table:table-cell>
          <table:table-cell table:formula="of:=IF(AND(([.A30]=&quot;holding reg.&quot;);([.C30] &lt;&gt; 0)); 1; &quot;&quot;)">
            <text:p/>
          </table:table-cell>
          <table:table-cell/>
          <table:table-cell table:formula="of:=IF([.D30]=1; COM.MICROSOFT.CONCAT(&quot;ModbusCoils[coilIndexFromAddress(MODBUS_ADDR_&quot;; [.B30]; &quot;)] = &quot;; [.C30]; &quot;;&quot;); IF([.E30]=1; COM.MICROSOFT.CONCAT(&quot;ModbusHoldingRegisters[holdingIndexFromAddress(MODBUS_ADDR_&quot;; [.B30]; &quot;)] = &quot;; [.C30]; &quot;u;&quot;); &quot;&quot;))">
            <text:p/>
          </table:table-cell>
        </table:table-row>
        <table:table-row table:style-name="ro1">
          <table:table-cell table:style-name="ce17" table:formula="of:=[$List.B31]" office:value-type="float" office:value="0" calcext:value-type="float">
            <text:p>0</text:p>
          </table:table-cell>
          <table:table-cell table:style-name="ce17" table:formula="of:=[$List.I31]">
            <text:p/>
          </table:table-cell>
          <table:table-cell table:style-name="ce17" table:formula="of:=[$List.G31]" office:value-type="float" office:value="0" calcext:value-type="float">
            <text:p>0</text:p>
          </table:table-cell>
          <table:table-cell table:formula="of:=IF(AND(([.A31]=&quot;coil&quot;);([.C31]=&quot;true&quot;)); 1; &quot;&quot;)">
            <text:p/>
          </table:table-cell>
          <table:table-cell table:formula="of:=IF(AND(([.A31]=&quot;holding reg.&quot;);([.C31] &lt;&gt; 0)); 1; &quot;&quot;)">
            <text:p/>
          </table:table-cell>
          <table:table-cell/>
          <table:table-cell table:formula="of:=IF([.D31]=1; COM.MICROSOFT.CONCAT(&quot;ModbusCoils[coilIndexFromAddress(MODBUS_ADDR_&quot;; [.B31]; &quot;)] = &quot;; [.C31]; &quot;;&quot;); IF([.E31]=1; COM.MICROSOFT.CONCAT(&quot;ModbusHoldingRegisters[holdingIndexFromAddress(MODBUS_ADDR_&quot;; [.B31]; &quot;)] = &quot;; [.C31]; &quot;u;&quot;); &quot;&quot;))">
            <text:p/>
          </table:table-cell>
        </table:table-row>
        <table:table-row table:style-name="ro1">
          <table:table-cell table:style-name="ce17" table:formula="of:=[$List.B32]" office:value-type="float" office:value="0" calcext:value-type="float">
            <text:p>0</text:p>
          </table:table-cell>
          <table:table-cell table:style-name="ce17" table:formula="of:=[$List.I32]">
            <text:p/>
          </table:table-cell>
          <table:table-cell table:style-name="ce17" table:formula="of:=[$List.G32]" office:value-type="float" office:value="0" calcext:value-type="float">
            <text:p>0</text:p>
          </table:table-cell>
          <table:table-cell table:formula="of:=IF(AND(([.A32]=&quot;coil&quot;);([.C32]=&quot;true&quot;)); 1; &quot;&quot;)">
            <text:p/>
          </table:table-cell>
          <table:table-cell table:formula="of:=IF(AND(([.A32]=&quot;holding reg.&quot;);([.C32] &lt;&gt; 0)); 1; &quot;&quot;)">
            <text:p/>
          </table:table-cell>
          <table:table-cell/>
          <table:table-cell table:formula="of:=IF([.D32]=1; COM.MICROSOFT.CONCAT(&quot;ModbusCoils[coilIndexFromAddress(MODBUS_ADDR_&quot;; [.B32]; &quot;)] = &quot;; [.C32]; &quot;;&quot;); IF([.E32]=1; COM.MICROSOFT.CONCAT(&quot;ModbusHoldingRegisters[holdingIndexFromAddress(MODBUS_ADDR_&quot;; [.B32]; &quot;)] = &quot;; [.C32]; &quot;u;&quot;); &quot;&quot;))">
            <text:p/>
          </table:table-cell>
        </table:table-row>
        <table:table-row table:style-name="ro1">
          <table:table-cell table:style-name="ce17" table:formula="of:=[$List.B33]" office:value-type="string" office:string-value="holding reg." calcext:value-type="string">
            <text:p>holding reg.</text:p>
          </table:table-cell>
          <table:table-cell table:style-name="ce17" table:formula="of:=[$List.I33]" office:value-type="string" office:string-value="ERROR_CODE" calcext:value-type="string">
            <text:p>ERROR_CODE</text:p>
          </table:table-cell>
          <table:table-cell table:style-name="ce17" table:formula="of:=[$List.G33]" office:value-type="float" office:value="0" calcext:value-type="float">
            <text:p>0</text:p>
          </table:table-cell>
          <table:table-cell table:formula="of:=IF(AND(([.A33]=&quot;coil&quot;);([.C33]=&quot;true&quot;)); 1; &quot;&quot;)">
            <text:p/>
          </table:table-cell>
          <table:table-cell table:formula="of:=IF(AND(([.A33]=&quot;holding reg.&quot;);([.C33] &lt;&gt; 0)); 1; &quot;&quot;)">
            <text:p/>
          </table:table-cell>
          <table:table-cell/>
          <table:table-cell table:formula="of:=IF([.D33]=1; COM.MICROSOFT.CONCAT(&quot;ModbusCoils[coilIndexFromAddress(MODBUS_ADDR_&quot;; [.B33]; &quot;)] = &quot;; [.C33]; &quot;;&quot;); IF([.E33]=1; COM.MICROSOFT.CONCAT(&quot;ModbusHoldingRegisters[holdingIndexFromAddress(MODBUS_ADDR_&quot;; [.B33]; &quot;)] = &quot;; [.C33]; &quot;u;&quot;); &quot;&quot;))">
            <text:p/>
          </table:table-cell>
        </table:table-row>
        <table:table-row table:style-name="ro1">
          <table:table-cell table:style-name="ce17" table:formula="of:=[$List.B34]" office:value-type="string" office:string-value="holding reg." calcext:value-type="string">
            <text:p>holding reg.</text:p>
          </table:table-cell>
          <table:table-cell table:style-name="ce17" table:formula="of:=[$List.I34]" office:value-type="string" office:string-value="LAST_ERROR" calcext:value-type="string">
            <text:p>LAST_ERROR</text:p>
          </table:table-cell>
          <table:table-cell table:style-name="ce17" table:formula="of:=[$List.G34]" office:value-type="float" office:value="0" calcext:value-type="float">
            <text:p>0</text:p>
          </table:table-cell>
          <table:table-cell table:formula="of:=IF(AND(([.A34]=&quot;coil&quot;);([.C34]=&quot;true&quot;)); 1; &quot;&quot;)">
            <text:p/>
          </table:table-cell>
          <table:table-cell table:formula="of:=IF(AND(([.A34]=&quot;holding reg.&quot;);([.C34] &lt;&gt; 0)); 1; &quot;&quot;)">
            <text:p/>
          </table:table-cell>
          <table:table-cell/>
          <table:table-cell table:formula="of:=IF([.D34]=1; COM.MICROSOFT.CONCAT(&quot;ModbusCoils[coilIndexFromAddress(MODBUS_ADDR_&quot;; [.B34]; &quot;)] = &quot;; [.C34]; &quot;;&quot;); IF([.E34]=1; COM.MICROSOFT.CONCAT(&quot;ModbusHoldingRegisters[holdingIndexFromAddress(MODBUS_ADDR_&quot;; [.B34]; &quot;)] = &quot;; [.C34]; &quot;u;&quot;); &quot;&quot;))">
            <text:p/>
          </table:table-cell>
        </table:table-row>
        <table:table-row table:style-name="ro1">
          <table:table-cell table:style-name="ce17" table:formula="of:=[$List.B35]" office:value-type="string" office:string-value="holding reg." calcext:value-type="string">
            <text:p>holding reg.</text:p>
          </table:table-cell>
          <table:table-cell table:style-name="ce17" table:formula="of:=[$List.I35]" office:value-type="string" office:string-value="ERROR_STORAGE" calcext:value-type="string">
            <text:p>ERROR_STORAGE</text:p>
          </table:table-cell>
          <table:table-cell table:style-name="ce17" table:formula="of:=[$List.G35]" office:value-type="float" office:value="0" calcext:value-type="float">
            <text:p>0</text:p>
          </table:table-cell>
          <table:table-cell table:formula="of:=IF(AND(([.A35]=&quot;coil&quot;);([.C35]=&quot;true&quot;)); 1; &quot;&quot;)">
            <text:p/>
          </table:table-cell>
          <table:table-cell table:formula="of:=IF(AND(([.A35]=&quot;holding reg.&quot;);([.C35] &lt;&gt; 0)); 1; &quot;&quot;)">
            <text:p/>
          </table:table-cell>
          <table:table-cell/>
          <table:table-cell table:formula="of:=IF([.D35]=1; COM.MICROSOFT.CONCAT(&quot;ModbusCoils[coilIndexFromAddress(MODBUS_ADDR_&quot;; [.B35]; &quot;)] = &quot;; [.C35]; &quot;;&quot;); IF([.E35]=1; COM.MICROSOFT.CONCAT(&quot;ModbusHoldingRegisters[holdingIndexFromAddress(MODBUS_ADDR_&quot;; [.B35]; &quot;)] = &quot;; [.C35]; &quot;u;&quot;); &quot;&quot;))">
            <text:p/>
          </table:table-cell>
        </table:table-row>
        <table:table-row table:style-name="ro1">
          <table:table-cell table:style-name="ce17" table:formula="of:=[$List.B36]" office:value-type="float" office:value="0" calcext:value-type="float">
            <text:p>0</text:p>
          </table:table-cell>
          <table:table-cell table:style-name="ce17" table:formula="of:=[$List.I36]">
            <text:p/>
          </table:table-cell>
          <table:table-cell table:style-name="ce17" table:formula="of:=[$List.G36]" office:value-type="float" office:value="0" calcext:value-type="float">
            <text:p>0</text:p>
          </table:table-cell>
          <table:table-cell table:formula="of:=IF(AND(([.A36]=&quot;coil&quot;);([.C36]=&quot;true&quot;)); 1; &quot;&quot;)">
            <text:p/>
          </table:table-cell>
          <table:table-cell table:formula="of:=IF(AND(([.A36]=&quot;holding reg.&quot;);([.C36] &lt;&gt; 0)); 1; &quot;&quot;)">
            <text:p/>
          </table:table-cell>
          <table:table-cell/>
          <table:table-cell table:formula="of:=IF([.D36]=1; COM.MICROSOFT.CONCAT(&quot;ModbusCoils[coilIndexFromAddress(MODBUS_ADDR_&quot;; [.B36]; &quot;)] = &quot;; [.C36]; &quot;;&quot;); IF([.E36]=1; COM.MICROSOFT.CONCAT(&quot;ModbusHoldingRegisters[holdingIndexFromAddress(MODBUS_ADDR_&quot;; [.B36]; &quot;)] = &quot;; [.C36]; &quot;u;&quot;); &quot;&quot;))">
            <text:p/>
          </table:table-cell>
        </table:table-row>
        <table:table-row table:style-name="ro1">
          <table:table-cell table:style-name="ce17" table:formula="of:=[$List.B37]" office:value-type="string" office:string-value="holding reg." calcext:value-type="string">
            <text:p>holding reg.</text:p>
          </table:table-cell>
          <table:table-cell table:style-name="ce17" table:formula="of:=[$List.I37]" office:value-type="string" office:string-value="TIME_LIMIT_INSERTING1" calcext:value-type="string">
            <text:p>TIME_LIMIT_INSERTING1</text:p>
          </table:table-cell>
          <table:table-cell table:style-name="ce17" table:formula="of:=[$List.G37]" office:value-type="float" office:value="700" calcext:value-type="float">
            <text:p>700</text:p>
          </table:table-cell>
          <table:table-cell table:formula="of:=IF(AND(([.A37]=&quot;coil&quot;);([.C37]=&quot;true&quot;)); 1; &quot;&quot;)">
            <text:p/>
          </table:table-cell>
          <table:table-cell table:formula="of:=IF(AND(([.A37]=&quot;holding reg.&quot;);([.C37] &lt;&gt; 0)); 1; &quot;&quot;)" office:value-type="float" office:value="1" calcext:value-type="float">
            <text:p>1</text:p>
          </table:table-cell>
          <table:table-cell/>
          <table:table-cell table:formula="of:=IF([.D37]=1; COM.MICROSOFT.CONCAT(&quot;ModbusCoils[coilIndexFromAddress(MODBUS_ADDR_&quot;; [.B37]; &quot;)] = &quot;; [.C37]; &quot;;&quot;); IF([.E37]=1; COM.MICROSOFT.CONCAT(&quot;ModbusHoldingRegisters[holdingIndexFromAddress(MODBUS_ADDR_&quot;; [.B37]; &quot;)] = &quot;; [.C37]; &quot;u;&quot;); &quot;&quot;))" office:value-type="string" office:string-value="ModbusHoldingRegisters[holdingIndexFromAddress(MODBUS_ADDR_TIME_LIMIT_INSERTING1)] = 700u;" calcext:value-type="string">
            <text:p>ModbusHoldingRegisters[holdingIndexFromAddress(MODBUS_ADDR_TIME_LIMIT_INSERTING1)] = 700u;</text:p>
          </table:table-cell>
        </table:table-row>
        <table:table-row table:style-name="ro1">
          <table:table-cell table:style-name="ce17" table:formula="of:=[$List.B38]" office:value-type="string" office:string-value="holding reg." calcext:value-type="string">
            <text:p>holding reg.</text:p>
          </table:table-cell>
          <table:table-cell table:style-name="ce17" table:formula="of:=[$List.I38]" office:value-type="string" office:string-value="TIME_LIMIT_INSERTING2" calcext:value-type="string">
            <text:p>TIME_LIMIT_INSERTING2</text:p>
          </table:table-cell>
          <table:table-cell table:style-name="ce17" table:formula="of:=[$List.G38]" office:value-type="float" office:value="700" calcext:value-type="float">
            <text:p>700</text:p>
          </table:table-cell>
          <table:table-cell table:formula="of:=IF(AND(([.A38]=&quot;coil&quot;);([.C38]=&quot;true&quot;)); 1; &quot;&quot;)">
            <text:p/>
          </table:table-cell>
          <table:table-cell table:formula="of:=IF(AND(([.A38]=&quot;holding reg.&quot;);([.C38] &lt;&gt; 0)); 1; &quot;&quot;)" office:value-type="float" office:value="1" calcext:value-type="float">
            <text:p>1</text:p>
          </table:table-cell>
          <table:table-cell/>
          <table:table-cell table:formula="of:=IF([.D38]=1; COM.MICROSOFT.CONCAT(&quot;ModbusCoils[coilIndexFromAddress(MODBUS_ADDR_&quot;; [.B38]; &quot;)] = &quot;; [.C38]; &quot;;&quot;); IF([.E38]=1; COM.MICROSOFT.CONCAT(&quot;ModbusHoldingRegisters[holdingIndexFromAddress(MODBUS_ADDR_&quot;; [.B38]; &quot;)] = &quot;; [.C38]; &quot;u;&quot;); &quot;&quot;))" office:value-type="string" office:string-value="ModbusHoldingRegisters[holdingIndexFromAddress(MODBUS_ADDR_TIME_LIMIT_INSERTING2)] = 700u;" calcext:value-type="string">
            <text:p>ModbusHoldingRegisters[holdingIndexFromAddress(MODBUS_ADDR_TIME_LIMIT_INSERTING2)] = 700u;</text:p>
          </table:table-cell>
        </table:table-row>
        <table:table-row table:style-name="ro1">
          <table:table-cell table:style-name="ce17" table:formula="of:=[$List.B39]" office:value-type="string" office:string-value="holding reg." calcext:value-type="string">
            <text:p>holding reg.</text:p>
          </table:table-cell>
          <table:table-cell table:style-name="ce17" table:formula="of:=[$List.I39]" office:value-type="string" office:string-value="TIME_LIMIT_INSERTING3" calcext:value-type="string">
            <text:p>TIME_LIMIT_INSERTING3</text:p>
          </table:table-cell>
          <table:table-cell table:style-name="ce17" table:formula="of:=[$List.G39]" office:value-type="float" office:value="4000" calcext:value-type="float">
            <text:p>4000</text:p>
          </table:table-cell>
          <table:table-cell table:formula="of:=IF(AND(([.A39]=&quot;coil&quot;);([.C39]=&quot;true&quot;)); 1; &quot;&quot;)">
            <text:p/>
          </table:table-cell>
          <table:table-cell table:formula="of:=IF(AND(([.A39]=&quot;holding reg.&quot;);([.C39] &lt;&gt; 0)); 1; &quot;&quot;)" office:value-type="float" office:value="1" calcext:value-type="float">
            <text:p>1</text:p>
          </table:table-cell>
          <table:table-cell/>
          <table:table-cell table:formula="of:=IF([.D39]=1; COM.MICROSOFT.CONCAT(&quot;ModbusCoils[coilIndexFromAddress(MODBUS_ADDR_&quot;; [.B39]; &quot;)] = &quot;; [.C39]; &quot;;&quot;); IF([.E39]=1; COM.MICROSOFT.CONCAT(&quot;ModbusHoldingRegisters[holdingIndexFromAddress(MODBUS_ADDR_&quot;; [.B39]; &quot;)] = &quot;; [.C39]; &quot;u;&quot;); &quot;&quot;))" office:value-type="string" office:string-value="ModbusHoldingRegisters[holdingIndexFromAddress(MODBUS_ADDR_TIME_LIMIT_INSERTING3)] = 4000u;" calcext:value-type="string">
            <text:p>ModbusHoldingRegisters[holdingIndexFromAddress(MODBUS_ADDR_TIME_LIMIT_INSERTING3)] = 4000u;</text:p>
          </table:table-cell>
        </table:table-row>
        <table:table-row table:style-name="ro1">
          <table:table-cell table:style-name="ce17" table:formula="of:=[$List.B40]" office:value-type="string" office:string-value="holding reg." calcext:value-type="string">
            <text:p>holding reg.</text:p>
          </table:table-cell>
          <table:table-cell table:style-name="ce17" table:formula="of:=[$List.I40]" office:value-type="string" office:string-value="TIME_LIMIT_WITHDRAWING1" calcext:value-type="string">
            <text:p>TIME_LIMIT_WITHDRAWING1</text:p>
          </table:table-cell>
          <table:table-cell table:style-name="ce17" table:formula="of:=[$List.G40]" office:value-type="float" office:value="300" calcext:value-type="float">
            <text:p>300</text:p>
          </table:table-cell>
          <table:table-cell table:formula="of:=IF(AND(([.A40]=&quot;coil&quot;);([.C40]=&quot;true&quot;)); 1; &quot;&quot;)">
            <text:p/>
          </table:table-cell>
          <table:table-cell table:formula="of:=IF(AND(([.A40]=&quot;holding reg.&quot;);([.C40] &lt;&gt; 0)); 1; &quot;&quot;)" office:value-type="float" office:value="1" calcext:value-type="float">
            <text:p>1</text:p>
          </table:table-cell>
          <table:table-cell/>
          <table:table-cell table:formula="of:=IF([.D40]=1; COM.MICROSOFT.CONCAT(&quot;ModbusCoils[coilIndexFromAddress(MODBUS_ADDR_&quot;; [.B40]; &quot;)] = &quot;; [.C40]; &quot;;&quot;); IF([.E40]=1; COM.MICROSOFT.CONCAT(&quot;ModbusHoldingRegisters[holdingIndexFromAddress(MODBUS_ADDR_&quot;; [.B40]; &quot;)] = &quot;; [.C40]; &quot;u;&quot;); &quot;&quot;))" office:value-type="string" office:string-value="ModbusHoldingRegisters[holdingIndexFromAddress(MODBUS_ADDR_TIME_LIMIT_WITHDRAWING1)] = 300u;" calcext:value-type="string">
            <text:p>ModbusHoldingRegisters[holdingIndexFromAddress(MODBUS_ADDR_TIME_LIMIT_WITHDRAWING1)] = 300u;</text:p>
          </table:table-cell>
        </table:table-row>
        <table:table-row table:style-name="ro1">
          <table:table-cell table:style-name="ce17" table:formula="of:=[$List.B41]" office:value-type="string" office:string-value="holding reg." calcext:value-type="string">
            <text:p>holding reg.</text:p>
          </table:table-cell>
          <table:table-cell table:style-name="ce17" table:formula="of:=[$List.I41]" office:value-type="string" office:string-value="TIME_LIMIT_WITHDRAWING2" calcext:value-type="string">
            <text:p>TIME_LIMIT_WITHDRAWING2</text:p>
          </table:table-cell>
          <table:table-cell table:style-name="ce17" table:formula="of:=[$List.G41]" office:value-type="float" office:value="300" calcext:value-type="float">
            <text:p>300</text:p>
          </table:table-cell>
          <table:table-cell table:formula="of:=IF(AND(([.A41]=&quot;coil&quot;);([.C41]=&quot;true&quot;)); 1; &quot;&quot;)">
            <text:p/>
          </table:table-cell>
          <table:table-cell table:formula="of:=IF(AND(([.A41]=&quot;holding reg.&quot;);([.C41] &lt;&gt; 0)); 1; &quot;&quot;)" office:value-type="float" office:value="1" calcext:value-type="float">
            <text:p>1</text:p>
          </table:table-cell>
          <table:table-cell/>
          <table:table-cell table:formula="of:=IF([.D41]=1; COM.MICROSOFT.CONCAT(&quot;ModbusCoils[coilIndexFromAddress(MODBUS_ADDR_&quot;; [.B41]; &quot;)] = &quot;; [.C41]; &quot;;&quot;); IF([.E41]=1; COM.MICROSOFT.CONCAT(&quot;ModbusHoldingRegisters[holdingIndexFromAddress(MODBUS_ADDR_&quot;; [.B41]; &quot;)] = &quot;; [.C41]; &quot;u;&quot;); &quot;&quot;))" office:value-type="string" office:string-value="ModbusHoldingRegisters[holdingIndexFromAddress(MODBUS_ADDR_TIME_LIMIT_WITHDRAWING2)] = 300u;" calcext:value-type="string">
            <text:p>ModbusHoldingRegisters[holdingIndexFromAddress(MODBUS_ADDR_TIME_LIMIT_WITHDRAWING2)] = 300u;</text:p>
          </table:table-cell>
        </table:table-row>
        <table:table-row table:style-name="ro1">
          <table:table-cell table:style-name="ce17" table:formula="of:=[$List.B42]" office:value-type="string" office:string-value="holding reg." calcext:value-type="string">
            <text:p>holding reg.</text:p>
          </table:table-cell>
          <table:table-cell table:style-name="ce17" table:formula="of:=[$List.I42]" office:value-type="string" office:string-value="TIME_LIMIT_WITHDRAWING3" calcext:value-type="string">
            <text:p>TIME_LIMIT_WITHDRAWING3</text:p>
          </table:table-cell>
          <table:table-cell table:style-name="ce17" table:formula="of:=[$List.G42]" office:value-type="float" office:value="4400" calcext:value-type="float">
            <text:p>4400</text:p>
          </table:table-cell>
          <table:table-cell table:formula="of:=IF(AND(([.A42]=&quot;coil&quot;);([.C42]=&quot;true&quot;)); 1; &quot;&quot;)">
            <text:p/>
          </table:table-cell>
          <table:table-cell table:formula="of:=IF(AND(([.A42]=&quot;holding reg.&quot;);([.C42] &lt;&gt; 0)); 1; &quot;&quot;)" office:value-type="float" office:value="1" calcext:value-type="float">
            <text:p>1</text:p>
          </table:table-cell>
          <table:table-cell/>
          <table:table-cell table:formula="of:=IF([.D42]=1; COM.MICROSOFT.CONCAT(&quot;ModbusCoils[coilIndexFromAddress(MODBUS_ADDR_&quot;; [.B42]; &quot;)] = &quot;; [.C42]; &quot;;&quot;); IF([.E42]=1; COM.MICROSOFT.CONCAT(&quot;ModbusHoldingRegisters[holdingIndexFromAddress(MODBUS_ADDR_&quot;; [.B42]; &quot;)] = &quot;; [.C42]; &quot;u;&quot;); &quot;&quot;))" office:value-type="string" office:string-value="ModbusHoldingRegisters[holdingIndexFromAddress(MODBUS_ADDR_TIME_LIMIT_WITHDRAWING3)] = 4400u;" calcext:value-type="string">
            <text:p>ModbusHoldingRegisters[holdingIndexFromAddress(MODBUS_ADDR_TIME_LIMIT_WITHDRAWING3)] = 4400u;</text:p>
          </table:table-cell>
        </table:table-row>
        <table:table-row table:style-name="ro1">
          <table:table-cell table:style-name="ce17" table:formula="of:=[$List.B43]" office:value-type="float" office:value="0" calcext:value-type="float">
            <text:p>0</text:p>
          </table:table-cell>
          <table:table-cell table:style-name="ce17" table:formula="of:=[$List.I43]">
            <text:p/>
          </table:table-cell>
          <table:table-cell table:style-name="ce17" table:formula="of:=[$List.G43]" office:value-type="float" office:value="0" calcext:value-type="float">
            <text:p>0</text:p>
          </table:table-cell>
          <table:table-cell table:formula="of:=IF(AND(([.A43]=&quot;coil&quot;);([.C43]=&quot;true&quot;)); 1; &quot;&quot;)">
            <text:p/>
          </table:table-cell>
          <table:table-cell table:formula="of:=IF(AND(([.A43]=&quot;holding reg.&quot;);([.C43] &lt;&gt; 0)); 1; &quot;&quot;)">
            <text:p/>
          </table:table-cell>
          <table:table-cell/>
          <table:table-cell table:formula="of:=IF([.D43]=1; COM.MICROSOFT.CONCAT(&quot;ModbusCoils[coilIndexFromAddress(MODBUS_ADDR_&quot;; [.B43]; &quot;)] = &quot;; [.C43]; &quot;;&quot;); IF([.E43]=1; COM.MICROSOFT.CONCAT(&quot;ModbusHoldingRegisters[holdingIndexFromAddress(MODBUS_ADDR_&quot;; [.B43]; &quot;)] = &quot;; [.C43]; &quot;u;&quot;); &quot;&quot;))">
            <text:p/>
          </table:table-cell>
        </table:table-row>
        <table:table-row table:style-name="ro1">
          <table:table-cell table:style-name="ce17" table:formula="of:=[$List.B44]" office:value-type="string" office:string-value="holding reg." calcext:value-type="string">
            <text:p>holding reg.</text:p>
          </table:table-cell>
          <table:table-cell table:style-name="ce17" table:formula="of:=[$List.I44]" office:value-type="string" office:string-value="ACTIVE_CUP" calcext:value-type="string">
            <text:p>ACTIVE_CUP</text:p>
          </table:table-cell>
          <table:table-cell table:style-name="ce17" table:formula="of:=[$List.G44]" office:value-type="float" office:value="0" calcext:value-type="float">
            <text:p>0</text:p>
          </table:table-cell>
          <table:table-cell table:formula="of:=IF(AND(([.A44]=&quot;coil&quot;);([.C44]=&quot;true&quot;)); 1; &quot;&quot;)">
            <text:p/>
          </table:table-cell>
          <table:table-cell table:formula="of:=IF(AND(([.A44]=&quot;holding reg.&quot;);([.C44] &lt;&gt; 0)); 1; &quot;&quot;)">
            <text:p/>
          </table:table-cell>
          <table:table-cell/>
          <table:table-cell table:formula="of:=IF([.D44]=1; COM.MICROSOFT.CONCAT(&quot;ModbusCoils[coilIndexFromAddress(MODBUS_ADDR_&quot;; [.B44]; &quot;)] = &quot;; [.C44]; &quot;;&quot;); IF([.E44]=1; COM.MICROSOFT.CONCAT(&quot;ModbusHoldingRegisters[holdingIndexFromAddress(MODBUS_ADDR_&quot;; [.B44]; &quot;)] = &quot;; [.C44]; &quot;u;&quot;); &quot;&quot;))">
            <text:p/>
          </table:table-cell>
        </table:table-row>
        <table:table-row table:style-name="ro1">
          <table:table-cell table:style-name="ce17" table:formula="of:=[$List.B45]" office:value-type="float" office:value="0" calcext:value-type="float">
            <text:p>0</text:p>
          </table:table-cell>
          <table:table-cell table:style-name="ce17" table:formula="of:=[$List.I45]">
            <text:p/>
          </table:table-cell>
          <table:table-cell table:style-name="ce17" table:formula="of:=[$List.G45]" office:value-type="float" office:value="0" calcext:value-type="float">
            <text:p>0</text:p>
          </table:table-cell>
          <table:table-cell table:formula="of:=IF(AND(([.A45]=&quot;coil&quot;);([.C45]=&quot;true&quot;)); 1; &quot;&quot;)">
            <text:p/>
          </table:table-cell>
          <table:table-cell table:formula="of:=IF(AND(([.A45]=&quot;holding reg.&quot;);([.C45] &lt;&gt; 0)); 1; &quot;&quot;)">
            <text:p/>
          </table:table-cell>
          <table:table-cell/>
          <table:table-cell table:formula="of:=IF([.D45]=1; COM.MICROSOFT.CONCAT(&quot;ModbusCoils[coilIndexFromAddress(MODBUS_ADDR_&quot;; [.B45]; &quot;)] = &quot;; [.C45]; &quot;;&quot;); IF([.E45]=1; COM.MICROSOFT.CONCAT(&quot;ModbusHoldingRegisters[holdingIndexFromAddress(MODBUS_ADDR_&quot;; [.B45]; &quot;)] = &quot;; [.C45]; &quot;u;&quot;); &quot;&quot;))">
            <text:p/>
          </table:table-cell>
        </table:table-row>
        <table:table-row table:style-name="ro1">
          <table:table-cell table:style-name="ce17" table:formula="of:=[$List.B46]" office:value-type="string" office:string-value="holding reg." calcext:value-type="string">
            <text:p>holding reg.</text:p>
          </table:table-cell>
          <table:table-cell table:style-name="ce17" table:formula="of:=[$List.I46]" office:value-type="string" office:string-value="CUP1_FSM_STATE" calcext:value-type="string">
            <text:p>CUP1_FSM_STATE</text:p>
          </table:table-cell>
          <table:table-cell table:style-name="ce17" table:formula="of:=[$List.G46]" office:value-type="float" office:value="0" calcext:value-type="float">
            <text:p>0</text:p>
          </table:table-cell>
          <table:table-cell table:formula="of:=IF(AND(([.A46]=&quot;coil&quot;);([.C46]=&quot;true&quot;)); 1; &quot;&quot;)">
            <text:p/>
          </table:table-cell>
          <table:table-cell table:formula="of:=IF(AND(([.A46]=&quot;holding reg.&quot;);([.C46] &lt;&gt; 0)); 1; &quot;&quot;)">
            <text:p/>
          </table:table-cell>
          <table:table-cell/>
          <table:table-cell table:formula="of:=IF([.D46]=1; COM.MICROSOFT.CONCAT(&quot;ModbusCoils[coilIndexFromAddress(MODBUS_ADDR_&quot;; [.B46]; &quot;)] = &quot;; [.C46]; &quot;;&quot;); IF([.E46]=1; COM.MICROSOFT.CONCAT(&quot;ModbusHoldingRegisters[holdingIndexFromAddress(MODBUS_ADDR_&quot;; [.B46]; &quot;)] = &quot;; [.C46]; &quot;u;&quot;); &quot;&quot;))">
            <text:p/>
          </table:table-cell>
        </table:table-row>
        <table:table-row table:style-name="ro1">
          <table:table-cell table:style-name="ce17" table:formula="of:=[$List.B47]" office:value-type="string" office:string-value="holding reg." calcext:value-type="string">
            <text:p>holding reg.</text:p>
          </table:table-cell>
          <table:table-cell table:style-name="ce17" table:formula="of:=[$List.I47]" office:value-type="string" office:string-value="CUP2_FSM_STATE" calcext:value-type="string">
            <text:p>CUP2_FSM_STATE</text:p>
          </table:table-cell>
          <table:table-cell table:style-name="ce17" table:formula="of:=[$List.G47]" office:value-type="float" office:value="0" calcext:value-type="float">
            <text:p>0</text:p>
          </table:table-cell>
          <table:table-cell table:formula="of:=IF(AND(([.A47]=&quot;coil&quot;);([.C47]=&quot;true&quot;)); 1; &quot;&quot;)">
            <text:p/>
          </table:table-cell>
          <table:table-cell table:formula="of:=IF(AND(([.A47]=&quot;holding reg.&quot;);([.C47] &lt;&gt; 0)); 1; &quot;&quot;)">
            <text:p/>
          </table:table-cell>
          <table:table-cell/>
          <table:table-cell table:formula="of:=IF([.D47]=1; COM.MICROSOFT.CONCAT(&quot;ModbusCoils[coilIndexFromAddress(MODBUS_ADDR_&quot;; [.B47]; &quot;)] = &quot;; [.C47]; &quot;;&quot;); IF([.E47]=1; COM.MICROSOFT.CONCAT(&quot;ModbusHoldingRegisters[holdingIndexFromAddress(MODBUS_ADDR_&quot;; [.B47]; &quot;)] = &quot;; [.C47]; &quot;u;&quot;); &quot;&quot;))">
            <text:p/>
          </table:table-cell>
        </table:table-row>
        <table:table-row table:style-name="ro1">
          <table:table-cell table:style-name="ce17" table:formula="of:=[$List.B48]" office:value-type="string" office:string-value="holding reg." calcext:value-type="string">
            <text:p>holding reg.</text:p>
          </table:table-cell>
          <table:table-cell table:style-name="ce17" table:formula="of:=[$List.I48]" office:value-type="string" office:string-value="CUP3_FSM_STATE" calcext:value-type="string">
            <text:p>CUP3_FSM_STATE</text:p>
          </table:table-cell>
          <table:table-cell table:style-name="ce17" table:formula="of:=[$List.G48]" office:value-type="float" office:value="0" calcext:value-type="float">
            <text:p>0</text:p>
          </table:table-cell>
          <table:table-cell table:formula="of:=IF(AND(([.A48]=&quot;coil&quot;);([.C48]=&quot;true&quot;)); 1; &quot;&quot;)">
            <text:p/>
          </table:table-cell>
          <table:table-cell table:formula="of:=IF(AND(([.A48]=&quot;holding reg.&quot;);([.C48] &lt;&gt; 0)); 1; &quot;&quot;)">
            <text:p/>
          </table:table-cell>
          <table:table-cell/>
          <table:table-cell table:formula="of:=IF([.D48]=1; COM.MICROSOFT.CONCAT(&quot;ModbusCoils[coilIndexFromAddress(MODBUS_ADDR_&quot;; [.B48]; &quot;)] = &quot;; [.C48]; &quot;;&quot;); IF([.E48]=1; COM.MICROSOFT.CONCAT(&quot;ModbusHoldingRegisters[holdingIndexFromAddress(MODBUS_ADDR_&quot;; [.B48]; &quot;)] = &quot;; [.C48]; &quot;u;&quot;); &quot;&quot;))">
            <text:p/>
          </table:table-cell>
        </table:table-row>
        <table:table-row table:style-name="ro1">
          <table:table-cell table:style-name="ce17" table:formula="of:=[$List.B49]" office:value-type="string" office:string-value="holding reg." calcext:value-type="string">
            <text:p>holding reg.</text:p>
          </table:table-cell>
          <table:table-cell table:style-name="ce17" table:formula="of:=[$List.I49]" office:value-type="string" office:string-value="CUP1_ERROR" calcext:value-type="string">
            <text:p>CUP1_ERROR</text:p>
          </table:table-cell>
          <table:table-cell table:style-name="ce17" table:formula="of:=[$List.G49]" office:value-type="float" office:value="0" calcext:value-type="float">
            <text:p>0</text:p>
          </table:table-cell>
          <table:table-cell table:formula="of:=IF(AND(([.A49]=&quot;coil&quot;);([.C49]=&quot;true&quot;)); 1; &quot;&quot;)">
            <text:p/>
          </table:table-cell>
          <table:table-cell table:formula="of:=IF(AND(([.A49]=&quot;holding reg.&quot;);([.C49] &lt;&gt; 0)); 1; &quot;&quot;)">
            <text:p/>
          </table:table-cell>
          <table:table-cell/>
          <table:table-cell table:formula="of:=IF([.D49]=1; COM.MICROSOFT.CONCAT(&quot;ModbusCoils[coilIndexFromAddress(MODBUS_ADDR_&quot;; [.B49]; &quot;)] = &quot;; [.C49]; &quot;;&quot;); IF([.E49]=1; COM.MICROSOFT.CONCAT(&quot;ModbusHoldingRegisters[holdingIndexFromAddress(MODBUS_ADDR_&quot;; [.B49]; &quot;)] = &quot;; [.C49]; &quot;u;&quot;); &quot;&quot;))">
            <text:p/>
          </table:table-cell>
        </table:table-row>
        <table:table-row table:style-name="ro1">
          <table:table-cell table:style-name="ce17" table:formula="of:=[$List.B50]" office:value-type="string" office:string-value="holding reg." calcext:value-type="string">
            <text:p>holding reg.</text:p>
          </table:table-cell>
          <table:table-cell table:style-name="ce17" table:formula="of:=[$List.I50]" office:value-type="string" office:string-value="CUP2_ERROR" calcext:value-type="string">
            <text:p>CUP2_ERROR</text:p>
          </table:table-cell>
          <table:table-cell table:style-name="ce17" table:formula="of:=[$List.G50]" office:value-type="float" office:value="0" calcext:value-type="float">
            <text:p>0</text:p>
          </table:table-cell>
          <table:table-cell table:formula="of:=IF(AND(([.A50]=&quot;coil&quot;);([.C50]=&quot;true&quot;)); 1; &quot;&quot;)">
            <text:p/>
          </table:table-cell>
          <table:table-cell table:formula="of:=IF(AND(([.A50]=&quot;holding reg.&quot;);([.C50] &lt;&gt; 0)); 1; &quot;&quot;)">
            <text:p/>
          </table:table-cell>
          <table:table-cell/>
          <table:table-cell table:formula="of:=IF([.D50]=1; COM.MICROSOFT.CONCAT(&quot;ModbusCoils[coilIndexFromAddress(MODBUS_ADDR_&quot;; [.B50]; &quot;)] = &quot;; [.C50]; &quot;;&quot;); IF([.E50]=1; COM.MICROSOFT.CONCAT(&quot;ModbusHoldingRegisters[holdingIndexFromAddress(MODBUS_ADDR_&quot;; [.B50]; &quot;)] = &quot;; [.C50]; &quot;u;&quot;); &quot;&quot;))">
            <text:p/>
          </table:table-cell>
        </table:table-row>
        <table:table-row table:style-name="ro1">
          <table:table-cell table:style-name="ce17" table:formula="of:=[$List.B51]" office:value-type="string" office:string-value="holding reg." calcext:value-type="string">
            <text:p>holding reg.</text:p>
          </table:table-cell>
          <table:table-cell table:style-name="ce17" table:formula="of:=[$List.I51]" office:value-type="string" office:string-value="CUP3_ERROR" calcext:value-type="string">
            <text:p>CUP3_ERROR</text:p>
          </table:table-cell>
          <table:table-cell table:style-name="ce17" table:formula="of:=[$List.G51]" office:value-type="float" office:value="0" calcext:value-type="float">
            <text:p>0</text:p>
          </table:table-cell>
          <table:table-cell table:formula="of:=IF(AND(([.A51]=&quot;coil&quot;);([.C51]=&quot;true&quot;)); 1; &quot;&quot;)">
            <text:p/>
          </table:table-cell>
          <table:table-cell table:formula="of:=IF(AND(([.A51]=&quot;holding reg.&quot;);([.C51] &lt;&gt; 0)); 1; &quot;&quot;)">
            <text:p/>
          </table:table-cell>
          <table:table-cell/>
          <table:table-cell table:formula="of:=IF([.D51]=1; COM.MICROSOFT.CONCAT(&quot;ModbusCoils[coilIndexFromAddress(MODBUS_ADDR_&quot;; [.B51]; &quot;)] = &quot;; [.C51]; &quot;;&quot;); IF([.E51]=1; COM.MICROSOFT.CONCAT(&quot;ModbusHoldingRegisters[holdingIndexFromAddress(MODBUS_ADDR_&quot;; [.B51]; &quot;)] = &quot;; [.C51]; &quot;u;&quot;); &quot;&quot;))">
            <text:p/>
          </table:table-cell>
        </table:table-row>
        <table:table-row table:style-name="ro1">
          <table:table-cell table:style-name="ce17" table:formula="of:=[$List.B52]" office:value-type="string" office:string-value="holding reg." calcext:value-type="string">
            <text:p>holding reg.</text:p>
          </table:table-cell>
          <table:table-cell table:style-name="ce17" table:formula="of:=[$List.I52]" office:value-type="string" office:string-value="CUP1_LAST_ERROR" calcext:value-type="string">
            <text:p>CUP1_LAST_ERROR</text:p>
          </table:table-cell>
          <table:table-cell table:style-name="ce17" table:formula="of:=[$List.G52]" office:value-type="float" office:value="0" calcext:value-type="float">
            <text:p>0</text:p>
          </table:table-cell>
          <table:table-cell table:formula="of:=IF(AND(([.A52]=&quot;coil&quot;);([.C52]=&quot;true&quot;)); 1; &quot;&quot;)">
            <text:p/>
          </table:table-cell>
          <table:table-cell table:formula="of:=IF(AND(([.A52]=&quot;holding reg.&quot;);([.C52] &lt;&gt; 0)); 1; &quot;&quot;)">
            <text:p/>
          </table:table-cell>
          <table:table-cell/>
          <table:table-cell table:formula="of:=IF([.D52]=1; COM.MICROSOFT.CONCAT(&quot;ModbusCoils[coilIndexFromAddress(MODBUS_ADDR_&quot;; [.B52]; &quot;)] = &quot;; [.C52]; &quot;;&quot;); IF([.E52]=1; COM.MICROSOFT.CONCAT(&quot;ModbusHoldingRegisters[holdingIndexFromAddress(MODBUS_ADDR_&quot;; [.B52]; &quot;)] = &quot;; [.C52]; &quot;u;&quot;); &quot;&quot;))">
            <text:p/>
          </table:table-cell>
        </table:table-row>
        <table:table-row table:style-name="ro1">
          <table:table-cell table:style-name="ce17" table:formula="of:=[$List.B53]" office:value-type="string" office:string-value="holding reg." calcext:value-type="string">
            <text:p>holding reg.</text:p>
          </table:table-cell>
          <table:table-cell table:style-name="ce17" table:formula="of:=[$List.I53]" office:value-type="string" office:string-value="CUP2_LAST_ERROR" calcext:value-type="string">
            <text:p>CUP2_LAST_ERROR</text:p>
          </table:table-cell>
          <table:table-cell table:style-name="ce17" table:formula="of:=[$List.G53]" office:value-type="float" office:value="0" calcext:value-type="float">
            <text:p>0</text:p>
          </table:table-cell>
          <table:table-cell table:formula="of:=IF(AND(([.A53]=&quot;coil&quot;);([.C53]=&quot;true&quot;)); 1; &quot;&quot;)">
            <text:p/>
          </table:table-cell>
          <table:table-cell table:formula="of:=IF(AND(([.A53]=&quot;holding reg.&quot;);([.C53] &lt;&gt; 0)); 1; &quot;&quot;)">
            <text:p/>
          </table:table-cell>
          <table:table-cell/>
          <table:table-cell table:formula="of:=IF([.D53]=1; COM.MICROSOFT.CONCAT(&quot;ModbusCoils[coilIndexFromAddress(MODBUS_ADDR_&quot;; [.B53]; &quot;)] = &quot;; [.C53]; &quot;;&quot;); IF([.E53]=1; COM.MICROSOFT.CONCAT(&quot;ModbusHoldingRegisters[holdingIndexFromAddress(MODBUS_ADDR_&quot;; [.B53]; &quot;)] = &quot;; [.C53]; &quot;u;&quot;); &quot;&quot;))">
            <text:p/>
          </table:table-cell>
        </table:table-row>
        <table:table-row table:style-name="ro1">
          <table:table-cell table:style-name="ce17" table:formula="of:=[$List.B54]" office:value-type="string" office:string-value="holding reg." calcext:value-type="string">
            <text:p>holding reg.</text:p>
          </table:table-cell>
          <table:table-cell table:style-name="ce17" table:formula="of:=[$List.I54]" office:value-type="string" office:string-value="CUP3_LAST_ERROR" calcext:value-type="string">
            <text:p>CUP3_LAST_ERROR</text:p>
          </table:table-cell>
          <table:table-cell table:style-name="ce17" table:formula="of:=[$List.G54]" office:value-type="float" office:value="0" calcext:value-type="float">
            <text:p>0</text:p>
          </table:table-cell>
          <table:table-cell table:formula="of:=IF(AND(([.A54]=&quot;coil&quot;);([.C54]=&quot;true&quot;)); 1; &quot;&quot;)">
            <text:p/>
          </table:table-cell>
          <table:table-cell table:formula="of:=IF(AND(([.A54]=&quot;holding reg.&quot;);([.C54] &lt;&gt; 0)); 1; &quot;&quot;)">
            <text:p/>
          </table:table-cell>
          <table:table-cell/>
          <table:table-cell table:formula="of:=IF([.D54]=1; COM.MICROSOFT.CONCAT(&quot;ModbusCoils[coilIndexFromAddress(MODBUS_ADDR_&quot;; [.B54]; &quot;)] = &quot;; [.C54]; &quot;;&quot;); IF([.E54]=1; COM.MICROSOFT.CONCAT(&quot;ModbusHoldingRegisters[holdingIndexFromAddress(MODBUS_ADDR_&quot;; [.B54]; &quot;)] = &quot;; [.C54]; &quot;u;&quot;); &quot;&quot;))">
            <text:p/>
          </table:table-cell>
        </table:table-row>
        <table:table-row table:style-name="ro1">
          <table:table-cell table:style-name="ce17" table:formula="of:=[$List.B55]" office:value-type="string" office:string-value="holding reg." calcext:value-type="string">
            <text:p>holding reg.</text:p>
          </table:table-cell>
          <table:table-cell table:style-name="ce17" table:formula="of:=[$List.I55]" office:value-type="string" office:string-value="CUP1_ERROR_STORAGE" calcext:value-type="string">
            <text:p>CUP1_ERROR_STORAGE</text:p>
          </table:table-cell>
          <table:table-cell table:style-name="ce17" table:formula="of:=[$List.G55]" office:value-type="float" office:value="0" calcext:value-type="float">
            <text:p>0</text:p>
          </table:table-cell>
          <table:table-cell table:formula="of:=IF(AND(([.A55]=&quot;coil&quot;);([.C55]=&quot;true&quot;)); 1; &quot;&quot;)">
            <text:p/>
          </table:table-cell>
          <table:table-cell table:formula="of:=IF(AND(([.A55]=&quot;holding reg.&quot;);([.C55] &lt;&gt; 0)); 1; &quot;&quot;)">
            <text:p/>
          </table:table-cell>
          <table:table-cell/>
          <table:table-cell table:formula="of:=IF([.D55]=1; COM.MICROSOFT.CONCAT(&quot;ModbusCoils[coilIndexFromAddress(MODBUS_ADDR_&quot;; [.B55]; &quot;)] = &quot;; [.C55]; &quot;;&quot;); IF([.E55]=1; COM.MICROSOFT.CONCAT(&quot;ModbusHoldingRegisters[holdingIndexFromAddress(MODBUS_ADDR_&quot;; [.B55]; &quot;)] = &quot;; [.C55]; &quot;u;&quot;); &quot;&quot;))">
            <text:p/>
          </table:table-cell>
        </table:table-row>
        <table:table-row table:style-name="ro1">
          <table:table-cell table:style-name="ce17" table:formula="of:=[$List.B56]" office:value-type="string" office:string-value="holding reg." calcext:value-type="string">
            <text:p>holding reg.</text:p>
          </table:table-cell>
          <table:table-cell table:style-name="ce17" table:formula="of:=[$List.I56]" office:value-type="string" office:string-value="CUP2_ERROR_STORAGE" calcext:value-type="string">
            <text:p>CUP2_ERROR_STORAGE</text:p>
          </table:table-cell>
          <table:table-cell table:style-name="ce17" table:formula="of:=[$List.G56]" office:value-type="float" office:value="0" calcext:value-type="float">
            <text:p>0</text:p>
          </table:table-cell>
          <table:table-cell table:formula="of:=IF(AND(([.A56]=&quot;coil&quot;);([.C56]=&quot;true&quot;)); 1; &quot;&quot;)">
            <text:p/>
          </table:table-cell>
          <table:table-cell table:formula="of:=IF(AND(([.A56]=&quot;holding reg.&quot;);([.C56] &lt;&gt; 0)); 1; &quot;&quot;)">
            <text:p/>
          </table:table-cell>
          <table:table-cell/>
          <table:table-cell table:formula="of:=IF([.D56]=1; COM.MICROSOFT.CONCAT(&quot;ModbusCoils[coilIndexFromAddress(MODBUS_ADDR_&quot;; [.B56]; &quot;)] = &quot;; [.C56]; &quot;;&quot;); IF([.E56]=1; COM.MICROSOFT.CONCAT(&quot;ModbusHoldingRegisters[holdingIndexFromAddress(MODBUS_ADDR_&quot;; [.B56]; &quot;)] = &quot;; [.C56]; &quot;u;&quot;); &quot;&quot;))">
            <text:p/>
          </table:table-cell>
        </table:table-row>
        <table:table-row table:style-name="ro1">
          <table:table-cell table:style-name="ce17" table:formula="of:=[$List.B57]" office:value-type="string" office:string-value="holding reg." calcext:value-type="string">
            <text:p>holding reg.</text:p>
          </table:table-cell>
          <table:table-cell table:style-name="ce17" table:formula="of:=[$List.I57]" office:value-type="string" office:string-value="CUP3_ERROR_STORAGE" calcext:value-type="string">
            <text:p>CUP3_ERROR_STORAGE</text:p>
          </table:table-cell>
          <table:table-cell table:style-name="ce17" table:formula="of:=[$List.G57]" office:value-type="float" office:value="0" calcext:value-type="float">
            <text:p>0</text:p>
          </table:table-cell>
          <table:table-cell table:formula="of:=IF(AND(([.A57]=&quot;coil&quot;);([.C57]=&quot;true&quot;)); 1; &quot;&quot;)">
            <text:p/>
          </table:table-cell>
          <table:table-cell table:formula="of:=IF(AND(([.A57]=&quot;holding reg.&quot;);([.C57] &lt;&gt; 0)); 1; &quot;&quot;)">
            <text:p/>
          </table:table-cell>
          <table:table-cell/>
          <table:table-cell table:formula="of:=IF([.D57]=1; COM.MICROSOFT.CONCAT(&quot;ModbusCoils[coilIndexFromAddress(MODBUS_ADDR_&quot;; [.B57]; &quot;)] = &quot;; [.C57]; &quot;;&quot;); IF([.E57]=1; COM.MICROSOFT.CONCAT(&quot;ModbusHoldingRegisters[holdingIndexFromAddress(MODBUS_ADDR_&quot;; [.B57]; &quot;)] = &quot;; [.C57]; &quot;u;&quot;); &quot;&quot;))">
            <text:p/>
          </table:table-cell>
        </table:table-row>
        <table:table-row table:style-name="ro1">
          <table:table-cell table:style-name="ce17" table:formula="of:=[$List.B58]" office:value-type="float" office:value="0" calcext:value-type="float">
            <text:p>0</text:p>
          </table:table-cell>
          <table:table-cell table:style-name="ce17" table:formula="of:=[$List.I58]">
            <text:p/>
          </table:table-cell>
          <table:table-cell table:style-name="ce17" table:formula="of:=[$List.G58]" office:value-type="float" office:value="0" calcext:value-type="float">
            <text:p>0</text:p>
          </table:table-cell>
          <table:table-cell table:formula="of:=IF(AND(([.A58]=&quot;coil&quot;);([.C58]=&quot;true&quot;)); 1; &quot;&quot;)">
            <text:p/>
          </table:table-cell>
          <table:table-cell table:formula="of:=IF(AND(([.A58]=&quot;holding reg.&quot;);([.C58] &lt;&gt; 0)); 1; &quot;&quot;)">
            <text:p/>
          </table:table-cell>
          <table:table-cell/>
          <table:table-cell table:formula="of:=IF([.D58]=1; COM.MICROSOFT.CONCAT(&quot;ModbusCoils[coilIndexFromAddress(MODBUS_ADDR_&quot;; [.B58]; &quot;)] = &quot;; [.C58]; &quot;;&quot;); IF([.E58]=1; COM.MICROSOFT.CONCAT(&quot;ModbusHoldingRegisters[holdingIndexFromAddress(MODBUS_ADDR_&quot;; [.B58]; &quot;)] = &quot;; [.C58]; &quot;u;&quot;); &quot;&quot;))">
            <text:p/>
          </table:table-cell>
        </table:table-row>
        <table:table-row table:style-name="ro1">
          <table:table-cell table:style-name="ce17" table:formula="of:=[$List.B59]" office:value-type="string" office:string-value="holding reg." calcext:value-type="string">
            <text:p>holding reg.</text:p>
          </table:table-cell>
          <table:table-cell table:style-name="ce17" table:formula="of:=[$List.I59]" office:value-type="string" office:string-value="INSTALLED_CUPS" calcext:value-type="string">
            <text:p>INSTALLED_CUPS</text:p>
          </table:table-cell>
          <table:table-cell table:style-name="ce17" table:formula="of:=[$List.G59]" office:value-type="float" office:value="3" calcext:value-type="float">
            <text:p>3</text:p>
          </table:table-cell>
          <table:table-cell table:formula="of:=IF(AND(([.A59]=&quot;coil&quot;);([.C59]=&quot;true&quot;)); 1; &quot;&quot;)">
            <text:p/>
          </table:table-cell>
          <table:table-cell table:formula="of:=IF(AND(([.A59]=&quot;holding reg.&quot;);([.C59] &lt;&gt; 0)); 1; &quot;&quot;)" office:value-type="float" office:value="1" calcext:value-type="float">
            <text:p>1</text:p>
          </table:table-cell>
          <table:table-cell/>
          <table:table-cell table:formula="of:=IF([.D59]=1; COM.MICROSOFT.CONCAT(&quot;ModbusCoils[coilIndexFromAddress(MODBUS_ADDR_&quot;; [.B59]; &quot;)] = &quot;; [.C59]; &quot;;&quot;); IF([.E59]=1; COM.MICROSOFT.CONCAT(&quot;ModbusHoldingRegisters[holdingIndexFromAddress(MODBUS_ADDR_&quot;; [.B59]; &quot;)] = &quot;; [.C59]; &quot;u;&quot;); &quot;&quot;))" office:value-type="string" office:string-value="ModbusHoldingRegisters[holdingIndexFromAddress(MODBUS_ADDR_INSTALLED_CUPS)] = 3u;" calcext:value-type="string">
            <text:p>ModbusHoldingRegisters[holdingIndexFromAddress(MODBUS_ADDR_INSTALLED_CUPS)] = 3u;</text:p>
          </table:table-cell>
        </table:table-row>
        <table:table-row table:style-name="ro1">
          <table:table-cell table:style-name="ce17" table:formula="of:=[$List.B60]" office:value-type="string" office:string-value="holding reg." calcext:value-type="string">
            <text:p>holding reg.</text:p>
          </table:table-cell>
          <table:table-cell table:style-name="ce17" table:formula="of:=[$List.I60]" office:value-type="string" office:string-value="ELECTRODES_CUP1" calcext:value-type="string">
            <text:p>ELECTRODES_CUP1</text:p>
          </table:table-cell>
          <table:table-cell table:style-name="ce17" table:formula="of:=[$List.G60]" office:value-type="float" office:value="4" calcext:value-type="float">
            <text:p>4</text:p>
          </table:table-cell>
          <table:table-cell table:formula="of:=IF(AND(([.A60]=&quot;coil&quot;);([.C60]=&quot;true&quot;)); 1; &quot;&quot;)">
            <text:p/>
          </table:table-cell>
          <table:table-cell table:formula="of:=IF(AND(([.A60]=&quot;holding reg.&quot;);([.C60] &lt;&gt; 0)); 1; &quot;&quot;)" office:value-type="float" office:value="1" calcext:value-type="float">
            <text:p>1</text:p>
          </table:table-cell>
          <table:table-cell/>
          <table:table-cell table:formula="of:=IF([.D60]=1; COM.MICROSOFT.CONCAT(&quot;ModbusCoils[coilIndexFromAddress(MODBUS_ADDR_&quot;; [.B60]; &quot;)] = &quot;; [.C60]; &quot;;&quot;); IF([.E60]=1; COM.MICROSOFT.CONCAT(&quot;ModbusHoldingRegisters[holdingIndexFromAddress(MODBUS_ADDR_&quot;; [.B60]; &quot;)] = &quot;; [.C60]; &quot;u;&quot;); &quot;&quot;))" office:value-type="string" office:string-value="ModbusHoldingRegisters[holdingIndexFromAddress(MODBUS_ADDR_ELECTRODES_CUP1)] = 4u;" calcext:value-type="string">
            <text:p>ModbusHoldingRegisters[holdingIndexFromAddress(MODBUS_ADDR_ELECTRODES_CUP1)] = 4u;</text:p>
          </table:table-cell>
        </table:table-row>
        <table:table-row table:style-name="ro1">
          <table:table-cell table:style-name="ce17" table:formula="of:=[$List.B61]" office:value-type="string" office:string-value="holding reg." calcext:value-type="string">
            <text:p>holding reg.</text:p>
          </table:table-cell>
          <table:table-cell table:style-name="ce17" table:formula="of:=[$List.I61]" office:value-type="string" office:string-value="ELECTRODES_CUP2" calcext:value-type="string">
            <text:p>ELECTRODES_CUP2</text:p>
          </table:table-cell>
          <table:table-cell table:style-name="ce17" table:formula="of:=[$List.G61]" office:value-type="float" office:value="4" calcext:value-type="float">
            <text:p>4</text:p>
          </table:table-cell>
          <table:table-cell table:formula="of:=IF(AND(([.A61]=&quot;coil&quot;);([.C61]=&quot;true&quot;)); 1; &quot;&quot;)">
            <text:p/>
          </table:table-cell>
          <table:table-cell table:formula="of:=IF(AND(([.A61]=&quot;holding reg.&quot;);([.C61] &lt;&gt; 0)); 1; &quot;&quot;)" office:value-type="float" office:value="1" calcext:value-type="float">
            <text:p>1</text:p>
          </table:table-cell>
          <table:table-cell/>
          <table:table-cell table:formula="of:=IF([.D61]=1; COM.MICROSOFT.CONCAT(&quot;ModbusCoils[coilIndexFromAddress(MODBUS_ADDR_&quot;; [.B61]; &quot;)] = &quot;; [.C61]; &quot;;&quot;); IF([.E61]=1; COM.MICROSOFT.CONCAT(&quot;ModbusHoldingRegisters[holdingIndexFromAddress(MODBUS_ADDR_&quot;; [.B61]; &quot;)] = &quot;; [.C61]; &quot;u;&quot;); &quot;&quot;))" office:value-type="string" office:string-value="ModbusHoldingRegisters[holdingIndexFromAddress(MODBUS_ADDR_ELECTRODES_CUP2)] = 4u;" calcext:value-type="string">
            <text:p>ModbusHoldingRegisters[holdingIndexFromAddress(MODBUS_ADDR_ELECTRODES_CUP2)] = 4u;</text:p>
          </table:table-cell>
        </table:table-row>
        <table:table-row table:style-name="ro1">
          <table:table-cell table:style-name="ce17" table:formula="of:=[$List.B62]" office:value-type="string" office:string-value="holding reg." calcext:value-type="string">
            <text:p>holding reg.</text:p>
          </table:table-cell>
          <table:table-cell table:style-name="ce17" table:formula="of:=[$List.I62]" office:value-type="string" office:string-value="ELECTRODES_CUP3" calcext:value-type="string">
            <text:p>ELECTRODES_CUP3</text:p>
          </table:table-cell>
          <table:table-cell table:style-name="ce17" table:formula="of:=[$List.G62]" office:value-type="float" office:value="4" calcext:value-type="float">
            <text:p>4</text:p>
          </table:table-cell>
          <table:table-cell table:formula="of:=IF(AND(([.A62]=&quot;coil&quot;);([.C62]=&quot;true&quot;)); 1; &quot;&quot;)">
            <text:p/>
          </table:table-cell>
          <table:table-cell table:formula="of:=IF(AND(([.A62]=&quot;holding reg.&quot;);([.C62] &lt;&gt; 0)); 1; &quot;&quot;)" office:value-type="float" office:value="1" calcext:value-type="float">
            <text:p>1</text:p>
          </table:table-cell>
          <table:table-cell/>
          <table:table-cell table:formula="of:=IF([.D62]=1; COM.MICROSOFT.CONCAT(&quot;ModbusCoils[coilIndexFromAddress(MODBUS_ADDR_&quot;; [.B62]; &quot;)] = &quot;; [.C62]; &quot;;&quot;); IF([.E62]=1; COM.MICROSOFT.CONCAT(&quot;ModbusHoldingRegisters[holdingIndexFromAddress(MODBUS_ADDR_&quot;; [.B62]; &quot;)] = &quot;; [.C62]; &quot;u;&quot;); &quot;&quot;))" office:value-type="string" office:string-value="ModbusHoldingRegisters[holdingIndexFromAddress(MODBUS_ADDR_ELECTRODES_CUP3)] = 4u;" calcext:value-type="string">
            <text:p>ModbusHoldingRegisters[holdingIndexFromAddress(MODBUS_ADDR_ELECTRODES_CUP3)] = 4u;</text:p>
          </table:table-cell>
        </table:table-row>
        <table:table-row table:style-name="ro1">
          <table:table-cell table:style-name="ce17" table:formula="of:=[$List.B63]" office:value-type="string" office:string-value="holding reg." calcext:value-type="string">
            <text:p>holding reg.</text:p>
          </table:table-cell>
          <table:table-cell table:style-name="ce17" table:formula="of:=[$List.I63]" office:value-type="string" office:string-value="CUP1_TYPE" calcext:value-type="string">
            <text:p>CUP1_TYPE</text:p>
          </table:table-cell>
          <table:table-cell table:style-name="ce17" table:formula="of:=[$List.G63]" office:value-type="float" office:value="0" calcext:value-type="float">
            <text:p>0</text:p>
          </table:table-cell>
          <table:table-cell table:formula="of:=IF(AND(([.A63]=&quot;coil&quot;);([.C63]=&quot;true&quot;)); 1; &quot;&quot;)">
            <text:p/>
          </table:table-cell>
          <table:table-cell table:formula="of:=IF(AND(([.A63]=&quot;holding reg.&quot;);([.C63] &lt;&gt; 0)); 1; &quot;&quot;)">
            <text:p/>
          </table:table-cell>
          <table:table-cell/>
          <table:table-cell table:formula="of:=IF([.D63]=1; COM.MICROSOFT.CONCAT(&quot;ModbusCoils[coilIndexFromAddress(MODBUS_ADDR_&quot;; [.B63]; &quot;)] = &quot;; [.C63]; &quot;;&quot;); IF([.E63]=1; COM.MICROSOFT.CONCAT(&quot;ModbusHoldingRegisters[holdingIndexFromAddress(MODBUS_ADDR_&quot;; [.B63]; &quot;)] = &quot;; [.C63]; &quot;u;&quot;); &quot;&quot;))">
            <text:p/>
          </table:table-cell>
        </table:table-row>
        <table:table-row table:style-name="ro1">
          <table:table-cell table:style-name="ce17" table:formula="of:=[$List.B64]" office:value-type="string" office:string-value="holding reg." calcext:value-type="string">
            <text:p>holding reg.</text:p>
          </table:table-cell>
          <table:table-cell table:style-name="ce17" table:formula="of:=[$List.I64]" office:value-type="string" office:string-value="CUP2_TYPE" calcext:value-type="string">
            <text:p>CUP2_TYPE</text:p>
          </table:table-cell>
          <table:table-cell table:style-name="ce17" table:formula="of:=[$List.G64]" office:value-type="float" office:value="1" calcext:value-type="float">
            <text:p>1</text:p>
          </table:table-cell>
          <table:table-cell table:formula="of:=IF(AND(([.A64]=&quot;coil&quot;);([.C64]=&quot;true&quot;)); 1; &quot;&quot;)">
            <text:p/>
          </table:table-cell>
          <table:table-cell table:formula="of:=IF(AND(([.A64]=&quot;holding reg.&quot;);([.C64] &lt;&gt; 0)); 1; &quot;&quot;)" office:value-type="float" office:value="1" calcext:value-type="float">
            <text:p>1</text:p>
          </table:table-cell>
          <table:table-cell/>
          <table:table-cell table:formula="of:=IF([.D64]=1; COM.MICROSOFT.CONCAT(&quot;ModbusCoils[coilIndexFromAddress(MODBUS_ADDR_&quot;; [.B64]; &quot;)] = &quot;; [.C64]; &quot;;&quot;); IF([.E64]=1; COM.MICROSOFT.CONCAT(&quot;ModbusHoldingRegisters[holdingIndexFromAddress(MODBUS_ADDR_&quot;; [.B64]; &quot;)] = &quot;; [.C64]; &quot;u;&quot;); &quot;&quot;))" office:value-type="string" office:string-value="ModbusHoldingRegisters[holdingIndexFromAddress(MODBUS_ADDR_CUP2_TYPE)] = 1u;" calcext:value-type="string">
            <text:p>ModbusHoldingRegisters[holdingIndexFromAddress(MODBUS_ADDR_CUP2_TYPE)] = 1u;</text:p>
          </table:table-cell>
        </table:table-row>
        <table:table-row table:style-name="ro1">
          <table:table-cell table:style-name="ce17" table:formula="of:=[$List.B65]" office:value-type="string" office:string-value="holding reg." calcext:value-type="string">
            <text:p>holding reg.</text:p>
          </table:table-cell>
          <table:table-cell table:style-name="ce17" table:formula="of:=[$List.I65]" office:value-type="string" office:string-value="CUP3_TYPE" calcext:value-type="string">
            <text:p>CUP3_TYPE</text:p>
          </table:table-cell>
          <table:table-cell table:style-name="ce17" table:formula="of:=[$List.G65]" office:value-type="float" office:value="2" calcext:value-type="float">
            <text:p>2</text:p>
          </table:table-cell>
          <table:table-cell table:formula="of:=IF(AND(([.A65]=&quot;coil&quot;);([.C65]=&quot;true&quot;)); 1; &quot;&quot;)">
            <text:p/>
          </table:table-cell>
          <table:table-cell table:formula="of:=IF(AND(([.A65]=&quot;holding reg.&quot;);([.C65] &lt;&gt; 0)); 1; &quot;&quot;)" office:value-type="float" office:value="1" calcext:value-type="float">
            <text:p>1</text:p>
          </table:table-cell>
          <table:table-cell/>
          <table:table-cell table:formula="of:=IF([.D65]=1; COM.MICROSOFT.CONCAT(&quot;ModbusCoils[coilIndexFromAddress(MODBUS_ADDR_&quot;; [.B65]; &quot;)] = &quot;; [.C65]; &quot;;&quot;); IF([.E65]=1; COM.MICROSOFT.CONCAT(&quot;ModbusHoldingRegisters[holdingIndexFromAddress(MODBUS_ADDR_&quot;; [.B65]; &quot;)] = &quot;; [.C65]; &quot;u;&quot;); &quot;&quot;))" office:value-type="string" office:string-value="ModbusHoldingRegisters[holdingIndexFromAddress(MODBUS_ADDR_CUP3_TYPE)] = 2u;" calcext:value-type="string">
            <text:p>ModbusHoldingRegisters[holdingIndexFromAddress(MODBUS_ADDR_CUP3_TYPE)] = 2u;</text:p>
          </table:table-cell>
        </table:table-row>
        <table:table-row table:style-name="ro1">
          <table:table-cell table:style-name="ce17" table:formula="of:=[$List.B66]" office:value-type="float" office:value="0" calcext:value-type="float">
            <text:p>0</text:p>
          </table:table-cell>
          <table:table-cell table:style-name="ce17" table:formula="of:=[$List.I66]">
            <text:p/>
          </table:table-cell>
          <table:table-cell table:style-name="ce17" table:formula="of:=[$List.G66]" office:value-type="float" office:value="0" calcext:value-type="float">
            <text:p>0</text:p>
          </table:table-cell>
          <table:table-cell table:formula="of:=IF(AND(([.A66]=&quot;coil&quot;);([.C66]=&quot;true&quot;)); 1; &quot;&quot;)">
            <text:p/>
          </table:table-cell>
          <table:table-cell table:formula="of:=IF(AND(([.A66]=&quot;holding reg.&quot;);([.C66] &lt;&gt; 0)); 1; &quot;&quot;)">
            <text:p/>
          </table:table-cell>
          <table:table-cell/>
          <table:table-cell table:formula="of:=IF([.D66]=1; COM.MICROSOFT.CONCAT(&quot;ModbusCoils[coilIndexFromAddress(MODBUS_ADDR_&quot;; [.B66]; &quot;)] = &quot;; [.C66]; &quot;;&quot;); IF([.E66]=1; COM.MICROSOFT.CONCAT(&quot;ModbusHoldingRegisters[holdingIndexFromAddress(MODBUS_ADDR_&quot;; [.B66]; &quot;)] = &quot;; [.C66]; &quot;u;&quot;); &quot;&quot;))">
            <text:p/>
          </table:table-cell>
        </table:table-row>
        <table:table-row table:style-name="ro1">
          <table:table-cell table:style-name="ce17" table:formula="of:=[$List.B67]" office:value-type="string" office:string-value="holding reg." calcext:value-type="string">
            <text:p>holding reg.</text:p>
          </table:table-cell>
          <table:table-cell table:style-name="ce17" table:formula="of:=[$List.I67]" office:value-type="string" office:string-value="CALIBRATION_CURRENT1" calcext:value-type="string">
            <text:p>CALIBRATION_CURRENT1</text:p>
          </table:table-cell>
          <table:table-cell table:style-name="ce17" table:formula="of:=[$List.G67]" office:value-type="float" office:value="24169" calcext:value-type="float">
            <text:p>24169</text:p>
          </table:table-cell>
          <table:table-cell table:formula="of:=IF(AND(([.A67]=&quot;coil&quot;);([.C67]=&quot;true&quot;)); 1; &quot;&quot;)">
            <text:p/>
          </table:table-cell>
          <table:table-cell table:formula="of:=IF(AND(([.A67]=&quot;holding reg.&quot;);([.C67] &lt;&gt; 0)); 1; &quot;&quot;)" office:value-type="float" office:value="1" calcext:value-type="float">
            <text:p>1</text:p>
          </table:table-cell>
          <table:table-cell/>
          <table:table-cell table:formula="of:=IF([.D67]=1; COM.MICROSOFT.CONCAT(&quot;ModbusCoils[coilIndexFromAddress(MODBUS_ADDR_&quot;; [.B67]; &quot;)] = &quot;; [.C67]; &quot;;&quot;); IF([.E67]=1; COM.MICROSOFT.CONCAT(&quot;ModbusHoldingRegisters[holdingIndexFromAddress(MODBUS_ADDR_&quot;; [.B67]; &quot;)] = &quot;; [.C67]; &quot;u;&quot;); &quot;&quot;))" office:value-type="string" office:string-value="ModbusHoldingRegisters[holdingIndexFromAddress(MODBUS_ADDR_CALIBRATION_CURRENT1)] = 24169u;" calcext:value-type="string">
            <text:p>ModbusHoldingRegisters[holdingIndexFromAddress(MODBUS_ADDR_CALIBRATION_CURRENT1)] = 24169u;</text:p>
          </table:table-cell>
        </table:table-row>
        <table:table-row table:style-name="ro1">
          <table:table-cell table:style-name="ce17" table:formula="of:=[$List.B68]" office:value-type="string" office:string-value="holding reg." calcext:value-type="string">
            <text:p>holding reg.</text:p>
          </table:table-cell>
          <table:table-cell table:style-name="ce17" table:formula="of:=[$List.I68]" office:value-type="string" office:string-value="CALIBRATION_CURRENT2" calcext:value-type="string">
            <text:p>CALIBRATION_CURRENT2</text:p>
          </table:table-cell>
          <table:table-cell table:style-name="ce17" table:formula="of:=[$List.G68]" office:value-type="float" office:value="2410" calcext:value-type="float">
            <text:p>2410</text:p>
          </table:table-cell>
          <table:table-cell table:formula="of:=IF(AND(([.A68]=&quot;coil&quot;);([.C68]=&quot;true&quot;)); 1; &quot;&quot;)">
            <text:p/>
          </table:table-cell>
          <table:table-cell table:formula="of:=IF(AND(([.A68]=&quot;holding reg.&quot;);([.C68] &lt;&gt; 0)); 1; &quot;&quot;)" office:value-type="float" office:value="1" calcext:value-type="float">
            <text:p>1</text:p>
          </table:table-cell>
          <table:table-cell/>
          <table:table-cell table:formula="of:=IF([.D68]=1; COM.MICROSOFT.CONCAT(&quot;ModbusCoils[coilIndexFromAddress(MODBUS_ADDR_&quot;; [.B68]; &quot;)] = &quot;; [.C68]; &quot;;&quot;); IF([.E68]=1; COM.MICROSOFT.CONCAT(&quot;ModbusHoldingRegisters[holdingIndexFromAddress(MODBUS_ADDR_&quot;; [.B68]; &quot;)] = &quot;; [.C68]; &quot;u;&quot;); &quot;&quot;))" office:value-type="string" office:string-value="ModbusHoldingRegisters[holdingIndexFromAddress(MODBUS_ADDR_CALIBRATION_CURRENT2)] = 2410u;" calcext:value-type="string">
            <text:p>ModbusHoldingRegisters[holdingIndexFromAddress(MODBUS_ADDR_CALIBRATION_CURRENT2)] = 2410u;</text:p>
          </table:table-cell>
        </table:table-row>
        <table:table-row table:style-name="ro1">
          <table:table-cell table:style-name="ce17" table:formula="of:=[$List.B69]" office:value-type="string" office:string-value="holding reg." calcext:value-type="string">
            <text:p>holding reg.</text:p>
          </table:table-cell>
          <table:table-cell table:style-name="ce17" table:formula="of:=[$List.I69]" office:value-type="string" office:string-value="CALIBRATION_CURRENT3" calcext:value-type="string">
            <text:p>CALIBRATION_CURRENT3</text:p>
          </table:table-cell>
          <table:table-cell table:style-name="ce17" table:formula="of:=[$List.G69]" office:value-type="float" office:value="2198" calcext:value-type="float">
            <text:p>2198</text:p>
          </table:table-cell>
          <table:table-cell table:formula="of:=IF(AND(([.A69]=&quot;coil&quot;);([.C69]=&quot;true&quot;)); 1; &quot;&quot;)">
            <text:p/>
          </table:table-cell>
          <table:table-cell table:formula="of:=IF(AND(([.A69]=&quot;holding reg.&quot;);([.C69] &lt;&gt; 0)); 1; &quot;&quot;)" office:value-type="float" office:value="1" calcext:value-type="float">
            <text:p>1</text:p>
          </table:table-cell>
          <table:table-cell/>
          <table:table-cell table:formula="of:=IF([.D69]=1; COM.MICROSOFT.CONCAT(&quot;ModbusCoils[coilIndexFromAddress(MODBUS_ADDR_&quot;; [.B69]; &quot;)] = &quot;; [.C69]; &quot;;&quot;); IF([.E69]=1; COM.MICROSOFT.CONCAT(&quot;ModbusHoldingRegisters[holdingIndexFromAddress(MODBUS_ADDR_&quot;; [.B69]; &quot;)] = &quot;; [.C69]; &quot;u;&quot;); &quot;&quot;))" office:value-type="string" office:string-value="ModbusHoldingRegisters[holdingIndexFromAddress(MODBUS_ADDR_CALIBRATION_CURRENT3)] = 2198u;" calcext:value-type="string">
            <text:p>ModbusHoldingRegisters[holdingIndexFromAddress(MODBUS_ADDR_CALIBRATION_CURRENT3)] = 2198u;</text:p>
          </table:table-cell>
        </table:table-row>
        <table:table-row table:style-name="ro1">
          <table:table-cell table:style-name="ce17" table:formula="of:=[$List.B70]" office:value-type="string" office:string-value="holding reg." calcext:value-type="string">
            <text:p>holding reg.</text:p>
          </table:table-cell>
          <table:table-cell table:style-name="ce17" table:formula="of:=[$List.I70]" office:value-type="string" office:string-value="CALIBRATION_CURRENT4" calcext:value-type="string">
            <text:p>CALIBRATION_CURRENT4</text:p>
          </table:table-cell>
          <table:table-cell table:style-name="ce17" table:formula="of:=[$List.G70]" office:value-type="float" office:value="158" calcext:value-type="float">
            <text:p>158</text:p>
          </table:table-cell>
          <table:table-cell table:formula="of:=IF(AND(([.A70]=&quot;coil&quot;);([.C70]=&quot;true&quot;)); 1; &quot;&quot;)">
            <text:p/>
          </table:table-cell>
          <table:table-cell table:formula="of:=IF(AND(([.A70]=&quot;holding reg.&quot;);([.C70] &lt;&gt; 0)); 1; &quot;&quot;)" office:value-type="float" office:value="1" calcext:value-type="float">
            <text:p>1</text:p>
          </table:table-cell>
          <table:table-cell/>
          <table:table-cell table:formula="of:=IF([.D70]=1; COM.MICROSOFT.CONCAT(&quot;ModbusCoils[coilIndexFromAddress(MODBUS_ADDR_&quot;; [.B70]; &quot;)] = &quot;; [.C70]; &quot;;&quot;); IF([.E70]=1; COM.MICROSOFT.CONCAT(&quot;ModbusHoldingRegisters[holdingIndexFromAddress(MODBUS_ADDR_&quot;; [.B70]; &quot;)] = &quot;; [.C70]; &quot;u;&quot;); &quot;&quot;))" office:value-type="string" office:string-value="ModbusHoldingRegisters[holdingIndexFromAddress(MODBUS_ADDR_CALIBRATION_CURRENT4)] = 158u;" calcext:value-type="string">
            <text:p>ModbusHoldingRegisters[holdingIndexFromAddress(MODBUS_ADDR_CALIBRATION_CURRENT4)] = 158u;</text:p>
          </table:table-cell>
        </table:table-row>
        <table:table-row table:style-name="ro1">
          <table:table-cell table:style-name="ce17" table:formula="of:=[$List.B71]" office:value-type="float" office:value="0" calcext:value-type="float">
            <text:p>0</text:p>
          </table:table-cell>
          <table:table-cell table:style-name="ce17" table:formula="of:=[$List.I71]" office:value-type="float" office:value="0" calcext:value-type="float">
            <text:p>0</text:p>
          </table:table-cell>
          <table:table-cell table:style-name="ce17" table:formula="of:=[$List.G71]" office:value-type="float" office:value="0" calcext:value-type="float">
            <text:p>0</text:p>
          </table:table-cell>
          <table:table-cell table:formula="of:=IF(AND(([.A71]=&quot;coil&quot;);([.C71]=&quot;true&quot;)); 1; &quot;&quot;)">
            <text:p/>
          </table:table-cell>
          <table:table-cell table:formula="of:=IF(AND(([.A71]=&quot;holding reg.&quot;);([.C71] &lt;&gt; 0)); 1; &quot;&quot;)">
            <text:p/>
          </table:table-cell>
          <table:table-cell/>
          <table:table-cell table:formula="of:=IF([.D71]=1; COM.MICROSOFT.CONCAT(&quot;ModbusCoils[coilIndexFromAddress(MODBUS_ADDR_&quot;; [.B71]; &quot;)] = &quot;; [.C71]; &quot;;&quot;); IF([.E71]=1; COM.MICROSOFT.CONCAT(&quot;ModbusHoldingRegisters[holdingIndexFromAddress(MODBUS_ADDR_&quot;; [.B71]; &quot;)] = &quot;; [.C71]; &quot;u;&quot;); &quot;&quot;))">
            <text:p/>
          </table:table-cell>
        </table:table-row>
        <table:table-row table:style-name="ro1">
          <table:table-cell table:style-name="ce17" table:formula="of:=[$List.B72]" office:value-type="string" office:string-value="holding reg." calcext:value-type="string">
            <text:p>holding reg.</text:p>
          </table:table-cell>
          <table:table-cell table:style-name="ce17" table:formula="of:=[$List.I72]" office:value-type="string" office:string-value="CUP1_CHANNEL1_GAIN_LOW_POINT1" calcext:value-type="string">
            <text:p>CUP1_CHANNEL1_GAIN_LOW_POINT1</text:p>
          </table:table-cell>
          <table:table-cell table:style-name="ce17" table:formula="of:=[$List.G72]" office:value-type="float" office:value="1725" calcext:value-type="float">
            <text:p>1725</text:p>
          </table:table-cell>
          <table:table-cell table:formula="of:=IF(AND(([.A72]=&quot;coil&quot;);([.C72]=&quot;true&quot;)); 1; &quot;&quot;)">
            <text:p/>
          </table:table-cell>
          <table:table-cell table:formula="of:=IF(AND(([.A72]=&quot;holding reg.&quot;);([.C72] &lt;&gt; 0)); 1; &quot;&quot;)" office:value-type="float" office:value="1" calcext:value-type="float">
            <text:p>1</text:p>
          </table:table-cell>
          <table:table-cell/>
          <table:table-cell table:formula="of:=IF([.D72]=1; COM.MICROSOFT.CONCAT(&quot;ModbusCoils[coilIndexFromAddress(MODBUS_ADDR_&quot;; [.B72]; &quot;)] = &quot;; [.C72]; &quot;;&quot;); IF([.E72]=1; COM.MICROSOFT.CONCAT(&quot;ModbusHoldingRegisters[holdingIndexFromAddress(MODBUS_ADDR_&quot;; [.B72]; &quot;)] = &quot;; [.C72]; &quot;u;&quot;); &quot;&quot;))" office:value-type="string" office:string-value="ModbusHoldingRegisters[holdingIndexFromAddress(MODBUS_ADDR_CUP1_CHANNEL1_GAIN_LOW_POINT1)] = 1725u;" calcext:value-type="string">
            <text:p>ModbusHoldingRegisters[holdingIndexFromAddress(MODBUS_ADDR_CUP1_CHANNEL1_GAIN_LOW_POINT1)] = 1725u;</text:p>
          </table:table-cell>
        </table:table-row>
        <table:table-row table:style-name="ro1">
          <table:table-cell table:style-name="ce17" table:formula="of:=[$List.B73]" office:value-type="string" office:string-value="holding reg." calcext:value-type="string">
            <text:p>holding reg.</text:p>
          </table:table-cell>
          <table:table-cell table:style-name="ce17" table:formula="of:=[$List.I73]" office:value-type="string" office:string-value="CUP1_CHANNEL1_GAIN_LOW_POINT2" calcext:value-type="string">
            <text:p>CUP1_CHANNEL1_GAIN_LOW_POINT2</text:p>
          </table:table-cell>
          <table:table-cell table:style-name="ce17" table:formula="of:=[$List.G73]" office:value-type="float" office:value="180" calcext:value-type="float">
            <text:p>180</text:p>
          </table:table-cell>
          <table:table-cell table:formula="of:=IF(AND(([.A73]=&quot;coil&quot;);([.C73]=&quot;true&quot;)); 1; &quot;&quot;)">
            <text:p/>
          </table:table-cell>
          <table:table-cell table:formula="of:=IF(AND(([.A73]=&quot;holding reg.&quot;);([.C73] &lt;&gt; 0)); 1; &quot;&quot;)" office:value-type="float" office:value="1" calcext:value-type="float">
            <text:p>1</text:p>
          </table:table-cell>
          <table:table-cell/>
          <table:table-cell table:formula="of:=IF([.D73]=1; COM.MICROSOFT.CONCAT(&quot;ModbusCoils[coilIndexFromAddress(MODBUS_ADDR_&quot;; [.B73]; &quot;)] = &quot;; [.C73]; &quot;;&quot;); IF([.E73]=1; COM.MICROSOFT.CONCAT(&quot;ModbusHoldingRegisters[holdingIndexFromAddress(MODBUS_ADDR_&quot;; [.B73]; &quot;)] = &quot;; [.C73]; &quot;u;&quot;); &quot;&quot;))" office:value-type="string" office:string-value="ModbusHoldingRegisters[holdingIndexFromAddress(MODBUS_ADDR_CUP1_CHANNEL1_GAIN_LOW_POINT2)] = 180u;" calcext:value-type="string">
            <text:p>ModbusHoldingRegisters[holdingIndexFromAddress(MODBUS_ADDR_CUP1_CHANNEL1_GAIN_LOW_POINT2)] = 180u;</text:p>
          </table:table-cell>
        </table:table-row>
        <table:table-row table:style-name="ro1">
          <table:table-cell table:style-name="ce17" table:formula="of:=[$List.B74]" office:value-type="string" office:string-value="holding reg." calcext:value-type="string">
            <text:p>holding reg.</text:p>
          </table:table-cell>
          <table:table-cell table:style-name="ce17" table:formula="of:=[$List.I74]" office:value-type="string" office:string-value="CUP1_CHANNEL1_GAIN_LOW_POINT3" calcext:value-type="string">
            <text:p>CUP1_CHANNEL1_GAIN_LOW_POINT3</text:p>
          </table:table-cell>
          <table:table-cell table:style-name="ce17" table:formula="of:=[$List.G74]" office:value-type="float" office:value="164" calcext:value-type="float">
            <text:p>164</text:p>
          </table:table-cell>
          <table:table-cell table:formula="of:=IF(AND(([.A74]=&quot;coil&quot;);([.C74]=&quot;true&quot;)); 1; &quot;&quot;)">
            <text:p/>
          </table:table-cell>
          <table:table-cell table:formula="of:=IF(AND(([.A74]=&quot;holding reg.&quot;);([.C74] &lt;&gt; 0)); 1; &quot;&quot;)" office:value-type="float" office:value="1" calcext:value-type="float">
            <text:p>1</text:p>
          </table:table-cell>
          <table:table-cell/>
          <table:table-cell table:formula="of:=IF([.D74]=1; COM.MICROSOFT.CONCAT(&quot;ModbusCoils[coilIndexFromAddress(MODBUS_ADDR_&quot;; [.B74]; &quot;)] = &quot;; [.C74]; &quot;;&quot;); IF([.E74]=1; COM.MICROSOFT.CONCAT(&quot;ModbusHoldingRegisters[holdingIndexFromAddress(MODBUS_ADDR_&quot;; [.B74]; &quot;)] = &quot;; [.C74]; &quot;u;&quot;); &quot;&quot;))" office:value-type="string" office:string-value="ModbusHoldingRegisters[holdingIndexFromAddress(MODBUS_ADDR_CUP1_CHANNEL1_GAIN_LOW_POINT3)] = 164u;" calcext:value-type="string">
            <text:p>ModbusHoldingRegisters[holdingIndexFromAddress(MODBUS_ADDR_CUP1_CHANNEL1_GAIN_LOW_POINT3)] = 164u;</text:p>
          </table:table-cell>
        </table:table-row>
        <table:table-row table:style-name="ro1">
          <table:table-cell table:style-name="ce17" table:formula="of:=[$List.B75]" office:value-type="string" office:string-value="holding reg." calcext:value-type="string">
            <text:p>holding reg.</text:p>
          </table:table-cell>
          <table:table-cell table:style-name="ce17" table:formula="of:=[$List.I75]" office:value-type="string" office:string-value="CUP1_CHANNEL1_GAIN_HIGH_POINT2" calcext:value-type="string">
            <text:p>CUP1_CHANNEL1_GAIN_HIGH_POINT2</text:p>
          </table:table-cell>
          <table:table-cell table:style-name="ce17" table:formula="of:=[$List.G75]" office:value-type="float" office:value="1741" calcext:value-type="float">
            <text:p>1741</text:p>
          </table:table-cell>
          <table:table-cell table:formula="of:=IF(AND(([.A75]=&quot;coil&quot;);([.C75]=&quot;true&quot;)); 1; &quot;&quot;)">
            <text:p/>
          </table:table-cell>
          <table:table-cell table:formula="of:=IF(AND(([.A75]=&quot;holding reg.&quot;);([.C75] &lt;&gt; 0)); 1; &quot;&quot;)" office:value-type="float" office:value="1" calcext:value-type="float">
            <text:p>1</text:p>
          </table:table-cell>
          <table:table-cell/>
          <table:table-cell table:formula="of:=IF([.D75]=1; COM.MICROSOFT.CONCAT(&quot;ModbusCoils[coilIndexFromAddress(MODBUS_ADDR_&quot;; [.B75]; &quot;)] = &quot;; [.C75]; &quot;;&quot;); IF([.E75]=1; COM.MICROSOFT.CONCAT(&quot;ModbusHoldingRegisters[holdingIndexFromAddress(MODBUS_ADDR_&quot;; [.B75]; &quot;)] = &quot;; [.C75]; &quot;u;&quot;); &quot;&quot;))" office:value-type="string" office:string-value="ModbusHoldingRegisters[holdingIndexFromAddress(MODBUS_ADDR_CUP1_CHANNEL1_GAIN_HIGH_POINT2)] = 1741u;" calcext:value-type="string">
            <text:p>ModbusHoldingRegisters[holdingIndexFromAddress(MODBUS_ADDR_CUP1_CHANNEL1_GAIN_HIGH_POINT2)] = 1741u;</text:p>
          </table:table-cell>
        </table:table-row>
        <table:table-row table:style-name="ro1">
          <table:table-cell table:style-name="ce17" table:formula="of:=[$List.B76]" office:value-type="string" office:string-value="holding reg." calcext:value-type="string">
            <text:p>holding reg.</text:p>
          </table:table-cell>
          <table:table-cell table:style-name="ce17" table:formula="of:=[$List.I76]" office:value-type="string" office:string-value="CUP1_CHANNEL1_GAIN_HIGH_POINT3" calcext:value-type="string">
            <text:p>CUP1_CHANNEL1_GAIN_HIGH_POINT3</text:p>
          </table:table-cell>
          <table:table-cell table:style-name="ce17" table:formula="of:=[$List.G76]" office:value-type="float" office:value="1589" calcext:value-type="float">
            <text:p>1589</text:p>
          </table:table-cell>
          <table:table-cell table:formula="of:=IF(AND(([.A76]=&quot;coil&quot;);([.C76]=&quot;true&quot;)); 1; &quot;&quot;)">
            <text:p/>
          </table:table-cell>
          <table:table-cell table:formula="of:=IF(AND(([.A76]=&quot;holding reg.&quot;);([.C76] &lt;&gt; 0)); 1; &quot;&quot;)" office:value-type="float" office:value="1" calcext:value-type="float">
            <text:p>1</text:p>
          </table:table-cell>
          <table:table-cell/>
          <table:table-cell table:formula="of:=IF([.D76]=1; COM.MICROSOFT.CONCAT(&quot;ModbusCoils[coilIndexFromAddress(MODBUS_ADDR_&quot;; [.B76]; &quot;)] = &quot;; [.C76]; &quot;;&quot;); IF([.E76]=1; COM.MICROSOFT.CONCAT(&quot;ModbusHoldingRegisters[holdingIndexFromAddress(MODBUS_ADDR_&quot;; [.B76]; &quot;)] = &quot;; [.C76]; &quot;u;&quot;); &quot;&quot;))" office:value-type="string" office:string-value="ModbusHoldingRegisters[holdingIndexFromAddress(MODBUS_ADDR_CUP1_CHANNEL1_GAIN_HIGH_POINT3)] = 1589u;" calcext:value-type="string">
            <text:p>ModbusHoldingRegisters[holdingIndexFromAddress(MODBUS_ADDR_CUP1_CHANNEL1_GAIN_HIGH_POINT3)] = 1589u;</text:p>
          </table:table-cell>
        </table:table-row>
        <table:table-row table:style-name="ro1">
          <table:table-cell table:style-name="ce17" table:formula="of:=[$List.B77]" office:value-type="string" office:string-value="holding reg." calcext:value-type="string">
            <text:p>holding reg.</text:p>
          </table:table-cell>
          <table:table-cell table:style-name="ce17" table:formula="of:=[$List.I77]" office:value-type="string" office:string-value="CUP1_CHANNEL1_GAIN_HIGH_POINT4" calcext:value-type="string">
            <text:p>CUP1_CHANNEL1_GAIN_HIGH_POINT4</text:p>
          </table:table-cell>
          <table:table-cell table:style-name="ce17" table:formula="of:=[$List.G77]" office:value-type="float" office:value="43" calcext:value-type="float">
            <text:p>43</text:p>
          </table:table-cell>
          <table:table-cell table:formula="of:=IF(AND(([.A77]=&quot;coil&quot;);([.C77]=&quot;true&quot;)); 1; &quot;&quot;)">
            <text:p/>
          </table:table-cell>
          <table:table-cell table:formula="of:=IF(AND(([.A77]=&quot;holding reg.&quot;);([.C77] &lt;&gt; 0)); 1; &quot;&quot;)" office:value-type="float" office:value="1" calcext:value-type="float">
            <text:p>1</text:p>
          </table:table-cell>
          <table:table-cell/>
          <table:table-cell table:formula="of:=IF([.D77]=1; COM.MICROSOFT.CONCAT(&quot;ModbusCoils[coilIndexFromAddress(MODBUS_ADDR_&quot;; [.B77]; &quot;)] = &quot;; [.C77]; &quot;;&quot;); IF([.E77]=1; COM.MICROSOFT.CONCAT(&quot;ModbusHoldingRegisters[holdingIndexFromAddress(MODBUS_ADDR_&quot;; [.B77]; &quot;)] = &quot;; [.C77]; &quot;u;&quot;); &quot;&quot;))" office:value-type="string" office:string-value="ModbusHoldingRegisters[holdingIndexFromAddress(MODBUS_ADDR_CUP1_CHANNEL1_GAIN_HIGH_POINT4)] = 43u;" calcext:value-type="string">
            <text:p>ModbusHoldingRegisters[holdingIndexFromAddress(MODBUS_ADDR_CUP1_CHANNEL1_GAIN_HIGH_POINT4)] = 43u;</text:p>
          </table:table-cell>
        </table:table-row>
        <table:table-row table:style-name="ro1">
          <table:table-cell table:style-name="ce17" table:formula="of:=[$List.B78]" office:value-type="string" office:string-value="holding reg." calcext:value-type="string">
            <text:p>holding reg.</text:p>
          </table:table-cell>
          <table:table-cell table:style-name="ce17" table:formula="of:=[$List.I78]" office:value-type="string" office:string-value="CUP1_CHANNEL2_GAIN_LOW_POINT1" calcext:value-type="string">
            <text:p>CUP1_CHANNEL2_GAIN_LOW_POINT1</text:p>
          </table:table-cell>
          <table:table-cell table:style-name="ce17" table:formula="of:=[$List.G78]" office:value-type="float" office:value="1732" calcext:value-type="float">
            <text:p>1732</text:p>
          </table:table-cell>
          <table:table-cell table:formula="of:=IF(AND(([.A78]=&quot;coil&quot;);([.C78]=&quot;true&quot;)); 1; &quot;&quot;)">
            <text:p/>
          </table:table-cell>
          <table:table-cell table:formula="of:=IF(AND(([.A78]=&quot;holding reg.&quot;);([.C78] &lt;&gt; 0)); 1; &quot;&quot;)" office:value-type="float" office:value="1" calcext:value-type="float">
            <text:p>1</text:p>
          </table:table-cell>
          <table:table-cell/>
          <table:table-cell table:formula="of:=IF([.D78]=1; COM.MICROSOFT.CONCAT(&quot;ModbusCoils[coilIndexFromAddress(MODBUS_ADDR_&quot;; [.B78]; &quot;)] = &quot;; [.C78]; &quot;;&quot;); IF([.E78]=1; COM.MICROSOFT.CONCAT(&quot;ModbusHoldingRegisters[holdingIndexFromAddress(MODBUS_ADDR_&quot;; [.B78]; &quot;)] = &quot;; [.C78]; &quot;u;&quot;); &quot;&quot;))" office:value-type="string" office:string-value="ModbusHoldingRegisters[holdingIndexFromAddress(MODBUS_ADDR_CUP1_CHANNEL2_GAIN_LOW_POINT1)] = 1732u;" calcext:value-type="string">
            <text:p>ModbusHoldingRegisters[holdingIndexFromAddress(MODBUS_ADDR_CUP1_CHANNEL2_GAIN_LOW_POINT1)] = 1732u;</text:p>
          </table:table-cell>
        </table:table-row>
        <table:table-row table:style-name="ro1">
          <table:table-cell table:style-name="ce17" table:formula="of:=[$List.B79]" office:value-type="string" office:string-value="holding reg." calcext:value-type="string">
            <text:p>holding reg.</text:p>
          </table:table-cell>
          <table:table-cell table:style-name="ce17" table:formula="of:=[$List.I79]" office:value-type="string" office:string-value="CUP1_CHANNEL2_GAIN_LOW_POINT2" calcext:value-type="string">
            <text:p>CUP1_CHANNEL2_GAIN_LOW_POINT2</text:p>
          </table:table-cell>
          <table:table-cell table:style-name="ce17" table:formula="of:=[$List.G79]" office:value-type="float" office:value="184" calcext:value-type="float">
            <text:p>184</text:p>
          </table:table-cell>
          <table:table-cell table:formula="of:=IF(AND(([.A79]=&quot;coil&quot;);([.C79]=&quot;true&quot;)); 1; &quot;&quot;)">
            <text:p/>
          </table:table-cell>
          <table:table-cell table:formula="of:=IF(AND(([.A79]=&quot;holding reg.&quot;);([.C79] &lt;&gt; 0)); 1; &quot;&quot;)" office:value-type="float" office:value="1" calcext:value-type="float">
            <text:p>1</text:p>
          </table:table-cell>
          <table:table-cell/>
          <table:table-cell table:formula="of:=IF([.D79]=1; COM.MICROSOFT.CONCAT(&quot;ModbusCoils[coilIndexFromAddress(MODBUS_ADDR_&quot;; [.B79]; &quot;)] = &quot;; [.C79]; &quot;;&quot;); IF([.E79]=1; COM.MICROSOFT.CONCAT(&quot;ModbusHoldingRegisters[holdingIndexFromAddress(MODBUS_ADDR_&quot;; [.B79]; &quot;)] = &quot;; [.C79]; &quot;u;&quot;); &quot;&quot;))" office:value-type="string" office:string-value="ModbusHoldingRegisters[holdingIndexFromAddress(MODBUS_ADDR_CUP1_CHANNEL2_GAIN_LOW_POINT2)] = 184u;" calcext:value-type="string">
            <text:p>ModbusHoldingRegisters[holdingIndexFromAddress(MODBUS_ADDR_CUP1_CHANNEL2_GAIN_LOW_POINT2)] = 184u;</text:p>
          </table:table-cell>
        </table:table-row>
        <table:table-row table:style-name="ro1">
          <table:table-cell table:style-name="ce17" table:formula="of:=[$List.B80]" office:value-type="string" office:string-value="holding reg." calcext:value-type="string">
            <text:p>holding reg.</text:p>
          </table:table-cell>
          <table:table-cell table:style-name="ce17" table:formula="of:=[$List.I80]" office:value-type="string" office:string-value="CUP1_CHANNEL2_GAIN_LOW_POINT3" calcext:value-type="string">
            <text:p>CUP1_CHANNEL2_GAIN_LOW_POINT3</text:p>
          </table:table-cell>
          <table:table-cell table:style-name="ce17" table:formula="of:=[$List.G80]" office:value-type="float" office:value="166" calcext:value-type="float">
            <text:p>166</text:p>
          </table:table-cell>
          <table:table-cell table:formula="of:=IF(AND(([.A80]=&quot;coil&quot;);([.C80]=&quot;true&quot;)); 1; &quot;&quot;)">
            <text:p/>
          </table:table-cell>
          <table:table-cell table:formula="of:=IF(AND(([.A80]=&quot;holding reg.&quot;);([.C80] &lt;&gt; 0)); 1; &quot;&quot;)" office:value-type="float" office:value="1" calcext:value-type="float">
            <text:p>1</text:p>
          </table:table-cell>
          <table:table-cell/>
          <table:table-cell table:formula="of:=IF([.D80]=1; COM.MICROSOFT.CONCAT(&quot;ModbusCoils[coilIndexFromAddress(MODBUS_ADDR_&quot;; [.B80]; &quot;)] = &quot;; [.C80]; &quot;;&quot;); IF([.E80]=1; COM.MICROSOFT.CONCAT(&quot;ModbusHoldingRegisters[holdingIndexFromAddress(MODBUS_ADDR_&quot;; [.B80]; &quot;)] = &quot;; [.C80]; &quot;u;&quot;); &quot;&quot;))" office:value-type="string" office:string-value="ModbusHoldingRegisters[holdingIndexFromAddress(MODBUS_ADDR_CUP1_CHANNEL2_GAIN_LOW_POINT3)] = 166u;" calcext:value-type="string">
            <text:p>ModbusHoldingRegisters[holdingIndexFromAddress(MODBUS_ADDR_CUP1_CHANNEL2_GAIN_LOW_POINT3)] = 166u;</text:p>
          </table:table-cell>
        </table:table-row>
        <table:table-row table:style-name="ro1">
          <table:table-cell table:style-name="ce17" table:formula="of:=[$List.B81]" office:value-type="string" office:string-value="holding reg." calcext:value-type="string">
            <text:p>holding reg.</text:p>
          </table:table-cell>
          <table:table-cell table:style-name="ce17" table:formula="of:=[$List.I81]" office:value-type="string" office:string-value="CUP1_CHANNEL2_GAIN_HIGH_POINT2" calcext:value-type="string">
            <text:p>CUP1_CHANNEL2_GAIN_HIGH_POINT2</text:p>
          </table:table-cell>
          <table:table-cell table:style-name="ce17" table:formula="of:=[$List.G81]" office:value-type="float" office:value="1766" calcext:value-type="float">
            <text:p>1766</text:p>
          </table:table-cell>
          <table:table-cell table:formula="of:=IF(AND(([.A81]=&quot;coil&quot;);([.C81]=&quot;true&quot;)); 1; &quot;&quot;)">
            <text:p/>
          </table:table-cell>
          <table:table-cell table:formula="of:=IF(AND(([.A81]=&quot;holding reg.&quot;);([.C81] &lt;&gt; 0)); 1; &quot;&quot;)" office:value-type="float" office:value="1" calcext:value-type="float">
            <text:p>1</text:p>
          </table:table-cell>
          <table:table-cell/>
          <table:table-cell table:formula="of:=IF([.D81]=1; COM.MICROSOFT.CONCAT(&quot;ModbusCoils[coilIndexFromAddress(MODBUS_ADDR_&quot;; [.B81]; &quot;)] = &quot;; [.C81]; &quot;;&quot;); IF([.E81]=1; COM.MICROSOFT.CONCAT(&quot;ModbusHoldingRegisters[holdingIndexFromAddress(MODBUS_ADDR_&quot;; [.B81]; &quot;)] = &quot;; [.C81]; &quot;u;&quot;); &quot;&quot;))" office:value-type="string" office:string-value="ModbusHoldingRegisters[holdingIndexFromAddress(MODBUS_ADDR_CUP1_CHANNEL2_GAIN_HIGH_POINT2)] = 1766u;" calcext:value-type="string">
            <text:p>ModbusHoldingRegisters[holdingIndexFromAddress(MODBUS_ADDR_CUP1_CHANNEL2_GAIN_HIGH_POINT2)] = 1766u;</text:p>
          </table:table-cell>
        </table:table-row>
        <table:table-row table:style-name="ro1">
          <table:table-cell table:style-name="ce17" table:formula="of:=[$List.B82]" office:value-type="string" office:string-value="holding reg." calcext:value-type="string">
            <text:p>holding reg.</text:p>
          </table:table-cell>
          <table:table-cell table:style-name="ce17" table:formula="of:=[$List.I82]" office:value-type="string" office:string-value="CUP1_CHANNEL2_GAIN_HIGH_POINT3" calcext:value-type="string">
            <text:p>CUP1_CHANNEL2_GAIN_HIGH_POINT3</text:p>
          </table:table-cell>
          <table:table-cell table:style-name="ce17" table:formula="of:=[$List.G82]" office:value-type="float" office:value="1622" calcext:value-type="float">
            <text:p>1622</text:p>
          </table:table-cell>
          <table:table-cell table:formula="of:=IF(AND(([.A82]=&quot;coil&quot;);([.C82]=&quot;true&quot;)); 1; &quot;&quot;)">
            <text:p/>
          </table:table-cell>
          <table:table-cell table:formula="of:=IF(AND(([.A82]=&quot;holding reg.&quot;);([.C82] &lt;&gt; 0)); 1; &quot;&quot;)" office:value-type="float" office:value="1" calcext:value-type="float">
            <text:p>1</text:p>
          </table:table-cell>
          <table:table-cell/>
          <table:table-cell table:formula="of:=IF([.D82]=1; COM.MICROSOFT.CONCAT(&quot;ModbusCoils[coilIndexFromAddress(MODBUS_ADDR_&quot;; [.B82]; &quot;)] = &quot;; [.C82]; &quot;;&quot;); IF([.E82]=1; COM.MICROSOFT.CONCAT(&quot;ModbusHoldingRegisters[holdingIndexFromAddress(MODBUS_ADDR_&quot;; [.B82]; &quot;)] = &quot;; [.C82]; &quot;u;&quot;); &quot;&quot;))" office:value-type="string" office:string-value="ModbusHoldingRegisters[holdingIndexFromAddress(MODBUS_ADDR_CUP1_CHANNEL2_GAIN_HIGH_POINT3)] = 1622u;" calcext:value-type="string">
            <text:p>ModbusHoldingRegisters[holdingIndexFromAddress(MODBUS_ADDR_CUP1_CHANNEL2_GAIN_HIGH_POINT3)] = 1622u;</text:p>
          </table:table-cell>
        </table:table-row>
        <table:table-row table:style-name="ro1">
          <table:table-cell table:style-name="ce17" table:formula="of:=[$List.B83]" office:value-type="string" office:string-value="holding reg." calcext:value-type="string">
            <text:p>holding reg.</text:p>
          </table:table-cell>
          <table:table-cell table:style-name="ce17" table:formula="of:=[$List.I83]" office:value-type="string" office:string-value="CUP1_CHANNEL2_GAIN_HIGH_POINT4" calcext:value-type="string">
            <text:p>CUP1_CHANNEL2_GAIN_HIGH_POINT4</text:p>
          </table:table-cell>
          <table:table-cell table:style-name="ce17" table:formula="of:=[$List.G83]" office:value-type="float" office:value="66" calcext:value-type="float">
            <text:p>66</text:p>
          </table:table-cell>
          <table:table-cell table:formula="of:=IF(AND(([.A83]=&quot;coil&quot;);([.C83]=&quot;true&quot;)); 1; &quot;&quot;)">
            <text:p/>
          </table:table-cell>
          <table:table-cell table:formula="of:=IF(AND(([.A83]=&quot;holding reg.&quot;);([.C83] &lt;&gt; 0)); 1; &quot;&quot;)" office:value-type="float" office:value="1" calcext:value-type="float">
            <text:p>1</text:p>
          </table:table-cell>
          <table:table-cell/>
          <table:table-cell table:formula="of:=IF([.D83]=1; COM.MICROSOFT.CONCAT(&quot;ModbusCoils[coilIndexFromAddress(MODBUS_ADDR_&quot;; [.B83]; &quot;)] = &quot;; [.C83]; &quot;;&quot;); IF([.E83]=1; COM.MICROSOFT.CONCAT(&quot;ModbusHoldingRegisters[holdingIndexFromAddress(MODBUS_ADDR_&quot;; [.B83]; &quot;)] = &quot;; [.C83]; &quot;u;&quot;); &quot;&quot;))" office:value-type="string" office:string-value="ModbusHoldingRegisters[holdingIndexFromAddress(MODBUS_ADDR_CUP1_CHANNEL2_GAIN_HIGH_POINT4)] = 66u;" calcext:value-type="string">
            <text:p>ModbusHoldingRegisters[holdingIndexFromAddress(MODBUS_ADDR_CUP1_CHANNEL2_GAIN_HIGH_POINT4)] = 66u;</text:p>
          </table:table-cell>
        </table:table-row>
        <table:table-row table:style-name="ro1">
          <table:table-cell table:style-name="ce17" table:formula="of:=[$List.B84]" office:value-type="string" office:string-value="holding reg." calcext:value-type="string">
            <text:p>holding reg.</text:p>
          </table:table-cell>
          <table:table-cell table:style-name="ce17" table:formula="of:=[$List.I84]" office:value-type="string" office:string-value="CUP1_CHANNEL3_GAIN_LOW_POINT1" calcext:value-type="string">
            <text:p>CUP1_CHANNEL3_GAIN_LOW_POINT1</text:p>
          </table:table-cell>
          <table:table-cell table:style-name="ce17" table:formula="of:=[$List.G84]" office:value-type="float" office:value="1731" calcext:value-type="float">
            <text:p>1731</text:p>
          </table:table-cell>
          <table:table-cell table:formula="of:=IF(AND(([.A84]=&quot;coil&quot;);([.C84]=&quot;true&quot;)); 1; &quot;&quot;)">
            <text:p/>
          </table:table-cell>
          <table:table-cell table:formula="of:=IF(AND(([.A84]=&quot;holding reg.&quot;);([.C84] &lt;&gt; 0)); 1; &quot;&quot;)" office:value-type="float" office:value="1" calcext:value-type="float">
            <text:p>1</text:p>
          </table:table-cell>
          <table:table-cell/>
          <table:table-cell table:formula="of:=IF([.D84]=1; COM.MICROSOFT.CONCAT(&quot;ModbusCoils[coilIndexFromAddress(MODBUS_ADDR_&quot;; [.B84]; &quot;)] = &quot;; [.C84]; &quot;;&quot;); IF([.E84]=1; COM.MICROSOFT.CONCAT(&quot;ModbusHoldingRegisters[holdingIndexFromAddress(MODBUS_ADDR_&quot;; [.B84]; &quot;)] = &quot;; [.C84]; &quot;u;&quot;); &quot;&quot;))" office:value-type="string" office:string-value="ModbusHoldingRegisters[holdingIndexFromAddress(MODBUS_ADDR_CUP1_CHANNEL3_GAIN_LOW_POINT1)] = 1731u;" calcext:value-type="string">
            <text:p>ModbusHoldingRegisters[holdingIndexFromAddress(MODBUS_ADDR_CUP1_CHANNEL3_GAIN_LOW_POINT1)] = 1731u;</text:p>
          </table:table-cell>
        </table:table-row>
        <table:table-row table:style-name="ro1">
          <table:table-cell table:style-name="ce17" table:formula="of:=[$List.B85]" office:value-type="string" office:string-value="holding reg." calcext:value-type="string">
            <text:p>holding reg.</text:p>
          </table:table-cell>
          <table:table-cell table:style-name="ce17" table:formula="of:=[$List.I85]" office:value-type="string" office:string-value="CUP1_CHANNEL3_GAIN_LOW_POINT2" calcext:value-type="string">
            <text:p>CUP1_CHANNEL3_GAIN_LOW_POINT2</text:p>
          </table:table-cell>
          <table:table-cell table:style-name="ce17" table:formula="of:=[$List.G85]" office:value-type="float" office:value="187" calcext:value-type="float">
            <text:p>187</text:p>
          </table:table-cell>
          <table:table-cell table:formula="of:=IF(AND(([.A85]=&quot;coil&quot;);([.C85]=&quot;true&quot;)); 1; &quot;&quot;)">
            <text:p/>
          </table:table-cell>
          <table:table-cell table:formula="of:=IF(AND(([.A85]=&quot;holding reg.&quot;);([.C85] &lt;&gt; 0)); 1; &quot;&quot;)" office:value-type="float" office:value="1" calcext:value-type="float">
            <text:p>1</text:p>
          </table:table-cell>
          <table:table-cell/>
          <table:table-cell table:formula="of:=IF([.D85]=1; COM.MICROSOFT.CONCAT(&quot;ModbusCoils[coilIndexFromAddress(MODBUS_ADDR_&quot;; [.B85]; &quot;)] = &quot;; [.C85]; &quot;;&quot;); IF([.E85]=1; COM.MICROSOFT.CONCAT(&quot;ModbusHoldingRegisters[holdingIndexFromAddress(MODBUS_ADDR_&quot;; [.B85]; &quot;)] = &quot;; [.C85]; &quot;u;&quot;); &quot;&quot;))" office:value-type="string" office:string-value="ModbusHoldingRegisters[holdingIndexFromAddress(MODBUS_ADDR_CUP1_CHANNEL3_GAIN_LOW_POINT2)] = 187u;" calcext:value-type="string">
            <text:p>ModbusHoldingRegisters[holdingIndexFromAddress(MODBUS_ADDR_CUP1_CHANNEL3_GAIN_LOW_POINT2)] = 187u;</text:p>
          </table:table-cell>
        </table:table-row>
        <table:table-row table:style-name="ro1">
          <table:table-cell table:style-name="ce17" table:formula="of:=[$List.B86]" office:value-type="string" office:string-value="holding reg." calcext:value-type="string">
            <text:p>holding reg.</text:p>
          </table:table-cell>
          <table:table-cell table:style-name="ce17" table:formula="of:=[$List.I86]" office:value-type="string" office:string-value="CUP1_CHANNEL3_GAIN_LOW_POINT3" calcext:value-type="string">
            <text:p>CUP1_CHANNEL3_GAIN_LOW_POINT3</text:p>
          </table:table-cell>
          <table:table-cell table:style-name="ce17" table:formula="of:=[$List.G86]" office:value-type="float" office:value="171" calcext:value-type="float">
            <text:p>171</text:p>
          </table:table-cell>
          <table:table-cell table:formula="of:=IF(AND(([.A86]=&quot;coil&quot;);([.C86]=&quot;true&quot;)); 1; &quot;&quot;)">
            <text:p/>
          </table:table-cell>
          <table:table-cell table:formula="of:=IF(AND(([.A86]=&quot;holding reg.&quot;);([.C86] &lt;&gt; 0)); 1; &quot;&quot;)" office:value-type="float" office:value="1" calcext:value-type="float">
            <text:p>1</text:p>
          </table:table-cell>
          <table:table-cell/>
          <table:table-cell table:formula="of:=IF([.D86]=1; COM.MICROSOFT.CONCAT(&quot;ModbusCoils[coilIndexFromAddress(MODBUS_ADDR_&quot;; [.B86]; &quot;)] = &quot;; [.C86]; &quot;;&quot;); IF([.E86]=1; COM.MICROSOFT.CONCAT(&quot;ModbusHoldingRegisters[holdingIndexFromAddress(MODBUS_ADDR_&quot;; [.B86]; &quot;)] = &quot;; [.C86]; &quot;u;&quot;); &quot;&quot;))" office:value-type="string" office:string-value="ModbusHoldingRegisters[holdingIndexFromAddress(MODBUS_ADDR_CUP1_CHANNEL3_GAIN_LOW_POINT3)] = 171u;" calcext:value-type="string">
            <text:p>ModbusHoldingRegisters[holdingIndexFromAddress(MODBUS_ADDR_CUP1_CHANNEL3_GAIN_LOW_POINT3)] = 171u;</text:p>
          </table:table-cell>
        </table:table-row>
        <table:table-row table:style-name="ro1">
          <table:table-cell table:style-name="ce17" table:formula="of:=[$List.B87]" office:value-type="string" office:string-value="holding reg." calcext:value-type="string">
            <text:p>holding reg.</text:p>
          </table:table-cell>
          <table:table-cell table:style-name="ce17" table:formula="of:=[$List.I87]" office:value-type="string" office:string-value="CUP1_CHANNEL3_GAIN_HIGH_POINT2" calcext:value-type="string">
            <text:p>CUP1_CHANNEL3_GAIN_HIGH_POINT2</text:p>
          </table:table-cell>
          <table:table-cell table:style-name="ce17" table:formula="of:=[$List.G87]" office:value-type="float" office:value="1795" calcext:value-type="float">
            <text:p>1795</text:p>
          </table:table-cell>
          <table:table-cell table:formula="of:=IF(AND(([.A87]=&quot;coil&quot;);([.C87]=&quot;true&quot;)); 1; &quot;&quot;)">
            <text:p/>
          </table:table-cell>
          <table:table-cell table:formula="of:=IF(AND(([.A87]=&quot;holding reg.&quot;);([.C87] &lt;&gt; 0)); 1; &quot;&quot;)" office:value-type="float" office:value="1" calcext:value-type="float">
            <text:p>1</text:p>
          </table:table-cell>
          <table:table-cell/>
          <table:table-cell table:formula="of:=IF([.D87]=1; COM.MICROSOFT.CONCAT(&quot;ModbusCoils[coilIndexFromAddress(MODBUS_ADDR_&quot;; [.B87]; &quot;)] = &quot;; [.C87]; &quot;;&quot;); IF([.E87]=1; COM.MICROSOFT.CONCAT(&quot;ModbusHoldingRegisters[holdingIndexFromAddress(MODBUS_ADDR_&quot;; [.B87]; &quot;)] = &quot;; [.C87]; &quot;u;&quot;); &quot;&quot;))" office:value-type="string" office:string-value="ModbusHoldingRegisters[holdingIndexFromAddress(MODBUS_ADDR_CUP1_CHANNEL3_GAIN_HIGH_POINT2)] = 1795u;" calcext:value-type="string">
            <text:p>ModbusHoldingRegisters[holdingIndexFromAddress(MODBUS_ADDR_CUP1_CHANNEL3_GAIN_HIGH_POINT2)] = 1795u;</text:p>
          </table:table-cell>
        </table:table-row>
        <table:table-row table:style-name="ro1">
          <table:table-cell table:style-name="ce17" table:formula="of:=[$List.B88]" office:value-type="string" office:string-value="holding reg." calcext:value-type="string">
            <text:p>holding reg.</text:p>
          </table:table-cell>
          <table:table-cell table:style-name="ce17" table:formula="of:=[$List.I88]" office:value-type="string" office:string-value="CUP1_CHANNEL3_GAIN_HIGH_POINT3" calcext:value-type="string">
            <text:p>CUP1_CHANNEL3_GAIN_HIGH_POINT3</text:p>
          </table:table-cell>
          <table:table-cell table:style-name="ce17" table:formula="of:=[$List.G88]" office:value-type="float" office:value="1661" calcext:value-type="float">
            <text:p>1661</text:p>
          </table:table-cell>
          <table:table-cell table:formula="of:=IF(AND(([.A88]=&quot;coil&quot;);([.C88]=&quot;true&quot;)); 1; &quot;&quot;)">
            <text:p/>
          </table:table-cell>
          <table:table-cell table:formula="of:=IF(AND(([.A88]=&quot;holding reg.&quot;);([.C88] &lt;&gt; 0)); 1; &quot;&quot;)" office:value-type="float" office:value="1" calcext:value-type="float">
            <text:p>1</text:p>
          </table:table-cell>
          <table:table-cell/>
          <table:table-cell table:formula="of:=IF([.D88]=1; COM.MICROSOFT.CONCAT(&quot;ModbusCoils[coilIndexFromAddress(MODBUS_ADDR_&quot;; [.B88]; &quot;)] = &quot;; [.C88]; &quot;;&quot;); IF([.E88]=1; COM.MICROSOFT.CONCAT(&quot;ModbusHoldingRegisters[holdingIndexFromAddress(MODBUS_ADDR_&quot;; [.B88]; &quot;)] = &quot;; [.C88]; &quot;u;&quot;); &quot;&quot;))" office:value-type="string" office:string-value="ModbusHoldingRegisters[holdingIndexFromAddress(MODBUS_ADDR_CUP1_CHANNEL3_GAIN_HIGH_POINT3)] = 1661u;" calcext:value-type="string">
            <text:p>ModbusHoldingRegisters[holdingIndexFromAddress(MODBUS_ADDR_CUP1_CHANNEL3_GAIN_HIGH_POINT3)] = 1661u;</text:p>
          </table:table-cell>
        </table:table-row>
        <table:table-row table:style-name="ro1">
          <table:table-cell table:style-name="ce17" table:formula="of:=[$List.B89]" office:value-type="string" office:string-value="holding reg." calcext:value-type="string">
            <text:p>holding reg.</text:p>
          </table:table-cell>
          <table:table-cell table:style-name="ce17" table:formula="of:=[$List.I89]" office:value-type="string" office:string-value="CUP1_CHANNEL3_GAIN_HIGH_POINT4" calcext:value-type="string">
            <text:p>CUP1_CHANNEL3_GAIN_HIGH_POINT4</text:p>
          </table:table-cell>
          <table:table-cell table:style-name="ce17" table:formula="of:=[$List.G89]" office:value-type="float" office:value="108" calcext:value-type="float">
            <text:p>108</text:p>
          </table:table-cell>
          <table:table-cell table:formula="of:=IF(AND(([.A89]=&quot;coil&quot;);([.C89]=&quot;true&quot;)); 1; &quot;&quot;)">
            <text:p/>
          </table:table-cell>
          <table:table-cell table:formula="of:=IF(AND(([.A89]=&quot;holding reg.&quot;);([.C89] &lt;&gt; 0)); 1; &quot;&quot;)" office:value-type="float" office:value="1" calcext:value-type="float">
            <text:p>1</text:p>
          </table:table-cell>
          <table:table-cell/>
          <table:table-cell table:formula="of:=IF([.D89]=1; COM.MICROSOFT.CONCAT(&quot;ModbusCoils[coilIndexFromAddress(MODBUS_ADDR_&quot;; [.B89]; &quot;)] = &quot;; [.C89]; &quot;;&quot;); IF([.E89]=1; COM.MICROSOFT.CONCAT(&quot;ModbusHoldingRegisters[holdingIndexFromAddress(MODBUS_ADDR_&quot;; [.B89]; &quot;)] = &quot;; [.C89]; &quot;u;&quot;); &quot;&quot;))" office:value-type="string" office:string-value="ModbusHoldingRegisters[holdingIndexFromAddress(MODBUS_ADDR_CUP1_CHANNEL3_GAIN_HIGH_POINT4)] = 108u;" calcext:value-type="string">
            <text:p>ModbusHoldingRegisters[holdingIndexFromAddress(MODBUS_ADDR_CUP1_CHANNEL3_GAIN_HIGH_POINT4)] = 108u;</text:p>
          </table:table-cell>
        </table:table-row>
        <table:table-row table:style-name="ro1">
          <table:table-cell table:style-name="ce17" table:formula="of:=[$List.B90]" office:value-type="string" office:string-value="holding reg." calcext:value-type="string">
            <text:p>holding reg.</text:p>
          </table:table-cell>
          <table:table-cell table:style-name="ce17" table:formula="of:=[$List.I90]" office:value-type="string" office:string-value="CUP1_CHANNEL4_GAIN_LOW_POINT1" calcext:value-type="string">
            <text:p>CUP1_CHANNEL4_GAIN_LOW_POINT1</text:p>
          </table:table-cell>
          <table:table-cell table:style-name="ce17" table:formula="of:=[$List.G90]" office:value-type="float" office:value="1722" calcext:value-type="float">
            <text:p>1722</text:p>
          </table:table-cell>
          <table:table-cell table:formula="of:=IF(AND(([.A90]=&quot;coil&quot;);([.C90]=&quot;true&quot;)); 1; &quot;&quot;)">
            <text:p/>
          </table:table-cell>
          <table:table-cell table:formula="of:=IF(AND(([.A90]=&quot;holding reg.&quot;);([.C90] &lt;&gt; 0)); 1; &quot;&quot;)" office:value-type="float" office:value="1" calcext:value-type="float">
            <text:p>1</text:p>
          </table:table-cell>
          <table:table-cell/>
          <table:table-cell table:formula="of:=IF([.D90]=1; COM.MICROSOFT.CONCAT(&quot;ModbusCoils[coilIndexFromAddress(MODBUS_ADDR_&quot;; [.B90]; &quot;)] = &quot;; [.C90]; &quot;;&quot;); IF([.E90]=1; COM.MICROSOFT.CONCAT(&quot;ModbusHoldingRegisters[holdingIndexFromAddress(MODBUS_ADDR_&quot;; [.B90]; &quot;)] = &quot;; [.C90]; &quot;u;&quot;); &quot;&quot;))" office:value-type="string" office:string-value="ModbusHoldingRegisters[holdingIndexFromAddress(MODBUS_ADDR_CUP1_CHANNEL4_GAIN_LOW_POINT1)] = 1722u;" calcext:value-type="string">
            <text:p>ModbusHoldingRegisters[holdingIndexFromAddress(MODBUS_ADDR_CUP1_CHANNEL4_GAIN_LOW_POINT1)] = 1722u;</text:p>
          </table:table-cell>
        </table:table-row>
        <table:table-row table:style-name="ro1">
          <table:table-cell table:style-name="ce17" table:formula="of:=[$List.B91]" office:value-type="string" office:string-value="holding reg." calcext:value-type="string">
            <text:p>holding reg.</text:p>
          </table:table-cell>
          <table:table-cell table:style-name="ce17" table:formula="of:=[$List.I91]" office:value-type="string" office:string-value="CUP1_CHANNEL4_GAIN_LOW_POINT2" calcext:value-type="string">
            <text:p>CUP1_CHANNEL4_GAIN_LOW_POINT2</text:p>
          </table:table-cell>
          <table:table-cell table:style-name="ce17" table:formula="of:=[$List.G91]" office:value-type="float" office:value="177" calcext:value-type="float">
            <text:p>177</text:p>
          </table:table-cell>
          <table:table-cell table:formula="of:=IF(AND(([.A91]=&quot;coil&quot;);([.C91]=&quot;true&quot;)); 1; &quot;&quot;)">
            <text:p/>
          </table:table-cell>
          <table:table-cell table:formula="of:=IF(AND(([.A91]=&quot;holding reg.&quot;);([.C91] &lt;&gt; 0)); 1; &quot;&quot;)" office:value-type="float" office:value="1" calcext:value-type="float">
            <text:p>1</text:p>
          </table:table-cell>
          <table:table-cell/>
          <table:table-cell table:formula="of:=IF([.D91]=1; COM.MICROSOFT.CONCAT(&quot;ModbusCoils[coilIndexFromAddress(MODBUS_ADDR_&quot;; [.B91]; &quot;)] = &quot;; [.C91]; &quot;;&quot;); IF([.E91]=1; COM.MICROSOFT.CONCAT(&quot;ModbusHoldingRegisters[holdingIndexFromAddress(MODBUS_ADDR_&quot;; [.B91]; &quot;)] = &quot;; [.C91]; &quot;u;&quot;); &quot;&quot;))" office:value-type="string" office:string-value="ModbusHoldingRegisters[holdingIndexFromAddress(MODBUS_ADDR_CUP1_CHANNEL4_GAIN_LOW_POINT2)] = 177u;" calcext:value-type="string">
            <text:p>ModbusHoldingRegisters[holdingIndexFromAddress(MODBUS_ADDR_CUP1_CHANNEL4_GAIN_LOW_POINT2)] = 177u;</text:p>
          </table:table-cell>
        </table:table-row>
        <table:table-row table:style-name="ro1">
          <table:table-cell table:style-name="ce17" table:formula="of:=[$List.B92]" office:value-type="string" office:string-value="holding reg." calcext:value-type="string">
            <text:p>holding reg.</text:p>
          </table:table-cell>
          <table:table-cell table:style-name="ce17" table:formula="of:=[$List.I92]" office:value-type="string" office:string-value="CUP1_CHANNEL4_GAIN_LOW_POINT3" calcext:value-type="string">
            <text:p>CUP1_CHANNEL4_GAIN_LOW_POINT3</text:p>
          </table:table-cell>
          <table:table-cell table:style-name="ce17" table:formula="of:=[$List.G92]" office:value-type="float" office:value="162" calcext:value-type="float">
            <text:p>162</text:p>
          </table:table-cell>
          <table:table-cell table:formula="of:=IF(AND(([.A92]=&quot;coil&quot;);([.C92]=&quot;true&quot;)); 1; &quot;&quot;)">
            <text:p/>
          </table:table-cell>
          <table:table-cell table:formula="of:=IF(AND(([.A92]=&quot;holding reg.&quot;);([.C92] &lt;&gt; 0)); 1; &quot;&quot;)" office:value-type="float" office:value="1" calcext:value-type="float">
            <text:p>1</text:p>
          </table:table-cell>
          <table:table-cell/>
          <table:table-cell table:formula="of:=IF([.D92]=1; COM.MICROSOFT.CONCAT(&quot;ModbusCoils[coilIndexFromAddress(MODBUS_ADDR_&quot;; [.B92]; &quot;)] = &quot;; [.C92]; &quot;;&quot;); IF([.E92]=1; COM.MICROSOFT.CONCAT(&quot;ModbusHoldingRegisters[holdingIndexFromAddress(MODBUS_ADDR_&quot;; [.B92]; &quot;)] = &quot;; [.C92]; &quot;u;&quot;); &quot;&quot;))" office:value-type="string" office:string-value="ModbusHoldingRegisters[holdingIndexFromAddress(MODBUS_ADDR_CUP1_CHANNEL4_GAIN_LOW_POINT3)] = 162u;" calcext:value-type="string">
            <text:p>ModbusHoldingRegisters[holdingIndexFromAddress(MODBUS_ADDR_CUP1_CHANNEL4_GAIN_LOW_POINT3)] = 162u;</text:p>
          </table:table-cell>
        </table:table-row>
        <table:table-row table:style-name="ro1">
          <table:table-cell table:style-name="ce17" table:formula="of:=[$List.B93]" office:value-type="string" office:string-value="holding reg." calcext:value-type="string">
            <text:p>holding reg.</text:p>
          </table:table-cell>
          <table:table-cell table:style-name="ce17" table:formula="of:=[$List.I93]" office:value-type="string" office:string-value="CUP1_CHANNEL4_GAIN_HIGH_POINT2" calcext:value-type="string">
            <text:p>CUP1_CHANNEL4_GAIN_HIGH_POINT2</text:p>
          </table:table-cell>
          <table:table-cell table:style-name="ce17" table:formula="of:=[$List.G93]" office:value-type="float" office:value="1719" calcext:value-type="float">
            <text:p>1719</text:p>
          </table:table-cell>
          <table:table-cell table:formula="of:=IF(AND(([.A93]=&quot;coil&quot;);([.C93]=&quot;true&quot;)); 1; &quot;&quot;)">
            <text:p/>
          </table:table-cell>
          <table:table-cell table:formula="of:=IF(AND(([.A93]=&quot;holding reg.&quot;);([.C93] &lt;&gt; 0)); 1; &quot;&quot;)" office:value-type="float" office:value="1" calcext:value-type="float">
            <text:p>1</text:p>
          </table:table-cell>
          <table:table-cell/>
          <table:table-cell table:formula="of:=IF([.D93]=1; COM.MICROSOFT.CONCAT(&quot;ModbusCoils[coilIndexFromAddress(MODBUS_ADDR_&quot;; [.B93]; &quot;)] = &quot;; [.C93]; &quot;;&quot;); IF([.E93]=1; COM.MICROSOFT.CONCAT(&quot;ModbusHoldingRegisters[holdingIndexFromAddress(MODBUS_ADDR_&quot;; [.B93]; &quot;)] = &quot;; [.C93]; &quot;u;&quot;); &quot;&quot;))" office:value-type="string" office:string-value="ModbusHoldingRegisters[holdingIndexFromAddress(MODBUS_ADDR_CUP1_CHANNEL4_GAIN_HIGH_POINT2)] = 1719u;" calcext:value-type="string">
            <text:p>ModbusHoldingRegisters[holdingIndexFromAddress(MODBUS_ADDR_CUP1_CHANNEL4_GAIN_HIGH_POINT2)] = 1719u;</text:p>
          </table:table-cell>
        </table:table-row>
        <table:table-row table:style-name="ro1">
          <table:table-cell table:style-name="ce17" table:formula="of:=[$List.B94]" office:value-type="string" office:string-value="holding reg." calcext:value-type="string">
            <text:p>holding reg.</text:p>
          </table:table-cell>
          <table:table-cell table:style-name="ce17" table:formula="of:=[$List.I94]" office:value-type="string" office:string-value="CUP1_CHANNEL4_GAIN_HIGH_POINT3" calcext:value-type="string">
            <text:p>CUP1_CHANNEL4_GAIN_HIGH_POINT3</text:p>
          </table:table-cell>
          <table:table-cell table:style-name="ce17" table:formula="of:=[$List.G94]" office:value-type="float" office:value="1566" calcext:value-type="float">
            <text:p>1566</text:p>
          </table:table-cell>
          <table:table-cell table:formula="of:=IF(AND(([.A94]=&quot;coil&quot;);([.C94]=&quot;true&quot;)); 1; &quot;&quot;)">
            <text:p/>
          </table:table-cell>
          <table:table-cell table:formula="of:=IF(AND(([.A94]=&quot;holding reg.&quot;);([.C94] &lt;&gt; 0)); 1; &quot;&quot;)" office:value-type="float" office:value="1" calcext:value-type="float">
            <text:p>1</text:p>
          </table:table-cell>
          <table:table-cell/>
          <table:table-cell table:formula="of:=IF([.D94]=1; COM.MICROSOFT.CONCAT(&quot;ModbusCoils[coilIndexFromAddress(MODBUS_ADDR_&quot;; [.B94]; &quot;)] = &quot;; [.C94]; &quot;;&quot;); IF([.E94]=1; COM.MICROSOFT.CONCAT(&quot;ModbusHoldingRegisters[holdingIndexFromAddress(MODBUS_ADDR_&quot;; [.B94]; &quot;)] = &quot;; [.C94]; &quot;u;&quot;); &quot;&quot;))" office:value-type="string" office:string-value="ModbusHoldingRegisters[holdingIndexFromAddress(MODBUS_ADDR_CUP1_CHANNEL4_GAIN_HIGH_POINT3)] = 1566u;" calcext:value-type="string">
            <text:p>ModbusHoldingRegisters[holdingIndexFromAddress(MODBUS_ADDR_CUP1_CHANNEL4_GAIN_HIGH_POINT3)] = 1566u;</text:p>
          </table:table-cell>
        </table:table-row>
        <table:table-row table:style-name="ro1">
          <table:table-cell table:style-name="ce17" table:formula="of:=[$List.B95]" office:value-type="string" office:string-value="holding reg." calcext:value-type="string">
            <text:p>holding reg.</text:p>
          </table:table-cell>
          <table:table-cell table:style-name="ce17" table:formula="of:=[$List.I95]" office:value-type="string" office:string-value="CUP1_CHANNEL4_GAIN_HIGH_POINT4" calcext:value-type="string">
            <text:p>CUP1_CHANNEL4_GAIN_HIGH_POINT4</text:p>
          </table:table-cell>
          <table:table-cell table:style-name="ce17" table:formula="of:=[$List.G95]" office:value-type="float" office:value="22" calcext:value-type="float">
            <text:p>22</text:p>
          </table:table-cell>
          <table:table-cell table:formula="of:=IF(AND(([.A95]=&quot;coil&quot;);([.C95]=&quot;true&quot;)); 1; &quot;&quot;)">
            <text:p/>
          </table:table-cell>
          <table:table-cell table:formula="of:=IF(AND(([.A95]=&quot;holding reg.&quot;);([.C95] &lt;&gt; 0)); 1; &quot;&quot;)" office:value-type="float" office:value="1" calcext:value-type="float">
            <text:p>1</text:p>
          </table:table-cell>
          <table:table-cell/>
          <table:table-cell table:formula="of:=IF([.D95]=1; COM.MICROSOFT.CONCAT(&quot;ModbusCoils[coilIndexFromAddress(MODBUS_ADDR_&quot;; [.B95]; &quot;)] = &quot;; [.C95]; &quot;;&quot;); IF([.E95]=1; COM.MICROSOFT.CONCAT(&quot;ModbusHoldingRegisters[holdingIndexFromAddress(MODBUS_ADDR_&quot;; [.B95]; &quot;)] = &quot;; [.C95]; &quot;u;&quot;); &quot;&quot;))" office:value-type="string" office:string-value="ModbusHoldingRegisters[holdingIndexFromAddress(MODBUS_ADDR_CUP1_CHANNEL4_GAIN_HIGH_POINT4)] = 22u;" calcext:value-type="string">
            <text:p>ModbusHoldingRegisters[holdingIndexFromAddress(MODBUS_ADDR_CUP1_CHANNEL4_GAIN_HIGH_POINT4)] = 22u;</text:p>
          </table:table-cell>
        </table:table-row>
        <table:table-row table:style-name="ro1">
          <table:table-cell table:style-name="ce17" table:formula="of:=[$List.B96]" office:value-type="float" office:value="0" calcext:value-type="float">
            <text:p>0</text:p>
          </table:table-cell>
          <table:table-cell table:style-name="ce17" table:formula="of:=[$List.I96]">
            <text:p/>
          </table:table-cell>
          <table:table-cell table:style-name="ce17" table:formula="of:=[$List.G96]" office:value-type="float" office:value="0" calcext:value-type="float">
            <text:p>0</text:p>
          </table:table-cell>
          <table:table-cell table:formula="of:=IF(AND(([.A96]=&quot;coil&quot;);([.C96]=&quot;true&quot;)); 1; &quot;&quot;)">
            <text:p/>
          </table:table-cell>
          <table:table-cell table:formula="of:=IF(AND(([.A96]=&quot;holding reg.&quot;);([.C96] &lt;&gt; 0)); 1; &quot;&quot;)">
            <text:p/>
          </table:table-cell>
          <table:table-cell/>
          <table:table-cell table:formula="of:=IF([.D96]=1; COM.MICROSOFT.CONCAT(&quot;ModbusCoils[coilIndexFromAddress(MODBUS_ADDR_&quot;; [.B96]; &quot;)] = &quot;; [.C96]; &quot;;&quot;); IF([.E96]=1; COM.MICROSOFT.CONCAT(&quot;ModbusHoldingRegisters[holdingIndexFromAddress(MODBUS_ADDR_&quot;; [.B96]; &quot;)] = &quot;; [.C96]; &quot;u;&quot;); &quot;&quot;))">
            <text:p/>
          </table:table-cell>
        </table:table-row>
        <table:table-row table:style-name="ro1">
          <table:table-cell table:style-name="ce17" table:formula="of:=[$List.B97]" office:value-type="string" office:string-value="holding reg." calcext:value-type="string">
            <text:p>holding reg.</text:p>
          </table:table-cell>
          <table:table-cell table:style-name="ce17" table:formula="of:=[$List.I97]" office:value-type="string" office:string-value="CUP2_CHANNEL1_GAIN_LOW_POINT1" calcext:value-type="string">
            <text:p>CUP2_CHANNEL1_GAIN_LOW_POINT1</text:p>
          </table:table-cell>
          <table:table-cell table:style-name="ce17" table:formula="of:=[$List.G97]" office:value-type="float" office:value="1727" calcext:value-type="float">
            <text:p>1727</text:p>
          </table:table-cell>
          <table:table-cell table:formula="of:=IF(AND(([.A97]=&quot;coil&quot;);([.C97]=&quot;true&quot;)); 1; &quot;&quot;)">
            <text:p/>
          </table:table-cell>
          <table:table-cell table:formula="of:=IF(AND(([.A97]=&quot;holding reg.&quot;);([.C97] &lt;&gt; 0)); 1; &quot;&quot;)" office:value-type="float" office:value="1" calcext:value-type="float">
            <text:p>1</text:p>
          </table:table-cell>
          <table:table-cell/>
          <table:table-cell table:formula="of:=IF([.D97]=1; COM.MICROSOFT.CONCAT(&quot;ModbusCoils[coilIndexFromAddress(MODBUS_ADDR_&quot;; [.B97]; &quot;)] = &quot;; [.C97]; &quot;;&quot;); IF([.E97]=1; COM.MICROSOFT.CONCAT(&quot;ModbusHoldingRegisters[holdingIndexFromAddress(MODBUS_ADDR_&quot;; [.B97]; &quot;)] = &quot;; [.C97]; &quot;u;&quot;); &quot;&quot;))" office:value-type="string" office:string-value="ModbusHoldingRegisters[holdingIndexFromAddress(MODBUS_ADDR_CUP2_CHANNEL1_GAIN_LOW_POINT1)] = 1727u;" calcext:value-type="string">
            <text:p>ModbusHoldingRegisters[holdingIndexFromAddress(MODBUS_ADDR_CUP2_CHANNEL1_GAIN_LOW_POINT1)] = 1727u;</text:p>
          </table:table-cell>
        </table:table-row>
        <table:table-row table:style-name="ro1">
          <table:table-cell table:style-name="ce17" table:formula="of:=[$List.B98]" office:value-type="string" office:string-value="holding reg." calcext:value-type="string">
            <text:p>holding reg.</text:p>
          </table:table-cell>
          <table:table-cell table:style-name="ce17" table:formula="of:=[$List.I98]" office:value-type="string" office:string-value="CUP2_CHANNEL1_GAIN_LOW_POINT2" calcext:value-type="string">
            <text:p>CUP2_CHANNEL1_GAIN_LOW_POINT2</text:p>
          </table:table-cell>
          <table:table-cell table:style-name="ce17" table:formula="of:=[$List.G98]" office:value-type="float" office:value="185" calcext:value-type="float">
            <text:p>185</text:p>
          </table:table-cell>
          <table:table-cell table:formula="of:=IF(AND(([.A98]=&quot;coil&quot;);([.C98]=&quot;true&quot;)); 1; &quot;&quot;)">
            <text:p/>
          </table:table-cell>
          <table:table-cell table:formula="of:=IF(AND(([.A98]=&quot;holding reg.&quot;);([.C98] &lt;&gt; 0)); 1; &quot;&quot;)" office:value-type="float" office:value="1" calcext:value-type="float">
            <text:p>1</text:p>
          </table:table-cell>
          <table:table-cell/>
          <table:table-cell table:formula="of:=IF([.D98]=1; COM.MICROSOFT.CONCAT(&quot;ModbusCoils[coilIndexFromAddress(MODBUS_ADDR_&quot;; [.B98]; &quot;)] = &quot;; [.C98]; &quot;;&quot;); IF([.E98]=1; COM.MICROSOFT.CONCAT(&quot;ModbusHoldingRegisters[holdingIndexFromAddress(MODBUS_ADDR_&quot;; [.B98]; &quot;)] = &quot;; [.C98]; &quot;u;&quot;); &quot;&quot;))" office:value-type="string" office:string-value="ModbusHoldingRegisters[holdingIndexFromAddress(MODBUS_ADDR_CUP2_CHANNEL1_GAIN_LOW_POINT2)] = 185u;" calcext:value-type="string">
            <text:p>ModbusHoldingRegisters[holdingIndexFromAddress(MODBUS_ADDR_CUP2_CHANNEL1_GAIN_LOW_POINT2)] = 185u;</text:p>
          </table:table-cell>
        </table:table-row>
        <table:table-row table:style-name="ro1">
          <table:table-cell table:style-name="ce17" table:formula="of:=[$List.B99]" office:value-type="string" office:string-value="holding reg." calcext:value-type="string">
            <text:p>holding reg.</text:p>
          </table:table-cell>
          <table:table-cell table:style-name="ce17" table:formula="of:=[$List.I99]" office:value-type="string" office:string-value="CUP2_CHANNEL1_GAIN_LOW_POINT3" calcext:value-type="string">
            <text:p>CUP2_CHANNEL1_GAIN_LOW_POINT3</text:p>
          </table:table-cell>
          <table:table-cell table:style-name="ce17" table:formula="of:=[$List.G99]" office:value-type="float" office:value="167" calcext:value-type="float">
            <text:p>167</text:p>
          </table:table-cell>
          <table:table-cell table:formula="of:=IF(AND(([.A99]=&quot;coil&quot;);([.C99]=&quot;true&quot;)); 1; &quot;&quot;)">
            <text:p/>
          </table:table-cell>
          <table:table-cell table:formula="of:=IF(AND(([.A99]=&quot;holding reg.&quot;);([.C99] &lt;&gt; 0)); 1; &quot;&quot;)" office:value-type="float" office:value="1" calcext:value-type="float">
            <text:p>1</text:p>
          </table:table-cell>
          <table:table-cell/>
          <table:table-cell table:formula="of:=IF([.D99]=1; COM.MICROSOFT.CONCAT(&quot;ModbusCoils[coilIndexFromAddress(MODBUS_ADDR_&quot;; [.B99]; &quot;)] = &quot;; [.C99]; &quot;;&quot;); IF([.E99]=1; COM.MICROSOFT.CONCAT(&quot;ModbusHoldingRegisters[holdingIndexFromAddress(MODBUS_ADDR_&quot;; [.B99]; &quot;)] = &quot;; [.C99]; &quot;u;&quot;); &quot;&quot;))" office:value-type="string" office:string-value="ModbusHoldingRegisters[holdingIndexFromAddress(MODBUS_ADDR_CUP2_CHANNEL1_GAIN_LOW_POINT3)] = 167u;" calcext:value-type="string">
            <text:p>ModbusHoldingRegisters[holdingIndexFromAddress(MODBUS_ADDR_CUP2_CHANNEL1_GAIN_LOW_POINT3)] = 167u;</text:p>
          </table:table-cell>
        </table:table-row>
        <table:table-row table:style-name="ro1">
          <table:table-cell table:style-name="ce17" table:formula="of:=[$List.B100]" office:value-type="string" office:string-value="holding reg." calcext:value-type="string">
            <text:p>holding reg.</text:p>
          </table:table-cell>
          <table:table-cell table:style-name="ce17" table:formula="of:=[$List.I100]" office:value-type="string" office:string-value="CUP2_CHANNEL1_GAIN_HIGH_POINT2" calcext:value-type="string">
            <text:p>CUP2_CHANNEL1_GAIN_HIGH_POINT2</text:p>
          </table:table-cell>
          <table:table-cell table:style-name="ce17" table:formula="of:=[$List.G100]" office:value-type="float" office:value="1770" calcext:value-type="float">
            <text:p>1770</text:p>
          </table:table-cell>
          <table:table-cell table:formula="of:=IF(AND(([.A100]=&quot;coil&quot;);([.C100]=&quot;true&quot;)); 1; &quot;&quot;)">
            <text:p/>
          </table:table-cell>
          <table:table-cell table:formula="of:=IF(AND(([.A100]=&quot;holding reg.&quot;);([.C100] &lt;&gt; 0)); 1; &quot;&quot;)" office:value-type="float" office:value="1" calcext:value-type="float">
            <text:p>1</text:p>
          </table:table-cell>
          <table:table-cell/>
          <table:table-cell table:formula="of:=IF([.D100]=1; COM.MICROSOFT.CONCAT(&quot;ModbusCoils[coilIndexFromAddress(MODBUS_ADDR_&quot;; [.B100]; &quot;)] = &quot;; [.C100]; &quot;;&quot;); IF([.E100]=1; COM.MICROSOFT.CONCAT(&quot;ModbusHoldingRegisters[holdingIndexFromAddress(MODBUS_ADDR_&quot;; [.B100]; &quot;)] = &quot;; [.C100]; &quot;u;&quot;); &quot;&quot;))" office:value-type="string" office:string-value="ModbusHoldingRegisters[holdingIndexFromAddress(MODBUS_ADDR_CUP2_CHANNEL1_GAIN_HIGH_POINT2)] = 1770u;" calcext:value-type="string">
            <text:p>ModbusHoldingRegisters[holdingIndexFromAddress(MODBUS_ADDR_CUP2_CHANNEL1_GAIN_HIGH_POINT2)] = 1770u;</text:p>
          </table:table-cell>
        </table:table-row>
        <table:table-row table:style-name="ro1">
          <table:table-cell table:style-name="ce17" table:formula="of:=[$List.B101]" office:value-type="string" office:string-value="holding reg." calcext:value-type="string">
            <text:p>holding reg.</text:p>
          </table:table-cell>
          <table:table-cell table:style-name="ce17" table:formula="of:=[$List.I101]" office:value-type="string" office:string-value="CUP2_CHANNEL1_GAIN_HIGH_POINT3" calcext:value-type="string">
            <text:p>CUP2_CHANNEL1_GAIN_HIGH_POINT3</text:p>
          </table:table-cell>
          <table:table-cell table:style-name="ce17" table:formula="of:=[$List.G101]" office:value-type="float" office:value="1625" calcext:value-type="float">
            <text:p>1625</text:p>
          </table:table-cell>
          <table:table-cell table:formula="of:=IF(AND(([.A101]=&quot;coil&quot;);([.C101]=&quot;true&quot;)); 1; &quot;&quot;)">
            <text:p/>
          </table:table-cell>
          <table:table-cell table:formula="of:=IF(AND(([.A101]=&quot;holding reg.&quot;);([.C101] &lt;&gt; 0)); 1; &quot;&quot;)" office:value-type="float" office:value="1" calcext:value-type="float">
            <text:p>1</text:p>
          </table:table-cell>
          <table:table-cell/>
          <table:table-cell table:formula="of:=IF([.D101]=1; COM.MICROSOFT.CONCAT(&quot;ModbusCoils[coilIndexFromAddress(MODBUS_ADDR_&quot;; [.B101]; &quot;)] = &quot;; [.C101]; &quot;;&quot;); IF([.E101]=1; COM.MICROSOFT.CONCAT(&quot;ModbusHoldingRegisters[holdingIndexFromAddress(MODBUS_ADDR_&quot;; [.B101]; &quot;)] = &quot;; [.C101]; &quot;u;&quot;); &quot;&quot;))" office:value-type="string" office:string-value="ModbusHoldingRegisters[holdingIndexFromAddress(MODBUS_ADDR_CUP2_CHANNEL1_GAIN_HIGH_POINT3)] = 1625u;" calcext:value-type="string">
            <text:p>ModbusHoldingRegisters[holdingIndexFromAddress(MODBUS_ADDR_CUP2_CHANNEL1_GAIN_HIGH_POINT3)] = 1625u;</text:p>
          </table:table-cell>
        </table:table-row>
        <table:table-row table:style-name="ro1">
          <table:table-cell table:style-name="ce17" table:formula="of:=[$List.B102]" office:value-type="string" office:string-value="holding reg." calcext:value-type="string">
            <text:p>holding reg.</text:p>
          </table:table-cell>
          <table:table-cell table:style-name="ce17" table:formula="of:=[$List.I102]" office:value-type="string" office:string-value="CUP2_CHANNEL1_GAIN_HIGH_POINT4" calcext:value-type="string">
            <text:p>CUP2_CHANNEL1_GAIN_HIGH_POINT4</text:p>
          </table:table-cell>
          <table:table-cell table:style-name="ce17" table:formula="of:=[$List.G102]" office:value-type="float" office:value="75" calcext:value-type="float">
            <text:p>75</text:p>
          </table:table-cell>
          <table:table-cell table:formula="of:=IF(AND(([.A102]=&quot;coil&quot;);([.C102]=&quot;true&quot;)); 1; &quot;&quot;)">
            <text:p/>
          </table:table-cell>
          <table:table-cell table:formula="of:=IF(AND(([.A102]=&quot;holding reg.&quot;);([.C102] &lt;&gt; 0)); 1; &quot;&quot;)" office:value-type="float" office:value="1" calcext:value-type="float">
            <text:p>1</text:p>
          </table:table-cell>
          <table:table-cell/>
          <table:table-cell table:formula="of:=IF([.D102]=1; COM.MICROSOFT.CONCAT(&quot;ModbusCoils[coilIndexFromAddress(MODBUS_ADDR_&quot;; [.B102]; &quot;)] = &quot;; [.C102]; &quot;;&quot;); IF([.E102]=1; COM.MICROSOFT.CONCAT(&quot;ModbusHoldingRegisters[holdingIndexFromAddress(MODBUS_ADDR_&quot;; [.B102]; &quot;)] = &quot;; [.C102]; &quot;u;&quot;); &quot;&quot;))" office:value-type="string" office:string-value="ModbusHoldingRegisters[holdingIndexFromAddress(MODBUS_ADDR_CUP2_CHANNEL1_GAIN_HIGH_POINT4)] = 75u;" calcext:value-type="string">
            <text:p>ModbusHoldingRegisters[holdingIndexFromAddress(MODBUS_ADDR_CUP2_CHANNEL1_GAIN_HIGH_POINT4)] = 75u;</text:p>
          </table:table-cell>
        </table:table-row>
        <table:table-row table:style-name="ro1">
          <table:table-cell table:style-name="ce17" table:formula="of:=[$List.B103]" office:value-type="string" office:string-value="holding reg." calcext:value-type="string">
            <text:p>holding reg.</text:p>
          </table:table-cell>
          <table:table-cell table:style-name="ce17" table:formula="of:=[$List.I103]" office:value-type="string" office:string-value="CUP2_CHANNEL2_GAIN_LOW_POINT1" calcext:value-type="string">
            <text:p>CUP2_CHANNEL2_GAIN_LOW_POINT1</text:p>
          </table:table-cell>
          <table:table-cell table:style-name="ce17" table:formula="of:=[$List.G103]" office:value-type="float" office:value="1728" calcext:value-type="float">
            <text:p>1728</text:p>
          </table:table-cell>
          <table:table-cell table:formula="of:=IF(AND(([.A103]=&quot;coil&quot;);([.C103]=&quot;true&quot;)); 1; &quot;&quot;)">
            <text:p/>
          </table:table-cell>
          <table:table-cell table:formula="of:=IF(AND(([.A103]=&quot;holding reg.&quot;);([.C103] &lt;&gt; 0)); 1; &quot;&quot;)" office:value-type="float" office:value="1" calcext:value-type="float">
            <text:p>1</text:p>
          </table:table-cell>
          <table:table-cell/>
          <table:table-cell table:formula="of:=IF([.D103]=1; COM.MICROSOFT.CONCAT(&quot;ModbusCoils[coilIndexFromAddress(MODBUS_ADDR_&quot;; [.B103]; &quot;)] = &quot;; [.C103]; &quot;;&quot;); IF([.E103]=1; COM.MICROSOFT.CONCAT(&quot;ModbusHoldingRegisters[holdingIndexFromAddress(MODBUS_ADDR_&quot;; [.B103]; &quot;)] = &quot;; [.C103]; &quot;u;&quot;); &quot;&quot;))" office:value-type="string" office:string-value="ModbusHoldingRegisters[holdingIndexFromAddress(MODBUS_ADDR_CUP2_CHANNEL2_GAIN_LOW_POINT1)] = 1728u;" calcext:value-type="string">
            <text:p>ModbusHoldingRegisters[holdingIndexFromAddress(MODBUS_ADDR_CUP2_CHANNEL2_GAIN_LOW_POINT1)] = 1728u;</text:p>
          </table:table-cell>
        </table:table-row>
        <table:table-row table:style-name="ro1">
          <table:table-cell table:style-name="ce17" table:formula="of:=[$List.B104]" office:value-type="string" office:string-value="holding reg." calcext:value-type="string">
            <text:p>holding reg.</text:p>
          </table:table-cell>
          <table:table-cell table:style-name="ce17" table:formula="of:=[$List.I104]" office:value-type="string" office:string-value="CUP2_CHANNEL2_GAIN_LOW_POINT2" calcext:value-type="string">
            <text:p>CUP2_CHANNEL2_GAIN_LOW_POINT2</text:p>
          </table:table-cell>
          <table:table-cell table:style-name="ce17" table:formula="of:=[$List.G104]" office:value-type="float" office:value="185" calcext:value-type="float">
            <text:p>185</text:p>
          </table:table-cell>
          <table:table-cell table:formula="of:=IF(AND(([.A104]=&quot;coil&quot;);([.C104]=&quot;true&quot;)); 1; &quot;&quot;)">
            <text:p/>
          </table:table-cell>
          <table:table-cell table:formula="of:=IF(AND(([.A104]=&quot;holding reg.&quot;);([.C104] &lt;&gt; 0)); 1; &quot;&quot;)" office:value-type="float" office:value="1" calcext:value-type="float">
            <text:p>1</text:p>
          </table:table-cell>
          <table:table-cell/>
          <table:table-cell table:formula="of:=IF([.D104]=1; COM.MICROSOFT.CONCAT(&quot;ModbusCoils[coilIndexFromAddress(MODBUS_ADDR_&quot;; [.B104]; &quot;)] = &quot;; [.C104]; &quot;;&quot;); IF([.E104]=1; COM.MICROSOFT.CONCAT(&quot;ModbusHoldingRegisters[holdingIndexFromAddress(MODBUS_ADDR_&quot;; [.B104]; &quot;)] = &quot;; [.C104]; &quot;u;&quot;); &quot;&quot;))" office:value-type="string" office:string-value="ModbusHoldingRegisters[holdingIndexFromAddress(MODBUS_ADDR_CUP2_CHANNEL2_GAIN_LOW_POINT2)] = 185u;" calcext:value-type="string">
            <text:p>ModbusHoldingRegisters[holdingIndexFromAddress(MODBUS_ADDR_CUP2_CHANNEL2_GAIN_LOW_POINT2)] = 185u;</text:p>
          </table:table-cell>
        </table:table-row>
        <table:table-row table:style-name="ro1">
          <table:table-cell table:style-name="ce17" table:formula="of:=[$List.B105]" office:value-type="string" office:string-value="holding reg." calcext:value-type="string">
            <text:p>holding reg.</text:p>
          </table:table-cell>
          <table:table-cell table:style-name="ce17" table:formula="of:=[$List.I105]" office:value-type="string" office:string-value="CUP2_CHANNEL2_GAIN_LOW_POINT3" calcext:value-type="string">
            <text:p>CUP2_CHANNEL2_GAIN_LOW_POINT3</text:p>
          </table:table-cell>
          <table:table-cell table:style-name="ce17" table:formula="of:=[$List.G105]" office:value-type="float" office:value="169" calcext:value-type="float">
            <text:p>169</text:p>
          </table:table-cell>
          <table:table-cell table:formula="of:=IF(AND(([.A105]=&quot;coil&quot;);([.C105]=&quot;true&quot;)); 1; &quot;&quot;)">
            <text:p/>
          </table:table-cell>
          <table:table-cell table:formula="of:=IF(AND(([.A105]=&quot;holding reg.&quot;);([.C105] &lt;&gt; 0)); 1; &quot;&quot;)" office:value-type="float" office:value="1" calcext:value-type="float">
            <text:p>1</text:p>
          </table:table-cell>
          <table:table-cell/>
          <table:table-cell table:formula="of:=IF([.D105]=1; COM.MICROSOFT.CONCAT(&quot;ModbusCoils[coilIndexFromAddress(MODBUS_ADDR_&quot;; [.B105]; &quot;)] = &quot;; [.C105]; &quot;;&quot;); IF([.E105]=1; COM.MICROSOFT.CONCAT(&quot;ModbusHoldingRegisters[holdingIndexFromAddress(MODBUS_ADDR_&quot;; [.B105]; &quot;)] = &quot;; [.C105]; &quot;u;&quot;); &quot;&quot;))" office:value-type="string" office:string-value="ModbusHoldingRegisters[holdingIndexFromAddress(MODBUS_ADDR_CUP2_CHANNEL2_GAIN_LOW_POINT3)] = 169u;" calcext:value-type="string">
            <text:p>ModbusHoldingRegisters[holdingIndexFromAddress(MODBUS_ADDR_CUP2_CHANNEL2_GAIN_LOW_POINT3)] = 169u;</text:p>
          </table:table-cell>
        </table:table-row>
        <table:table-row table:style-name="ro1">
          <table:table-cell table:style-name="ce17" table:formula="of:=[$List.B106]" office:value-type="string" office:string-value="holding reg." calcext:value-type="string">
            <text:p>holding reg.</text:p>
          </table:table-cell>
          <table:table-cell table:style-name="ce17" table:formula="of:=[$List.I106]" office:value-type="string" office:string-value="CUP2_CHANNEL2_GAIN_HIGH_POINT2" calcext:value-type="string">
            <text:p>CUP2_CHANNEL2_GAIN_HIGH_POINT2</text:p>
          </table:table-cell>
          <table:table-cell table:style-name="ce17" table:formula="of:=[$List.G106]" office:value-type="float" office:value="1774" calcext:value-type="float">
            <text:p>1774</text:p>
          </table:table-cell>
          <table:table-cell table:formula="of:=IF(AND(([.A106]=&quot;coil&quot;);([.C106]=&quot;true&quot;)); 1; &quot;&quot;)">
            <text:p/>
          </table:table-cell>
          <table:table-cell table:formula="of:=IF(AND(([.A106]=&quot;holding reg.&quot;);([.C106] &lt;&gt; 0)); 1; &quot;&quot;)" office:value-type="float" office:value="1" calcext:value-type="float">
            <text:p>1</text:p>
          </table:table-cell>
          <table:table-cell/>
          <table:table-cell table:formula="of:=IF([.D106]=1; COM.MICROSOFT.CONCAT(&quot;ModbusCoils[coilIndexFromAddress(MODBUS_ADDR_&quot;; [.B106]; &quot;)] = &quot;; [.C106]; &quot;;&quot;); IF([.E106]=1; COM.MICROSOFT.CONCAT(&quot;ModbusHoldingRegisters[holdingIndexFromAddress(MODBUS_ADDR_&quot;; [.B106]; &quot;)] = &quot;; [.C106]; &quot;u;&quot;); &quot;&quot;))" office:value-type="string" office:string-value="ModbusHoldingRegisters[holdingIndexFromAddress(MODBUS_ADDR_CUP2_CHANNEL2_GAIN_HIGH_POINT2)] = 1774u;" calcext:value-type="string">
            <text:p>ModbusHoldingRegisters[holdingIndexFromAddress(MODBUS_ADDR_CUP2_CHANNEL2_GAIN_HIGH_POINT2)] = 1774u;</text:p>
          </table:table-cell>
        </table:table-row>
        <table:table-row table:style-name="ro1">
          <table:table-cell table:style-name="ce17" table:formula="of:=[$List.B107]" office:value-type="string" office:string-value="holding reg." calcext:value-type="string">
            <text:p>holding reg.</text:p>
          </table:table-cell>
          <table:table-cell table:style-name="ce17" table:formula="of:=[$List.I107]" office:value-type="string" office:string-value="CUP2_CHANNEL2_GAIN_HIGH_POINT3" calcext:value-type="string">
            <text:p>CUP2_CHANNEL2_GAIN_HIGH_POINT3</text:p>
          </table:table-cell>
          <table:table-cell table:style-name="ce17" table:formula="of:=[$List.G107]" office:value-type="float" office:value="1632" calcext:value-type="float">
            <text:p>1632</text:p>
          </table:table-cell>
          <table:table-cell table:formula="of:=IF(AND(([.A107]=&quot;coil&quot;);([.C107]=&quot;true&quot;)); 1; &quot;&quot;)">
            <text:p/>
          </table:table-cell>
          <table:table-cell table:formula="of:=IF(AND(([.A107]=&quot;holding reg.&quot;);([.C107] &lt;&gt; 0)); 1; &quot;&quot;)" office:value-type="float" office:value="1" calcext:value-type="float">
            <text:p>1</text:p>
          </table:table-cell>
          <table:table-cell/>
          <table:table-cell table:formula="of:=IF([.D107]=1; COM.MICROSOFT.CONCAT(&quot;ModbusCoils[coilIndexFromAddress(MODBUS_ADDR_&quot;; [.B107]; &quot;)] = &quot;; [.C107]; &quot;;&quot;); IF([.E107]=1; COM.MICROSOFT.CONCAT(&quot;ModbusHoldingRegisters[holdingIndexFromAddress(MODBUS_ADDR_&quot;; [.B107]; &quot;)] = &quot;; [.C107]; &quot;u;&quot;); &quot;&quot;))" office:value-type="string" office:string-value="ModbusHoldingRegisters[holdingIndexFromAddress(MODBUS_ADDR_CUP2_CHANNEL2_GAIN_HIGH_POINT3)] = 1632u;" calcext:value-type="string">
            <text:p>ModbusHoldingRegisters[holdingIndexFromAddress(MODBUS_ADDR_CUP2_CHANNEL2_GAIN_HIGH_POINT3)] = 1632u;</text:p>
          </table:table-cell>
        </table:table-row>
        <table:table-row table:style-name="ro1">
          <table:table-cell table:style-name="ce17" table:formula="of:=[$List.B108]" office:value-type="string" office:string-value="holding reg." calcext:value-type="string">
            <text:p>holding reg.</text:p>
          </table:table-cell>
          <table:table-cell table:style-name="ce17" table:formula="of:=[$List.I108]" office:value-type="string" office:string-value="CUP2_CHANNEL2_GAIN_HIGH_POINT4" calcext:value-type="string">
            <text:p>CUP2_CHANNEL2_GAIN_HIGH_POINT4</text:p>
          </table:table-cell>
          <table:table-cell table:style-name="ce17" table:formula="of:=[$List.G108]" office:value-type="float" office:value="81" calcext:value-type="float">
            <text:p>81</text:p>
          </table:table-cell>
          <table:table-cell table:formula="of:=IF(AND(([.A108]=&quot;coil&quot;);([.C108]=&quot;true&quot;)); 1; &quot;&quot;)">
            <text:p/>
          </table:table-cell>
          <table:table-cell table:formula="of:=IF(AND(([.A108]=&quot;holding reg.&quot;);([.C108] &lt;&gt; 0)); 1; &quot;&quot;)" office:value-type="float" office:value="1" calcext:value-type="float">
            <text:p>1</text:p>
          </table:table-cell>
          <table:table-cell/>
          <table:table-cell table:formula="of:=IF([.D108]=1; COM.MICROSOFT.CONCAT(&quot;ModbusCoils[coilIndexFromAddress(MODBUS_ADDR_&quot;; [.B108]; &quot;)] = &quot;; [.C108]; &quot;;&quot;); IF([.E108]=1; COM.MICROSOFT.CONCAT(&quot;ModbusHoldingRegisters[holdingIndexFromAddress(MODBUS_ADDR_&quot;; [.B108]; &quot;)] = &quot;; [.C108]; &quot;u;&quot;); &quot;&quot;))" office:value-type="string" office:string-value="ModbusHoldingRegisters[holdingIndexFromAddress(MODBUS_ADDR_CUP2_CHANNEL2_GAIN_HIGH_POINT4)] = 81u;" calcext:value-type="string">
            <text:p>ModbusHoldingRegisters[holdingIndexFromAddress(MODBUS_ADDR_CUP2_CHANNEL2_GAIN_HIGH_POINT4)] = 81u;</text:p>
          </table:table-cell>
        </table:table-row>
        <table:table-row table:style-name="ro1">
          <table:table-cell table:style-name="ce17" table:formula="of:=[$List.B109]" office:value-type="string" office:string-value="holding reg." calcext:value-type="string">
            <text:p>holding reg.</text:p>
          </table:table-cell>
          <table:table-cell table:style-name="ce17" table:formula="of:=[$List.I109]" office:value-type="string" office:string-value="CUP2_CHANNEL3_GAIN_LOW_POINT1" calcext:value-type="string">
            <text:p>CUP2_CHANNEL3_GAIN_LOW_POINT1</text:p>
          </table:table-cell>
          <table:table-cell table:style-name="ce17" table:formula="of:=[$List.G109]" office:value-type="float" office:value="1718" calcext:value-type="float">
            <text:p>1718</text:p>
          </table:table-cell>
          <table:table-cell table:formula="of:=IF(AND(([.A109]=&quot;coil&quot;);([.C109]=&quot;true&quot;)); 1; &quot;&quot;)">
            <text:p/>
          </table:table-cell>
          <table:table-cell table:formula="of:=IF(AND(([.A109]=&quot;holding reg.&quot;);([.C109] &lt;&gt; 0)); 1; &quot;&quot;)" office:value-type="float" office:value="1" calcext:value-type="float">
            <text:p>1</text:p>
          </table:table-cell>
          <table:table-cell/>
          <table:table-cell table:formula="of:=IF([.D109]=1; COM.MICROSOFT.CONCAT(&quot;ModbusCoils[coilIndexFromAddress(MODBUS_ADDR_&quot;; [.B109]; &quot;)] = &quot;; [.C109]; &quot;;&quot;); IF([.E109]=1; COM.MICROSOFT.CONCAT(&quot;ModbusHoldingRegisters[holdingIndexFromAddress(MODBUS_ADDR_&quot;; [.B109]; &quot;)] = &quot;; [.C109]; &quot;u;&quot;); &quot;&quot;))" office:value-type="string" office:string-value="ModbusHoldingRegisters[holdingIndexFromAddress(MODBUS_ADDR_CUP2_CHANNEL3_GAIN_LOW_POINT1)] = 1718u;" calcext:value-type="string">
            <text:p>ModbusHoldingRegisters[holdingIndexFromAddress(MODBUS_ADDR_CUP2_CHANNEL3_GAIN_LOW_POINT1)] = 1718u;</text:p>
          </table:table-cell>
        </table:table-row>
        <table:table-row table:style-name="ro1">
          <table:table-cell table:style-name="ce17" table:formula="of:=[$List.B110]" office:value-type="string" office:string-value="holding reg." calcext:value-type="string">
            <text:p>holding reg.</text:p>
          </table:table-cell>
          <table:table-cell table:style-name="ce17" table:formula="of:=[$List.I110]" office:value-type="string" office:string-value="CUP2_CHANNEL3_GAIN_LOW_POINT2" calcext:value-type="string">
            <text:p>CUP2_CHANNEL3_GAIN_LOW_POINT2</text:p>
          </table:table-cell>
          <table:table-cell table:style-name="ce17" table:formula="of:=[$List.G110]" office:value-type="float" office:value="176" calcext:value-type="float">
            <text:p>176</text:p>
          </table:table-cell>
          <table:table-cell table:formula="of:=IF(AND(([.A110]=&quot;coil&quot;);([.C110]=&quot;true&quot;)); 1; &quot;&quot;)">
            <text:p/>
          </table:table-cell>
          <table:table-cell table:formula="of:=IF(AND(([.A110]=&quot;holding reg.&quot;);([.C110] &lt;&gt; 0)); 1; &quot;&quot;)" office:value-type="float" office:value="1" calcext:value-type="float">
            <text:p>1</text:p>
          </table:table-cell>
          <table:table-cell/>
          <table:table-cell table:formula="of:=IF([.D110]=1; COM.MICROSOFT.CONCAT(&quot;ModbusCoils[coilIndexFromAddress(MODBUS_ADDR_&quot;; [.B110]; &quot;)] = &quot;; [.C110]; &quot;;&quot;); IF([.E110]=1; COM.MICROSOFT.CONCAT(&quot;ModbusHoldingRegisters[holdingIndexFromAddress(MODBUS_ADDR_&quot;; [.B110]; &quot;)] = &quot;; [.C110]; &quot;u;&quot;); &quot;&quot;))" office:value-type="string" office:string-value="ModbusHoldingRegisters[holdingIndexFromAddress(MODBUS_ADDR_CUP2_CHANNEL3_GAIN_LOW_POINT2)] = 176u;" calcext:value-type="string">
            <text:p>ModbusHoldingRegisters[holdingIndexFromAddress(MODBUS_ADDR_CUP2_CHANNEL3_GAIN_LOW_POINT2)] = 176u;</text:p>
          </table:table-cell>
        </table:table-row>
        <table:table-row table:style-name="ro1">
          <table:table-cell table:style-name="ce17" table:formula="of:=[$List.B111]" office:value-type="string" office:string-value="holding reg." calcext:value-type="string">
            <text:p>holding reg.</text:p>
          </table:table-cell>
          <table:table-cell table:style-name="ce17" table:formula="of:=[$List.I111]" office:value-type="string" office:string-value="CUP2_CHANNEL3_GAIN_LOW_POINT3" calcext:value-type="string">
            <text:p>CUP2_CHANNEL3_GAIN_LOW_POINT3</text:p>
          </table:table-cell>
          <table:table-cell table:style-name="ce17" table:formula="of:=[$List.G111]" office:value-type="float" office:value="163" calcext:value-type="float">
            <text:p>163</text:p>
          </table:table-cell>
          <table:table-cell table:formula="of:=IF(AND(([.A111]=&quot;coil&quot;);([.C111]=&quot;true&quot;)); 1; &quot;&quot;)">
            <text:p/>
          </table:table-cell>
          <table:table-cell table:formula="of:=IF(AND(([.A111]=&quot;holding reg.&quot;);([.C111] &lt;&gt; 0)); 1; &quot;&quot;)" office:value-type="float" office:value="1" calcext:value-type="float">
            <text:p>1</text:p>
          </table:table-cell>
          <table:table-cell/>
          <table:table-cell table:formula="of:=IF([.D111]=1; COM.MICROSOFT.CONCAT(&quot;ModbusCoils[coilIndexFromAddress(MODBUS_ADDR_&quot;; [.B111]; &quot;)] = &quot;; [.C111]; &quot;;&quot;); IF([.E111]=1; COM.MICROSOFT.CONCAT(&quot;ModbusHoldingRegisters[holdingIndexFromAddress(MODBUS_ADDR_&quot;; [.B111]; &quot;)] = &quot;; [.C111]; &quot;u;&quot;); &quot;&quot;))" office:value-type="string" office:string-value="ModbusHoldingRegisters[holdingIndexFromAddress(MODBUS_ADDR_CUP2_CHANNEL3_GAIN_LOW_POINT3)] = 163u;" calcext:value-type="string">
            <text:p>ModbusHoldingRegisters[holdingIndexFromAddress(MODBUS_ADDR_CUP2_CHANNEL3_GAIN_LOW_POINT3)] = 163u;</text:p>
          </table:table-cell>
        </table:table-row>
        <table:table-row table:style-name="ro1">
          <table:table-cell table:style-name="ce17" table:formula="of:=[$List.B112]" office:value-type="string" office:string-value="holding reg." calcext:value-type="string">
            <text:p>holding reg.</text:p>
          </table:table-cell>
          <table:table-cell table:style-name="ce17" table:formula="of:=[$List.I112]" office:value-type="string" office:string-value="CUP2_CHANNEL3_GAIN_HIGH_POINT2" calcext:value-type="string">
            <text:p>CUP2_CHANNEL3_GAIN_HIGH_POINT2</text:p>
          </table:table-cell>
          <table:table-cell table:style-name="ce17" table:formula="of:=[$List.G112]" office:value-type="float" office:value="1713" calcext:value-type="float">
            <text:p>1713</text:p>
          </table:table-cell>
          <table:table-cell table:formula="of:=IF(AND(([.A112]=&quot;coil&quot;);([.C112]=&quot;true&quot;)); 1; &quot;&quot;)">
            <text:p/>
          </table:table-cell>
          <table:table-cell table:formula="of:=IF(AND(([.A112]=&quot;holding reg.&quot;);([.C112] &lt;&gt; 0)); 1; &quot;&quot;)" office:value-type="float" office:value="1" calcext:value-type="float">
            <text:p>1</text:p>
          </table:table-cell>
          <table:table-cell/>
          <table:table-cell table:formula="of:=IF([.D112]=1; COM.MICROSOFT.CONCAT(&quot;ModbusCoils[coilIndexFromAddress(MODBUS_ADDR_&quot;; [.B112]; &quot;)] = &quot;; [.C112]; &quot;;&quot;); IF([.E112]=1; COM.MICROSOFT.CONCAT(&quot;ModbusHoldingRegisters[holdingIndexFromAddress(MODBUS_ADDR_&quot;; [.B112]; &quot;)] = &quot;; [.C112]; &quot;u;&quot;); &quot;&quot;))" office:value-type="string" office:string-value="ModbusHoldingRegisters[holdingIndexFromAddress(MODBUS_ADDR_CUP2_CHANNEL3_GAIN_HIGH_POINT2)] = 1713u;" calcext:value-type="string">
            <text:p>ModbusHoldingRegisters[holdingIndexFromAddress(MODBUS_ADDR_CUP2_CHANNEL3_GAIN_HIGH_POINT2)] = 1713u;</text:p>
          </table:table-cell>
        </table:table-row>
        <table:table-row table:style-name="ro1">
          <table:table-cell table:style-name="ce17" table:formula="of:=[$List.B113]" office:value-type="string" office:string-value="holding reg." calcext:value-type="string">
            <text:p>holding reg.</text:p>
          </table:table-cell>
          <table:table-cell table:style-name="ce17" table:formula="of:=[$List.I113]" office:value-type="string" office:string-value="CUP2_CHANNEL3_GAIN_HIGH_POINT3" calcext:value-type="string">
            <text:p>CUP2_CHANNEL3_GAIN_HIGH_POINT3</text:p>
          </table:table-cell>
          <table:table-cell table:style-name="ce17" table:formula="of:=[$List.G113]" office:value-type="float" office:value="1558" calcext:value-type="float">
            <text:p>1558</text:p>
          </table:table-cell>
          <table:table-cell table:formula="of:=IF(AND(([.A113]=&quot;coil&quot;);([.C113]=&quot;true&quot;)); 1; &quot;&quot;)">
            <text:p/>
          </table:table-cell>
          <table:table-cell table:formula="of:=IF(AND(([.A113]=&quot;holding reg.&quot;);([.C113] &lt;&gt; 0)); 1; &quot;&quot;)" office:value-type="float" office:value="1" calcext:value-type="float">
            <text:p>1</text:p>
          </table:table-cell>
          <table:table-cell/>
          <table:table-cell table:formula="of:=IF([.D113]=1; COM.MICROSOFT.CONCAT(&quot;ModbusCoils[coilIndexFromAddress(MODBUS_ADDR_&quot;; [.B113]; &quot;)] = &quot;; [.C113]; &quot;;&quot;); IF([.E113]=1; COM.MICROSOFT.CONCAT(&quot;ModbusHoldingRegisters[holdingIndexFromAddress(MODBUS_ADDR_&quot;; [.B113]; &quot;)] = &quot;; [.C113]; &quot;u;&quot;); &quot;&quot;))" office:value-type="string" office:string-value="ModbusHoldingRegisters[holdingIndexFromAddress(MODBUS_ADDR_CUP2_CHANNEL3_GAIN_HIGH_POINT3)] = 1558u;" calcext:value-type="string">
            <text:p>ModbusHoldingRegisters[holdingIndexFromAddress(MODBUS_ADDR_CUP2_CHANNEL3_GAIN_HIGH_POINT3)] = 1558u;</text:p>
          </table:table-cell>
        </table:table-row>
        <table:table-row table:style-name="ro1">
          <table:table-cell table:style-name="ce17" table:formula="of:=[$List.B114]" office:value-type="string" office:string-value="holding reg." calcext:value-type="string">
            <text:p>holding reg.</text:p>
          </table:table-cell>
          <table:table-cell table:style-name="ce17" table:formula="of:=[$List.I114]" office:value-type="string" office:string-value="CUP2_CHANNEL3_GAIN_HIGH_POINT4" calcext:value-type="string">
            <text:p>CUP2_CHANNEL3_GAIN_HIGH_POINT4</text:p>
          </table:table-cell>
          <table:table-cell table:style-name="ce17" table:formula="of:=[$List.G114]" office:value-type="float" office:value="22" calcext:value-type="float">
            <text:p>22</text:p>
          </table:table-cell>
          <table:table-cell table:formula="of:=IF(AND(([.A114]=&quot;coil&quot;);([.C114]=&quot;true&quot;)); 1; &quot;&quot;)">
            <text:p/>
          </table:table-cell>
          <table:table-cell table:formula="of:=IF(AND(([.A114]=&quot;holding reg.&quot;);([.C114] &lt;&gt; 0)); 1; &quot;&quot;)" office:value-type="float" office:value="1" calcext:value-type="float">
            <text:p>1</text:p>
          </table:table-cell>
          <table:table-cell/>
          <table:table-cell table:formula="of:=IF([.D114]=1; COM.MICROSOFT.CONCAT(&quot;ModbusCoils[coilIndexFromAddress(MODBUS_ADDR_&quot;; [.B114]; &quot;)] = &quot;; [.C114]; &quot;;&quot;); IF([.E114]=1; COM.MICROSOFT.CONCAT(&quot;ModbusHoldingRegisters[holdingIndexFromAddress(MODBUS_ADDR_&quot;; [.B114]; &quot;)] = &quot;; [.C114]; &quot;u;&quot;); &quot;&quot;))" office:value-type="string" office:string-value="ModbusHoldingRegisters[holdingIndexFromAddress(MODBUS_ADDR_CUP2_CHANNEL3_GAIN_HIGH_POINT4)] = 22u;" calcext:value-type="string">
            <text:p>ModbusHoldingRegisters[holdingIndexFromAddress(MODBUS_ADDR_CUP2_CHANNEL3_GAIN_HIGH_POINT4)] = 22u;</text:p>
          </table:table-cell>
        </table:table-row>
        <table:table-row table:style-name="ro1">
          <table:table-cell table:style-name="ce17" table:formula="of:=[$List.B115]" office:value-type="string" office:string-value="holding reg." calcext:value-type="string">
            <text:p>holding reg.</text:p>
          </table:table-cell>
          <table:table-cell table:style-name="ce17" table:formula="of:=[$List.I115]" office:value-type="string" office:string-value="CUP2_CHANNEL4_GAIN_LOW_POINT1" calcext:value-type="string">
            <text:p>CUP2_CHANNEL4_GAIN_LOW_POINT1</text:p>
          </table:table-cell>
          <table:table-cell table:style-name="ce17" table:formula="of:=[$List.G115]" office:value-type="float" office:value="1741" calcext:value-type="float">
            <text:p>1741</text:p>
          </table:table-cell>
          <table:table-cell table:formula="of:=IF(AND(([.A115]=&quot;coil&quot;);([.C115]=&quot;true&quot;)); 1; &quot;&quot;)">
            <text:p/>
          </table:table-cell>
          <table:table-cell table:formula="of:=IF(AND(([.A115]=&quot;holding reg.&quot;);([.C115] &lt;&gt; 0)); 1; &quot;&quot;)" office:value-type="float" office:value="1" calcext:value-type="float">
            <text:p>1</text:p>
          </table:table-cell>
          <table:table-cell/>
          <table:table-cell table:formula="of:=IF([.D115]=1; COM.MICROSOFT.CONCAT(&quot;ModbusCoils[coilIndexFromAddress(MODBUS_ADDR_&quot;; [.B115]; &quot;)] = &quot;; [.C115]; &quot;;&quot;); IF([.E115]=1; COM.MICROSOFT.CONCAT(&quot;ModbusHoldingRegisters[holdingIndexFromAddress(MODBUS_ADDR_&quot;; [.B115]; &quot;)] = &quot;; [.C115]; &quot;u;&quot;); &quot;&quot;))" office:value-type="string" office:string-value="ModbusHoldingRegisters[holdingIndexFromAddress(MODBUS_ADDR_CUP2_CHANNEL4_GAIN_LOW_POINT1)] = 1741u;" calcext:value-type="string">
            <text:p>ModbusHoldingRegisters[holdingIndexFromAddress(MODBUS_ADDR_CUP2_CHANNEL4_GAIN_LOW_POINT1)] = 1741u;</text:p>
          </table:table-cell>
        </table:table-row>
        <table:table-row table:style-name="ro1">
          <table:table-cell table:style-name="ce17" table:formula="of:=[$List.B116]" office:value-type="string" office:string-value="holding reg." calcext:value-type="string">
            <text:p>holding reg.</text:p>
          </table:table-cell>
          <table:table-cell table:style-name="ce17" table:formula="of:=[$List.I116]" office:value-type="string" office:string-value="CUP2_CHANNEL4_GAIN_LOW_POINT2" calcext:value-type="string">
            <text:p>CUP2_CHANNEL4_GAIN_LOW_POINT2</text:p>
          </table:table-cell>
          <table:table-cell table:style-name="ce17" table:formula="of:=[$List.G116]" office:value-type="float" office:value="198" calcext:value-type="float">
            <text:p>198</text:p>
          </table:table-cell>
          <table:table-cell table:formula="of:=IF(AND(([.A116]=&quot;coil&quot;);([.C116]=&quot;true&quot;)); 1; &quot;&quot;)">
            <text:p/>
          </table:table-cell>
          <table:table-cell table:formula="of:=IF(AND(([.A116]=&quot;holding reg.&quot;);([.C116] &lt;&gt; 0)); 1; &quot;&quot;)" office:value-type="float" office:value="1" calcext:value-type="float">
            <text:p>1</text:p>
          </table:table-cell>
          <table:table-cell/>
          <table:table-cell table:formula="of:=IF([.D116]=1; COM.MICROSOFT.CONCAT(&quot;ModbusCoils[coilIndexFromAddress(MODBUS_ADDR_&quot;; [.B116]; &quot;)] = &quot;; [.C116]; &quot;;&quot;); IF([.E116]=1; COM.MICROSOFT.CONCAT(&quot;ModbusHoldingRegisters[holdingIndexFromAddress(MODBUS_ADDR_&quot;; [.B116]; &quot;)] = &quot;; [.C116]; &quot;u;&quot;); &quot;&quot;))" office:value-type="string" office:string-value="ModbusHoldingRegisters[holdingIndexFromAddress(MODBUS_ADDR_CUP2_CHANNEL4_GAIN_LOW_POINT2)] = 198u;" calcext:value-type="string">
            <text:p>ModbusHoldingRegisters[holdingIndexFromAddress(MODBUS_ADDR_CUP2_CHANNEL4_GAIN_LOW_POINT2)] = 198u;</text:p>
          </table:table-cell>
        </table:table-row>
        <table:table-row table:style-name="ro1">
          <table:table-cell table:style-name="ce17" table:formula="of:=[$List.B117]" office:value-type="string" office:string-value="holding reg." calcext:value-type="string">
            <text:p>holding reg.</text:p>
          </table:table-cell>
          <table:table-cell table:style-name="ce17" table:formula="of:=[$List.I117]" office:value-type="string" office:string-value="CUP2_CHANNEL4_GAIN_LOW_POINT3" calcext:value-type="string">
            <text:p>CUP2_CHANNEL4_GAIN_LOW_POINT3</text:p>
          </table:table-cell>
          <table:table-cell table:style-name="ce17" table:formula="of:=[$List.G117]" office:value-type="float" office:value="182" calcext:value-type="float">
            <text:p>182</text:p>
          </table:table-cell>
          <table:table-cell table:formula="of:=IF(AND(([.A117]=&quot;coil&quot;);([.C117]=&quot;true&quot;)); 1; &quot;&quot;)">
            <text:p/>
          </table:table-cell>
          <table:table-cell table:formula="of:=IF(AND(([.A117]=&quot;holding reg.&quot;);([.C117] &lt;&gt; 0)); 1; &quot;&quot;)" office:value-type="float" office:value="1" calcext:value-type="float">
            <text:p>1</text:p>
          </table:table-cell>
          <table:table-cell/>
          <table:table-cell table:formula="of:=IF([.D117]=1; COM.MICROSOFT.CONCAT(&quot;ModbusCoils[coilIndexFromAddress(MODBUS_ADDR_&quot;; [.B117]; &quot;)] = &quot;; [.C117]; &quot;;&quot;); IF([.E117]=1; COM.MICROSOFT.CONCAT(&quot;ModbusHoldingRegisters[holdingIndexFromAddress(MODBUS_ADDR_&quot;; [.B117]; &quot;)] = &quot;; [.C117]; &quot;u;&quot;); &quot;&quot;))" office:value-type="string" office:string-value="ModbusHoldingRegisters[holdingIndexFromAddress(MODBUS_ADDR_CUP2_CHANNEL4_GAIN_LOW_POINT3)] = 182u;" calcext:value-type="string">
            <text:p>ModbusHoldingRegisters[holdingIndexFromAddress(MODBUS_ADDR_CUP2_CHANNEL4_GAIN_LOW_POINT3)] = 182u;</text:p>
          </table:table-cell>
        </table:table-row>
        <table:table-row table:style-name="ro1">
          <table:table-cell table:style-name="ce17" table:formula="of:=[$List.B118]" office:value-type="string" office:string-value="holding reg." calcext:value-type="string">
            <text:p>holding reg.</text:p>
          </table:table-cell>
          <table:table-cell table:style-name="ce17" table:formula="of:=[$List.I118]" office:value-type="string" office:string-value="CUP2_CHANNEL4_GAIN_HIGH_POINT2" calcext:value-type="string">
            <text:p>CUP2_CHANNEL4_GAIN_HIGH_POINT2</text:p>
          </table:table-cell>
          <table:table-cell table:style-name="ce17" table:formula="of:=[$List.G118]" office:value-type="float" office:value="1851" calcext:value-type="float">
            <text:p>1851</text:p>
          </table:table-cell>
          <table:table-cell table:formula="of:=IF(AND(([.A118]=&quot;coil&quot;);([.C118]=&quot;true&quot;)); 1; &quot;&quot;)">
            <text:p/>
          </table:table-cell>
          <table:table-cell table:formula="of:=IF(AND(([.A118]=&quot;holding reg.&quot;);([.C118] &lt;&gt; 0)); 1; &quot;&quot;)" office:value-type="float" office:value="1" calcext:value-type="float">
            <text:p>1</text:p>
          </table:table-cell>
          <table:table-cell/>
          <table:table-cell table:formula="of:=IF([.D118]=1; COM.MICROSOFT.CONCAT(&quot;ModbusCoils[coilIndexFromAddress(MODBUS_ADDR_&quot;; [.B118]; &quot;)] = &quot;; [.C118]; &quot;;&quot;); IF([.E118]=1; COM.MICROSOFT.CONCAT(&quot;ModbusHoldingRegisters[holdingIndexFromAddress(MODBUS_ADDR_&quot;; [.B118]; &quot;)] = &quot;; [.C118]; &quot;u;&quot;); &quot;&quot;))" office:value-type="string" office:string-value="ModbusHoldingRegisters[holdingIndexFromAddress(MODBUS_ADDR_CUP2_CHANNEL4_GAIN_HIGH_POINT2)] = 1851u;" calcext:value-type="string">
            <text:p>ModbusHoldingRegisters[holdingIndexFromAddress(MODBUS_ADDR_CUP2_CHANNEL4_GAIN_HIGH_POINT2)] = 1851u;</text:p>
          </table:table-cell>
        </table:table-row>
        <table:table-row table:style-name="ro1">
          <table:table-cell table:style-name="ce17" table:formula="of:=[$List.B119]" office:value-type="string" office:string-value="holding reg." calcext:value-type="string">
            <text:p>holding reg.</text:p>
          </table:table-cell>
          <table:table-cell table:style-name="ce17" table:formula="of:=[$List.I119]" office:value-type="string" office:string-value="CUP2_CHANNEL4_GAIN_HIGH_POINT3" calcext:value-type="string">
            <text:p>CUP2_CHANNEL4_GAIN_HIGH_POINT3</text:p>
          </table:table-cell>
          <table:table-cell table:style-name="ce17" table:formula="of:=[$List.G119]" office:value-type="float" office:value="1752" calcext:value-type="float">
            <text:p>1752</text:p>
          </table:table-cell>
          <table:table-cell table:formula="of:=IF(AND(([.A119]=&quot;coil&quot;);([.C119]=&quot;true&quot;)); 1; &quot;&quot;)">
            <text:p/>
          </table:table-cell>
          <table:table-cell table:formula="of:=IF(AND(([.A119]=&quot;holding reg.&quot;);([.C119] &lt;&gt; 0)); 1; &quot;&quot;)" office:value-type="float" office:value="1" calcext:value-type="float">
            <text:p>1</text:p>
          </table:table-cell>
          <table:table-cell/>
          <table:table-cell table:formula="of:=IF([.D119]=1; COM.MICROSOFT.CONCAT(&quot;ModbusCoils[coilIndexFromAddress(MODBUS_ADDR_&quot;; [.B119]; &quot;)] = &quot;; [.C119]; &quot;;&quot;); IF([.E119]=1; COM.MICROSOFT.CONCAT(&quot;ModbusHoldingRegisters[holdingIndexFromAddress(MODBUS_ADDR_&quot;; [.B119]; &quot;)] = &quot;; [.C119]; &quot;u;&quot;); &quot;&quot;))" office:value-type="string" office:string-value="ModbusHoldingRegisters[holdingIndexFromAddress(MODBUS_ADDR_CUP2_CHANNEL4_GAIN_HIGH_POINT3)] = 1752u;" calcext:value-type="string">
            <text:p>ModbusHoldingRegisters[holdingIndexFromAddress(MODBUS_ADDR_CUP2_CHANNEL4_GAIN_HIGH_POINT3)] = 1752u;</text:p>
          </table:table-cell>
        </table:table-row>
        <table:table-row table:style-name="ro1">
          <table:table-cell table:style-name="ce17" table:formula="of:=[$List.B120]" office:value-type="string" office:string-value="holding reg." calcext:value-type="string">
            <text:p>holding reg.</text:p>
          </table:table-cell>
          <table:table-cell table:style-name="ce17" table:formula="of:=[$List.I120]" office:value-type="string" office:string-value="CUP2_CHANNEL4_GAIN_HIGH_POINT4" calcext:value-type="string">
            <text:p>CUP2_CHANNEL4_GAIN_HIGH_POINT4</text:p>
          </table:table-cell>
          <table:table-cell table:style-name="ce17" table:formula="of:=[$List.G120]" office:value-type="float" office:value="213" calcext:value-type="float">
            <text:p>213</text:p>
          </table:table-cell>
          <table:table-cell table:formula="of:=IF(AND(([.A120]=&quot;coil&quot;);([.C120]=&quot;true&quot;)); 1; &quot;&quot;)">
            <text:p/>
          </table:table-cell>
          <table:table-cell table:formula="of:=IF(AND(([.A120]=&quot;holding reg.&quot;);([.C120] &lt;&gt; 0)); 1; &quot;&quot;)" office:value-type="float" office:value="1" calcext:value-type="float">
            <text:p>1</text:p>
          </table:table-cell>
          <table:table-cell/>
          <table:table-cell table:formula="of:=IF([.D120]=1; COM.MICROSOFT.CONCAT(&quot;ModbusCoils[coilIndexFromAddress(MODBUS_ADDR_&quot;; [.B120]; &quot;)] = &quot;; [.C120]; &quot;;&quot;); IF([.E120]=1; COM.MICROSOFT.CONCAT(&quot;ModbusHoldingRegisters[holdingIndexFromAddress(MODBUS_ADDR_&quot;; [.B120]; &quot;)] = &quot;; [.C120]; &quot;u;&quot;); &quot;&quot;))" office:value-type="string" office:string-value="ModbusHoldingRegisters[holdingIndexFromAddress(MODBUS_ADDR_CUP2_CHANNEL4_GAIN_HIGH_POINT4)] = 213u;" calcext:value-type="string">
            <text:p>ModbusHoldingRegisters[holdingIndexFromAddress(MODBUS_ADDR_CUP2_CHANNEL4_GAIN_HIGH_POINT4)] = 213u;</text:p>
          </table:table-cell>
        </table:table-row>
        <table:table-row table:style-name="ro1">
          <table:table-cell table:style-name="ce17" table:formula="of:=[$List.B121]" office:value-type="float" office:value="0" calcext:value-type="float">
            <text:p>0</text:p>
          </table:table-cell>
          <table:table-cell table:style-name="ce17" table:formula="of:=[$List.I121]" office:value-type="float" office:value="0" calcext:value-type="float">
            <text:p>0</text:p>
          </table:table-cell>
          <table:table-cell table:style-name="ce17" table:formula="of:=[$List.G121]" office:value-type="float" office:value="0" calcext:value-type="float">
            <text:p>0</text:p>
          </table:table-cell>
          <table:table-cell table:formula="of:=IF(AND(([.A121]=&quot;coil&quot;);([.C121]=&quot;true&quot;)); 1; &quot;&quot;)">
            <text:p/>
          </table:table-cell>
          <table:table-cell table:formula="of:=IF(AND(([.A121]=&quot;holding reg.&quot;);([.C121] &lt;&gt; 0)); 1; &quot;&quot;)">
            <text:p/>
          </table:table-cell>
          <table:table-cell/>
          <table:table-cell table:formula="of:=IF([.D121]=1; COM.MICROSOFT.CONCAT(&quot;ModbusCoils[coilIndexFromAddress(MODBUS_ADDR_&quot;; [.B121]; &quot;)] = &quot;; [.C121]; &quot;;&quot;); IF([.E121]=1; COM.MICROSOFT.CONCAT(&quot;ModbusHoldingRegisters[holdingIndexFromAddress(MODBUS_ADDR_&quot;; [.B121]; &quot;)] = &quot;; [.C121]; &quot;u;&quot;); &quot;&quot;))">
            <text:p/>
          </table:table-cell>
        </table:table-row>
        <table:table-row table:style-name="ro1">
          <table:table-cell table:style-name="ce17" table:formula="of:=[$List.B122]" office:value-type="string" office:string-value="holding reg." calcext:value-type="string">
            <text:p>holding reg.</text:p>
          </table:table-cell>
          <table:table-cell table:style-name="ce17" table:formula="of:=[$List.I122]" office:value-type="string" office:string-value="CUP3_CHANNEL1_GAIN_LOW_POINT1" calcext:value-type="string">
            <text:p>CUP3_CHANNEL1_GAIN_LOW_POINT1</text:p>
          </table:table-cell>
          <table:table-cell table:style-name="ce17" table:formula="of:=[$List.G122]" office:value-type="float" office:value="1725" calcext:value-type="float">
            <text:p>1725</text:p>
          </table:table-cell>
          <table:table-cell table:formula="of:=IF(AND(([.A122]=&quot;coil&quot;);([.C122]=&quot;true&quot;)); 1; &quot;&quot;)">
            <text:p/>
          </table:table-cell>
          <table:table-cell table:formula="of:=IF(AND(([.A122]=&quot;holding reg.&quot;);([.C122] &lt;&gt; 0)); 1; &quot;&quot;)" office:value-type="float" office:value="1" calcext:value-type="float">
            <text:p>1</text:p>
          </table:table-cell>
          <table:table-cell/>
          <table:table-cell table:formula="of:=IF([.D122]=1; COM.MICROSOFT.CONCAT(&quot;ModbusCoils[coilIndexFromAddress(MODBUS_ADDR_&quot;; [.B122]; &quot;)] = &quot;; [.C122]; &quot;;&quot;); IF([.E122]=1; COM.MICROSOFT.CONCAT(&quot;ModbusHoldingRegisters[holdingIndexFromAddress(MODBUS_ADDR_&quot;; [.B122]; &quot;)] = &quot;; [.C122]; &quot;u;&quot;); &quot;&quot;))" office:value-type="string" office:string-value="ModbusHoldingRegisters[holdingIndexFromAddress(MODBUS_ADDR_CUP3_CHANNEL1_GAIN_LOW_POINT1)] = 1725u;" calcext:value-type="string">
            <text:p>ModbusHoldingRegisters[holdingIndexFromAddress(MODBUS_ADDR_CUP3_CHANNEL1_GAIN_LOW_POINT1)] = 1725u;</text:p>
          </table:table-cell>
        </table:table-row>
        <table:table-row table:style-name="ro1">
          <table:table-cell table:style-name="ce17" table:formula="of:=[$List.B123]" office:value-type="string" office:string-value="holding reg." calcext:value-type="string">
            <text:p>holding reg.</text:p>
          </table:table-cell>
          <table:table-cell table:style-name="ce17" table:formula="of:=[$List.I123]" office:value-type="string" office:string-value="CUP3_CHANNEL1_GAIN_LOW_POINT2" calcext:value-type="string">
            <text:p>CUP3_CHANNEL1_GAIN_LOW_POINT2</text:p>
          </table:table-cell>
          <table:table-cell table:style-name="ce17" table:formula="of:=[$List.G123]" office:value-type="float" office:value="181" calcext:value-type="float">
            <text:p>181</text:p>
          </table:table-cell>
          <table:table-cell table:formula="of:=IF(AND(([.A123]=&quot;coil&quot;);([.C123]=&quot;true&quot;)); 1; &quot;&quot;)">
            <text:p/>
          </table:table-cell>
          <table:table-cell table:formula="of:=IF(AND(([.A123]=&quot;holding reg.&quot;);([.C123] &lt;&gt; 0)); 1; &quot;&quot;)" office:value-type="float" office:value="1" calcext:value-type="float">
            <text:p>1</text:p>
          </table:table-cell>
          <table:table-cell/>
          <table:table-cell table:formula="of:=IF([.D123]=1; COM.MICROSOFT.CONCAT(&quot;ModbusCoils[coilIndexFromAddress(MODBUS_ADDR_&quot;; [.B123]; &quot;)] = &quot;; [.C123]; &quot;;&quot;); IF([.E123]=1; COM.MICROSOFT.CONCAT(&quot;ModbusHoldingRegisters[holdingIndexFromAddress(MODBUS_ADDR_&quot;; [.B123]; &quot;)] = &quot;; [.C123]; &quot;u;&quot;); &quot;&quot;))" office:value-type="string" office:string-value="ModbusHoldingRegisters[holdingIndexFromAddress(MODBUS_ADDR_CUP3_CHANNEL1_GAIN_LOW_POINT2)] = 181u;" calcext:value-type="string">
            <text:p>ModbusHoldingRegisters[holdingIndexFromAddress(MODBUS_ADDR_CUP3_CHANNEL1_GAIN_LOW_POINT2)] = 181u;</text:p>
          </table:table-cell>
        </table:table-row>
        <table:table-row table:style-name="ro1">
          <table:table-cell table:style-name="ce17" table:formula="of:=[$List.B124]" office:value-type="string" office:string-value="holding reg." calcext:value-type="string">
            <text:p>holding reg.</text:p>
          </table:table-cell>
          <table:table-cell table:style-name="ce17" table:formula="of:=[$List.I124]" office:value-type="string" office:string-value="CUP3_CHANNEL1_GAIN_LOW_POINT3" calcext:value-type="string">
            <text:p>CUP3_CHANNEL1_GAIN_LOW_POINT3</text:p>
          </table:table-cell>
          <table:table-cell table:style-name="ce17" table:formula="of:=[$List.G124]" office:value-type="float" office:value="165" calcext:value-type="float">
            <text:p>165</text:p>
          </table:table-cell>
          <table:table-cell table:formula="of:=IF(AND(([.A124]=&quot;coil&quot;);([.C124]=&quot;true&quot;)); 1; &quot;&quot;)">
            <text:p/>
          </table:table-cell>
          <table:table-cell table:formula="of:=IF(AND(([.A124]=&quot;holding reg.&quot;);([.C124] &lt;&gt; 0)); 1; &quot;&quot;)" office:value-type="float" office:value="1" calcext:value-type="float">
            <text:p>1</text:p>
          </table:table-cell>
          <table:table-cell/>
          <table:table-cell table:formula="of:=IF([.D124]=1; COM.MICROSOFT.CONCAT(&quot;ModbusCoils[coilIndexFromAddress(MODBUS_ADDR_&quot;; [.B124]; &quot;)] = &quot;; [.C124]; &quot;;&quot;); IF([.E124]=1; COM.MICROSOFT.CONCAT(&quot;ModbusHoldingRegisters[holdingIndexFromAddress(MODBUS_ADDR_&quot;; [.B124]; &quot;)] = &quot;; [.C124]; &quot;u;&quot;); &quot;&quot;))" office:value-type="string" office:string-value="ModbusHoldingRegisters[holdingIndexFromAddress(MODBUS_ADDR_CUP3_CHANNEL1_GAIN_LOW_POINT3)] = 165u;" calcext:value-type="string">
            <text:p>ModbusHoldingRegisters[holdingIndexFromAddress(MODBUS_ADDR_CUP3_CHANNEL1_GAIN_LOW_POINT3)] = 165u;</text:p>
          </table:table-cell>
        </table:table-row>
        <table:table-row table:style-name="ro1">
          <table:table-cell table:style-name="ce17" table:formula="of:=[$List.B125]" office:value-type="string" office:string-value="holding reg." calcext:value-type="string">
            <text:p>holding reg.</text:p>
          </table:table-cell>
          <table:table-cell table:style-name="ce17" table:formula="of:=[$List.I125]" office:value-type="string" office:string-value="CUP3_CHANNEL1_GAIN_HIGH_POINT2" calcext:value-type="string">
            <text:p>CUP3_CHANNEL1_GAIN_HIGH_POINT2</text:p>
          </table:table-cell>
          <table:table-cell table:style-name="ce17" table:formula="of:=[$List.G125]" office:value-type="float" office:value="1751" calcext:value-type="float">
            <text:p>1751</text:p>
          </table:table-cell>
          <table:table-cell table:formula="of:=IF(AND(([.A125]=&quot;coil&quot;);([.C125]=&quot;true&quot;)); 1; &quot;&quot;)">
            <text:p/>
          </table:table-cell>
          <table:table-cell table:formula="of:=IF(AND(([.A125]=&quot;holding reg.&quot;);([.C125] &lt;&gt; 0)); 1; &quot;&quot;)" office:value-type="float" office:value="1" calcext:value-type="float">
            <text:p>1</text:p>
          </table:table-cell>
          <table:table-cell/>
          <table:table-cell table:formula="of:=IF([.D125]=1; COM.MICROSOFT.CONCAT(&quot;ModbusCoils[coilIndexFromAddress(MODBUS_ADDR_&quot;; [.B125]; &quot;)] = &quot;; [.C125]; &quot;;&quot;); IF([.E125]=1; COM.MICROSOFT.CONCAT(&quot;ModbusHoldingRegisters[holdingIndexFromAddress(MODBUS_ADDR_&quot;; [.B125]; &quot;)] = &quot;; [.C125]; &quot;u;&quot;); &quot;&quot;))" office:value-type="string" office:string-value="ModbusHoldingRegisters[holdingIndexFromAddress(MODBUS_ADDR_CUP3_CHANNEL1_GAIN_HIGH_POINT2)] = 1751u;" calcext:value-type="string">
            <text:p>ModbusHoldingRegisters[holdingIndexFromAddress(MODBUS_ADDR_CUP3_CHANNEL1_GAIN_HIGH_POINT2)] = 1751u;</text:p>
          </table:table-cell>
        </table:table-row>
        <table:table-row table:style-name="ro1">
          <table:table-cell table:style-name="ce17" table:formula="of:=[$List.B126]" office:value-type="string" office:string-value="holding reg." calcext:value-type="string">
            <text:p>holding reg.</text:p>
          </table:table-cell>
          <table:table-cell table:style-name="ce17" table:formula="of:=[$List.I126]" office:value-type="string" office:string-value="CUP3_CHANNEL1_GAIN_HIGH_POINT3" calcext:value-type="string">
            <text:p>CUP3_CHANNEL1_GAIN_HIGH_POINT3</text:p>
          </table:table-cell>
          <table:table-cell table:style-name="ce17" table:formula="of:=[$List.G126]" office:value-type="float" office:value="1603" calcext:value-type="float">
            <text:p>1603</text:p>
          </table:table-cell>
          <table:table-cell table:formula="of:=IF(AND(([.A126]=&quot;coil&quot;);([.C126]=&quot;true&quot;)); 1; &quot;&quot;)">
            <text:p/>
          </table:table-cell>
          <table:table-cell table:formula="of:=IF(AND(([.A126]=&quot;holding reg.&quot;);([.C126] &lt;&gt; 0)); 1; &quot;&quot;)" office:value-type="float" office:value="1" calcext:value-type="float">
            <text:p>1</text:p>
          </table:table-cell>
          <table:table-cell/>
          <table:table-cell table:formula="of:=IF([.D126]=1; COM.MICROSOFT.CONCAT(&quot;ModbusCoils[coilIndexFromAddress(MODBUS_ADDR_&quot;; [.B126]; &quot;)] = &quot;; [.C126]; &quot;;&quot;); IF([.E126]=1; COM.MICROSOFT.CONCAT(&quot;ModbusHoldingRegisters[holdingIndexFromAddress(MODBUS_ADDR_&quot;; [.B126]; &quot;)] = &quot;; [.C126]; &quot;u;&quot;); &quot;&quot;))" office:value-type="string" office:string-value="ModbusHoldingRegisters[holdingIndexFromAddress(MODBUS_ADDR_CUP3_CHANNEL1_GAIN_HIGH_POINT3)] = 1603u;" calcext:value-type="string">
            <text:p>ModbusHoldingRegisters[holdingIndexFromAddress(MODBUS_ADDR_CUP3_CHANNEL1_GAIN_HIGH_POINT3)] = 1603u;</text:p>
          </table:table-cell>
        </table:table-row>
        <table:table-row table:style-name="ro1">
          <table:table-cell table:style-name="ce17" table:formula="of:=[$List.B127]" office:value-type="string" office:string-value="holding reg." calcext:value-type="string">
            <text:p>holding reg.</text:p>
          </table:table-cell>
          <table:table-cell table:style-name="ce17" table:formula="of:=[$List.I127]" office:value-type="string" office:string-value="CUP3_CHANNEL1_GAIN_HIGH_POINT4" calcext:value-type="string">
            <text:p>CUP3_CHANNEL1_GAIN_HIGH_POINT4</text:p>
          </table:table-cell>
          <table:table-cell table:style-name="ce17" table:formula="of:=[$List.G127]" office:value-type="float" office:value="55" calcext:value-type="float">
            <text:p>55</text:p>
          </table:table-cell>
          <table:table-cell table:formula="of:=IF(AND(([.A127]=&quot;coil&quot;);([.C127]=&quot;true&quot;)); 1; &quot;&quot;)">
            <text:p/>
          </table:table-cell>
          <table:table-cell table:formula="of:=IF(AND(([.A127]=&quot;holding reg.&quot;);([.C127] &lt;&gt; 0)); 1; &quot;&quot;)" office:value-type="float" office:value="1" calcext:value-type="float">
            <text:p>1</text:p>
          </table:table-cell>
          <table:table-cell/>
          <table:table-cell table:formula="of:=IF([.D127]=1; COM.MICROSOFT.CONCAT(&quot;ModbusCoils[coilIndexFromAddress(MODBUS_ADDR_&quot;; [.B127]; &quot;)] = &quot;; [.C127]; &quot;;&quot;); IF([.E127]=1; COM.MICROSOFT.CONCAT(&quot;ModbusHoldingRegisters[holdingIndexFromAddress(MODBUS_ADDR_&quot;; [.B127]; &quot;)] = &quot;; [.C127]; &quot;u;&quot;); &quot;&quot;))" office:value-type="string" office:string-value="ModbusHoldingRegisters[holdingIndexFromAddress(MODBUS_ADDR_CUP3_CHANNEL1_GAIN_HIGH_POINT4)] = 55u;" calcext:value-type="string">
            <text:p>ModbusHoldingRegisters[holdingIndexFromAddress(MODBUS_ADDR_CUP3_CHANNEL1_GAIN_HIGH_POINT4)] = 55u;</text:p>
          </table:table-cell>
        </table:table-row>
        <table:table-row table:style-name="ro1">
          <table:table-cell table:style-name="ce17" table:formula="of:=[$List.B128]" office:value-type="string" office:string-value="holding reg." calcext:value-type="string">
            <text:p>holding reg.</text:p>
          </table:table-cell>
          <table:table-cell table:style-name="ce17" table:formula="of:=[$List.I128]" office:value-type="string" office:string-value="CUP3_CHANNEL2_GAIN_LOW_POINT1" calcext:value-type="string">
            <text:p>CUP3_CHANNEL2_GAIN_LOW_POINT1</text:p>
          </table:table-cell>
          <table:table-cell table:style-name="ce17" table:formula="of:=[$List.G128]" office:value-type="float" office:value="1724" calcext:value-type="float">
            <text:p>1724</text:p>
          </table:table-cell>
          <table:table-cell table:formula="of:=IF(AND(([.A128]=&quot;coil&quot;);([.C128]=&quot;true&quot;)); 1; &quot;&quot;)">
            <text:p/>
          </table:table-cell>
          <table:table-cell table:formula="of:=IF(AND(([.A128]=&quot;holding reg.&quot;);([.C128] &lt;&gt; 0)); 1; &quot;&quot;)" office:value-type="float" office:value="1" calcext:value-type="float">
            <text:p>1</text:p>
          </table:table-cell>
          <table:table-cell/>
          <table:table-cell table:formula="of:=IF([.D128]=1; COM.MICROSOFT.CONCAT(&quot;ModbusCoils[coilIndexFromAddress(MODBUS_ADDR_&quot;; [.B128]; &quot;)] = &quot;; [.C128]; &quot;;&quot;); IF([.E128]=1; COM.MICROSOFT.CONCAT(&quot;ModbusHoldingRegisters[holdingIndexFromAddress(MODBUS_ADDR_&quot;; [.B128]; &quot;)] = &quot;; [.C128]; &quot;u;&quot;); &quot;&quot;))" office:value-type="string" office:string-value="ModbusHoldingRegisters[holdingIndexFromAddress(MODBUS_ADDR_CUP3_CHANNEL2_GAIN_LOW_POINT1)] = 1724u;" calcext:value-type="string">
            <text:p>ModbusHoldingRegisters[holdingIndexFromAddress(MODBUS_ADDR_CUP3_CHANNEL2_GAIN_LOW_POINT1)] = 1724u;</text:p>
          </table:table-cell>
        </table:table-row>
        <table:table-row table:style-name="ro1">
          <table:table-cell table:style-name="ce17" table:formula="of:=[$List.B129]" office:value-type="string" office:string-value="holding reg." calcext:value-type="string">
            <text:p>holding reg.</text:p>
          </table:table-cell>
          <table:table-cell table:style-name="ce17" table:formula="of:=[$List.I129]" office:value-type="string" office:string-value="CUP3_CHANNEL2_GAIN_LOW_POINT2" calcext:value-type="string">
            <text:p>CUP3_CHANNEL2_GAIN_LOW_POINT2</text:p>
          </table:table-cell>
          <table:table-cell table:style-name="ce17" table:formula="of:=[$List.G129]" office:value-type="float" office:value="181" calcext:value-type="float">
            <text:p>181</text:p>
          </table:table-cell>
          <table:table-cell table:formula="of:=IF(AND(([.A129]=&quot;coil&quot;);([.C129]=&quot;true&quot;)); 1; &quot;&quot;)">
            <text:p/>
          </table:table-cell>
          <table:table-cell table:formula="of:=IF(AND(([.A129]=&quot;holding reg.&quot;);([.C129] &lt;&gt; 0)); 1; &quot;&quot;)" office:value-type="float" office:value="1" calcext:value-type="float">
            <text:p>1</text:p>
          </table:table-cell>
          <table:table-cell/>
          <table:table-cell table:formula="of:=IF([.D129]=1; COM.MICROSOFT.CONCAT(&quot;ModbusCoils[coilIndexFromAddress(MODBUS_ADDR_&quot;; [.B129]; &quot;)] = &quot;; [.C129]; &quot;;&quot;); IF([.E129]=1; COM.MICROSOFT.CONCAT(&quot;ModbusHoldingRegisters[holdingIndexFromAddress(MODBUS_ADDR_&quot;; [.B129]; &quot;)] = &quot;; [.C129]; &quot;u;&quot;); &quot;&quot;))" office:value-type="string" office:string-value="ModbusHoldingRegisters[holdingIndexFromAddress(MODBUS_ADDR_CUP3_CHANNEL2_GAIN_LOW_POINT2)] = 181u;" calcext:value-type="string">
            <text:p>ModbusHoldingRegisters[holdingIndexFromAddress(MODBUS_ADDR_CUP3_CHANNEL2_GAIN_LOW_POINT2)] = 181u;</text:p>
          </table:table-cell>
        </table:table-row>
        <table:table-row table:style-name="ro1">
          <table:table-cell table:style-name="ce17" table:formula="of:=[$List.B130]" office:value-type="string" office:string-value="holding reg." calcext:value-type="string">
            <text:p>holding reg.</text:p>
          </table:table-cell>
          <table:table-cell table:style-name="ce17" table:formula="of:=[$List.I130]" office:value-type="string" office:string-value="CUP3_CHANNEL2_GAIN_LOW_POINT3" calcext:value-type="string">
            <text:p>CUP3_CHANNEL2_GAIN_LOW_POINT3</text:p>
          </table:table-cell>
          <table:table-cell table:style-name="ce17" table:formula="of:=[$List.G130]" office:value-type="float" office:value="166" calcext:value-type="float">
            <text:p>166</text:p>
          </table:table-cell>
          <table:table-cell table:formula="of:=IF(AND(([.A130]=&quot;coil&quot;);([.C130]=&quot;true&quot;)); 1; &quot;&quot;)">
            <text:p/>
          </table:table-cell>
          <table:table-cell table:formula="of:=IF(AND(([.A130]=&quot;holding reg.&quot;);([.C130] &lt;&gt; 0)); 1; &quot;&quot;)" office:value-type="float" office:value="1" calcext:value-type="float">
            <text:p>1</text:p>
          </table:table-cell>
          <table:table-cell/>
          <table:table-cell table:formula="of:=IF([.D130]=1; COM.MICROSOFT.CONCAT(&quot;ModbusCoils[coilIndexFromAddress(MODBUS_ADDR_&quot;; [.B130]; &quot;)] = &quot;; [.C130]; &quot;;&quot;); IF([.E130]=1; COM.MICROSOFT.CONCAT(&quot;ModbusHoldingRegisters[holdingIndexFromAddress(MODBUS_ADDR_&quot;; [.B130]; &quot;)] = &quot;; [.C130]; &quot;u;&quot;); &quot;&quot;))" office:value-type="string" office:string-value="ModbusHoldingRegisters[holdingIndexFromAddress(MODBUS_ADDR_CUP3_CHANNEL2_GAIN_LOW_POINT3)] = 166u;" calcext:value-type="string">
            <text:p>ModbusHoldingRegisters[holdingIndexFromAddress(MODBUS_ADDR_CUP3_CHANNEL2_GAIN_LOW_POINT3)] = 166u;</text:p>
          </table:table-cell>
        </table:table-row>
        <table:table-row table:style-name="ro1">
          <table:table-cell table:style-name="ce17" table:formula="of:=[$List.B131]" office:value-type="string" office:string-value="holding reg." calcext:value-type="string">
            <text:p>holding reg.</text:p>
          </table:table-cell>
          <table:table-cell table:style-name="ce17" table:formula="of:=[$List.I131]" office:value-type="string" office:string-value="CUP3_CHANNEL2_GAIN_HIGH_POINT2" calcext:value-type="string">
            <text:p>CUP3_CHANNEL2_GAIN_HIGH_POINT2</text:p>
          </table:table-cell>
          <table:table-cell table:style-name="ce17" table:formula="of:=[$List.G131]" office:value-type="float" office:value="1756" calcext:value-type="float">
            <text:p>1756</text:p>
          </table:table-cell>
          <table:table-cell table:formula="of:=IF(AND(([.A131]=&quot;coil&quot;);([.C131]=&quot;true&quot;)); 1; &quot;&quot;)">
            <text:p/>
          </table:table-cell>
          <table:table-cell table:formula="of:=IF(AND(([.A131]=&quot;holding reg.&quot;);([.C131] &lt;&gt; 0)); 1; &quot;&quot;)" office:value-type="float" office:value="1" calcext:value-type="float">
            <text:p>1</text:p>
          </table:table-cell>
          <table:table-cell/>
          <table:table-cell table:formula="of:=IF([.D131]=1; COM.MICROSOFT.CONCAT(&quot;ModbusCoils[coilIndexFromAddress(MODBUS_ADDR_&quot;; [.B131]; &quot;)] = &quot;; [.C131]; &quot;;&quot;); IF([.E131]=1; COM.MICROSOFT.CONCAT(&quot;ModbusHoldingRegisters[holdingIndexFromAddress(MODBUS_ADDR_&quot;; [.B131]; &quot;)] = &quot;; [.C131]; &quot;u;&quot;); &quot;&quot;))" office:value-type="string" office:string-value="ModbusHoldingRegisters[holdingIndexFromAddress(MODBUS_ADDR_CUP3_CHANNEL2_GAIN_HIGH_POINT2)] = 1756u;" calcext:value-type="string">
            <text:p>ModbusHoldingRegisters[holdingIndexFromAddress(MODBUS_ADDR_CUP3_CHANNEL2_GAIN_HIGH_POINT2)] = 1756u;</text:p>
          </table:table-cell>
        </table:table-row>
        <table:table-row table:style-name="ro1">
          <table:table-cell table:style-name="ce17" table:formula="of:=[$List.B132]" office:value-type="string" office:string-value="holding reg." calcext:value-type="string">
            <text:p>holding reg.</text:p>
          </table:table-cell>
          <table:table-cell table:style-name="ce17" table:formula="of:=[$List.I132]" office:value-type="string" office:string-value="CUP3_CHANNEL2_GAIN_HIGH_POINT3" calcext:value-type="string">
            <text:p>CUP3_CHANNEL2_GAIN_HIGH_POINT3</text:p>
          </table:table-cell>
          <table:table-cell table:style-name="ce17" table:formula="of:=[$List.G132]" office:value-type="float" office:value="1608" calcext:value-type="float">
            <text:p>1608</text:p>
          </table:table-cell>
          <table:table-cell table:formula="of:=IF(AND(([.A132]=&quot;coil&quot;);([.C132]=&quot;true&quot;)); 1; &quot;&quot;)">
            <text:p/>
          </table:table-cell>
          <table:table-cell table:formula="of:=IF(AND(([.A132]=&quot;holding reg.&quot;);([.C132] &lt;&gt; 0)); 1; &quot;&quot;)" office:value-type="float" office:value="1" calcext:value-type="float">
            <text:p>1</text:p>
          </table:table-cell>
          <table:table-cell/>
          <table:table-cell table:formula="of:=IF([.D132]=1; COM.MICROSOFT.CONCAT(&quot;ModbusCoils[coilIndexFromAddress(MODBUS_ADDR_&quot;; [.B132]; &quot;)] = &quot;; [.C132]; &quot;;&quot;); IF([.E132]=1; COM.MICROSOFT.CONCAT(&quot;ModbusHoldingRegisters[holdingIndexFromAddress(MODBUS_ADDR_&quot;; [.B132]; &quot;)] = &quot;; [.C132]; &quot;u;&quot;); &quot;&quot;))" office:value-type="string" office:string-value="ModbusHoldingRegisters[holdingIndexFromAddress(MODBUS_ADDR_CUP3_CHANNEL2_GAIN_HIGH_POINT3)] = 1608u;" calcext:value-type="string">
            <text:p>ModbusHoldingRegisters[holdingIndexFromAddress(MODBUS_ADDR_CUP3_CHANNEL2_GAIN_HIGH_POINT3)] = 1608u;</text:p>
          </table:table-cell>
        </table:table-row>
        <table:table-row table:style-name="ro1">
          <table:table-cell table:style-name="ce17" table:formula="of:=[$List.B133]" office:value-type="string" office:string-value="holding reg." calcext:value-type="string">
            <text:p>holding reg.</text:p>
          </table:table-cell>
          <table:table-cell table:style-name="ce17" table:formula="of:=[$List.I133]" office:value-type="string" office:string-value="CUP3_CHANNEL2_GAIN_HIGH_POINT4" calcext:value-type="string">
            <text:p>CUP3_CHANNEL2_GAIN_HIGH_POINT4</text:p>
          </table:table-cell>
          <table:table-cell table:style-name="ce17" table:formula="of:=[$List.G133]" office:value-type="float" office:value="59" calcext:value-type="float">
            <text:p>59</text:p>
          </table:table-cell>
          <table:table-cell table:formula="of:=IF(AND(([.A133]=&quot;coil&quot;);([.C133]=&quot;true&quot;)); 1; &quot;&quot;)">
            <text:p/>
          </table:table-cell>
          <table:table-cell table:formula="of:=IF(AND(([.A133]=&quot;holding reg.&quot;);([.C133] &lt;&gt; 0)); 1; &quot;&quot;)" office:value-type="float" office:value="1" calcext:value-type="float">
            <text:p>1</text:p>
          </table:table-cell>
          <table:table-cell/>
          <table:table-cell table:formula="of:=IF([.D133]=1; COM.MICROSOFT.CONCAT(&quot;ModbusCoils[coilIndexFromAddress(MODBUS_ADDR_&quot;; [.B133]; &quot;)] = &quot;; [.C133]; &quot;;&quot;); IF([.E133]=1; COM.MICROSOFT.CONCAT(&quot;ModbusHoldingRegisters[holdingIndexFromAddress(MODBUS_ADDR_&quot;; [.B133]; &quot;)] = &quot;; [.C133]; &quot;u;&quot;); &quot;&quot;))" office:value-type="string" office:string-value="ModbusHoldingRegisters[holdingIndexFromAddress(MODBUS_ADDR_CUP3_CHANNEL2_GAIN_HIGH_POINT4)] = 59u;" calcext:value-type="string">
            <text:p>ModbusHoldingRegisters[holdingIndexFromAddress(MODBUS_ADDR_CUP3_CHANNEL2_GAIN_HIGH_POINT4)] = 59u;</text:p>
          </table:table-cell>
        </table:table-row>
        <table:table-row table:style-name="ro1">
          <table:table-cell table:style-name="ce17" table:formula="of:=[$List.B134]" office:value-type="string" office:string-value="holding reg." calcext:value-type="string">
            <text:p>holding reg.</text:p>
          </table:table-cell>
          <table:table-cell table:style-name="ce17" table:formula="of:=[$List.I134]" office:value-type="string" office:string-value="CUP3_CHANNEL3_GAIN_LOW_POINT1" calcext:value-type="string">
            <text:p>CUP3_CHANNEL3_GAIN_LOW_POINT1</text:p>
          </table:table-cell>
          <table:table-cell table:style-name="ce17" table:formula="of:=[$List.G134]" office:value-type="float" office:value="1724" calcext:value-type="float">
            <text:p>1724</text:p>
          </table:table-cell>
          <table:table-cell table:formula="of:=IF(AND(([.A134]=&quot;coil&quot;);([.C134]=&quot;true&quot;)); 1; &quot;&quot;)">
            <text:p/>
          </table:table-cell>
          <table:table-cell table:formula="of:=IF(AND(([.A134]=&quot;holding reg.&quot;);([.C134] &lt;&gt; 0)); 1; &quot;&quot;)" office:value-type="float" office:value="1" calcext:value-type="float">
            <text:p>1</text:p>
          </table:table-cell>
          <table:table-cell/>
          <table:table-cell table:formula="of:=IF([.D134]=1; COM.MICROSOFT.CONCAT(&quot;ModbusCoils[coilIndexFromAddress(MODBUS_ADDR_&quot;; [.B134]; &quot;)] = &quot;; [.C134]; &quot;;&quot;); IF([.E134]=1; COM.MICROSOFT.CONCAT(&quot;ModbusHoldingRegisters[holdingIndexFromAddress(MODBUS_ADDR_&quot;; [.B134]; &quot;)] = &quot;; [.C134]; &quot;u;&quot;); &quot;&quot;))" office:value-type="string" office:string-value="ModbusHoldingRegisters[holdingIndexFromAddress(MODBUS_ADDR_CUP3_CHANNEL3_GAIN_LOW_POINT1)] = 1724u;" calcext:value-type="string">
            <text:p>ModbusHoldingRegisters[holdingIndexFromAddress(MODBUS_ADDR_CUP3_CHANNEL3_GAIN_LOW_POINT1)] = 1724u;</text:p>
          </table:table-cell>
        </table:table-row>
        <table:table-row table:style-name="ro1">
          <table:table-cell table:style-name="ce17" table:formula="of:=[$List.B135]" office:value-type="string" office:string-value="holding reg." calcext:value-type="string">
            <text:p>holding reg.</text:p>
          </table:table-cell>
          <table:table-cell table:style-name="ce17" table:formula="of:=[$List.I135]" office:value-type="string" office:string-value="CUP3_CHANNEL3_GAIN_LOW_POINT2" calcext:value-type="string">
            <text:p>CUP3_CHANNEL3_GAIN_LOW_POINT2</text:p>
          </table:table-cell>
          <table:table-cell table:style-name="ce17" table:formula="of:=[$List.G135]" office:value-type="float" office:value="180" calcext:value-type="float">
            <text:p>180</text:p>
          </table:table-cell>
          <table:table-cell table:formula="of:=IF(AND(([.A135]=&quot;coil&quot;);([.C135]=&quot;true&quot;)); 1; &quot;&quot;)">
            <text:p/>
          </table:table-cell>
          <table:table-cell table:formula="of:=IF(AND(([.A135]=&quot;holding reg.&quot;);([.C135] &lt;&gt; 0)); 1; &quot;&quot;)" office:value-type="float" office:value="1" calcext:value-type="float">
            <text:p>1</text:p>
          </table:table-cell>
          <table:table-cell/>
          <table:table-cell table:formula="of:=IF([.D135]=1; COM.MICROSOFT.CONCAT(&quot;ModbusCoils[coilIndexFromAddress(MODBUS_ADDR_&quot;; [.B135]; &quot;)] = &quot;; [.C135]; &quot;;&quot;); IF([.E135]=1; COM.MICROSOFT.CONCAT(&quot;ModbusHoldingRegisters[holdingIndexFromAddress(MODBUS_ADDR_&quot;; [.B135]; &quot;)] = &quot;; [.C135]; &quot;u;&quot;); &quot;&quot;))" office:value-type="string" office:string-value="ModbusHoldingRegisters[holdingIndexFromAddress(MODBUS_ADDR_CUP3_CHANNEL3_GAIN_LOW_POINT2)] = 180u;" calcext:value-type="string">
            <text:p>ModbusHoldingRegisters[holdingIndexFromAddress(MODBUS_ADDR_CUP3_CHANNEL3_GAIN_LOW_POINT2)] = 180u;</text:p>
          </table:table-cell>
        </table:table-row>
        <table:table-row table:style-name="ro1">
          <table:table-cell table:style-name="ce17" table:formula="of:=[$List.B136]" office:value-type="string" office:string-value="holding reg." calcext:value-type="string">
            <text:p>holding reg.</text:p>
          </table:table-cell>
          <table:table-cell table:style-name="ce17" table:formula="of:=[$List.I136]" office:value-type="string" office:string-value="CUP3_CHANNEL3_GAIN_LOW_POINT3" calcext:value-type="string">
            <text:p>CUP3_CHANNEL3_GAIN_LOW_POINT3</text:p>
          </table:table-cell>
          <table:table-cell table:style-name="ce17" table:formula="of:=[$List.G136]" office:value-type="float" office:value="165" calcext:value-type="float">
            <text:p>165</text:p>
          </table:table-cell>
          <table:table-cell table:formula="of:=IF(AND(([.A136]=&quot;coil&quot;);([.C136]=&quot;true&quot;)); 1; &quot;&quot;)">
            <text:p/>
          </table:table-cell>
          <table:table-cell table:formula="of:=IF(AND(([.A136]=&quot;holding reg.&quot;);([.C136] &lt;&gt; 0)); 1; &quot;&quot;)" office:value-type="float" office:value="1" calcext:value-type="float">
            <text:p>1</text:p>
          </table:table-cell>
          <table:table-cell/>
          <table:table-cell table:formula="of:=IF([.D136]=1; COM.MICROSOFT.CONCAT(&quot;ModbusCoils[coilIndexFromAddress(MODBUS_ADDR_&quot;; [.B136]; &quot;)] = &quot;; [.C136]; &quot;;&quot;); IF([.E136]=1; COM.MICROSOFT.CONCAT(&quot;ModbusHoldingRegisters[holdingIndexFromAddress(MODBUS_ADDR_&quot;; [.B136]; &quot;)] = &quot;; [.C136]; &quot;u;&quot;); &quot;&quot;))" office:value-type="string" office:string-value="ModbusHoldingRegisters[holdingIndexFromAddress(MODBUS_ADDR_CUP3_CHANNEL3_GAIN_LOW_POINT3)] = 165u;" calcext:value-type="string">
            <text:p>ModbusHoldingRegisters[holdingIndexFromAddress(MODBUS_ADDR_CUP3_CHANNEL3_GAIN_LOW_POINT3)] = 165u;</text:p>
          </table:table-cell>
        </table:table-row>
        <table:table-row table:style-name="ro1">
          <table:table-cell table:style-name="ce17" table:formula="of:=[$List.B137]" office:value-type="string" office:string-value="holding reg." calcext:value-type="string">
            <text:p>holding reg.</text:p>
          </table:table-cell>
          <table:table-cell table:style-name="ce17" table:formula="of:=[$List.I137]" office:value-type="string" office:string-value="CUP3_CHANNEL3_GAIN_HIGH_POINT2" calcext:value-type="string">
            <text:p>CUP3_CHANNEL3_GAIN_HIGH_POINT2</text:p>
          </table:table-cell>
          <table:table-cell table:style-name="ce17" table:formula="of:=[$List.G137]" office:value-type="float" office:value="1746" calcext:value-type="float">
            <text:p>1746</text:p>
          </table:table-cell>
          <table:table-cell table:formula="of:=IF(AND(([.A137]=&quot;coil&quot;);([.C137]=&quot;true&quot;)); 1; &quot;&quot;)">
            <text:p/>
          </table:table-cell>
          <table:table-cell table:formula="of:=IF(AND(([.A137]=&quot;holding reg.&quot;);([.C137] &lt;&gt; 0)); 1; &quot;&quot;)" office:value-type="float" office:value="1" calcext:value-type="float">
            <text:p>1</text:p>
          </table:table-cell>
          <table:table-cell/>
          <table:table-cell table:formula="of:=IF([.D137]=1; COM.MICROSOFT.CONCAT(&quot;ModbusCoils[coilIndexFromAddress(MODBUS_ADDR_&quot;; [.B137]; &quot;)] = &quot;; [.C137]; &quot;;&quot;); IF([.E137]=1; COM.MICROSOFT.CONCAT(&quot;ModbusHoldingRegisters[holdingIndexFromAddress(MODBUS_ADDR_&quot;; [.B137]; &quot;)] = &quot;; [.C137]; &quot;u;&quot;); &quot;&quot;))" office:value-type="string" office:string-value="ModbusHoldingRegisters[holdingIndexFromAddress(MODBUS_ADDR_CUP3_CHANNEL3_GAIN_HIGH_POINT2)] = 1746u;" calcext:value-type="string">
            <text:p>ModbusHoldingRegisters[holdingIndexFromAddress(MODBUS_ADDR_CUP3_CHANNEL3_GAIN_HIGH_POINT2)] = 1746u;</text:p>
          </table:table-cell>
        </table:table-row>
        <table:table-row table:style-name="ro1">
          <table:table-cell table:style-name="ce17" table:formula="of:=[$List.B138]" office:value-type="string" office:string-value="holding reg." calcext:value-type="string">
            <text:p>holding reg.</text:p>
          </table:table-cell>
          <table:table-cell table:style-name="ce17" table:formula="of:=[$List.I138]" office:value-type="string" office:string-value="CUP3_CHANNEL3_GAIN_HIGH_POINT3" calcext:value-type="string">
            <text:p>CUP3_CHANNEL3_GAIN_HIGH_POINT3</text:p>
          </table:table-cell>
          <table:table-cell table:style-name="ce17" table:formula="of:=[$List.G138]" office:value-type="float" office:value="1595" calcext:value-type="float">
            <text:p>1595</text:p>
          </table:table-cell>
          <table:table-cell table:formula="of:=IF(AND(([.A138]=&quot;coil&quot;);([.C138]=&quot;true&quot;)); 1; &quot;&quot;)">
            <text:p/>
          </table:table-cell>
          <table:table-cell table:formula="of:=IF(AND(([.A138]=&quot;holding reg.&quot;);([.C138] &lt;&gt; 0)); 1; &quot;&quot;)" office:value-type="float" office:value="1" calcext:value-type="float">
            <text:p>1</text:p>
          </table:table-cell>
          <table:table-cell/>
          <table:table-cell table:formula="of:=IF([.D138]=1; COM.MICROSOFT.CONCAT(&quot;ModbusCoils[coilIndexFromAddress(MODBUS_ADDR_&quot;; [.B138]; &quot;)] = &quot;; [.C138]; &quot;;&quot;); IF([.E138]=1; COM.MICROSOFT.CONCAT(&quot;ModbusHoldingRegisters[holdingIndexFromAddress(MODBUS_ADDR_&quot;; [.B138]; &quot;)] = &quot;; [.C138]; &quot;u;&quot;); &quot;&quot;))" office:value-type="string" office:string-value="ModbusHoldingRegisters[holdingIndexFromAddress(MODBUS_ADDR_CUP3_CHANNEL3_GAIN_HIGH_POINT3)] = 1595u;" calcext:value-type="string">
            <text:p>ModbusHoldingRegisters[holdingIndexFromAddress(MODBUS_ADDR_CUP3_CHANNEL3_GAIN_HIGH_POINT3)] = 1595u;</text:p>
          </table:table-cell>
        </table:table-row>
        <table:table-row table:style-name="ro1">
          <table:table-cell table:style-name="ce17" table:formula="of:=[$List.B139]" office:value-type="string" office:string-value="holding reg." calcext:value-type="string">
            <text:p>holding reg.</text:p>
          </table:table-cell>
          <table:table-cell table:style-name="ce17" table:formula="of:=[$List.I139]" office:value-type="string" office:string-value="CUP3_CHANNEL3_GAIN_HIGH_POINT4" calcext:value-type="string">
            <text:p>CUP3_CHANNEL3_GAIN_HIGH_POINT4</text:p>
          </table:table-cell>
          <table:table-cell table:style-name="ce17" table:formula="of:=[$List.G139]" office:value-type="float" office:value="49" calcext:value-type="float">
            <text:p>49</text:p>
          </table:table-cell>
          <table:table-cell table:formula="of:=IF(AND(([.A139]=&quot;coil&quot;);([.C139]=&quot;true&quot;)); 1; &quot;&quot;)">
            <text:p/>
          </table:table-cell>
          <table:table-cell table:formula="of:=IF(AND(([.A139]=&quot;holding reg.&quot;);([.C139] &lt;&gt; 0)); 1; &quot;&quot;)" office:value-type="float" office:value="1" calcext:value-type="float">
            <text:p>1</text:p>
          </table:table-cell>
          <table:table-cell/>
          <table:table-cell table:formula="of:=IF([.D139]=1; COM.MICROSOFT.CONCAT(&quot;ModbusCoils[coilIndexFromAddress(MODBUS_ADDR_&quot;; [.B139]; &quot;)] = &quot;; [.C139]; &quot;;&quot;); IF([.E139]=1; COM.MICROSOFT.CONCAT(&quot;ModbusHoldingRegisters[holdingIndexFromAddress(MODBUS_ADDR_&quot;; [.B139]; &quot;)] = &quot;; [.C139]; &quot;u;&quot;); &quot;&quot;))" office:value-type="string" office:string-value="ModbusHoldingRegisters[holdingIndexFromAddress(MODBUS_ADDR_CUP3_CHANNEL3_GAIN_HIGH_POINT4)] = 49u;" calcext:value-type="string">
            <text:p>ModbusHoldingRegisters[holdingIndexFromAddress(MODBUS_ADDR_CUP3_CHANNEL3_GAIN_HIGH_POINT4)] = 49u;</text:p>
          </table:table-cell>
        </table:table-row>
        <table:table-row table:style-name="ro1">
          <table:table-cell table:style-name="ce17" table:formula="of:=[$List.B140]" office:value-type="string" office:string-value="holding reg." calcext:value-type="string">
            <text:p>holding reg.</text:p>
          </table:table-cell>
          <table:table-cell table:style-name="ce17" table:formula="of:=[$List.I140]" office:value-type="string" office:string-value="CUP3_CHANNEL4_GAIN_LOW_POINT1" calcext:value-type="string">
            <text:p>CUP3_CHANNEL4_GAIN_LOW_POINT1</text:p>
          </table:table-cell>
          <table:table-cell table:style-name="ce17" table:formula="of:=[$List.G140]" office:value-type="float" office:value="1724" calcext:value-type="float">
            <text:p>1724</text:p>
          </table:table-cell>
          <table:table-cell table:formula="of:=IF(AND(([.A140]=&quot;coil&quot;);([.C140]=&quot;true&quot;)); 1; &quot;&quot;)">
            <text:p/>
          </table:table-cell>
          <table:table-cell table:formula="of:=IF(AND(([.A140]=&quot;holding reg.&quot;);([.C140] &lt;&gt; 0)); 1; &quot;&quot;)" office:value-type="float" office:value="1" calcext:value-type="float">
            <text:p>1</text:p>
          </table:table-cell>
          <table:table-cell/>
          <table:table-cell table:formula="of:=IF([.D140]=1; COM.MICROSOFT.CONCAT(&quot;ModbusCoils[coilIndexFromAddress(MODBUS_ADDR_&quot;; [.B140]; &quot;)] = &quot;; [.C140]; &quot;;&quot;); IF([.E140]=1; COM.MICROSOFT.CONCAT(&quot;ModbusHoldingRegisters[holdingIndexFromAddress(MODBUS_ADDR_&quot;; [.B140]; &quot;)] = &quot;; [.C140]; &quot;u;&quot;); &quot;&quot;))" office:value-type="string" office:string-value="ModbusHoldingRegisters[holdingIndexFromAddress(MODBUS_ADDR_CUP3_CHANNEL4_GAIN_LOW_POINT1)] = 1724u;" calcext:value-type="string">
            <text:p>ModbusHoldingRegisters[holdingIndexFromAddress(MODBUS_ADDR_CUP3_CHANNEL4_GAIN_LOW_POINT1)] = 1724u;</text:p>
          </table:table-cell>
        </table:table-row>
        <table:table-row table:style-name="ro1">
          <table:table-cell table:style-name="ce17" table:formula="of:=[$List.B141]" office:value-type="string" office:string-value="holding reg." calcext:value-type="string">
            <text:p>holding reg.</text:p>
          </table:table-cell>
          <table:table-cell table:style-name="ce17" table:formula="of:=[$List.I141]" office:value-type="string" office:string-value="CUP3_CHANNEL4_GAIN_LOW_POINT2" calcext:value-type="string">
            <text:p>CUP3_CHANNEL4_GAIN_LOW_POINT2</text:p>
          </table:table-cell>
          <table:table-cell table:style-name="ce17" table:formula="of:=[$List.G141]" office:value-type="float" office:value="181" calcext:value-type="float">
            <text:p>181</text:p>
          </table:table-cell>
          <table:table-cell table:formula="of:=IF(AND(([.A141]=&quot;coil&quot;);([.C141]=&quot;true&quot;)); 1; &quot;&quot;)">
            <text:p/>
          </table:table-cell>
          <table:table-cell table:formula="of:=IF(AND(([.A141]=&quot;holding reg.&quot;);([.C141] &lt;&gt; 0)); 1; &quot;&quot;)" office:value-type="float" office:value="1" calcext:value-type="float">
            <text:p>1</text:p>
          </table:table-cell>
          <table:table-cell/>
          <table:table-cell table:formula="of:=IF([.D141]=1; COM.MICROSOFT.CONCAT(&quot;ModbusCoils[coilIndexFromAddress(MODBUS_ADDR_&quot;; [.B141]; &quot;)] = &quot;; [.C141]; &quot;;&quot;); IF([.E141]=1; COM.MICROSOFT.CONCAT(&quot;ModbusHoldingRegisters[holdingIndexFromAddress(MODBUS_ADDR_&quot;; [.B141]; &quot;)] = &quot;; [.C141]; &quot;u;&quot;); &quot;&quot;))" office:value-type="string" office:string-value="ModbusHoldingRegisters[holdingIndexFromAddress(MODBUS_ADDR_CUP3_CHANNEL4_GAIN_LOW_POINT2)] = 181u;" calcext:value-type="string">
            <text:p>ModbusHoldingRegisters[holdingIndexFromAddress(MODBUS_ADDR_CUP3_CHANNEL4_GAIN_LOW_POINT2)] = 181u;</text:p>
          </table:table-cell>
        </table:table-row>
        <table:table-row table:style-name="ro1">
          <table:table-cell table:style-name="ce17" table:formula="of:=[$List.B142]" office:value-type="string" office:string-value="holding reg." calcext:value-type="string">
            <text:p>holding reg.</text:p>
          </table:table-cell>
          <table:table-cell table:style-name="ce17" table:formula="of:=[$List.I142]" office:value-type="string" office:string-value="CUP3_CHANNEL4_GAIN_LOW_POINT3" calcext:value-type="string">
            <text:p>CUP3_CHANNEL4_GAIN_LOW_POINT3</text:p>
          </table:table-cell>
          <table:table-cell table:style-name="ce17" table:formula="of:=[$List.G142]" office:value-type="float" office:value="164" calcext:value-type="float">
            <text:p>164</text:p>
          </table:table-cell>
          <table:table-cell table:formula="of:=IF(AND(([.A142]=&quot;coil&quot;);([.C142]=&quot;true&quot;)); 1; &quot;&quot;)">
            <text:p/>
          </table:table-cell>
          <table:table-cell table:formula="of:=IF(AND(([.A142]=&quot;holding reg.&quot;);([.C142] &lt;&gt; 0)); 1; &quot;&quot;)" office:value-type="float" office:value="1" calcext:value-type="float">
            <text:p>1</text:p>
          </table:table-cell>
          <table:table-cell/>
          <table:table-cell table:formula="of:=IF([.D142]=1; COM.MICROSOFT.CONCAT(&quot;ModbusCoils[coilIndexFromAddress(MODBUS_ADDR_&quot;; [.B142]; &quot;)] = &quot;; [.C142]; &quot;;&quot;); IF([.E142]=1; COM.MICROSOFT.CONCAT(&quot;ModbusHoldingRegisters[holdingIndexFromAddress(MODBUS_ADDR_&quot;; [.B142]; &quot;)] = &quot;; [.C142]; &quot;u;&quot;); &quot;&quot;))" office:value-type="string" office:string-value="ModbusHoldingRegisters[holdingIndexFromAddress(MODBUS_ADDR_CUP3_CHANNEL4_GAIN_LOW_POINT3)] = 164u;" calcext:value-type="string">
            <text:p>ModbusHoldingRegisters[holdingIndexFromAddress(MODBUS_ADDR_CUP3_CHANNEL4_GAIN_LOW_POINT3)] = 164u;</text:p>
          </table:table-cell>
        </table:table-row>
        <table:table-row table:style-name="ro1">
          <table:table-cell table:style-name="ce17" table:formula="of:=[$List.B143]" office:value-type="string" office:string-value="holding reg." calcext:value-type="string">
            <text:p>holding reg.</text:p>
          </table:table-cell>
          <table:table-cell table:style-name="ce17" table:formula="of:=[$List.I143]" office:value-type="string" office:string-value="CUP3_CHANNEL4_GAIN_HIGH_POINT2" calcext:value-type="string">
            <text:p>CUP3_CHANNEL4_GAIN_HIGH_POINT2</text:p>
          </table:table-cell>
          <table:table-cell table:style-name="ce17" table:formula="of:=[$List.G143]" office:value-type="float" office:value="1744" calcext:value-type="float">
            <text:p>1744</text:p>
          </table:table-cell>
          <table:table-cell table:formula="of:=IF(AND(([.A143]=&quot;coil&quot;);([.C143]=&quot;true&quot;)); 1; &quot;&quot;)">
            <text:p/>
          </table:table-cell>
          <table:table-cell table:formula="of:=IF(AND(([.A143]=&quot;holding reg.&quot;);([.C143] &lt;&gt; 0)); 1; &quot;&quot;)" office:value-type="float" office:value="1" calcext:value-type="float">
            <text:p>1</text:p>
          </table:table-cell>
          <table:table-cell/>
          <table:table-cell table:formula="of:=IF([.D143]=1; COM.MICROSOFT.CONCAT(&quot;ModbusCoils[coilIndexFromAddress(MODBUS_ADDR_&quot;; [.B143]; &quot;)] = &quot;; [.C143]; &quot;;&quot;); IF([.E143]=1; COM.MICROSOFT.CONCAT(&quot;ModbusHoldingRegisters[holdingIndexFromAddress(MODBUS_ADDR_&quot;; [.B143]; &quot;)] = &quot;; [.C143]; &quot;u;&quot;); &quot;&quot;))" office:value-type="string" office:string-value="ModbusHoldingRegisters[holdingIndexFromAddress(MODBUS_ADDR_CUP3_CHANNEL4_GAIN_HIGH_POINT2)] = 1744u;" calcext:value-type="string">
            <text:p>ModbusHoldingRegisters[holdingIndexFromAddress(MODBUS_ADDR_CUP3_CHANNEL4_GAIN_HIGH_POINT2)] = 1744u;</text:p>
          </table:table-cell>
        </table:table-row>
        <table:table-row table:style-name="ro1">
          <table:table-cell table:style-name="ce17" table:formula="of:=[$List.B144]" office:value-type="string" office:string-value="holding reg." calcext:value-type="string">
            <text:p>holding reg.</text:p>
          </table:table-cell>
          <table:table-cell table:style-name="ce17" table:formula="of:=[$List.I144]" office:value-type="string" office:string-value="CUP3_CHANNEL4_GAIN_HIGH_POINT3" calcext:value-type="string">
            <text:p>CUP3_CHANNEL4_GAIN_HIGH_POINT3</text:p>
          </table:table-cell>
          <table:table-cell table:style-name="ce17" table:formula="of:=[$List.G144]" office:value-type="float" office:value="1593" calcext:value-type="float">
            <text:p>1593</text:p>
          </table:table-cell>
          <table:table-cell table:formula="of:=IF(AND(([.A144]=&quot;coil&quot;);([.C144]=&quot;true&quot;)); 1; &quot;&quot;)">
            <text:p/>
          </table:table-cell>
          <table:table-cell table:formula="of:=IF(AND(([.A144]=&quot;holding reg.&quot;);([.C144] &lt;&gt; 0)); 1; &quot;&quot;)" office:value-type="float" office:value="1" calcext:value-type="float">
            <text:p>1</text:p>
          </table:table-cell>
          <table:table-cell/>
          <table:table-cell table:formula="of:=IF([.D144]=1; COM.MICROSOFT.CONCAT(&quot;ModbusCoils[coilIndexFromAddress(MODBUS_ADDR_&quot;; [.B144]; &quot;)] = &quot;; [.C144]; &quot;;&quot;); IF([.E144]=1; COM.MICROSOFT.CONCAT(&quot;ModbusHoldingRegisters[holdingIndexFromAddress(MODBUS_ADDR_&quot;; [.B144]; &quot;)] = &quot;; [.C144]; &quot;u;&quot;); &quot;&quot;))" office:value-type="string" office:string-value="ModbusHoldingRegisters[holdingIndexFromAddress(MODBUS_ADDR_CUP3_CHANNEL4_GAIN_HIGH_POINT3)] = 1593u;" calcext:value-type="string">
            <text:p>ModbusHoldingRegisters[holdingIndexFromAddress(MODBUS_ADDR_CUP3_CHANNEL4_GAIN_HIGH_POINT3)] = 1593u;</text:p>
          </table:table-cell>
        </table:table-row>
        <table:table-row table:style-name="ro1">
          <table:table-cell table:style-name="ce17" table:formula="of:=[$List.B145]" office:value-type="string" office:string-value="holding reg." calcext:value-type="string">
            <text:p>holding reg.</text:p>
          </table:table-cell>
          <table:table-cell table:style-name="ce17" table:formula="of:=[$List.I145]" office:value-type="string" office:string-value="CUP3_CHANNEL4_GAIN_HIGH_POINT4" calcext:value-type="string">
            <text:p>CUP3_CHANNEL4_GAIN_HIGH_POINT4</text:p>
          </table:table-cell>
          <table:table-cell table:style-name="ce17" table:formula="of:=[$List.G145]" office:value-type="float" office:value="44" calcext:value-type="float">
            <text:p>44</text:p>
          </table:table-cell>
          <table:table-cell table:formula="of:=IF(AND(([.A145]=&quot;coil&quot;);([.C145]=&quot;true&quot;)); 1; &quot;&quot;)">
            <text:p/>
          </table:table-cell>
          <table:table-cell table:formula="of:=IF(AND(([.A145]=&quot;holding reg.&quot;);([.C145] &lt;&gt; 0)); 1; &quot;&quot;)" office:value-type="float" office:value="1" calcext:value-type="float">
            <text:p>1</text:p>
          </table:table-cell>
          <table:table-cell/>
          <table:table-cell table:formula="of:=IF([.D145]=1; COM.MICROSOFT.CONCAT(&quot;ModbusCoils[coilIndexFromAddress(MODBUS_ADDR_&quot;; [.B145]; &quot;)] = &quot;; [.C145]; &quot;;&quot;); IF([.E145]=1; COM.MICROSOFT.CONCAT(&quot;ModbusHoldingRegisters[holdingIndexFromAddress(MODBUS_ADDR_&quot;; [.B145]; &quot;)] = &quot;; [.C145]; &quot;u;&quot;); &quot;&quot;))" office:value-type="string" office:string-value="ModbusHoldingRegisters[holdingIndexFromAddress(MODBUS_ADDR_CUP3_CHANNEL4_GAIN_HIGH_POINT4)] = 44u;" calcext:value-type="string">
            <text:p>ModbusHoldingRegisters[holdingIndexFromAddress(MODBUS_ADDR_CUP3_CHANNEL4_GAIN_HIGH_POINT4)] = 44u;</text:p>
          </table:table-cell>
        </table:table-row>
        <table:table-row table:style-name="ro1">
          <table:table-cell table:style-name="ce17" table:formula="of:=[$List.B146]" office:value-type="float" office:value="0" calcext:value-type="float">
            <text:p>0</text:p>
          </table:table-cell>
          <table:table-cell table:style-name="ce17" table:formula="of:=[$List.I146]" office:value-type="float" office:value="0" calcext:value-type="float">
            <text:p>0</text:p>
          </table:table-cell>
          <table:table-cell table:style-name="ce17" table:formula="of:=[$List.G146]" office:value-type="float" office:value="0" calcext:value-type="float">
            <text:p>0</text:p>
          </table:table-cell>
          <table:table-cell table:formula="of:=IF(AND(([.A146]=&quot;coil&quot;);([.C146]=&quot;true&quot;)); 1; &quot;&quot;)">
            <text:p/>
          </table:table-cell>
          <table:table-cell table:formula="of:=IF(AND(([.A146]=&quot;holding reg.&quot;);([.C146] &lt;&gt; 0)); 1; &quot;&quot;)">
            <text:p/>
          </table:table-cell>
          <table:table-cell/>
          <table:table-cell table:formula="of:=IF([.D146]=1; COM.MICROSOFT.CONCAT(&quot;ModbusCoils[coilIndexFromAddress(MODBUS_ADDR_&quot;; [.B146]; &quot;)] = &quot;; [.C146]; &quot;;&quot;); IF([.E146]=1; COM.MICROSOFT.CONCAT(&quot;ModbusHoldingRegisters[holdingIndexFromAddress(MODBUS_ADDR_&quot;; [.B146]; &quot;)] = &quot;; [.C146]; &quot;u;&quot;); &quot;&quot;))">
            <text:p/>
          </table:table-cell>
        </table:table-row>
        <table:table-row table:style-name="ro1">
          <table:table-cell table:style-name="ce17" table:formula="of:=[$List.B147]" office:value-type="string" office:string-value="holding reg." calcext:value-type="string">
            <text:p>holding reg.</text:p>
          </table:table-cell>
          <table:table-cell table:style-name="ce17" table:formula="of:=[$List.I147]" office:value-type="string" office:string-value="CUP1_CHANNEL1_LOWER_LIMIT" calcext:value-type="string">
            <text:p>CUP1_CHANNEL1_LOWER_LIMIT</text:p>
          </table:table-cell>
          <table:table-cell table:style-name="ce17" table:formula="of:=[$List.G147]" office:value-type="float" office:value="0" calcext:value-type="float">
            <text:p>0</text:p>
          </table:table-cell>
          <table:table-cell table:formula="of:=IF(AND(([.A147]=&quot;coil&quot;);([.C147]=&quot;true&quot;)); 1; &quot;&quot;)">
            <text:p/>
          </table:table-cell>
          <table:table-cell table:formula="of:=IF(AND(([.A147]=&quot;holding reg.&quot;);([.C147] &lt;&gt; 0)); 1; &quot;&quot;)">
            <text:p/>
          </table:table-cell>
          <table:table-cell/>
          <table:table-cell table:formula="of:=IF([.D147]=1; COM.MICROSOFT.CONCAT(&quot;ModbusCoils[coilIndexFromAddress(MODBUS_ADDR_&quot;; [.B147]; &quot;)] = &quot;; [.C147]; &quot;;&quot;); IF([.E147]=1; COM.MICROSOFT.CONCAT(&quot;ModbusHoldingRegisters[holdingIndexFromAddress(MODBUS_ADDR_&quot;; [.B147]; &quot;)] = &quot;; [.C147]; &quot;u;&quot;); &quot;&quot;))">
            <text:p/>
          </table:table-cell>
        </table:table-row>
        <table:table-row table:style-name="ro1">
          <table:table-cell table:style-name="ce17" table:formula="of:=[$List.B148]" office:value-type="string" office:string-value="holding reg." calcext:value-type="string">
            <text:p>holding reg.</text:p>
          </table:table-cell>
          <table:table-cell table:style-name="ce17" table:formula="of:=[$List.I148]" office:value-type="string" office:string-value="CUP1_CHANNEL2_LOWER_LIMIT" calcext:value-type="string">
            <text:p>CUP1_CHANNEL2_LOWER_LIMIT</text:p>
          </table:table-cell>
          <table:table-cell table:style-name="ce17" table:formula="of:=[$List.G148]" office:value-type="float" office:value="0" calcext:value-type="float">
            <text:p>0</text:p>
          </table:table-cell>
          <table:table-cell table:formula="of:=IF(AND(([.A148]=&quot;coil&quot;);([.C148]=&quot;true&quot;)); 1; &quot;&quot;)">
            <text:p/>
          </table:table-cell>
          <table:table-cell table:formula="of:=IF(AND(([.A148]=&quot;holding reg.&quot;);([.C148] &lt;&gt; 0)); 1; &quot;&quot;)">
            <text:p/>
          </table:table-cell>
          <table:table-cell/>
          <table:table-cell table:formula="of:=IF([.D148]=1; COM.MICROSOFT.CONCAT(&quot;ModbusCoils[coilIndexFromAddress(MODBUS_ADDR_&quot;; [.B148]; &quot;)] = &quot;; [.C148]; &quot;;&quot;); IF([.E148]=1; COM.MICROSOFT.CONCAT(&quot;ModbusHoldingRegisters[holdingIndexFromAddress(MODBUS_ADDR_&quot;; [.B148]; &quot;)] = &quot;; [.C148]; &quot;u;&quot;); &quot;&quot;))">
            <text:p/>
          </table:table-cell>
        </table:table-row>
        <table:table-row table:style-name="ro1">
          <table:table-cell table:style-name="ce17" table:formula="of:=[$List.B149]" office:value-type="string" office:string-value="holding reg." calcext:value-type="string">
            <text:p>holding reg.</text:p>
          </table:table-cell>
          <table:table-cell table:style-name="ce17" table:formula="of:=[$List.I149]" office:value-type="string" office:string-value="CUP1_CHANNEL3_LOWER_LIMIT" calcext:value-type="string">
            <text:p>CUP1_CHANNEL3_LOWER_LIMIT</text:p>
          </table:table-cell>
          <table:table-cell table:style-name="ce17" table:formula="of:=[$List.G149]" office:value-type="float" office:value="0" calcext:value-type="float">
            <text:p>0</text:p>
          </table:table-cell>
          <table:table-cell table:formula="of:=IF(AND(([.A149]=&quot;coil&quot;);([.C149]=&quot;true&quot;)); 1; &quot;&quot;)">
            <text:p/>
          </table:table-cell>
          <table:table-cell table:formula="of:=IF(AND(([.A149]=&quot;holding reg.&quot;);([.C149] &lt;&gt; 0)); 1; &quot;&quot;)">
            <text:p/>
          </table:table-cell>
          <table:table-cell/>
          <table:table-cell table:formula="of:=IF([.D149]=1; COM.MICROSOFT.CONCAT(&quot;ModbusCoils[coilIndexFromAddress(MODBUS_ADDR_&quot;; [.B149]; &quot;)] = &quot;; [.C149]; &quot;;&quot;); IF([.E149]=1; COM.MICROSOFT.CONCAT(&quot;ModbusHoldingRegisters[holdingIndexFromAddress(MODBUS_ADDR_&quot;; [.B149]; &quot;)] = &quot;; [.C149]; &quot;u;&quot;); &quot;&quot;))">
            <text:p/>
          </table:table-cell>
        </table:table-row>
        <table:table-row table:style-name="ro1">
          <table:table-cell table:style-name="ce17" table:formula="of:=[$List.B150]" office:value-type="string" office:string-value="holding reg." calcext:value-type="string">
            <text:p>holding reg.</text:p>
          </table:table-cell>
          <table:table-cell table:style-name="ce17" table:formula="of:=[$List.I150]" office:value-type="string" office:string-value="CUP1_CHANNEL4_LOWER_LIMIT" calcext:value-type="string">
            <text:p>CUP1_CHANNEL4_LOWER_LIMIT</text:p>
          </table:table-cell>
          <table:table-cell table:style-name="ce17" table:formula="of:=[$List.G150]" office:value-type="float" office:value="0" calcext:value-type="float">
            <text:p>0</text:p>
          </table:table-cell>
          <table:table-cell table:formula="of:=IF(AND(([.A150]=&quot;coil&quot;);([.C150]=&quot;true&quot;)); 1; &quot;&quot;)">
            <text:p/>
          </table:table-cell>
          <table:table-cell table:formula="of:=IF(AND(([.A150]=&quot;holding reg.&quot;);([.C150] &lt;&gt; 0)); 1; &quot;&quot;)">
            <text:p/>
          </table:table-cell>
          <table:table-cell/>
          <table:table-cell table:formula="of:=IF([.D150]=1; COM.MICROSOFT.CONCAT(&quot;ModbusCoils[coilIndexFromAddress(MODBUS_ADDR_&quot;; [.B150]; &quot;)] = &quot;; [.C150]; &quot;;&quot;); IF([.E150]=1; COM.MICROSOFT.CONCAT(&quot;ModbusHoldingRegisters[holdingIndexFromAddress(MODBUS_ADDR_&quot;; [.B150]; &quot;)] = &quot;; [.C150]; &quot;u;&quot;); &quot;&quot;))">
            <text:p/>
          </table:table-cell>
        </table:table-row>
        <table:table-row table:style-name="ro1">
          <table:table-cell table:style-name="ce17" table:formula="of:=[$List.B151]" office:value-type="string" office:string-value="holding reg." calcext:value-type="string">
            <text:p>holding reg.</text:p>
          </table:table-cell>
          <table:table-cell table:style-name="ce17" table:formula="of:=[$List.I151]" office:value-type="string" office:string-value="CUP2_CHANNEL1_LOWER_LIMIT" calcext:value-type="string">
            <text:p>CUP2_CHANNEL1_LOWER_LIMIT</text:p>
          </table:table-cell>
          <table:table-cell table:style-name="ce17" table:formula="of:=[$List.G151]" office:value-type="float" office:value="0" calcext:value-type="float">
            <text:p>0</text:p>
          </table:table-cell>
          <table:table-cell table:formula="of:=IF(AND(([.A151]=&quot;coil&quot;);([.C151]=&quot;true&quot;)); 1; &quot;&quot;)">
            <text:p/>
          </table:table-cell>
          <table:table-cell table:formula="of:=IF(AND(([.A151]=&quot;holding reg.&quot;);([.C151] &lt;&gt; 0)); 1; &quot;&quot;)">
            <text:p/>
          </table:table-cell>
          <table:table-cell/>
          <table:table-cell table:formula="of:=IF([.D151]=1; COM.MICROSOFT.CONCAT(&quot;ModbusCoils[coilIndexFromAddress(MODBUS_ADDR_&quot;; [.B151]; &quot;)] = &quot;; [.C151]; &quot;;&quot;); IF([.E151]=1; COM.MICROSOFT.CONCAT(&quot;ModbusHoldingRegisters[holdingIndexFromAddress(MODBUS_ADDR_&quot;; [.B151]; &quot;)] = &quot;; [.C151]; &quot;u;&quot;); &quot;&quot;))">
            <text:p/>
          </table:table-cell>
        </table:table-row>
        <table:table-row table:style-name="ro1">
          <table:table-cell table:style-name="ce17" table:formula="of:=[$List.B152]" office:value-type="string" office:string-value="holding reg." calcext:value-type="string">
            <text:p>holding reg.</text:p>
          </table:table-cell>
          <table:table-cell table:style-name="ce17" table:formula="of:=[$List.I152]" office:value-type="string" office:string-value="CUP2_CHANNEL2_LOWER_LIMIT" calcext:value-type="string">
            <text:p>CUP2_CHANNEL2_LOWER_LIMIT</text:p>
          </table:table-cell>
          <table:table-cell table:style-name="ce17" table:formula="of:=[$List.G152]" office:value-type="float" office:value="0" calcext:value-type="float">
            <text:p>0</text:p>
          </table:table-cell>
          <table:table-cell table:formula="of:=IF(AND(([.A152]=&quot;coil&quot;);([.C152]=&quot;true&quot;)); 1; &quot;&quot;)">
            <text:p/>
          </table:table-cell>
          <table:table-cell table:formula="of:=IF(AND(([.A152]=&quot;holding reg.&quot;);([.C152] &lt;&gt; 0)); 1; &quot;&quot;)">
            <text:p/>
          </table:table-cell>
          <table:table-cell/>
          <table:table-cell table:formula="of:=IF([.D152]=1; COM.MICROSOFT.CONCAT(&quot;ModbusCoils[coilIndexFromAddress(MODBUS_ADDR_&quot;; [.B152]; &quot;)] = &quot;; [.C152]; &quot;;&quot;); IF([.E152]=1; COM.MICROSOFT.CONCAT(&quot;ModbusHoldingRegisters[holdingIndexFromAddress(MODBUS_ADDR_&quot;; [.B152]; &quot;)] = &quot;; [.C152]; &quot;u;&quot;); &quot;&quot;))">
            <text:p/>
          </table:table-cell>
        </table:table-row>
        <table:table-row table:style-name="ro1">
          <table:table-cell table:style-name="ce17" table:formula="of:=[$List.B153]" office:value-type="string" office:string-value="holding reg." calcext:value-type="string">
            <text:p>holding reg.</text:p>
          </table:table-cell>
          <table:table-cell table:style-name="ce17" table:formula="of:=[$List.I153]" office:value-type="string" office:string-value="CUP2_CHANNEL3_LOWER_LIMIT" calcext:value-type="string">
            <text:p>CUP2_CHANNEL3_LOWER_LIMIT</text:p>
          </table:table-cell>
          <table:table-cell table:style-name="ce17" table:formula="of:=[$List.G153]" office:value-type="float" office:value="0" calcext:value-type="float">
            <text:p>0</text:p>
          </table:table-cell>
          <table:table-cell table:formula="of:=IF(AND(([.A153]=&quot;coil&quot;);([.C153]=&quot;true&quot;)); 1; &quot;&quot;)">
            <text:p/>
          </table:table-cell>
          <table:table-cell table:formula="of:=IF(AND(([.A153]=&quot;holding reg.&quot;);([.C153] &lt;&gt; 0)); 1; &quot;&quot;)">
            <text:p/>
          </table:table-cell>
          <table:table-cell/>
          <table:table-cell table:formula="of:=IF([.D153]=1; COM.MICROSOFT.CONCAT(&quot;ModbusCoils[coilIndexFromAddress(MODBUS_ADDR_&quot;; [.B153]; &quot;)] = &quot;; [.C153]; &quot;;&quot;); IF([.E153]=1; COM.MICROSOFT.CONCAT(&quot;ModbusHoldingRegisters[holdingIndexFromAddress(MODBUS_ADDR_&quot;; [.B153]; &quot;)] = &quot;; [.C153]; &quot;u;&quot;); &quot;&quot;))">
            <text:p/>
          </table:table-cell>
        </table:table-row>
        <table:table-row table:style-name="ro1">
          <table:table-cell table:style-name="ce17" table:formula="of:=[$List.B154]" office:value-type="string" office:string-value="holding reg." calcext:value-type="string">
            <text:p>holding reg.</text:p>
          </table:table-cell>
          <table:table-cell table:style-name="ce17" table:formula="of:=[$List.I154]" office:value-type="string" office:string-value="CUP2_CHANNEL4_LOWER_LIMIT" calcext:value-type="string">
            <text:p>CUP2_CHANNEL4_LOWER_LIMIT</text:p>
          </table:table-cell>
          <table:table-cell table:style-name="ce17" table:formula="of:=[$List.G154]" office:value-type="float" office:value="0" calcext:value-type="float">
            <text:p>0</text:p>
          </table:table-cell>
          <table:table-cell table:formula="of:=IF(AND(([.A154]=&quot;coil&quot;);([.C154]=&quot;true&quot;)); 1; &quot;&quot;)">
            <text:p/>
          </table:table-cell>
          <table:table-cell table:formula="of:=IF(AND(([.A154]=&quot;holding reg.&quot;);([.C154] &lt;&gt; 0)); 1; &quot;&quot;)">
            <text:p/>
          </table:table-cell>
          <table:table-cell/>
          <table:table-cell table:formula="of:=IF([.D154]=1; COM.MICROSOFT.CONCAT(&quot;ModbusCoils[coilIndexFromAddress(MODBUS_ADDR_&quot;; [.B154]; &quot;)] = &quot;; [.C154]; &quot;;&quot;); IF([.E154]=1; COM.MICROSOFT.CONCAT(&quot;ModbusHoldingRegisters[holdingIndexFromAddress(MODBUS_ADDR_&quot;; [.B154]; &quot;)] = &quot;; [.C154]; &quot;u;&quot;); &quot;&quot;))">
            <text:p/>
          </table:table-cell>
        </table:table-row>
        <table:table-row table:style-name="ro1">
          <table:table-cell table:style-name="ce17" table:formula="of:=[$List.B155]" office:value-type="string" office:string-value="holding reg." calcext:value-type="string">
            <text:p>holding reg.</text:p>
          </table:table-cell>
          <table:table-cell table:style-name="ce17" table:formula="of:=[$List.I155]" office:value-type="string" office:string-value="CUP3_CHANNEL1_LOWER_LIMIT" calcext:value-type="string">
            <text:p>CUP3_CHANNEL1_LOWER_LIMIT</text:p>
          </table:table-cell>
          <table:table-cell table:style-name="ce17" table:formula="of:=[$List.G155]" office:value-type="float" office:value="0" calcext:value-type="float">
            <text:p>0</text:p>
          </table:table-cell>
          <table:table-cell table:formula="of:=IF(AND(([.A155]=&quot;coil&quot;);([.C155]=&quot;true&quot;)); 1; &quot;&quot;)">
            <text:p/>
          </table:table-cell>
          <table:table-cell table:formula="of:=IF(AND(([.A155]=&quot;holding reg.&quot;);([.C155] &lt;&gt; 0)); 1; &quot;&quot;)">
            <text:p/>
          </table:table-cell>
          <table:table-cell/>
          <table:table-cell table:formula="of:=IF([.D155]=1; COM.MICROSOFT.CONCAT(&quot;ModbusCoils[coilIndexFromAddress(MODBUS_ADDR_&quot;; [.B155]; &quot;)] = &quot;; [.C155]; &quot;;&quot;); IF([.E155]=1; COM.MICROSOFT.CONCAT(&quot;ModbusHoldingRegisters[holdingIndexFromAddress(MODBUS_ADDR_&quot;; [.B155]; &quot;)] = &quot;; [.C155]; &quot;u;&quot;); &quot;&quot;))">
            <text:p/>
          </table:table-cell>
        </table:table-row>
        <table:table-row table:style-name="ro1">
          <table:table-cell table:style-name="ce17" table:formula="of:=[$List.B156]" office:value-type="string" office:string-value="holding reg." calcext:value-type="string">
            <text:p>holding reg.</text:p>
          </table:table-cell>
          <table:table-cell table:style-name="ce17" table:formula="of:=[$List.I156]" office:value-type="string" office:string-value="CUP3_CHANNEL2_LOWER_LIMIT" calcext:value-type="string">
            <text:p>CUP3_CHANNEL2_LOWER_LIMIT</text:p>
          </table:table-cell>
          <table:table-cell table:style-name="ce17" table:formula="of:=[$List.G156]" office:value-type="float" office:value="0" calcext:value-type="float">
            <text:p>0</text:p>
          </table:table-cell>
          <table:table-cell table:formula="of:=IF(AND(([.A156]=&quot;coil&quot;);([.C156]=&quot;true&quot;)); 1; &quot;&quot;)">
            <text:p/>
          </table:table-cell>
          <table:table-cell table:formula="of:=IF(AND(([.A156]=&quot;holding reg.&quot;);([.C156] &lt;&gt; 0)); 1; &quot;&quot;)">
            <text:p/>
          </table:table-cell>
          <table:table-cell/>
          <table:table-cell table:formula="of:=IF([.D156]=1; COM.MICROSOFT.CONCAT(&quot;ModbusCoils[coilIndexFromAddress(MODBUS_ADDR_&quot;; [.B156]; &quot;)] = &quot;; [.C156]; &quot;;&quot;); IF([.E156]=1; COM.MICROSOFT.CONCAT(&quot;ModbusHoldingRegisters[holdingIndexFromAddress(MODBUS_ADDR_&quot;; [.B156]; &quot;)] = &quot;; [.C156]; &quot;u;&quot;); &quot;&quot;))">
            <text:p/>
          </table:table-cell>
        </table:table-row>
        <table:table-row table:style-name="ro1">
          <table:table-cell table:style-name="ce17" table:formula="of:=[$List.B157]" office:value-type="string" office:string-value="holding reg." calcext:value-type="string">
            <text:p>holding reg.</text:p>
          </table:table-cell>
          <table:table-cell table:style-name="ce17" table:formula="of:=[$List.I157]" office:value-type="string" office:string-value="CUP3_CHANNEL3_LOWER_LIMIT" calcext:value-type="string">
            <text:p>CUP3_CHANNEL3_LOWER_LIMIT</text:p>
          </table:table-cell>
          <table:table-cell table:style-name="ce17" table:formula="of:=[$List.G157]" office:value-type="float" office:value="0" calcext:value-type="float">
            <text:p>0</text:p>
          </table:table-cell>
          <table:table-cell table:formula="of:=IF(AND(([.A157]=&quot;coil&quot;);([.C157]=&quot;true&quot;)); 1; &quot;&quot;)">
            <text:p/>
          </table:table-cell>
          <table:table-cell table:formula="of:=IF(AND(([.A157]=&quot;holding reg.&quot;);([.C157] &lt;&gt; 0)); 1; &quot;&quot;)">
            <text:p/>
          </table:table-cell>
          <table:table-cell/>
          <table:table-cell table:formula="of:=IF([.D157]=1; COM.MICROSOFT.CONCAT(&quot;ModbusCoils[coilIndexFromAddress(MODBUS_ADDR_&quot;; [.B157]; &quot;)] = &quot;; [.C157]; &quot;;&quot;); IF([.E157]=1; COM.MICROSOFT.CONCAT(&quot;ModbusHoldingRegisters[holdingIndexFromAddress(MODBUS_ADDR_&quot;; [.B157]; &quot;)] = &quot;; [.C157]; &quot;u;&quot;); &quot;&quot;))">
            <text:p/>
          </table:table-cell>
        </table:table-row>
        <table:table-row table:style-name="ro1">
          <table:table-cell table:style-name="ce17" table:formula="of:=[$List.B158]" office:value-type="string" office:string-value="holding reg." calcext:value-type="string">
            <text:p>holding reg.</text:p>
          </table:table-cell>
          <table:table-cell table:style-name="ce17" table:formula="of:=[$List.I158]" office:value-type="string" office:string-value="CUP3_CHANNEL4_LOWER_LIMIT" calcext:value-type="string">
            <text:p>CUP3_CHANNEL4_LOWER_LIMIT</text:p>
          </table:table-cell>
          <table:table-cell table:style-name="ce17" table:formula="of:=[$List.G158]" office:value-type="float" office:value="0" calcext:value-type="float">
            <text:p>0</text:p>
          </table:table-cell>
          <table:table-cell table:formula="of:=IF(AND(([.A158]=&quot;coil&quot;);([.C158]=&quot;true&quot;)); 1; &quot;&quot;)">
            <text:p/>
          </table:table-cell>
          <table:table-cell table:formula="of:=IF(AND(([.A158]=&quot;holding reg.&quot;);([.C158] &lt;&gt; 0)); 1; &quot;&quot;)">
            <text:p/>
          </table:table-cell>
          <table:table-cell/>
          <table:table-cell table:formula="of:=IF([.D158]=1; COM.MICROSOFT.CONCAT(&quot;ModbusCoils[coilIndexFromAddress(MODBUS_ADDR_&quot;; [.B158]; &quot;)] = &quot;; [.C158]; &quot;;&quot;); IF([.E158]=1; COM.MICROSOFT.CONCAT(&quot;ModbusHoldingRegisters[holdingIndexFromAddress(MODBUS_ADDR_&quot;; [.B158]; &quot;)] = &quot;; [.C158]; &quot;u;&quot;); &quot;&quot;))">
            <text:p/>
          </table:table-cell>
        </table:table-row>
        <table:table-row table:style-name="ro1">
          <table:table-cell table:style-name="ce17" table:formula="of:=[$List.B159]" office:value-type="float" office:value="0" calcext:value-type="float">
            <text:p>0</text:p>
          </table:table-cell>
          <table:table-cell table:style-name="ce17" table:formula="of:=[$List.I159]">
            <text:p/>
          </table:table-cell>
          <table:table-cell table:style-name="ce17" table:formula="of:=[$List.G159]" office:value-type="float" office:value="0" calcext:value-type="float">
            <text:p>0</text:p>
          </table:table-cell>
          <table:table-cell table:formula="of:=IF(AND(([.A159]=&quot;coil&quot;);([.C159]=&quot;true&quot;)); 1; &quot;&quot;)">
            <text:p/>
          </table:table-cell>
          <table:table-cell table:formula="of:=IF(AND(([.A159]=&quot;holding reg.&quot;);([.C159] &lt;&gt; 0)); 1; &quot;&quot;)">
            <text:p/>
          </table:table-cell>
          <table:table-cell/>
          <table:table-cell table:formula="of:=IF([.D159]=1; COM.MICROSOFT.CONCAT(&quot;ModbusCoils[coilIndexFromAddress(MODBUS_ADDR_&quot;; [.B159]; &quot;)] = &quot;; [.C159]; &quot;;&quot;); IF([.E159]=1; COM.MICROSOFT.CONCAT(&quot;ModbusHoldingRegisters[holdingIndexFromAddress(MODBUS_ADDR_&quot;; [.B159]; &quot;)] = &quot;; [.C159]; &quot;u;&quot;); &quot;&quot;))">
            <text:p/>
          </table:table-cell>
        </table:table-row>
        <table:table-row table:style-name="ro1">
          <table:table-cell table:style-name="ce17" table:formula="of:=[$List.B160]" office:value-type="string" office:string-value="holding reg." calcext:value-type="string">
            <text:p>holding reg.</text:p>
          </table:table-cell>
          <table:table-cell table:style-name="ce17" table:formula="of:=[$List.I160]" office:value-type="string" office:string-value="CUP1_CHANNEL1_UPPER_LIMIT" calcext:value-type="string">
            <text:p>CUP1_CHANNEL1_UPPER_LIMIT</text:p>
          </table:table-cell>
          <table:table-cell table:style-name="ce17" table:formula="of:=[$List.G160]" office:value-type="float" office:value="65535" calcext:value-type="float">
            <text:p>65535</text:p>
          </table:table-cell>
          <table:table-cell table:formula="of:=IF(AND(([.A160]=&quot;coil&quot;);([.C160]=&quot;true&quot;)); 1; &quot;&quot;)">
            <text:p/>
          </table:table-cell>
          <table:table-cell table:formula="of:=IF(AND(([.A160]=&quot;holding reg.&quot;);([.C160] &lt;&gt; 0)); 1; &quot;&quot;)" office:value-type="float" office:value="1" calcext:value-type="float">
            <text:p>1</text:p>
          </table:table-cell>
          <table:table-cell/>
          <table:table-cell table:formula="of:=IF([.D160]=1; COM.MICROSOFT.CONCAT(&quot;ModbusCoils[coilIndexFromAddress(MODBUS_ADDR_&quot;; [.B160]; &quot;)] = &quot;; [.C160]; &quot;;&quot;); IF([.E160]=1; COM.MICROSOFT.CONCAT(&quot;ModbusHoldingRegisters[holdingIndexFromAddress(MODBUS_ADDR_&quot;; [.B160]; &quot;)] = &quot;; [.C160]; &quot;u;&quot;); &quot;&quot;))" office:value-type="string" office:string-value="ModbusHoldingRegisters[holdingIndexFromAddress(MODBUS_ADDR_CUP1_CHANNEL1_UPPER_LIMIT)] = 65535u;" calcext:value-type="string">
            <text:p>ModbusHoldingRegisters[holdingIndexFromAddress(MODBUS_ADDR_CUP1_CHANNEL1_UPPER_LIMIT)] = 65535u;</text:p>
          </table:table-cell>
        </table:table-row>
        <table:table-row table:style-name="ro1">
          <table:table-cell table:style-name="ce17" table:formula="of:=[$List.B161]" office:value-type="string" office:string-value="holding reg." calcext:value-type="string">
            <text:p>holding reg.</text:p>
          </table:table-cell>
          <table:table-cell table:style-name="ce17" table:formula="of:=[$List.I161]" office:value-type="string" office:string-value="CUP1_CHANNEL2_UPPER_LIMIT" calcext:value-type="string">
            <text:p>CUP1_CHANNEL2_UPPER_LIMIT</text:p>
          </table:table-cell>
          <table:table-cell table:style-name="ce17" table:formula="of:=[$List.G161]" office:value-type="float" office:value="65535" calcext:value-type="float">
            <text:p>65535</text:p>
          </table:table-cell>
          <table:table-cell table:formula="of:=IF(AND(([.A161]=&quot;coil&quot;);([.C161]=&quot;true&quot;)); 1; &quot;&quot;)">
            <text:p/>
          </table:table-cell>
          <table:table-cell table:formula="of:=IF(AND(([.A161]=&quot;holding reg.&quot;);([.C161] &lt;&gt; 0)); 1; &quot;&quot;)" office:value-type="float" office:value="1" calcext:value-type="float">
            <text:p>1</text:p>
          </table:table-cell>
          <table:table-cell/>
          <table:table-cell table:formula="of:=IF([.D161]=1; COM.MICROSOFT.CONCAT(&quot;ModbusCoils[coilIndexFromAddress(MODBUS_ADDR_&quot;; [.B161]; &quot;)] = &quot;; [.C161]; &quot;;&quot;); IF([.E161]=1; COM.MICROSOFT.CONCAT(&quot;ModbusHoldingRegisters[holdingIndexFromAddress(MODBUS_ADDR_&quot;; [.B161]; &quot;)] = &quot;; [.C161]; &quot;u;&quot;); &quot;&quot;))" office:value-type="string" office:string-value="ModbusHoldingRegisters[holdingIndexFromAddress(MODBUS_ADDR_CUP1_CHANNEL2_UPPER_LIMIT)] = 65535u;" calcext:value-type="string">
            <text:p>ModbusHoldingRegisters[holdingIndexFromAddress(MODBUS_ADDR_CUP1_CHANNEL2_UPPER_LIMIT)] = 65535u;</text:p>
          </table:table-cell>
        </table:table-row>
        <table:table-row table:style-name="ro1">
          <table:table-cell table:style-name="ce17" table:formula="of:=[$List.B162]" office:value-type="string" office:string-value="holding reg." calcext:value-type="string">
            <text:p>holding reg.</text:p>
          </table:table-cell>
          <table:table-cell table:style-name="ce17" table:formula="of:=[$List.I162]" office:value-type="string" office:string-value="CUP1_CHANNEL3_UPPER_LIMIT" calcext:value-type="string">
            <text:p>CUP1_CHANNEL3_UPPER_LIMIT</text:p>
          </table:table-cell>
          <table:table-cell table:style-name="ce17" table:formula="of:=[$List.G162]" office:value-type="float" office:value="65535" calcext:value-type="float">
            <text:p>65535</text:p>
          </table:table-cell>
          <table:table-cell table:formula="of:=IF(AND(([.A162]=&quot;coil&quot;);([.C162]=&quot;true&quot;)); 1; &quot;&quot;)">
            <text:p/>
          </table:table-cell>
          <table:table-cell table:formula="of:=IF(AND(([.A162]=&quot;holding reg.&quot;);([.C162] &lt;&gt; 0)); 1; &quot;&quot;)" office:value-type="float" office:value="1" calcext:value-type="float">
            <text:p>1</text:p>
          </table:table-cell>
          <table:table-cell/>
          <table:table-cell table:formula="of:=IF([.D162]=1; COM.MICROSOFT.CONCAT(&quot;ModbusCoils[coilIndexFromAddress(MODBUS_ADDR_&quot;; [.B162]; &quot;)] = &quot;; [.C162]; &quot;;&quot;); IF([.E162]=1; COM.MICROSOFT.CONCAT(&quot;ModbusHoldingRegisters[holdingIndexFromAddress(MODBUS_ADDR_&quot;; [.B162]; &quot;)] = &quot;; [.C162]; &quot;u;&quot;); &quot;&quot;))" office:value-type="string" office:string-value="ModbusHoldingRegisters[holdingIndexFromAddress(MODBUS_ADDR_CUP1_CHANNEL3_UPPER_LIMIT)] = 65535u;" calcext:value-type="string">
            <text:p>ModbusHoldingRegisters[holdingIndexFromAddress(MODBUS_ADDR_CUP1_CHANNEL3_UPPER_LIMIT)] = 65535u;</text:p>
          </table:table-cell>
        </table:table-row>
        <table:table-row table:style-name="ro1">
          <table:table-cell table:style-name="ce17" table:formula="of:=[$List.B163]" office:value-type="string" office:string-value="holding reg." calcext:value-type="string">
            <text:p>holding reg.</text:p>
          </table:table-cell>
          <table:table-cell table:style-name="ce17" table:formula="of:=[$List.I163]" office:value-type="string" office:string-value="CUP1_CHANNEL4_UPPER_LIMIT" calcext:value-type="string">
            <text:p>CUP1_CHANNEL4_UPPER_LIMIT</text:p>
          </table:table-cell>
          <table:table-cell table:style-name="ce17" table:formula="of:=[$List.G163]" office:value-type="float" office:value="65535" calcext:value-type="float">
            <text:p>65535</text:p>
          </table:table-cell>
          <table:table-cell table:formula="of:=IF(AND(([.A163]=&quot;coil&quot;);([.C163]=&quot;true&quot;)); 1; &quot;&quot;)">
            <text:p/>
          </table:table-cell>
          <table:table-cell table:formula="of:=IF(AND(([.A163]=&quot;holding reg.&quot;);([.C163] &lt;&gt; 0)); 1; &quot;&quot;)" office:value-type="float" office:value="1" calcext:value-type="float">
            <text:p>1</text:p>
          </table:table-cell>
          <table:table-cell/>
          <table:table-cell table:formula="of:=IF([.D163]=1; COM.MICROSOFT.CONCAT(&quot;ModbusCoils[coilIndexFromAddress(MODBUS_ADDR_&quot;; [.B163]; &quot;)] = &quot;; [.C163]; &quot;;&quot;); IF([.E163]=1; COM.MICROSOFT.CONCAT(&quot;ModbusHoldingRegisters[holdingIndexFromAddress(MODBUS_ADDR_&quot;; [.B163]; &quot;)] = &quot;; [.C163]; &quot;u;&quot;); &quot;&quot;))" office:value-type="string" office:string-value="ModbusHoldingRegisters[holdingIndexFromAddress(MODBUS_ADDR_CUP1_CHANNEL4_UPPER_LIMIT)] = 65535u;" calcext:value-type="string">
            <text:p>ModbusHoldingRegisters[holdingIndexFromAddress(MODBUS_ADDR_CUP1_CHANNEL4_UPPER_LIMIT)] = 65535u;</text:p>
          </table:table-cell>
        </table:table-row>
        <table:table-row table:style-name="ro1">
          <table:table-cell table:style-name="ce17" table:formula="of:=[$List.B164]" office:value-type="string" office:string-value="holding reg." calcext:value-type="string">
            <text:p>holding reg.</text:p>
          </table:table-cell>
          <table:table-cell table:style-name="ce17" table:formula="of:=[$List.I164]" office:value-type="string" office:string-value="CUP2_CHANNEL1_UPPER_LIMIT" calcext:value-type="string">
            <text:p>CUP2_CHANNEL1_UPPER_LIMIT</text:p>
          </table:table-cell>
          <table:table-cell table:style-name="ce17" table:formula="of:=[$List.G164]" office:value-type="float" office:value="65535" calcext:value-type="float">
            <text:p>65535</text:p>
          </table:table-cell>
          <table:table-cell table:formula="of:=IF(AND(([.A164]=&quot;coil&quot;);([.C164]=&quot;true&quot;)); 1; &quot;&quot;)">
            <text:p/>
          </table:table-cell>
          <table:table-cell table:formula="of:=IF(AND(([.A164]=&quot;holding reg.&quot;);([.C164] &lt;&gt; 0)); 1; &quot;&quot;)" office:value-type="float" office:value="1" calcext:value-type="float">
            <text:p>1</text:p>
          </table:table-cell>
          <table:table-cell/>
          <table:table-cell table:formula="of:=IF([.D164]=1; COM.MICROSOFT.CONCAT(&quot;ModbusCoils[coilIndexFromAddress(MODBUS_ADDR_&quot;; [.B164]; &quot;)] = &quot;; [.C164]; &quot;;&quot;); IF([.E164]=1; COM.MICROSOFT.CONCAT(&quot;ModbusHoldingRegisters[holdingIndexFromAddress(MODBUS_ADDR_&quot;; [.B164]; &quot;)] = &quot;; [.C164]; &quot;u;&quot;); &quot;&quot;))" office:value-type="string" office:string-value="ModbusHoldingRegisters[holdingIndexFromAddress(MODBUS_ADDR_CUP2_CHANNEL1_UPPER_LIMIT)] = 65535u;" calcext:value-type="string">
            <text:p>ModbusHoldingRegisters[holdingIndexFromAddress(MODBUS_ADDR_CUP2_CHANNEL1_UPPER_LIMIT)] = 65535u;</text:p>
          </table:table-cell>
        </table:table-row>
        <table:table-row table:style-name="ro1">
          <table:table-cell table:style-name="ce17" table:formula="of:=[$List.B165]" office:value-type="string" office:string-value="holding reg." calcext:value-type="string">
            <text:p>holding reg.</text:p>
          </table:table-cell>
          <table:table-cell table:style-name="ce17" table:formula="of:=[$List.I165]" office:value-type="string" office:string-value="CUP2_CHANNEL2_UPPER_LIMIT" calcext:value-type="string">
            <text:p>CUP2_CHANNEL2_UPPER_LIMIT</text:p>
          </table:table-cell>
          <table:table-cell table:style-name="ce17" table:formula="of:=[$List.G165]" office:value-type="float" office:value="65535" calcext:value-type="float">
            <text:p>65535</text:p>
          </table:table-cell>
          <table:table-cell table:formula="of:=IF(AND(([.A165]=&quot;coil&quot;);([.C165]=&quot;true&quot;)); 1; &quot;&quot;)">
            <text:p/>
          </table:table-cell>
          <table:table-cell table:formula="of:=IF(AND(([.A165]=&quot;holding reg.&quot;);([.C165] &lt;&gt; 0)); 1; &quot;&quot;)" office:value-type="float" office:value="1" calcext:value-type="float">
            <text:p>1</text:p>
          </table:table-cell>
          <table:table-cell/>
          <table:table-cell table:formula="of:=IF([.D165]=1; COM.MICROSOFT.CONCAT(&quot;ModbusCoils[coilIndexFromAddress(MODBUS_ADDR_&quot;; [.B165]; &quot;)] = &quot;; [.C165]; &quot;;&quot;); IF([.E165]=1; COM.MICROSOFT.CONCAT(&quot;ModbusHoldingRegisters[holdingIndexFromAddress(MODBUS_ADDR_&quot;; [.B165]; &quot;)] = &quot;; [.C165]; &quot;u;&quot;); &quot;&quot;))" office:value-type="string" office:string-value="ModbusHoldingRegisters[holdingIndexFromAddress(MODBUS_ADDR_CUP2_CHANNEL2_UPPER_LIMIT)] = 65535u;" calcext:value-type="string">
            <text:p>ModbusHoldingRegisters[holdingIndexFromAddress(MODBUS_ADDR_CUP2_CHANNEL2_UPPER_LIMIT)] = 65535u;</text:p>
          </table:table-cell>
        </table:table-row>
        <table:table-row table:style-name="ro1">
          <table:table-cell table:style-name="ce17" table:formula="of:=[$List.B166]" office:value-type="string" office:string-value="holding reg." calcext:value-type="string">
            <text:p>holding reg.</text:p>
          </table:table-cell>
          <table:table-cell table:style-name="ce17" table:formula="of:=[$List.I166]" office:value-type="string" office:string-value="CUP2_CHANNEL3_UPPER_LIMIT" calcext:value-type="string">
            <text:p>CUP2_CHANNEL3_UPPER_LIMIT</text:p>
          </table:table-cell>
          <table:table-cell table:style-name="ce17" table:formula="of:=[$List.G166]" office:value-type="float" office:value="65535" calcext:value-type="float">
            <text:p>65535</text:p>
          </table:table-cell>
          <table:table-cell table:formula="of:=IF(AND(([.A166]=&quot;coil&quot;);([.C166]=&quot;true&quot;)); 1; &quot;&quot;)">
            <text:p/>
          </table:table-cell>
          <table:table-cell table:formula="of:=IF(AND(([.A166]=&quot;holding reg.&quot;);([.C166] &lt;&gt; 0)); 1; &quot;&quot;)" office:value-type="float" office:value="1" calcext:value-type="float">
            <text:p>1</text:p>
          </table:table-cell>
          <table:table-cell/>
          <table:table-cell table:formula="of:=IF([.D166]=1; COM.MICROSOFT.CONCAT(&quot;ModbusCoils[coilIndexFromAddress(MODBUS_ADDR_&quot;; [.B166]; &quot;)] = &quot;; [.C166]; &quot;;&quot;); IF([.E166]=1; COM.MICROSOFT.CONCAT(&quot;ModbusHoldingRegisters[holdingIndexFromAddress(MODBUS_ADDR_&quot;; [.B166]; &quot;)] = &quot;; [.C166]; &quot;u;&quot;); &quot;&quot;))" office:value-type="string" office:string-value="ModbusHoldingRegisters[holdingIndexFromAddress(MODBUS_ADDR_CUP2_CHANNEL3_UPPER_LIMIT)] = 65535u;" calcext:value-type="string">
            <text:p>ModbusHoldingRegisters[holdingIndexFromAddress(MODBUS_ADDR_CUP2_CHANNEL3_UPPER_LIMIT)] = 65535u;</text:p>
          </table:table-cell>
        </table:table-row>
        <table:table-row table:style-name="ro1">
          <table:table-cell table:style-name="ce17" table:formula="of:=[$List.B167]" office:value-type="string" office:string-value="holding reg." calcext:value-type="string">
            <text:p>holding reg.</text:p>
          </table:table-cell>
          <table:table-cell table:style-name="ce17" table:formula="of:=[$List.I167]" office:value-type="string" office:string-value="CUP2_CHANNEL4_UPPER_LIMIT" calcext:value-type="string">
            <text:p>CUP2_CHANNEL4_UPPER_LIMIT</text:p>
          </table:table-cell>
          <table:table-cell table:style-name="ce17" table:formula="of:=[$List.G167]" office:value-type="float" office:value="65535" calcext:value-type="float">
            <text:p>65535</text:p>
          </table:table-cell>
          <table:table-cell table:formula="of:=IF(AND(([.A167]=&quot;coil&quot;);([.C167]=&quot;true&quot;)); 1; &quot;&quot;)">
            <text:p/>
          </table:table-cell>
          <table:table-cell table:formula="of:=IF(AND(([.A167]=&quot;holding reg.&quot;);([.C167] &lt;&gt; 0)); 1; &quot;&quot;)" office:value-type="float" office:value="1" calcext:value-type="float">
            <text:p>1</text:p>
          </table:table-cell>
          <table:table-cell/>
          <table:table-cell table:formula="of:=IF([.D167]=1; COM.MICROSOFT.CONCAT(&quot;ModbusCoils[coilIndexFromAddress(MODBUS_ADDR_&quot;; [.B167]; &quot;)] = &quot;; [.C167]; &quot;;&quot;); IF([.E167]=1; COM.MICROSOFT.CONCAT(&quot;ModbusHoldingRegisters[holdingIndexFromAddress(MODBUS_ADDR_&quot;; [.B167]; &quot;)] = &quot;; [.C167]; &quot;u;&quot;); &quot;&quot;))" office:value-type="string" office:string-value="ModbusHoldingRegisters[holdingIndexFromAddress(MODBUS_ADDR_CUP2_CHANNEL4_UPPER_LIMIT)] = 65535u;" calcext:value-type="string">
            <text:p>ModbusHoldingRegisters[holdingIndexFromAddress(MODBUS_ADDR_CUP2_CHANNEL4_UPPER_LIMIT)] = 65535u;</text:p>
          </table:table-cell>
        </table:table-row>
        <table:table-row table:style-name="ro1">
          <table:table-cell table:style-name="ce17" table:formula="of:=[$List.B168]" office:value-type="string" office:string-value="holding reg." calcext:value-type="string">
            <text:p>holding reg.</text:p>
          </table:table-cell>
          <table:table-cell table:style-name="ce17" table:formula="of:=[$List.I168]" office:value-type="string" office:string-value="CUP3_CHANNEL1_UPPER_LIMIT" calcext:value-type="string">
            <text:p>CUP3_CHANNEL1_UPPER_LIMIT</text:p>
          </table:table-cell>
          <table:table-cell table:style-name="ce17" table:formula="of:=[$List.G168]" office:value-type="float" office:value="65535" calcext:value-type="float">
            <text:p>65535</text:p>
          </table:table-cell>
          <table:table-cell table:formula="of:=IF(AND(([.A168]=&quot;coil&quot;);([.C168]=&quot;true&quot;)); 1; &quot;&quot;)">
            <text:p/>
          </table:table-cell>
          <table:table-cell table:formula="of:=IF(AND(([.A168]=&quot;holding reg.&quot;);([.C168] &lt;&gt; 0)); 1; &quot;&quot;)" office:value-type="float" office:value="1" calcext:value-type="float">
            <text:p>1</text:p>
          </table:table-cell>
          <table:table-cell/>
          <table:table-cell table:formula="of:=IF([.D168]=1; COM.MICROSOFT.CONCAT(&quot;ModbusCoils[coilIndexFromAddress(MODBUS_ADDR_&quot;; [.B168]; &quot;)] = &quot;; [.C168]; &quot;;&quot;); IF([.E168]=1; COM.MICROSOFT.CONCAT(&quot;ModbusHoldingRegisters[holdingIndexFromAddress(MODBUS_ADDR_&quot;; [.B168]; &quot;)] = &quot;; [.C168]; &quot;u;&quot;); &quot;&quot;))" office:value-type="string" office:string-value="ModbusHoldingRegisters[holdingIndexFromAddress(MODBUS_ADDR_CUP3_CHANNEL1_UPPER_LIMIT)] = 65535u;" calcext:value-type="string">
            <text:p>ModbusHoldingRegisters[holdingIndexFromAddress(MODBUS_ADDR_CUP3_CHANNEL1_UPPER_LIMIT)] = 65535u;</text:p>
          </table:table-cell>
        </table:table-row>
        <table:table-row table:style-name="ro1">
          <table:table-cell table:style-name="ce17" table:formula="of:=[$List.B169]" office:value-type="string" office:string-value="holding reg." calcext:value-type="string">
            <text:p>holding reg.</text:p>
          </table:table-cell>
          <table:table-cell table:style-name="ce17" table:formula="of:=[$List.I169]" office:value-type="string" office:string-value="CUP3_CHANNEL2_UPPER_LIMIT" calcext:value-type="string">
            <text:p>CUP3_CHANNEL2_UPPER_LIMIT</text:p>
          </table:table-cell>
          <table:table-cell table:style-name="ce17" table:formula="of:=[$List.G169]" office:value-type="float" office:value="65535" calcext:value-type="float">
            <text:p>65535</text:p>
          </table:table-cell>
          <table:table-cell table:formula="of:=IF(AND(([.A169]=&quot;coil&quot;);([.C169]=&quot;true&quot;)); 1; &quot;&quot;)">
            <text:p/>
          </table:table-cell>
          <table:table-cell table:formula="of:=IF(AND(([.A169]=&quot;holding reg.&quot;);([.C169] &lt;&gt; 0)); 1; &quot;&quot;)" office:value-type="float" office:value="1" calcext:value-type="float">
            <text:p>1</text:p>
          </table:table-cell>
          <table:table-cell/>
          <table:table-cell table:formula="of:=IF([.D169]=1; COM.MICROSOFT.CONCAT(&quot;ModbusCoils[coilIndexFromAddress(MODBUS_ADDR_&quot;; [.B169]; &quot;)] = &quot;; [.C169]; &quot;;&quot;); IF([.E169]=1; COM.MICROSOFT.CONCAT(&quot;ModbusHoldingRegisters[holdingIndexFromAddress(MODBUS_ADDR_&quot;; [.B169]; &quot;)] = &quot;; [.C169]; &quot;u;&quot;); &quot;&quot;))" office:value-type="string" office:string-value="ModbusHoldingRegisters[holdingIndexFromAddress(MODBUS_ADDR_CUP3_CHANNEL2_UPPER_LIMIT)] = 65535u;" calcext:value-type="string">
            <text:p>ModbusHoldingRegisters[holdingIndexFromAddress(MODBUS_ADDR_CUP3_CHANNEL2_UPPER_LIMIT)] = 65535u;</text:p>
          </table:table-cell>
        </table:table-row>
        <table:table-row table:style-name="ro1">
          <table:table-cell table:style-name="ce17" table:formula="of:=[$List.B170]" office:value-type="string" office:string-value="holding reg." calcext:value-type="string">
            <text:p>holding reg.</text:p>
          </table:table-cell>
          <table:table-cell table:style-name="ce17" table:formula="of:=[$List.I170]" office:value-type="string" office:string-value="CUP3_CHANNEL3_UPPER_LIMIT" calcext:value-type="string">
            <text:p>CUP3_CHANNEL3_UPPER_LIMIT</text:p>
          </table:table-cell>
          <table:table-cell table:style-name="ce17" table:formula="of:=[$List.G170]" office:value-type="float" office:value="65535" calcext:value-type="float">
            <text:p>65535</text:p>
          </table:table-cell>
          <table:table-cell table:formula="of:=IF(AND(([.A170]=&quot;coil&quot;);([.C170]=&quot;true&quot;)); 1; &quot;&quot;)">
            <text:p/>
          </table:table-cell>
          <table:table-cell table:formula="of:=IF(AND(([.A170]=&quot;holding reg.&quot;);([.C170] &lt;&gt; 0)); 1; &quot;&quot;)" office:value-type="float" office:value="1" calcext:value-type="float">
            <text:p>1</text:p>
          </table:table-cell>
          <table:table-cell/>
          <table:table-cell table:formula="of:=IF([.D170]=1; COM.MICROSOFT.CONCAT(&quot;ModbusCoils[coilIndexFromAddress(MODBUS_ADDR_&quot;; [.B170]; &quot;)] = &quot;; [.C170]; &quot;;&quot;); IF([.E170]=1; COM.MICROSOFT.CONCAT(&quot;ModbusHoldingRegisters[holdingIndexFromAddress(MODBUS_ADDR_&quot;; [.B170]; &quot;)] = &quot;; [.C170]; &quot;u;&quot;); &quot;&quot;))" office:value-type="string" office:string-value="ModbusHoldingRegisters[holdingIndexFromAddress(MODBUS_ADDR_CUP3_CHANNEL3_UPPER_LIMIT)] = 65535u;" calcext:value-type="string">
            <text:p>ModbusHoldingRegisters[holdingIndexFromAddress(MODBUS_ADDR_CUP3_CHANNEL3_UPPER_LIMIT)] = 65535u;</text:p>
          </table:table-cell>
        </table:table-row>
        <table:table-row table:style-name="ro1">
          <table:table-cell table:style-name="ce17" table:formula="of:=[$List.B171]" office:value-type="string" office:string-value="holding reg." calcext:value-type="string">
            <text:p>holding reg.</text:p>
          </table:table-cell>
          <table:table-cell table:style-name="ce17" table:formula="of:=[$List.I171]" office:value-type="string" office:string-value="CUP3_CHANNEL4_UPPER_LIMIT" calcext:value-type="string">
            <text:p>CUP3_CHANNEL4_UPPER_LIMIT</text:p>
          </table:table-cell>
          <table:table-cell table:style-name="ce17" table:formula="of:=[$List.G171]" office:value-type="float" office:value="65535" calcext:value-type="float">
            <text:p>65535</text:p>
          </table:table-cell>
          <table:table-cell table:formula="of:=IF(AND(([.A171]=&quot;coil&quot;);([.C171]=&quot;true&quot;)); 1; &quot;&quot;)">
            <text:p/>
          </table:table-cell>
          <table:table-cell table:formula="of:=IF(AND(([.A171]=&quot;holding reg.&quot;);([.C171] &lt;&gt; 0)); 1; &quot;&quot;)" office:value-type="float" office:value="1" calcext:value-type="float">
            <text:p>1</text:p>
          </table:table-cell>
          <table:table-cell/>
          <table:table-cell table:formula="of:=IF([.D171]=1; COM.MICROSOFT.CONCAT(&quot;ModbusCoils[coilIndexFromAddress(MODBUS_ADDR_&quot;; [.B171]; &quot;)] = &quot;; [.C171]; &quot;;&quot;); IF([.E171]=1; COM.MICROSOFT.CONCAT(&quot;ModbusHoldingRegisters[holdingIndexFromAddress(MODBUS_ADDR_&quot;; [.B171]; &quot;)] = &quot;; [.C171]; &quot;u;&quot;); &quot;&quot;))" office:value-type="string" office:string-value="ModbusHoldingRegisters[holdingIndexFromAddress(MODBUS_ADDR_CUP3_CHANNEL4_UPPER_LIMIT)] = 65535u;" calcext:value-type="string">
            <text:p>ModbusHoldingRegisters[holdingIndexFromAddress(MODBUS_ADDR_CUP3_CHANNEL4_UPPER_LIMIT)] = 65535u;</text:p>
          </table:table-cell>
        </table:table-row>
        <table:table-row table:style-name="ro1">
          <table:table-cell table:style-name="ce17" table:formula="of:=[$List.B172]" office:value-type="float" office:value="0" calcext:value-type="float">
            <text:p>0</text:p>
          </table:table-cell>
          <table:table-cell table:style-name="ce17" table:formula="of:=[$List.I172]">
            <text:p/>
          </table:table-cell>
          <table:table-cell table:style-name="ce17" table:formula="of:=[$List.G172]" office:value-type="float" office:value="0" calcext:value-type="float">
            <text:p>0</text:p>
          </table:table-cell>
          <table:table-cell table:formula="of:=IF(AND(([.A172]=&quot;coil&quot;);([.C172]=&quot;true&quot;)); 1; &quot;&quot;)">
            <text:p/>
          </table:table-cell>
          <table:table-cell table:formula="of:=IF(AND(([.A172]=&quot;holding reg.&quot;);([.C172] &lt;&gt; 0)); 1; &quot;&quot;)">
            <text:p/>
          </table:table-cell>
          <table:table-cell/>
          <table:table-cell table:formula="of:=IF([.D172]=1; COM.MICROSOFT.CONCAT(&quot;ModbusCoils[coilIndexFromAddress(MODBUS_ADDR_&quot;; [.B172]; &quot;)] = &quot;; [.C172]; &quot;;&quot;); IF([.E172]=1; COM.MICROSOFT.CONCAT(&quot;ModbusHoldingRegisters[holdingIndexFromAddress(MODBUS_ADDR_&quot;; [.B172]; &quot;)] = &quot;; [.C172]; &quot;u;&quot;); &quot;&quot;))">
            <text:p/>
          </table:table-cell>
        </table:table-row>
        <table:table-row table:style-name="ro1">
          <table:table-cell table:style-name="ce17" table:formula="of:=[$List.B173]" office:value-type="string" office:string-value="holding reg." calcext:value-type="string">
            <text:p>holding reg.</text:p>
          </table:table-cell>
          <table:table-cell table:style-name="ce17" table:formula="of:=[$List.I173]" office:value-type="string" office:string-value="SIM_MECHANISM_PROPAGATION1_IN" calcext:value-type="string">
            <text:p>SIM_MECHANISM_PROPAGATION1_IN</text:p>
          </table:table-cell>
          <table:table-cell table:style-name="ce17" table:formula="of:=[$List.G173]" office:value-type="float" office:value="300" calcext:value-type="float">
            <text:p>300</text:p>
          </table:table-cell>
          <table:table-cell table:formula="of:=IF(AND(([.A173]=&quot;coil&quot;);([.C173]=&quot;true&quot;)); 1; &quot;&quot;)">
            <text:p/>
          </table:table-cell>
          <table:table-cell table:formula="of:=IF(AND(([.A173]=&quot;holding reg.&quot;);([.C173] &lt;&gt; 0)); 1; &quot;&quot;)" office:value-type="float" office:value="1" calcext:value-type="float">
            <text:p>1</text:p>
          </table:table-cell>
          <table:table-cell/>
          <table:table-cell table:formula="of:=IF([.D173]=1; COM.MICROSOFT.CONCAT(&quot;ModbusCoils[coilIndexFromAddress(MODBUS_ADDR_&quot;; [.B173]; &quot;)] = &quot;; [.C173]; &quot;;&quot;); IF([.E173]=1; COM.MICROSOFT.CONCAT(&quot;ModbusHoldingRegisters[holdingIndexFromAddress(MODBUS_ADDR_&quot;; [.B173]; &quot;)] = &quot;; [.C173]; &quot;u;&quot;); &quot;&quot;))" office:value-type="string" office:string-value="ModbusHoldingRegisters[holdingIndexFromAddress(MODBUS_ADDR_SIM_MECHANISM_PROPAGATION1_IN)] = 300u;" calcext:value-type="string">
            <text:p>ModbusHoldingRegisters[holdingIndexFromAddress(MODBUS_ADDR_SIM_MECHANISM_PROPAGATION1_IN)] = 300u;</text:p>
          </table:table-cell>
        </table:table-row>
        <table:table-row table:style-name="ro1">
          <table:table-cell table:style-name="ce17" table:formula="of:=[$List.B174]" office:value-type="string" office:string-value="holding reg." calcext:value-type="string">
            <text:p>holding reg.</text:p>
          </table:table-cell>
          <table:table-cell table:style-name="ce17" table:formula="of:=[$List.I174]" office:value-type="string" office:string-value="SIM_MECHANISM_PROPAGATION1_IN_RAND" calcext:value-type="string">
            <text:p>SIM_MECHANISM_PROPAGATION1_IN_RAND</text:p>
          </table:table-cell>
          <table:table-cell table:style-name="ce17" table:formula="of:=[$List.G174]" office:value-type="float" office:value="0" calcext:value-type="float">
            <text:p>0</text:p>
          </table:table-cell>
          <table:table-cell table:formula="of:=IF(AND(([.A174]=&quot;coil&quot;);([.C174]=&quot;true&quot;)); 1; &quot;&quot;)">
            <text:p/>
          </table:table-cell>
          <table:table-cell table:formula="of:=IF(AND(([.A174]=&quot;holding reg.&quot;);([.C174] &lt;&gt; 0)); 1; &quot;&quot;)">
            <text:p/>
          </table:table-cell>
          <table:table-cell/>
          <table:table-cell table:formula="of:=IF([.D174]=1; COM.MICROSOFT.CONCAT(&quot;ModbusCoils[coilIndexFromAddress(MODBUS_ADDR_&quot;; [.B174]; &quot;)] = &quot;; [.C174]; &quot;;&quot;); IF([.E174]=1; COM.MICROSOFT.CONCAT(&quot;ModbusHoldingRegisters[holdingIndexFromAddress(MODBUS_ADDR_&quot;; [.B174]; &quot;)] = &quot;; [.C174]; &quot;u;&quot;); &quot;&quot;))">
            <text:p/>
          </table:table-cell>
        </table:table-row>
        <table:table-row table:style-name="ro1">
          <table:table-cell table:style-name="ce17" table:formula="of:=[$List.B175]" office:value-type="string" office:string-value="holding reg." calcext:value-type="string">
            <text:p>holding reg.</text:p>
          </table:table-cell>
          <table:table-cell table:style-name="ce17" table:formula="of:=[$List.I175]" office:value-type="string" office:string-value="SIM_MECHANISM_PROPAGATION1_OUT" calcext:value-type="string">
            <text:p>SIM_MECHANISM_PROPAGATION1_OUT</text:p>
          </table:table-cell>
          <table:table-cell table:style-name="ce17" table:formula="of:=[$List.G175]" office:value-type="float" office:value="100" calcext:value-type="float">
            <text:p>100</text:p>
          </table:table-cell>
          <table:table-cell table:formula="of:=IF(AND(([.A175]=&quot;coil&quot;);([.C175]=&quot;true&quot;)); 1; &quot;&quot;)">
            <text:p/>
          </table:table-cell>
          <table:table-cell table:formula="of:=IF(AND(([.A175]=&quot;holding reg.&quot;);([.C175] &lt;&gt; 0)); 1; &quot;&quot;)" office:value-type="float" office:value="1" calcext:value-type="float">
            <text:p>1</text:p>
          </table:table-cell>
          <table:table-cell/>
          <table:table-cell table:formula="of:=IF([.D175]=1; COM.MICROSOFT.CONCAT(&quot;ModbusCoils[coilIndexFromAddress(MODBUS_ADDR_&quot;; [.B175]; &quot;)] = &quot;; [.C175]; &quot;;&quot;); IF([.E175]=1; COM.MICROSOFT.CONCAT(&quot;ModbusHoldingRegisters[holdingIndexFromAddress(MODBUS_ADDR_&quot;; [.B175]; &quot;)] = &quot;; [.C175]; &quot;u;&quot;); &quot;&quot;))" office:value-type="string" office:string-value="ModbusHoldingRegisters[holdingIndexFromAddress(MODBUS_ADDR_SIM_MECHANISM_PROPAGATION1_OUT)] = 100u;" calcext:value-type="string">
            <text:p>ModbusHoldingRegisters[holdingIndexFromAddress(MODBUS_ADDR_SIM_MECHANISM_PROPAGATION1_OUT)] = 100u;</text:p>
          </table:table-cell>
        </table:table-row>
        <table:table-row table:style-name="ro1">
          <table:table-cell table:style-name="ce17" table:formula="of:=[$List.B176]" office:value-type="string" office:string-value="holding reg." calcext:value-type="string">
            <text:p>holding reg.</text:p>
          </table:table-cell>
          <table:table-cell table:style-name="ce17" table:formula="of:=[$List.I176]" office:value-type="string" office:string-value="SIM_MECHANISM_PROPAGATION1_OUT_RAND" calcext:value-type="string">
            <text:p>SIM_MECHANISM_PROPAGATION1_OUT_RAND</text:p>
          </table:table-cell>
          <table:table-cell table:style-name="ce17" table:formula="of:=[$List.G176]" office:value-type="float" office:value="0" calcext:value-type="float">
            <text:p>0</text:p>
          </table:table-cell>
          <table:table-cell table:formula="of:=IF(AND(([.A176]=&quot;coil&quot;);([.C176]=&quot;true&quot;)); 1; &quot;&quot;)">
            <text:p/>
          </table:table-cell>
          <table:table-cell table:formula="of:=IF(AND(([.A176]=&quot;holding reg.&quot;);([.C176] &lt;&gt; 0)); 1; &quot;&quot;)">
            <text:p/>
          </table:table-cell>
          <table:table-cell/>
          <table:table-cell table:formula="of:=IF([.D176]=1; COM.MICROSOFT.CONCAT(&quot;ModbusCoils[coilIndexFromAddress(MODBUS_ADDR_&quot;; [.B176]; &quot;)] = &quot;; [.C176]; &quot;;&quot;); IF([.E176]=1; COM.MICROSOFT.CONCAT(&quot;ModbusHoldingRegisters[holdingIndexFromAddress(MODBUS_ADDR_&quot;; [.B176]; &quot;)] = &quot;; [.C176]; &quot;u;&quot;); &quot;&quot;))">
            <text:p/>
          </table:table-cell>
        </table:table-row>
        <table:table-row table:style-name="ro1">
          <table:table-cell table:style-name="ce17" table:formula="of:=[$List.B177]" office:value-type="float" office:value="0" calcext:value-type="float">
            <text:p>0</text:p>
          </table:table-cell>
          <table:table-cell table:style-name="ce17" table:formula="of:=[$List.I177]">
            <text:p/>
          </table:table-cell>
          <table:table-cell table:style-name="ce17" table:formula="of:=[$List.G177]" office:value-type="float" office:value="0" calcext:value-type="float">
            <text:p>0</text:p>
          </table:table-cell>
          <table:table-cell table:formula="of:=IF(AND(([.A177]=&quot;coil&quot;);([.C177]=&quot;true&quot;)); 1; &quot;&quot;)">
            <text:p/>
          </table:table-cell>
          <table:table-cell table:formula="of:=IF(AND(([.A177]=&quot;holding reg.&quot;);([.C177] &lt;&gt; 0)); 1; &quot;&quot;)">
            <text:p/>
          </table:table-cell>
          <table:table-cell/>
          <table:table-cell table:formula="of:=IF([.D177]=1; COM.MICROSOFT.CONCAT(&quot;ModbusCoils[coilIndexFromAddress(MODBUS_ADDR_&quot;; [.B177]; &quot;)] = &quot;; [.C177]; &quot;;&quot;); IF([.E177]=1; COM.MICROSOFT.CONCAT(&quot;ModbusHoldingRegisters[holdingIndexFromAddress(MODBUS_ADDR_&quot;; [.B177]; &quot;)] = &quot;; [.C177]; &quot;u;&quot;); &quot;&quot;))">
            <text:p/>
          </table:table-cell>
        </table:table-row>
        <table:table-row table:style-name="ro1">
          <table:table-cell table:style-name="ce17" table:formula="of:=[$List.B178]" office:value-type="string" office:string-value="holding reg." calcext:value-type="string">
            <text:p>holding reg.</text:p>
          </table:table-cell>
          <table:table-cell table:style-name="ce17" table:formula="of:=[$List.I178]" office:value-type="string" office:string-value="SIM_MECHANISM_PROPAGATION2_IN" calcext:value-type="string">
            <text:p>SIM_MECHANISM_PROPAGATION2_IN</text:p>
          </table:table-cell>
          <table:table-cell table:style-name="ce17" table:formula="of:=[$List.G178]" office:value-type="float" office:value="300" calcext:value-type="float">
            <text:p>300</text:p>
          </table:table-cell>
          <table:table-cell table:formula="of:=IF(AND(([.A178]=&quot;coil&quot;);([.C178]=&quot;true&quot;)); 1; &quot;&quot;)">
            <text:p/>
          </table:table-cell>
          <table:table-cell table:formula="of:=IF(AND(([.A178]=&quot;holding reg.&quot;);([.C178] &lt;&gt; 0)); 1; &quot;&quot;)" office:value-type="float" office:value="1" calcext:value-type="float">
            <text:p>1</text:p>
          </table:table-cell>
          <table:table-cell/>
          <table:table-cell table:formula="of:=IF([.D178]=1; COM.MICROSOFT.CONCAT(&quot;ModbusCoils[coilIndexFromAddress(MODBUS_ADDR_&quot;; [.B178]; &quot;)] = &quot;; [.C178]; &quot;;&quot;); IF([.E178]=1; COM.MICROSOFT.CONCAT(&quot;ModbusHoldingRegisters[holdingIndexFromAddress(MODBUS_ADDR_&quot;; [.B178]; &quot;)] = &quot;; [.C178]; &quot;u;&quot;); &quot;&quot;))" office:value-type="string" office:string-value="ModbusHoldingRegisters[holdingIndexFromAddress(MODBUS_ADDR_SIM_MECHANISM_PROPAGATION2_IN)] = 300u;" calcext:value-type="string">
            <text:p>ModbusHoldingRegisters[holdingIndexFromAddress(MODBUS_ADDR_SIM_MECHANISM_PROPAGATION2_IN)] = 300u;</text:p>
          </table:table-cell>
        </table:table-row>
        <table:table-row table:style-name="ro1">
          <table:table-cell table:style-name="ce17" table:formula="of:=[$List.B179]" office:value-type="string" office:string-value="holding reg." calcext:value-type="string">
            <text:p>holding reg.</text:p>
          </table:table-cell>
          <table:table-cell table:style-name="ce17" table:formula="of:=[$List.I179]" office:value-type="string" office:string-value="SIM_MECHANISM_PROPAGATION2_IN_RAND" calcext:value-type="string">
            <text:p>SIM_MECHANISM_PROPAGATION2_IN_RAND</text:p>
          </table:table-cell>
          <table:table-cell table:style-name="ce17" table:formula="of:=[$List.G179]" office:value-type="float" office:value="0" calcext:value-type="float">
            <text:p>0</text:p>
          </table:table-cell>
          <table:table-cell table:formula="of:=IF(AND(([.A179]=&quot;coil&quot;);([.C179]=&quot;true&quot;)); 1; &quot;&quot;)">
            <text:p/>
          </table:table-cell>
          <table:table-cell table:formula="of:=IF(AND(([.A179]=&quot;holding reg.&quot;);([.C179] &lt;&gt; 0)); 1; &quot;&quot;)">
            <text:p/>
          </table:table-cell>
          <table:table-cell/>
          <table:table-cell table:formula="of:=IF([.D179]=1; COM.MICROSOFT.CONCAT(&quot;ModbusCoils[coilIndexFromAddress(MODBUS_ADDR_&quot;; [.B179]; &quot;)] = &quot;; [.C179]; &quot;;&quot;); IF([.E179]=1; COM.MICROSOFT.CONCAT(&quot;ModbusHoldingRegisters[holdingIndexFromAddress(MODBUS_ADDR_&quot;; [.B179]; &quot;)] = &quot;; [.C179]; &quot;u;&quot;); &quot;&quot;))">
            <text:p/>
          </table:table-cell>
        </table:table-row>
        <table:table-row table:style-name="ro1">
          <table:table-cell table:style-name="ce17" table:formula="of:=[$List.B180]" office:value-type="string" office:string-value="holding reg." calcext:value-type="string">
            <text:p>holding reg.</text:p>
          </table:table-cell>
          <table:table-cell table:style-name="ce17" table:formula="of:=[$List.I180]" office:value-type="string" office:string-value="SIM_MECHANISM_PROPAGATION2_OUT" calcext:value-type="string">
            <text:p>SIM_MECHANISM_PROPAGATION2_OUT</text:p>
          </table:table-cell>
          <table:table-cell table:style-name="ce17" table:formula="of:=[$List.G180]" office:value-type="float" office:value="100" calcext:value-type="float">
            <text:p>100</text:p>
          </table:table-cell>
          <table:table-cell table:formula="of:=IF(AND(([.A180]=&quot;coil&quot;);([.C180]=&quot;true&quot;)); 1; &quot;&quot;)">
            <text:p/>
          </table:table-cell>
          <table:table-cell table:formula="of:=IF(AND(([.A180]=&quot;holding reg.&quot;);([.C180] &lt;&gt; 0)); 1; &quot;&quot;)" office:value-type="float" office:value="1" calcext:value-type="float">
            <text:p>1</text:p>
          </table:table-cell>
          <table:table-cell/>
          <table:table-cell table:formula="of:=IF([.D180]=1; COM.MICROSOFT.CONCAT(&quot;ModbusCoils[coilIndexFromAddress(MODBUS_ADDR_&quot;; [.B180]; &quot;)] = &quot;; [.C180]; &quot;;&quot;); IF([.E180]=1; COM.MICROSOFT.CONCAT(&quot;ModbusHoldingRegisters[holdingIndexFromAddress(MODBUS_ADDR_&quot;; [.B180]; &quot;)] = &quot;; [.C180]; &quot;u;&quot;); &quot;&quot;))" office:value-type="string" office:string-value="ModbusHoldingRegisters[holdingIndexFromAddress(MODBUS_ADDR_SIM_MECHANISM_PROPAGATION2_OUT)] = 100u;" calcext:value-type="string">
            <text:p>ModbusHoldingRegisters[holdingIndexFromAddress(MODBUS_ADDR_SIM_MECHANISM_PROPAGATION2_OUT)] = 100u;</text:p>
          </table:table-cell>
        </table:table-row>
        <table:table-row table:style-name="ro1">
          <table:table-cell table:style-name="ce17" table:formula="of:=[$List.B181]" office:value-type="string" office:string-value="holding reg." calcext:value-type="string">
            <text:p>holding reg.</text:p>
          </table:table-cell>
          <table:table-cell table:style-name="ce17" table:formula="of:=[$List.I181]" office:value-type="string" office:string-value="SIM_MECHANISM_PROPAGATION2_OUT_RAND" calcext:value-type="string">
            <text:p>SIM_MECHANISM_PROPAGATION2_OUT_RAND</text:p>
          </table:table-cell>
          <table:table-cell table:style-name="ce17" table:formula="of:=[$List.G181]" office:value-type="float" office:value="0" calcext:value-type="float">
            <text:p>0</text:p>
          </table:table-cell>
          <table:table-cell table:formula="of:=IF(AND(([.A181]=&quot;coil&quot;);([.C181]=&quot;true&quot;)); 1; &quot;&quot;)">
            <text:p/>
          </table:table-cell>
          <table:table-cell table:formula="of:=IF(AND(([.A181]=&quot;holding reg.&quot;);([.C181] &lt;&gt; 0)); 1; &quot;&quot;)">
            <text:p/>
          </table:table-cell>
          <table:table-cell/>
          <table:table-cell table:formula="of:=IF([.D181]=1; COM.MICROSOFT.CONCAT(&quot;ModbusCoils[coilIndexFromAddress(MODBUS_ADDR_&quot;; [.B181]; &quot;)] = &quot;; [.C181]; &quot;;&quot;); IF([.E181]=1; COM.MICROSOFT.CONCAT(&quot;ModbusHoldingRegisters[holdingIndexFromAddress(MODBUS_ADDR_&quot;; [.B181]; &quot;)] = &quot;; [.C181]; &quot;u;&quot;); &quot;&quot;))">
            <text:p/>
          </table:table-cell>
        </table:table-row>
        <table:table-row table:style-name="ro1">
          <table:table-cell table:style-name="ce17" table:formula="of:=[$List.B182]" office:value-type="float" office:value="0" calcext:value-type="float">
            <text:p>0</text:p>
          </table:table-cell>
          <table:table-cell table:style-name="ce17" table:formula="of:=[$List.I182]">
            <text:p/>
          </table:table-cell>
          <table:table-cell table:style-name="ce17" table:formula="of:=[$List.G182]" office:value-type="float" office:value="0" calcext:value-type="float">
            <text:p>0</text:p>
          </table:table-cell>
          <table:table-cell table:formula="of:=IF(AND(([.A182]=&quot;coil&quot;);([.C182]=&quot;true&quot;)); 1; &quot;&quot;)">
            <text:p/>
          </table:table-cell>
          <table:table-cell table:formula="of:=IF(AND(([.A182]=&quot;holding reg.&quot;);([.C182] &lt;&gt; 0)); 1; &quot;&quot;)">
            <text:p/>
          </table:table-cell>
          <table:table-cell/>
          <table:table-cell table:formula="of:=IF([.D182]=1; COM.MICROSOFT.CONCAT(&quot;ModbusCoils[coilIndexFromAddress(MODBUS_ADDR_&quot;; [.B182]; &quot;)] = &quot;; [.C182]; &quot;;&quot;); IF([.E182]=1; COM.MICROSOFT.CONCAT(&quot;ModbusHoldingRegisters[holdingIndexFromAddress(MODBUS_ADDR_&quot;; [.B182]; &quot;)] = &quot;; [.C182]; &quot;u;&quot;); &quot;&quot;))">
            <text:p/>
          </table:table-cell>
        </table:table-row>
        <table:table-row table:style-name="ro1">
          <table:table-cell table:style-name="ce17" table:formula="of:=[$List.B183]" office:value-type="string" office:string-value="holding reg." calcext:value-type="string">
            <text:p>holding reg.</text:p>
          </table:table-cell>
          <table:table-cell table:style-name="ce17" table:formula="of:=[$List.I183]" office:value-type="string" office:string-value="SIM_MECHANISM_PROPAGATION3_IN" calcext:value-type="string">
            <text:p>SIM_MECHANISM_PROPAGATION3_IN</text:p>
          </table:table-cell>
          <table:table-cell table:style-name="ce17" table:formula="of:=[$List.G183]" office:value-type="float" office:value="1500" calcext:value-type="float">
            <text:p>1500</text:p>
          </table:table-cell>
          <table:table-cell table:formula="of:=IF(AND(([.A183]=&quot;coil&quot;);([.C183]=&quot;true&quot;)); 1; &quot;&quot;)">
            <text:p/>
          </table:table-cell>
          <table:table-cell table:formula="of:=IF(AND(([.A183]=&quot;holding reg.&quot;);([.C183] &lt;&gt; 0)); 1; &quot;&quot;)" office:value-type="float" office:value="1" calcext:value-type="float">
            <text:p>1</text:p>
          </table:table-cell>
          <table:table-cell/>
          <table:table-cell table:formula="of:=IF([.D183]=1; COM.MICROSOFT.CONCAT(&quot;ModbusCoils[coilIndexFromAddress(MODBUS_ADDR_&quot;; [.B183]; &quot;)] = &quot;; [.C183]; &quot;;&quot;); IF([.E183]=1; COM.MICROSOFT.CONCAT(&quot;ModbusHoldingRegisters[holdingIndexFromAddress(MODBUS_ADDR_&quot;; [.B183]; &quot;)] = &quot;; [.C183]; &quot;u;&quot;); &quot;&quot;))" office:value-type="string" office:string-value="ModbusHoldingRegisters[holdingIndexFromAddress(MODBUS_ADDR_SIM_MECHANISM_PROPAGATION3_IN)] = 1500u;" calcext:value-type="string">
            <text:p>ModbusHoldingRegisters[holdingIndexFromAddress(MODBUS_ADDR_SIM_MECHANISM_PROPAGATION3_IN)] = 1500u;</text:p>
          </table:table-cell>
        </table:table-row>
        <table:table-row table:style-name="ro1">
          <table:table-cell table:style-name="ce17" table:formula="of:=[$List.B184]" office:value-type="string" office:string-value="holding reg." calcext:value-type="string">
            <text:p>holding reg.</text:p>
          </table:table-cell>
          <table:table-cell table:style-name="ce17" table:formula="of:=[$List.I184]" office:value-type="string" office:string-value="SIM_MECHANISM_PROPAGATION3_IN_RAND" calcext:value-type="string">
            <text:p>SIM_MECHANISM_PROPAGATION3_IN_RAND</text:p>
          </table:table-cell>
          <table:table-cell table:style-name="ce17" table:formula="of:=[$List.G184]" office:value-type="float" office:value="0" calcext:value-type="float">
            <text:p>0</text:p>
          </table:table-cell>
          <table:table-cell table:formula="of:=IF(AND(([.A184]=&quot;coil&quot;);([.C184]=&quot;true&quot;)); 1; &quot;&quot;)">
            <text:p/>
          </table:table-cell>
          <table:table-cell table:formula="of:=IF(AND(([.A184]=&quot;holding reg.&quot;);([.C184] &lt;&gt; 0)); 1; &quot;&quot;)">
            <text:p/>
          </table:table-cell>
          <table:table-cell/>
          <table:table-cell table:formula="of:=IF([.D184]=1; COM.MICROSOFT.CONCAT(&quot;ModbusCoils[coilIndexFromAddress(MODBUS_ADDR_&quot;; [.B184]; &quot;)] = &quot;; [.C184]; &quot;;&quot;); IF([.E184]=1; COM.MICROSOFT.CONCAT(&quot;ModbusHoldingRegisters[holdingIndexFromAddress(MODBUS_ADDR_&quot;; [.B184]; &quot;)] = &quot;; [.C184]; &quot;u;&quot;); &quot;&quot;))">
            <text:p/>
          </table:table-cell>
        </table:table-row>
        <table:table-row table:style-name="ro1">
          <table:table-cell table:style-name="ce17" table:formula="of:=[$List.B185]" office:value-type="string" office:string-value="holding reg." calcext:value-type="string">
            <text:p>holding reg.</text:p>
          </table:table-cell>
          <table:table-cell table:style-name="ce17" table:formula="of:=[$List.I185]" office:value-type="string" office:string-value="SIM_MECHANISM_PROPAGATION3_OUT" calcext:value-type="string">
            <text:p>SIM_MECHANISM_PROPAGATION3_OUT</text:p>
          </table:table-cell>
          <table:table-cell table:style-name="ce17" table:formula="of:=[$List.G185]" office:value-type="float" office:value="2000" calcext:value-type="float">
            <text:p>2000</text:p>
          </table:table-cell>
          <table:table-cell table:formula="of:=IF(AND(([.A185]=&quot;coil&quot;);([.C185]=&quot;true&quot;)); 1; &quot;&quot;)">
            <text:p/>
          </table:table-cell>
          <table:table-cell table:formula="of:=IF(AND(([.A185]=&quot;holding reg.&quot;);([.C185] &lt;&gt; 0)); 1; &quot;&quot;)" office:value-type="float" office:value="1" calcext:value-type="float">
            <text:p>1</text:p>
          </table:table-cell>
          <table:table-cell/>
          <table:table-cell table:formula="of:=IF([.D185]=1; COM.MICROSOFT.CONCAT(&quot;ModbusCoils[coilIndexFromAddress(MODBUS_ADDR_&quot;; [.B185]; &quot;)] = &quot;; [.C185]; &quot;;&quot;); IF([.E185]=1; COM.MICROSOFT.CONCAT(&quot;ModbusHoldingRegisters[holdingIndexFromAddress(MODBUS_ADDR_&quot;; [.B185]; &quot;)] = &quot;; [.C185]; &quot;u;&quot;); &quot;&quot;))" office:value-type="string" office:string-value="ModbusHoldingRegisters[holdingIndexFromAddress(MODBUS_ADDR_SIM_MECHANISM_PROPAGATION3_OUT)] = 2000u;" calcext:value-type="string">
            <text:p>ModbusHoldingRegisters[holdingIndexFromAddress(MODBUS_ADDR_SIM_MECHANISM_PROPAGATION3_OUT)] = 2000u;</text:p>
          </table:table-cell>
        </table:table-row>
        <table:table-row table:style-name="ro1">
          <table:table-cell table:style-name="ce17" table:formula="of:=[$List.B186]" office:value-type="string" office:string-value="holding reg." calcext:value-type="string">
            <text:p>holding reg.</text:p>
          </table:table-cell>
          <table:table-cell table:style-name="ce17" table:formula="of:=[$List.I186]" office:value-type="string" office:string-value="SIM_MECHANISM_PROPAGATION3_OUT_RAND" calcext:value-type="string">
            <text:p>SIM_MECHANISM_PROPAGATION3_OUT_RAND</text:p>
          </table:table-cell>
          <table:table-cell table:style-name="ce17" table:formula="of:=[$List.G186]" office:value-type="float" office:value="0" calcext:value-type="float">
            <text:p>0</text:p>
          </table:table-cell>
          <table:table-cell table:formula="of:=IF(AND(([.A186]=&quot;coil&quot;);([.C186]=&quot;true&quot;)); 1; &quot;&quot;)">
            <text:p/>
          </table:table-cell>
          <table:table-cell table:formula="of:=IF(AND(([.A186]=&quot;holding reg.&quot;);([.C186] &lt;&gt; 0)); 1; &quot;&quot;)">
            <text:p/>
          </table:table-cell>
          <table:table-cell/>
          <table:table-cell table:formula="of:=IF([.D186]=1; COM.MICROSOFT.CONCAT(&quot;ModbusCoils[coilIndexFromAddress(MODBUS_ADDR_&quot;; [.B186]; &quot;)] = &quot;; [.C186]; &quot;;&quot;); IF([.E186]=1; COM.MICROSOFT.CONCAT(&quot;ModbusHoldingRegisters[holdingIndexFromAddress(MODBUS_ADDR_&quot;; [.B186]; &quot;)] = &quot;; [.C186]; &quot;u;&quot;); &quot;&quot;))">
            <text:p/>
          </table:table-cell>
        </table:table-row>
        <table:table-row table:style-name="ro1">
          <table:table-cell table:style-name="ce17" table:formula="of:=[$List.B187]" office:value-type="string" office:string-value="holding reg." calcext:value-type="string">
            <text:p>holding reg.</text:p>
          </table:table-cell>
          <table:table-cell table:style-name="ce17" table:formula="of:=[$List.I187]" office:value-type="string" office:string-value="SIM_MECHANISM3_INERTIAL_MOTION" calcext:value-type="string">
            <text:p>SIM_MECHANISM3_INERTIAL_MOTION</text:p>
          </table:table-cell>
          <table:table-cell table:style-name="ce17" table:formula="of:=[$List.G187]" office:value-type="float" office:value="70" calcext:value-type="float">
            <text:p>70</text:p>
          </table:table-cell>
          <table:table-cell table:formula="of:=IF(AND(([.A187]=&quot;coil&quot;);([.C187]=&quot;true&quot;)); 1; &quot;&quot;)">
            <text:p/>
          </table:table-cell>
          <table:table-cell table:formula="of:=IF(AND(([.A187]=&quot;holding reg.&quot;);([.C187] &lt;&gt; 0)); 1; &quot;&quot;)" office:value-type="float" office:value="1" calcext:value-type="float">
            <text:p>1</text:p>
          </table:table-cell>
          <table:table-cell/>
          <table:table-cell table:formula="of:=IF([.D187]=1; COM.MICROSOFT.CONCAT(&quot;ModbusCoils[coilIndexFromAddress(MODBUS_ADDR_&quot;; [.B187]; &quot;)] = &quot;; [.C187]; &quot;;&quot;); IF([.E187]=1; COM.MICROSOFT.CONCAT(&quot;ModbusHoldingRegisters[holdingIndexFromAddress(MODBUS_ADDR_&quot;; [.B187]; &quot;)] = &quot;; [.C187]; &quot;u;&quot;); &quot;&quot;))" office:value-type="string" office:string-value="ModbusHoldingRegisters[holdingIndexFromAddress(MODBUS_ADDR_SIM_MECHANISM3_INERTIAL_MOTION)] = 70u;" calcext:value-type="string">
            <text:p>ModbusHoldingRegisters[holdingIndexFromAddress(MODBUS_ADDR_SIM_MECHANISM3_INERTIAL_MOTION)] = 70u;</text:p>
          </table:table-cell>
        </table:table-row>
        <table:table-row table:style-name="ro1">
          <table:table-cell table:style-name="ce17" table:formula="of:=[$List.B188]" office:value-type="string" office:string-value="holding reg." calcext:value-type="string">
            <text:p>holding reg.</text:p>
          </table:table-cell>
          <table:table-cell table:style-name="ce17" table:formula="of:=[$List.I188]" office:value-type="string" office:string-value="SIM_MECHANISM3_BRAKED_MOTION" calcext:value-type="string">
            <text:p>SIM_MECHANISM3_BRAKED_MOTION</text:p>
          </table:table-cell>
          <table:table-cell table:style-name="ce17" table:formula="of:=[$List.G188]" office:value-type="float" office:value="7" calcext:value-type="float">
            <text:p>7</text:p>
          </table:table-cell>
          <table:table-cell table:formula="of:=IF(AND(([.A188]=&quot;coil&quot;);([.C188]=&quot;true&quot;)); 1; &quot;&quot;)">
            <text:p/>
          </table:table-cell>
          <table:table-cell table:formula="of:=IF(AND(([.A188]=&quot;holding reg.&quot;);([.C188] &lt;&gt; 0)); 1; &quot;&quot;)" office:value-type="float" office:value="1" calcext:value-type="float">
            <text:p>1</text:p>
          </table:table-cell>
          <table:table-cell/>
          <table:table-cell table:formula="of:=IF([.D188]=1; COM.MICROSOFT.CONCAT(&quot;ModbusCoils[coilIndexFromAddress(MODBUS_ADDR_&quot;; [.B188]; &quot;)] = &quot;; [.C188]; &quot;;&quot;); IF([.E188]=1; COM.MICROSOFT.CONCAT(&quot;ModbusHoldingRegisters[holdingIndexFromAddress(MODBUS_ADDR_&quot;; [.B188]; &quot;)] = &quot;; [.C188]; &quot;u;&quot;); &quot;&quot;))" office:value-type="string" office:string-value="ModbusHoldingRegisters[holdingIndexFromAddress(MODBUS_ADDR_SIM_MECHANISM3_BRAKED_MOTION)] = 7u;" calcext:value-type="string">
            <text:p>ModbusHoldingRegisters[holdingIndexFromAddress(MODBUS_ADDR_SIM_MECHANISM3_BRAKED_MOTION)] = 7u;</text:p>
          </table:table-cell>
        </table:table-row>
        <table:table-row table:style-name="ro1">
          <table:table-cell table:style-name="ce17" table:formula="of:=[$List.B189]" office:value-type="float" office:value="0" calcext:value-type="float">
            <text:p>0</text:p>
          </table:table-cell>
          <table:table-cell table:style-name="ce17" table:formula="of:=[$List.I189]" office:value-type="float" office:value="0" calcext:value-type="float">
            <text:p>0</text:p>
          </table:table-cell>
          <table:table-cell table:style-name="ce17" table:formula="of:=[$List.G189]" office:value-type="float" office:value="0" calcext:value-type="float">
            <text:p>0</text:p>
          </table:table-cell>
          <table:table-cell table:formula="of:=IF(AND(([.A189]=&quot;coil&quot;);([.C189]=&quot;true&quot;)); 1; &quot;&quot;)">
            <text:p/>
          </table:table-cell>
          <table:table-cell table:formula="of:=IF(AND(([.A189]=&quot;holding reg.&quot;);([.C189] &lt;&gt; 0)); 1; &quot;&quot;)">
            <text:p/>
          </table:table-cell>
          <table:table-cell/>
          <table:table-cell table:formula="of:=IF([.D189]=1; COM.MICROSOFT.CONCAT(&quot;ModbusCoils[coilIndexFromAddress(MODBUS_ADDR_&quot;; [.B189]; &quot;)] = &quot;; [.C189]; &quot;;&quot;); IF([.E189]=1; COM.MICROSOFT.CONCAT(&quot;ModbusHoldingRegisters[holdingIndexFromAddress(MODBUS_ADDR_&quot;; [.B189]; &quot;)] = &quot;; [.C189]; &quot;u;&quot;); &quot;&quot;))">
            <text:p/>
          </table:table-cell>
        </table:table-row>
        <table:table-row table:style-name="ro1">
          <table:table-cell table:style-name="ce17" table:formula="of:=[$List.B190]" office:value-type="string" office:string-value="holding reg." calcext:value-type="string">
            <text:p>holding reg.</text:p>
          </table:table-cell>
          <table:table-cell table:style-name="ce17" table:formula="of:=[$List.I190]" office:value-type="string" office:string-value="SIM_AMPLIFIER_CUP1_ELECTRODE1" calcext:value-type="string">
            <text:p>SIM_AMPLIFIER_CUP1_ELECTRODE1</text:p>
          </table:table-cell>
          <table:table-cell table:style-name="ce17" table:formula="of:=[$List.G190]" office:value-type="float" office:value="0" calcext:value-type="float">
            <text:p>0</text:p>
          </table:table-cell>
          <table:table-cell table:formula="of:=IF(AND(([.A190]=&quot;coil&quot;);([.C190]=&quot;true&quot;)); 1; &quot;&quot;)">
            <text:p/>
          </table:table-cell>
          <table:table-cell table:formula="of:=IF(AND(([.A190]=&quot;holding reg.&quot;);([.C190] &lt;&gt; 0)); 1; &quot;&quot;)">
            <text:p/>
          </table:table-cell>
          <table:table-cell/>
          <table:table-cell table:formula="of:=IF([.D190]=1; COM.MICROSOFT.CONCAT(&quot;ModbusCoils[coilIndexFromAddress(MODBUS_ADDR_&quot;; [.B190]; &quot;)] = &quot;; [.C190]; &quot;;&quot;); IF([.E190]=1; COM.MICROSOFT.CONCAT(&quot;ModbusHoldingRegisters[holdingIndexFromAddress(MODBUS_ADDR_&quot;; [.B190]; &quot;)] = &quot;; [.C190]; &quot;u;&quot;); &quot;&quot;))">
            <text:p/>
          </table:table-cell>
        </table:table-row>
        <table:table-row table:style-name="ro1">
          <table:table-cell table:style-name="ce17" table:formula="of:=[$List.B191]" office:value-type="string" office:string-value="holding reg." calcext:value-type="string">
            <text:p>holding reg.</text:p>
          </table:table-cell>
          <table:table-cell table:style-name="ce17" table:formula="of:=[$List.I191]" office:value-type="string" office:string-value="SIM_AMPLIFIER_CUP1_ELECTRODE2" calcext:value-type="string">
            <text:p>SIM_AMPLIFIER_CUP1_ELECTRODE2</text:p>
          </table:table-cell>
          <table:table-cell table:style-name="ce17" table:formula="of:=[$List.G191]" office:value-type="float" office:value="0" calcext:value-type="float">
            <text:p>0</text:p>
          </table:table-cell>
          <table:table-cell table:formula="of:=IF(AND(([.A191]=&quot;coil&quot;);([.C191]=&quot;true&quot;)); 1; &quot;&quot;)">
            <text:p/>
          </table:table-cell>
          <table:table-cell table:formula="of:=IF(AND(([.A191]=&quot;holding reg.&quot;);([.C191] &lt;&gt; 0)); 1; &quot;&quot;)">
            <text:p/>
          </table:table-cell>
          <table:table-cell/>
          <table:table-cell table:formula="of:=IF([.D191]=1; COM.MICROSOFT.CONCAT(&quot;ModbusCoils[coilIndexFromAddress(MODBUS_ADDR_&quot;; [.B191]; &quot;)] = &quot;; [.C191]; &quot;;&quot;); IF([.E191]=1; COM.MICROSOFT.CONCAT(&quot;ModbusHoldingRegisters[holdingIndexFromAddress(MODBUS_ADDR_&quot;; [.B191]; &quot;)] = &quot;; [.C191]; &quot;u;&quot;); &quot;&quot;))">
            <text:p/>
          </table:table-cell>
        </table:table-row>
        <table:table-row table:style-name="ro1">
          <table:table-cell table:style-name="ce17" table:formula="of:=[$List.B192]" office:value-type="string" office:string-value="holding reg." calcext:value-type="string">
            <text:p>holding reg.</text:p>
          </table:table-cell>
          <table:table-cell table:style-name="ce17" table:formula="of:=[$List.I192]" office:value-type="string" office:string-value="SIM_AMPLIFIER_CUP1_ELECTRODE3" calcext:value-type="string">
            <text:p>SIM_AMPLIFIER_CUP1_ELECTRODE3</text:p>
          </table:table-cell>
          <table:table-cell table:style-name="ce17" table:formula="of:=[$List.G192]" office:value-type="float" office:value="0" calcext:value-type="float">
            <text:p>0</text:p>
          </table:table-cell>
          <table:table-cell table:formula="of:=IF(AND(([.A192]=&quot;coil&quot;);([.C192]=&quot;true&quot;)); 1; &quot;&quot;)">
            <text:p/>
          </table:table-cell>
          <table:table-cell table:formula="of:=IF(AND(([.A192]=&quot;holding reg.&quot;);([.C192] &lt;&gt; 0)); 1; &quot;&quot;)">
            <text:p/>
          </table:table-cell>
          <table:table-cell/>
          <table:table-cell table:formula="of:=IF([.D192]=1; COM.MICROSOFT.CONCAT(&quot;ModbusCoils[coilIndexFromAddress(MODBUS_ADDR_&quot;; [.B192]; &quot;)] = &quot;; [.C192]; &quot;;&quot;); IF([.E192]=1; COM.MICROSOFT.CONCAT(&quot;ModbusHoldingRegisters[holdingIndexFromAddress(MODBUS_ADDR_&quot;; [.B192]; &quot;)] = &quot;; [.C192]; &quot;u;&quot;); &quot;&quot;))">
            <text:p/>
          </table:table-cell>
        </table:table-row>
        <table:table-row table:style-name="ro1">
          <table:table-cell table:style-name="ce17" table:formula="of:=[$List.B193]" office:value-type="string" office:string-value="holding reg." calcext:value-type="string">
            <text:p>holding reg.</text:p>
          </table:table-cell>
          <table:table-cell table:style-name="ce17" table:formula="of:=[$List.I193]" office:value-type="string" office:string-value="SIM_AMPLIFIER_CUP1_ELECTRODE4" calcext:value-type="string">
            <text:p>SIM_AMPLIFIER_CUP1_ELECTRODE4</text:p>
          </table:table-cell>
          <table:table-cell table:style-name="ce17" table:formula="of:=[$List.G193]" office:value-type="float" office:value="0" calcext:value-type="float">
            <text:p>0</text:p>
          </table:table-cell>
          <table:table-cell table:formula="of:=IF(AND(([.A193]=&quot;coil&quot;);([.C193]=&quot;true&quot;)); 1; &quot;&quot;)">
            <text:p/>
          </table:table-cell>
          <table:table-cell table:formula="of:=IF(AND(([.A193]=&quot;holding reg.&quot;);([.C193] &lt;&gt; 0)); 1; &quot;&quot;)">
            <text:p/>
          </table:table-cell>
          <table:table-cell/>
          <table:table-cell table:formula="of:=IF([.D193]=1; COM.MICROSOFT.CONCAT(&quot;ModbusCoils[coilIndexFromAddress(MODBUS_ADDR_&quot;; [.B193]; &quot;)] = &quot;; [.C193]; &quot;;&quot;); IF([.E193]=1; COM.MICROSOFT.CONCAT(&quot;ModbusHoldingRegisters[holdingIndexFromAddress(MODBUS_ADDR_&quot;; [.B193]; &quot;)] = &quot;; [.C193]; &quot;u;&quot;); &quot;&quot;))">
            <text:p/>
          </table:table-cell>
        </table:table-row>
        <table:table-row table:style-name="ro1">
          <table:table-cell table:style-name="ce17" table:formula="of:=[$List.B194]" office:value-type="string" office:string-value="holding reg." calcext:value-type="string">
            <text:p>holding reg.</text:p>
          </table:table-cell>
          <table:table-cell table:style-name="ce17" table:formula="of:=[$List.I194]" office:value-type="string" office:string-value="SIM_AMPLIFIER_CUP2_ELECTRODE1" calcext:value-type="string">
            <text:p>SIM_AMPLIFIER_CUP2_ELECTRODE1</text:p>
          </table:table-cell>
          <table:table-cell table:style-name="ce17" table:formula="of:=[$List.G194]" office:value-type="float" office:value="0" calcext:value-type="float">
            <text:p>0</text:p>
          </table:table-cell>
          <table:table-cell table:formula="of:=IF(AND(([.A194]=&quot;coil&quot;);([.C194]=&quot;true&quot;)); 1; &quot;&quot;)">
            <text:p/>
          </table:table-cell>
          <table:table-cell table:formula="of:=IF(AND(([.A194]=&quot;holding reg.&quot;);([.C194] &lt;&gt; 0)); 1; &quot;&quot;)">
            <text:p/>
          </table:table-cell>
          <table:table-cell/>
          <table:table-cell table:formula="of:=IF([.D194]=1; COM.MICROSOFT.CONCAT(&quot;ModbusCoils[coilIndexFromAddress(MODBUS_ADDR_&quot;; [.B194]; &quot;)] = &quot;; [.C194]; &quot;;&quot;); IF([.E194]=1; COM.MICROSOFT.CONCAT(&quot;ModbusHoldingRegisters[holdingIndexFromAddress(MODBUS_ADDR_&quot;; [.B194]; &quot;)] = &quot;; [.C194]; &quot;u;&quot;); &quot;&quot;))">
            <text:p/>
          </table:table-cell>
        </table:table-row>
        <table:table-row table:style-name="ro1">
          <table:table-cell table:style-name="ce17" table:formula="of:=[$List.B195]" office:value-type="string" office:string-value="holding reg." calcext:value-type="string">
            <text:p>holding reg.</text:p>
          </table:table-cell>
          <table:table-cell table:style-name="ce17" table:formula="of:=[$List.I195]" office:value-type="string" office:string-value="SIM_AMPLIFIER_CUP2_ELECTRODE2" calcext:value-type="string">
            <text:p>SIM_AMPLIFIER_CUP2_ELECTRODE2</text:p>
          </table:table-cell>
          <table:table-cell table:style-name="ce17" table:formula="of:=[$List.G195]" office:value-type="float" office:value="0" calcext:value-type="float">
            <text:p>0</text:p>
          </table:table-cell>
          <table:table-cell table:formula="of:=IF(AND(([.A195]=&quot;coil&quot;);([.C195]=&quot;true&quot;)); 1; &quot;&quot;)">
            <text:p/>
          </table:table-cell>
          <table:table-cell table:formula="of:=IF(AND(([.A195]=&quot;holding reg.&quot;);([.C195] &lt;&gt; 0)); 1; &quot;&quot;)">
            <text:p/>
          </table:table-cell>
          <table:table-cell/>
          <table:table-cell table:formula="of:=IF([.D195]=1; COM.MICROSOFT.CONCAT(&quot;ModbusCoils[coilIndexFromAddress(MODBUS_ADDR_&quot;; [.B195]; &quot;)] = &quot;; [.C195]; &quot;;&quot;); IF([.E195]=1; COM.MICROSOFT.CONCAT(&quot;ModbusHoldingRegisters[holdingIndexFromAddress(MODBUS_ADDR_&quot;; [.B195]; &quot;)] = &quot;; [.C195]; &quot;u;&quot;); &quot;&quot;))">
            <text:p/>
          </table:table-cell>
        </table:table-row>
        <table:table-row table:style-name="ro1">
          <table:table-cell table:style-name="ce17" table:formula="of:=[$List.B196]" office:value-type="string" office:string-value="holding reg." calcext:value-type="string">
            <text:p>holding reg.</text:p>
          </table:table-cell>
          <table:table-cell table:style-name="ce17" table:formula="of:=[$List.I196]" office:value-type="string" office:string-value="SIM_AMPLIFIER_CUP2_ELECTRODE3" calcext:value-type="string">
            <text:p>SIM_AMPLIFIER_CUP2_ELECTRODE3</text:p>
          </table:table-cell>
          <table:table-cell table:style-name="ce17" table:formula="of:=[$List.G196]" office:value-type="float" office:value="0" calcext:value-type="float">
            <text:p>0</text:p>
          </table:table-cell>
          <table:table-cell table:formula="of:=IF(AND(([.A196]=&quot;coil&quot;);([.C196]=&quot;true&quot;)); 1; &quot;&quot;)">
            <text:p/>
          </table:table-cell>
          <table:table-cell table:formula="of:=IF(AND(([.A196]=&quot;holding reg.&quot;);([.C196] &lt;&gt; 0)); 1; &quot;&quot;)">
            <text:p/>
          </table:table-cell>
          <table:table-cell/>
          <table:table-cell table:formula="of:=IF([.D196]=1; COM.MICROSOFT.CONCAT(&quot;ModbusCoils[coilIndexFromAddress(MODBUS_ADDR_&quot;; [.B196]; &quot;)] = &quot;; [.C196]; &quot;;&quot;); IF([.E196]=1; COM.MICROSOFT.CONCAT(&quot;ModbusHoldingRegisters[holdingIndexFromAddress(MODBUS_ADDR_&quot;; [.B196]; &quot;)] = &quot;; [.C196]; &quot;u;&quot;); &quot;&quot;))">
            <text:p/>
          </table:table-cell>
        </table:table-row>
        <table:table-row table:style-name="ro1">
          <table:table-cell table:style-name="ce17" table:formula="of:=[$List.B197]" office:value-type="string" office:string-value="holding reg." calcext:value-type="string">
            <text:p>holding reg.</text:p>
          </table:table-cell>
          <table:table-cell table:style-name="ce17" table:formula="of:=[$List.I197]" office:value-type="string" office:string-value="SIM_AMPLIFIER_CUP2_ELECTRODE4" calcext:value-type="string">
            <text:p>SIM_AMPLIFIER_CUP2_ELECTRODE4</text:p>
          </table:table-cell>
          <table:table-cell table:style-name="ce17" table:formula="of:=[$List.G197]" office:value-type="float" office:value="0" calcext:value-type="float">
            <text:p>0</text:p>
          </table:table-cell>
          <table:table-cell table:formula="of:=IF(AND(([.A197]=&quot;coil&quot;);([.C197]=&quot;true&quot;)); 1; &quot;&quot;)">
            <text:p/>
          </table:table-cell>
          <table:table-cell table:formula="of:=IF(AND(([.A197]=&quot;holding reg.&quot;);([.C197] &lt;&gt; 0)); 1; &quot;&quot;)">
            <text:p/>
          </table:table-cell>
          <table:table-cell/>
          <table:table-cell table:formula="of:=IF([.D197]=1; COM.MICROSOFT.CONCAT(&quot;ModbusCoils[coilIndexFromAddress(MODBUS_ADDR_&quot;; [.B197]; &quot;)] = &quot;; [.C197]; &quot;;&quot;); IF([.E197]=1; COM.MICROSOFT.CONCAT(&quot;ModbusHoldingRegisters[holdingIndexFromAddress(MODBUS_ADDR_&quot;; [.B197]; &quot;)] = &quot;; [.C197]; &quot;u;&quot;); &quot;&quot;))">
            <text:p/>
          </table:table-cell>
        </table:table-row>
        <table:table-row table:style-name="ro1">
          <table:table-cell table:style-name="ce17" table:formula="of:=[$List.B198]" office:value-type="string" office:string-value="holding reg." calcext:value-type="string">
            <text:p>holding reg.</text:p>
          </table:table-cell>
          <table:table-cell table:style-name="ce17" table:formula="of:=[$List.I198]" office:value-type="string" office:string-value="SIM_AMPLIFIER_CUP3_ELECTRODE1" calcext:value-type="string">
            <text:p>SIM_AMPLIFIER_CUP3_ELECTRODE1</text:p>
          </table:table-cell>
          <table:table-cell table:style-name="ce17" table:formula="of:=[$List.G198]" office:value-type="float" office:value="0" calcext:value-type="float">
            <text:p>0</text:p>
          </table:table-cell>
          <table:table-cell table:formula="of:=IF(AND(([.A198]=&quot;coil&quot;);([.C198]=&quot;true&quot;)); 1; &quot;&quot;)">
            <text:p/>
          </table:table-cell>
          <table:table-cell table:formula="of:=IF(AND(([.A198]=&quot;holding reg.&quot;);([.C198] &lt;&gt; 0)); 1; &quot;&quot;)">
            <text:p/>
          </table:table-cell>
          <table:table-cell/>
          <table:table-cell table:formula="of:=IF([.D198]=1; COM.MICROSOFT.CONCAT(&quot;ModbusCoils[coilIndexFromAddress(MODBUS_ADDR_&quot;; [.B198]; &quot;)] = &quot;; [.C198]; &quot;;&quot;); IF([.E198]=1; COM.MICROSOFT.CONCAT(&quot;ModbusHoldingRegisters[holdingIndexFromAddress(MODBUS_ADDR_&quot;; [.B198]; &quot;)] = &quot;; [.C198]; &quot;u;&quot;); &quot;&quot;))">
            <text:p/>
          </table:table-cell>
        </table:table-row>
        <table:table-row table:style-name="ro1">
          <table:table-cell table:style-name="ce17" table:formula="of:=[$List.B199]" office:value-type="string" office:string-value="holding reg." calcext:value-type="string">
            <text:p>holding reg.</text:p>
          </table:table-cell>
          <table:table-cell table:style-name="ce17" table:formula="of:=[$List.I199]" office:value-type="string" office:string-value="SIM_AMPLIFIER_CUP3_ELECTRODE2" calcext:value-type="string">
            <text:p>SIM_AMPLIFIER_CUP3_ELECTRODE2</text:p>
          </table:table-cell>
          <table:table-cell table:style-name="ce17" table:formula="of:=[$List.G199]" office:value-type="float" office:value="0" calcext:value-type="float">
            <text:p>0</text:p>
          </table:table-cell>
          <table:table-cell table:formula="of:=IF(AND(([.A199]=&quot;coil&quot;);([.C199]=&quot;true&quot;)); 1; &quot;&quot;)">
            <text:p/>
          </table:table-cell>
          <table:table-cell table:formula="of:=IF(AND(([.A199]=&quot;holding reg.&quot;);([.C199] &lt;&gt; 0)); 1; &quot;&quot;)">
            <text:p/>
          </table:table-cell>
          <table:table-cell/>
          <table:table-cell table:formula="of:=IF([.D199]=1; COM.MICROSOFT.CONCAT(&quot;ModbusCoils[coilIndexFromAddress(MODBUS_ADDR_&quot;; [.B199]; &quot;)] = &quot;; [.C199]; &quot;;&quot;); IF([.E199]=1; COM.MICROSOFT.CONCAT(&quot;ModbusHoldingRegisters[holdingIndexFromAddress(MODBUS_ADDR_&quot;; [.B199]; &quot;)] = &quot;; [.C199]; &quot;u;&quot;); &quot;&quot;))">
            <text:p/>
          </table:table-cell>
        </table:table-row>
        <table:table-row table:style-name="ro1">
          <table:table-cell table:style-name="ce17" table:formula="of:=[$List.B200]" office:value-type="string" office:string-value="holding reg." calcext:value-type="string">
            <text:p>holding reg.</text:p>
          </table:table-cell>
          <table:table-cell table:style-name="ce17" table:formula="of:=[$List.I200]" office:value-type="string" office:string-value="SIM_AMPLIFIER_CUP3_ELECTRODE3" calcext:value-type="string">
            <text:p>SIM_AMPLIFIER_CUP3_ELECTRODE3</text:p>
          </table:table-cell>
          <table:table-cell table:style-name="ce17" table:formula="of:=[$List.G200]" office:value-type="float" office:value="0" calcext:value-type="float">
            <text:p>0</text:p>
          </table:table-cell>
          <table:table-cell table:formula="of:=IF(AND(([.A200]=&quot;coil&quot;);([.C200]=&quot;true&quot;)); 1; &quot;&quot;)">
            <text:p/>
          </table:table-cell>
          <table:table-cell table:formula="of:=IF(AND(([.A200]=&quot;holding reg.&quot;);([.C200] &lt;&gt; 0)); 1; &quot;&quot;)">
            <text:p/>
          </table:table-cell>
          <table:table-cell/>
          <table:table-cell table:formula="of:=IF([.D200]=1; COM.MICROSOFT.CONCAT(&quot;ModbusCoils[coilIndexFromAddress(MODBUS_ADDR_&quot;; [.B200]; &quot;)] = &quot;; [.C200]; &quot;;&quot;); IF([.E200]=1; COM.MICROSOFT.CONCAT(&quot;ModbusHoldingRegisters[holdingIndexFromAddress(MODBUS_ADDR_&quot;; [.B200]; &quot;)] = &quot;; [.C200]; &quot;u;&quot;); &quot;&quot;))">
            <text:p/>
          </table:table-cell>
        </table:table-row>
        <table:table-row table:style-name="ro1">
          <table:table-cell table:style-name="ce17" table:formula="of:=[$List.B201]" office:value-type="string" office:string-value="holding reg." calcext:value-type="string">
            <text:p>holding reg.</text:p>
          </table:table-cell>
          <table:table-cell table:style-name="ce17" table:formula="of:=[$List.I201]" office:value-type="string" office:string-value="SIM_AMPLIFIER_CUP3_ELECTRODE4" calcext:value-type="string">
            <text:p>SIM_AMPLIFIER_CUP3_ELECTRODE4</text:p>
          </table:table-cell>
          <table:table-cell table:style-name="ce17" table:formula="of:=[$List.G201]" office:value-type="float" office:value="0" calcext:value-type="float">
            <text:p>0</text:p>
          </table:table-cell>
          <table:table-cell table:formula="of:=IF(AND(([.A201]=&quot;coil&quot;);([.C201]=&quot;true&quot;)); 1; &quot;&quot;)">
            <text:p/>
          </table:table-cell>
          <table:table-cell table:formula="of:=IF(AND(([.A201]=&quot;holding reg.&quot;);([.C201] &lt;&gt; 0)); 1; &quot;&quot;)">
            <text:p/>
          </table:table-cell>
          <table:table-cell/>
          <table:table-cell table:formula="of:=IF([.D201]=1; COM.MICROSOFT.CONCAT(&quot;ModbusCoils[coilIndexFromAddress(MODBUS_ADDR_&quot;; [.B201]; &quot;)] = &quot;; [.C201]; &quot;;&quot;); IF([.E201]=1; COM.MICROSOFT.CONCAT(&quot;ModbusHoldingRegisters[holdingIndexFromAddress(MODBUS_ADDR_&quot;; [.B201]; &quot;)] = &quot;; [.C201]; &quot;u;&quot;); &quot;&quot;))">
            <text:p/>
          </table:table-cell>
        </table:table-row>
        <table:table-row table:style-name="ro1">
          <table:table-cell table:style-name="ce17" table:formula="of:=[$List.B202]" office:value-type="float" office:value="0" calcext:value-type="float">
            <text:p>0</text:p>
          </table:table-cell>
          <table:table-cell table:style-name="ce17" table:formula="of:=[$List.I202]">
            <text:p/>
          </table:table-cell>
          <table:table-cell table:style-name="ce17" table:formula="of:=[$List.G202]" office:value-type="float" office:value="0" calcext:value-type="float">
            <text:p>0</text:p>
          </table:table-cell>
          <table:table-cell table:formula="of:=IF(AND(([.A202]=&quot;coil&quot;);([.C202]=&quot;true&quot;)); 1; &quot;&quot;)">
            <text:p/>
          </table:table-cell>
          <table:table-cell table:formula="of:=IF(AND(([.A202]=&quot;holding reg.&quot;);([.C202] &lt;&gt; 0)); 1; &quot;&quot;)">
            <text:p/>
          </table:table-cell>
          <table:table-cell/>
          <table:table-cell table:formula="of:=IF([.D202]=1; COM.MICROSOFT.CONCAT(&quot;ModbusCoils[coilIndexFromAddress(MODBUS_ADDR_&quot;; [.B202]; &quot;)] = &quot;; [.C202]; &quot;;&quot;); IF([.E202]=1; COM.MICROSOFT.CONCAT(&quot;ModbusHoldingRegisters[holdingIndexFromAddress(MODBUS_ADDR_&quot;; [.B202]; &quot;)] = &quot;; [.C202]; &quot;u;&quot;); &quot;&quot;))">
            <text:p/>
          </table:table-cell>
        </table:table-row>
        <table:table-row table:style-name="ro1">
          <table:table-cell table:style-name="ce17" table:formula="of:=[$List.B203]" office:value-type="string" office:string-value="holding reg." calcext:value-type="string">
            <text:p>holding reg.</text:p>
          </table:table-cell>
          <table:table-cell table:style-name="ce17" table:formula="of:=[$List.I203]" office:value-type="string" office:string-value="SIM_AMPLIFIER_RANDOM_RATE" calcext:value-type="string">
            <text:p>SIM_AMPLIFIER_RANDOM_RATE</text:p>
          </table:table-cell>
          <table:table-cell table:style-name="ce17" table:formula="of:=[$List.G203]" office:value-type="float" office:value="0" calcext:value-type="float">
            <text:p>0</text:p>
          </table:table-cell>
          <table:table-cell table:formula="of:=IF(AND(([.A203]=&quot;coil&quot;);([.C203]=&quot;true&quot;)); 1; &quot;&quot;)">
            <text:p/>
          </table:table-cell>
          <table:table-cell table:formula="of:=IF(AND(([.A203]=&quot;holding reg.&quot;);([.C203] &lt;&gt; 0)); 1; &quot;&quot;)">
            <text:p/>
          </table:table-cell>
          <table:table-cell/>
          <table:table-cell table:formula="of:=IF([.D203]=1; COM.MICROSOFT.CONCAT(&quot;ModbusCoils[coilIndexFromAddress(MODBUS_ADDR_&quot;; [.B203]; &quot;)] = &quot;; [.C203]; &quot;;&quot;); IF([.E203]=1; COM.MICROSOFT.CONCAT(&quot;ModbusHoldingRegisters[holdingIndexFromAddress(MODBUS_ADDR_&quot;; [.B203]; &quot;)] = &quot;; [.C203]; &quot;u;&quot;); &quot;&quot;))">
            <text:p/>
          </table:table-cell>
        </table:table-row>
        <table:table-row table:style-name="ro1">
          <table:table-cell table:style-name="ce17" table:formula="of:=[$List.B204]" office:value-type="string" office:string-value="holding reg." calcext:value-type="string">
            <text:p>holding reg.</text:p>
          </table:table-cell>
          <table:table-cell table:style-name="ce17" table:formula="of:=[$List.I204]" office:value-type="string" office:string-value="SIM_AMPLIFIER_RANDOM_OFFSET" calcext:value-type="string">
            <text:p>SIM_AMPLIFIER_RANDOM_OFFSET</text:p>
          </table:table-cell>
          <table:table-cell table:style-name="ce17" table:formula="of:=[$List.G204]" office:value-type="float" office:value="0" calcext:value-type="float">
            <text:p>0</text:p>
          </table:table-cell>
          <table:table-cell table:formula="of:=IF(AND(([.A204]=&quot;coil&quot;);([.C204]=&quot;true&quot;)); 1; &quot;&quot;)">
            <text:p/>
          </table:table-cell>
          <table:table-cell table:formula="of:=IF(AND(([.A204]=&quot;holding reg.&quot;);([.C204] &lt;&gt; 0)); 1; &quot;&quot;)">
            <text:p/>
          </table:table-cell>
          <table:table-cell/>
          <table:table-cell table:formula="of:=IF([.D204]=1; COM.MICROSOFT.CONCAT(&quot;ModbusCoils[coilIndexFromAddress(MODBUS_ADDR_&quot;; [.B204]; &quot;)] = &quot;; [.C204]; &quot;;&quot;); IF([.E204]=1; COM.MICROSOFT.CONCAT(&quot;ModbusHoldingRegisters[holdingIndexFromAddress(MODBUS_ADDR_&quot;; [.B204]; &quot;)] = &quot;; [.C204]; &quot;u;&quot;); &quot;&quot;))">
            <text:p/>
          </table:table-cell>
        </table:table-row>
        <table:table-row table:style-name="ro1">
          <table:table-cell table:style-name="ce17" table:formula="of:=[$List.B205]" office:value-type="float" office:value="0" calcext:value-type="float">
            <text:p>0</text:p>
          </table:table-cell>
          <table:table-cell table:style-name="ce17" table:formula="of:=[$List.I205]">
            <text:p/>
          </table:table-cell>
          <table:table-cell table:style-name="ce17" table:formula="of:=[$List.G205]" office:value-type="float" office:value="0" calcext:value-type="float">
            <text:p>0</text:p>
          </table:table-cell>
          <table:table-cell table:formula="of:=IF(AND(([.A205]=&quot;coil&quot;);([.C205]=&quot;true&quot;)); 1; &quot;&quot;)">
            <text:p/>
          </table:table-cell>
          <table:table-cell table:formula="of:=IF(AND(([.A205]=&quot;holding reg.&quot;);([.C205] &lt;&gt; 0)); 1; &quot;&quot;)">
            <text:p/>
          </table:table-cell>
          <table:table-cell/>
          <table:table-cell table:formula="of:=IF([.D205]=1; COM.MICROSOFT.CONCAT(&quot;ModbusCoils[coilIndexFromAddress(MODBUS_ADDR_&quot;; [.B205]; &quot;)] = &quot;; [.C205]; &quot;;&quot;); IF([.E205]=1; COM.MICROSOFT.CONCAT(&quot;ModbusHoldingRegisters[holdingIndexFromAddress(MODBUS_ADDR_&quot;; [.B205]; &quot;)] = &quot;; [.C205]; &quot;u;&quot;); &quot;&quot;))">
            <text:p/>
          </table:table-cell>
        </table:table-row>
        <table:table-row table:style-name="ro1">
          <table:table-cell table:style-name="ce17" table:formula="of:=[$List.B206]" office:value-type="string" office:string-value="holding reg." calcext:value-type="string">
            <text:p>holding reg.</text:p>
          </table:table-cell>
          <table:table-cell table:style-name="ce17" table:formula="of:=[$List.I206]" office:value-type="string" office:string-value="SIM_EXTERNAL_LOCK_PERIOD" calcext:value-type="string">
            <text:p>SIM_EXTERNAL_LOCK_PERIOD</text:p>
          </table:table-cell>
          <table:table-cell table:style-name="ce17" table:formula="of:=[$List.G206]" office:value-type="float" office:value="0" calcext:value-type="float">
            <text:p>0</text:p>
          </table:table-cell>
          <table:table-cell table:formula="of:=IF(AND(([.A206]=&quot;coil&quot;);([.C206]=&quot;true&quot;)); 1; &quot;&quot;)">
            <text:p/>
          </table:table-cell>
          <table:table-cell table:formula="of:=IF(AND(([.A206]=&quot;holding reg.&quot;);([.C206] &lt;&gt; 0)); 1; &quot;&quot;)">
            <text:p/>
          </table:table-cell>
          <table:table-cell/>
          <table:table-cell table:formula="of:=IF([.D206]=1; COM.MICROSOFT.CONCAT(&quot;ModbusCoils[coilIndexFromAddress(MODBUS_ADDR_&quot;; [.B206]; &quot;)] = &quot;; [.C206]; &quot;;&quot;); IF([.E206]=1; COM.MICROSOFT.CONCAT(&quot;ModbusHoldingRegisters[holdingIndexFromAddress(MODBUS_ADDR_&quot;; [.B206]; &quot;)] = &quot;; [.C206]; &quot;u;&quot;); &quot;&quot;))">
            <text:p/>
          </table:table-cell>
        </table:table-row>
        <table:table-row table:style-name="ro1">
          <table:table-cell table:style-name="ce17" table:formula="of:=[$List.B207]" office:value-type="string" office:string-value="holding reg." calcext:value-type="string">
            <text:p>holding reg.</text:p>
          </table:table-cell>
          <table:table-cell table:style-name="ce17" table:formula="of:=[$List.I207]" office:value-type="string" office:string-value="SIM_EXTERNAL_LOCK_DURATION" calcext:value-type="string">
            <text:p>SIM_EXTERNAL_LOCK_DURATION</text:p>
          </table:table-cell>
          <table:table-cell table:style-name="ce17" table:formula="of:=[$List.G207]" office:value-type="float" office:value="0" calcext:value-type="float">
            <text:p>0</text:p>
          </table:table-cell>
          <table:table-cell table:formula="of:=IF(AND(([.A207]=&quot;coil&quot;);([.C207]=&quot;true&quot;)); 1; &quot;&quot;)">
            <text:p/>
          </table:table-cell>
          <table:table-cell table:formula="of:=IF(AND(([.A207]=&quot;holding reg.&quot;);([.C207] &lt;&gt; 0)); 1; &quot;&quot;)">
            <text:p/>
          </table:table-cell>
          <table:table-cell/>
          <table:table-cell table:formula="of:=IF([.D207]=1; COM.MICROSOFT.CONCAT(&quot;ModbusCoils[coilIndexFromAddress(MODBUS_ADDR_&quot;; [.B207]; &quot;)] = &quot;; [.C207]; &quot;;&quot;); IF([.E207]=1; COM.MICROSOFT.CONCAT(&quot;ModbusHoldingRegisters[holdingIndexFromAddress(MODBUS_ADDR_&quot;; [.B207]; &quot;)] = &quot;; [.C207]; &quot;u;&quot;); &quot;&quot;))">
            <text:p/>
          </table:table-cell>
        </table:table-row>
        <table:table-row table:style-name="ro1">
          <table:table-cell table:style-name="ce17" table:formula="of:=[$List.B208]" office:value-type="string" office:string-value="holding reg." calcext:value-type="string">
            <text:p>holding reg.</text:p>
          </table:table-cell>
          <table:table-cell table:style-name="ce17" table:formula="of:=[$List.I208]" office:value-type="string" office:string-value="SIM_EXTERNAL_LOCK_DELAY" calcext:value-type="string">
            <text:p>SIM_EXTERNAL_LOCK_DELAY</text:p>
          </table:table-cell>
          <table:table-cell table:style-name="ce17" table:formula="of:=[$List.G208]" office:value-type="float" office:value="0" calcext:value-type="float">
            <text:p>0</text:p>
          </table:table-cell>
          <table:table-cell table:formula="of:=IF(AND(([.A208]=&quot;coil&quot;);([.C208]=&quot;true&quot;)); 1; &quot;&quot;)">
            <text:p/>
          </table:table-cell>
          <table:table-cell table:formula="of:=IF(AND(([.A208]=&quot;holding reg.&quot;);([.C208] &lt;&gt; 0)); 1; &quot;&quot;)">
            <text:p/>
          </table:table-cell>
          <table:table-cell/>
          <table:table-cell table:formula="of:=IF([.D208]=1; COM.MICROSOFT.CONCAT(&quot;ModbusCoils[coilIndexFromAddress(MODBUS_ADDR_&quot;; [.B208]; &quot;)] = &quot;; [.C208]; &quot;;&quot;); IF([.E208]=1; COM.MICROSOFT.CONCAT(&quot;ModbusHoldingRegisters[holdingIndexFromAddress(MODBUS_ADDR_&quot;; [.B208]; &quot;)] = &quot;; [.C208]; &quot;u;&quot;); &quot;&quot;))">
            <text:p/>
          </table:table-cell>
        </table:table-row>
        <table:table-row table:style-name="ro1">
          <table:table-cell table:style-name="ce17" table:formula="of:=[$List.B209]" office:value-type="float" office:value="0" calcext:value-type="float">
            <text:p>0</text:p>
          </table:table-cell>
          <table:table-cell table:style-name="ce17" table:formula="of:=[$List.I209]">
            <text:p/>
          </table:table-cell>
          <table:table-cell table:style-name="ce17" table:formula="of:=[$List.G209]" office:value-type="float" office:value="0" calcext:value-type="float">
            <text:p>0</text:p>
          </table:table-cell>
          <table:table-cell table:formula="of:=IF(AND(([.A209]=&quot;coil&quot;);([.C209]=&quot;true&quot;)); 1; &quot;&quot;)">
            <text:p/>
          </table:table-cell>
          <table:table-cell table:formula="of:=IF(AND(([.A209]=&quot;holding reg.&quot;);([.C209] &lt;&gt; 0)); 1; &quot;&quot;)">
            <text:p/>
          </table:table-cell>
          <table:table-cell/>
          <table:table-cell table:formula="of:=IF([.D209]=1; COM.MICROSOFT.CONCAT(&quot;ModbusCoils[coilIndexFromAddress(MODBUS_ADDR_&quot;; [.B209]; &quot;)] = &quot;; [.C209]; &quot;;&quot;); IF([.E209]=1; COM.MICROSOFT.CONCAT(&quot;ModbusHoldingRegisters[holdingIndexFromAddress(MODBUS_ADDR_&quot;; [.B209]; &quot;)] = &quot;; [.C209]; &quot;u;&quot;); &quot;&quot;))">
            <text:p/>
          </table:table-cell>
        </table:table-row>
        <table:table-row table:style-name="ro1">
          <table:table-cell table:style-name="ce17" table:formula="of:=[$List.B210]" office:value-type="string" office:string-value="holding reg." calcext:value-type="string">
            <text:p>holding reg.</text:p>
          </table:table-cell>
          <table:table-cell table:style-name="ce17" table:formula="of:=[$List.I210]" office:value-type="string" office:string-value="SIM_EVENT_CODE" calcext:value-type="string">
            <text:p>SIM_EVENT_CODE</text:p>
          </table:table-cell>
          <table:table-cell table:style-name="ce17" table:formula="of:=[$List.G210]" office:value-type="float" office:value="0" calcext:value-type="float">
            <text:p>0</text:p>
          </table:table-cell>
          <table:table-cell table:formula="of:=IF(AND(([.A210]=&quot;coil&quot;);([.C210]=&quot;true&quot;)); 1; &quot;&quot;)">
            <text:p/>
          </table:table-cell>
          <table:table-cell table:formula="of:=IF(AND(([.A210]=&quot;holding reg.&quot;);([.C210] &lt;&gt; 0)); 1; &quot;&quot;)">
            <text:p/>
          </table:table-cell>
          <table:table-cell/>
          <table:table-cell table:formula="of:=IF([.D210]=1; COM.MICROSOFT.CONCAT(&quot;ModbusCoils[coilIndexFromAddress(MODBUS_ADDR_&quot;; [.B210]; &quot;)] = &quot;; [.C210]; &quot;;&quot;); IF([.E210]=1; COM.MICROSOFT.CONCAT(&quot;ModbusHoldingRegisters[holdingIndexFromAddress(MODBUS_ADDR_&quot;; [.B210]; &quot;)] = &quot;; [.C210]; &quot;u;&quot;); &quot;&quot;))">
            <text:p/>
          </table:table-cell>
        </table:table-row>
        <table:table-row table:style-name="ro1">
          <table:table-cell table:style-name="ce17" table:formula="of:=[$List.B211]" office:value-type="string" office:string-value="holding reg." calcext:value-type="string">
            <text:p>holding reg.</text:p>
          </table:table-cell>
          <table:table-cell table:style-name="ce17" table:formula="of:=[$List.I211]" office:value-type="string" office:string-value="SIM_EVENT_PERIOD" calcext:value-type="string">
            <text:p>SIM_EVENT_PERIOD</text:p>
          </table:table-cell>
          <table:table-cell table:style-name="ce17" table:formula="of:=[$List.G211]" office:value-type="float" office:value="0" calcext:value-type="float">
            <text:p>0</text:p>
          </table:table-cell>
          <table:table-cell table:formula="of:=IF(AND(([.A211]=&quot;coil&quot;);([.C211]=&quot;true&quot;)); 1; &quot;&quot;)">
            <text:p/>
          </table:table-cell>
          <table:table-cell table:formula="of:=IF(AND(([.A211]=&quot;holding reg.&quot;);([.C211] &lt;&gt; 0)); 1; &quot;&quot;)">
            <text:p/>
          </table:table-cell>
          <table:table-cell/>
          <table:table-cell table:formula="of:=IF([.D211]=1; COM.MICROSOFT.CONCAT(&quot;ModbusCoils[coilIndexFromAddress(MODBUS_ADDR_&quot;; [.B211]; &quot;)] = &quot;; [.C211]; &quot;;&quot;); IF([.E211]=1; COM.MICROSOFT.CONCAT(&quot;ModbusHoldingRegisters[holdingIndexFromAddress(MODBUS_ADDR_&quot;; [.B211]; &quot;)] = &quot;; [.C211]; &quot;u;&quot;); &quot;&quot;))">
            <text:p/>
          </table:table-cell>
        </table:table-row>
        <table:table-row table:style-name="ro1">
          <table:table-cell table:style-name="ce17" table:formula="of:=[$List.B212]" office:value-type="string" office:string-value="holding reg." calcext:value-type="string">
            <text:p>holding reg.</text:p>
          </table:table-cell>
          <table:table-cell table:style-name="ce17" table:formula="of:=[$List.I212]" office:value-type="string" office:string-value="SIM_EVENT_DURATION" calcext:value-type="string">
            <text:p>SIM_EVENT_DURATION</text:p>
          </table:table-cell>
          <table:table-cell table:style-name="ce17" table:formula="of:=[$List.G212]" office:value-type="float" office:value="0" calcext:value-type="float">
            <text:p>0</text:p>
          </table:table-cell>
          <table:table-cell table:formula="of:=IF(AND(([.A212]=&quot;coil&quot;);([.C212]=&quot;true&quot;)); 1; &quot;&quot;)">
            <text:p/>
          </table:table-cell>
          <table:table-cell table:formula="of:=IF(AND(([.A212]=&quot;holding reg.&quot;);([.C212] &lt;&gt; 0)); 1; &quot;&quot;)">
            <text:p/>
          </table:table-cell>
          <table:table-cell/>
          <table:table-cell table:formula="of:=IF([.D212]=1; COM.MICROSOFT.CONCAT(&quot;ModbusCoils[coilIndexFromAddress(MODBUS_ADDR_&quot;; [.B212]; &quot;)] = &quot;; [.C212]; &quot;;&quot;); IF([.E212]=1; COM.MICROSOFT.CONCAT(&quot;ModbusHoldingRegisters[holdingIndexFromAddress(MODBUS_ADDR_&quot;; [.B212]; &quot;)] = &quot;; [.C212]; &quot;u;&quot;); &quot;&quot;))">
            <text:p/>
          </table:table-cell>
        </table:table-row>
        <table:table-row table:style-name="ro1">
          <table:table-cell table:style-name="ce17" table:formula="of:=[$List.B213]" office:value-type="string" office:string-value="holding reg." calcext:value-type="string">
            <text:p>holding reg.</text:p>
          </table:table-cell>
          <table:table-cell table:style-name="ce17" table:formula="of:=[$List.I213]" office:value-type="string" office:string-value="SIM_EVENT_DELAY" calcext:value-type="string">
            <text:p>SIM_EVENT_DELAY</text:p>
          </table:table-cell>
          <table:table-cell table:style-name="ce17" table:formula="of:=[$List.G213]" office:value-type="float" office:value="0" calcext:value-type="float">
            <text:p>0</text:p>
          </table:table-cell>
          <table:table-cell table:formula="of:=IF(AND(([.A213]=&quot;coil&quot;);([.C213]=&quot;true&quot;)); 1; &quot;&quot;)">
            <text:p/>
          </table:table-cell>
          <table:table-cell table:formula="of:=IF(AND(([.A213]=&quot;holding reg.&quot;);([.C213] &lt;&gt; 0)); 1; &quot;&quot;)">
            <text:p/>
          </table:table-cell>
          <table:table-cell/>
          <table:table-cell table:formula="of:=IF([.D213]=1; COM.MICROSOFT.CONCAT(&quot;ModbusCoils[coilIndexFromAddress(MODBUS_ADDR_&quot;; [.B213]; &quot;)] = &quot;; [.C213]; &quot;;&quot;); IF([.E213]=1; COM.MICROSOFT.CONCAT(&quot;ModbusHoldingRegisters[holdingIndexFromAddress(MODBUS_ADDR_&quot;; [.B213]; &quot;)] = &quot;; [.C213]; &quot;u;&quot;); &quot;&quot;))">
            <text:p/>
          </table:table-cell>
        </table:table-row>
        <table:table-row table:style-name="ro1">
          <table:table-cell table:style-name="ce17" table:formula="of:=[$List.B214]" office:value-type="float" office:value="0" calcext:value-type="float">
            <text:p>0</text:p>
          </table:table-cell>
          <table:table-cell table:style-name="ce17" table:formula="of:=[$List.I214]">
            <text:p/>
          </table:table-cell>
          <table:table-cell table:style-name="ce17" table:formula="of:=[$List.G214]" office:value-type="float" office:value="0" calcext:value-type="float">
            <text:p>0</text:p>
          </table:table-cell>
          <table:table-cell table:formula="of:=IF(AND(([.A214]=&quot;coil&quot;);([.C214]=&quot;true&quot;)); 1; &quot;&quot;)">
            <text:p/>
          </table:table-cell>
          <table:table-cell table:formula="of:=IF(AND(([.A214]=&quot;holding reg.&quot;);([.C214] &lt;&gt; 0)); 1; &quot;&quot;)">
            <text:p/>
          </table:table-cell>
          <table:table-cell/>
          <table:table-cell table:formula="of:=IF([.D214]=1; COM.MICROSOFT.CONCAT(&quot;ModbusCoils[coilIndexFromAddress(MODBUS_ADDR_&quot;; [.B214]; &quot;)] = &quot;; [.C214]; &quot;;&quot;); IF([.E214]=1; COM.MICROSOFT.CONCAT(&quot;ModbusHoldingRegisters[holdingIndexFromAddress(MODBUS_ADDR_&quot;; [.B214]; &quot;)] = &quot;; [.C214]; &quot;u;&quot;); &quot;&quot;))">
            <text:p/>
          </table:table-cell>
        </table:table-row>
        <table:table-row table:style-name="ro1">
          <table:table-cell table:style-name="ce17" table:formula="of:=[$List.B215]" office:value-type="string" office:string-value="holding reg." calcext:value-type="string">
            <text:p>holding reg.</text:p>
          </table:table-cell>
          <table:table-cell table:style-name="ce17" table:formula="of:=[$List.I215]" office:value-type="string" office:string-value="DEBUG_PRINTOUTS" calcext:value-type="string">
            <text:p>DEBUG_PRINTOUTS</text:p>
          </table:table-cell>
          <table:table-cell table:style-name="ce17" table:formula="of:=[$List.G215]" office:value-type="float" office:value="0" calcext:value-type="float">
            <text:p>0</text:p>
          </table:table-cell>
          <table:table-cell table:formula="of:=IF(AND(([.A215]=&quot;coil&quot;);([.C215]=&quot;true&quot;)); 1; &quot;&quot;)">
            <text:p/>
          </table:table-cell>
          <table:table-cell table:formula="of:=IF(AND(([.A215]=&quot;holding reg.&quot;);([.C215] &lt;&gt; 0)); 1; &quot;&quot;)">
            <text:p/>
          </table:table-cell>
          <table:table-cell/>
          <table:table-cell table:formula="of:=IF([.D215]=1; COM.MICROSOFT.CONCAT(&quot;ModbusCoils[coilIndexFromAddress(MODBUS_ADDR_&quot;; [.B215]; &quot;)] = &quot;; [.C215]; &quot;;&quot;); IF([.E215]=1; COM.MICROSOFT.CONCAT(&quot;ModbusHoldingRegisters[holdingIndexFromAddress(MODBUS_ADDR_&quot;; [.B215]; &quot;)] = &quot;; [.C215]; &quot;u;&quot;); &quot;&quot;))">
            <text:p/>
          </table:table-cell>
        </table:table-row>
        <table:table-row table:style-name="ro1">
          <table:table-cell table:style-name="ce17" table:formula="of:=[$List.B216]" office:value-type="string" office:string-value="holding reg." calcext:value-type="string">
            <text:p>holding reg.</text:p>
          </table:table-cell>
          <table:table-cell table:style-name="ce17" table:formula="of:=[$List.I216]" office:value-type="string" office:string-value="DEBUG_ARGUMENT1" calcext:value-type="string">
            <text:p>DEBUG_ARGUMENT1</text:p>
          </table:table-cell>
          <table:table-cell table:style-name="ce17" table:formula="of:=[$List.G216]" office:value-type="float" office:value="0" calcext:value-type="float">
            <text:p>0</text:p>
          </table:table-cell>
          <table:table-cell table:formula="of:=IF(AND(([.A216]=&quot;coil&quot;);([.C216]=&quot;true&quot;)); 1; &quot;&quot;)">
            <text:p/>
          </table:table-cell>
          <table:table-cell table:formula="of:=IF(AND(([.A216]=&quot;holding reg.&quot;);([.C216] &lt;&gt; 0)); 1; &quot;&quot;)">
            <text:p/>
          </table:table-cell>
          <table:table-cell/>
          <table:table-cell table:formula="of:=IF([.D216]=1; COM.MICROSOFT.CONCAT(&quot;ModbusCoils[coilIndexFromAddress(MODBUS_ADDR_&quot;; [.B216]; &quot;)] = &quot;; [.C216]; &quot;;&quot;); IF([.E216]=1; COM.MICROSOFT.CONCAT(&quot;ModbusHoldingRegisters[holdingIndexFromAddress(MODBUS_ADDR_&quot;; [.B216]; &quot;)] = &quot;; [.C216]; &quot;u;&quot;); &quot;&quot;))">
            <text:p/>
          </table:table-cell>
        </table:table-row>
        <table:table-row table:style-name="ro1">
          <table:table-cell table:style-name="ce17" table:formula="of:=[$List.B217]" office:value-type="float" office:value="0" calcext:value-type="float">
            <text:p>0</text:p>
          </table:table-cell>
          <table:table-cell table:style-name="ce17" table:formula="of:=[$List.I217]">
            <text:p/>
          </table:table-cell>
          <table:table-cell table:style-name="ce17" table:formula="of:=[$List.G217]" office:value-type="float" office:value="0" calcext:value-type="float">
            <text:p>0</text:p>
          </table:table-cell>
          <table:table-cell table:formula="of:=IF(AND(([.A217]=&quot;coil&quot;);([.C217]=&quot;true&quot;)); 1; &quot;&quot;)">
            <text:p/>
          </table:table-cell>
          <table:table-cell table:formula="of:=IF(AND(([.A217]=&quot;holding reg.&quot;);([.C217] &lt;&gt; 0)); 1; &quot;&quot;)">
            <text:p/>
          </table:table-cell>
          <table:table-cell/>
          <table:table-cell table:formula="of:=IF([.D217]=1; COM.MICROSOFT.CONCAT(&quot;ModbusCoils[coilIndexFromAddress(MODBUS_ADDR_&quot;; [.B217]; &quot;)] = &quot;; [.C217]; &quot;;&quot;); IF([.E217]=1; COM.MICROSOFT.CONCAT(&quot;ModbusHoldingRegisters[holdingIndexFromAddress(MODBUS_ADDR_&quot;; [.B217]; &quot;)] = &quot;; [.C217]; &quot;u;&quot;); &quot;&quot;))">
            <text:p/>
          </table:table-cell>
        </table:table-row>
        <table:table-row table:style-name="ro1">
          <table:table-cell table:style-name="ce17" table:formula="of:=[$List.B218]" office:value-type="float" office:value="0" calcext:value-type="float">
            <text:p>0</text:p>
          </table:table-cell>
          <table:table-cell table:style-name="ce17" table:formula="of:=[$List.I218]">
            <text:p/>
          </table:table-cell>
          <table:table-cell table:style-name="ce17" table:formula="of:=[$List.G218]" office:value-type="float" office:value="0" calcext:value-type="float">
            <text:p>0</text:p>
          </table:table-cell>
          <table:table-cell table:formula="of:=IF(AND(([.A218]=&quot;coil&quot;);([.C218]=&quot;true&quot;)); 1; &quot;&quot;)">
            <text:p/>
          </table:table-cell>
          <table:table-cell table:formula="of:=IF(AND(([.A218]=&quot;holding reg.&quot;);([.C218] &lt;&gt; 0)); 1; &quot;&quot;)">
            <text:p/>
          </table:table-cell>
          <table:table-cell/>
          <table:table-cell table:formula="of:=IF([.D218]=1; COM.MICROSOFT.CONCAT(&quot;ModbusCoils[coilIndexFromAddress(MODBUS_ADDR_&quot;; [.B218]; &quot;)] = &quot;; [.C218]; &quot;;&quot;); IF([.E218]=1; COM.MICROSOFT.CONCAT(&quot;ModbusHoldingRegisters[holdingIndexFromAddress(MODBUS_ADDR_&quot;; [.B218]; &quot;)] = &quot;; [.C218]; &quot;u;&quot;); &quot;&quot;))">
            <text:p/>
          </table:table-cell>
        </table:table-row>
        <table:table-row table:style-name="ro1">
          <table:table-cell table:style-name="ce17" table:formula="of:=[$List.B219]" office:value-type="string" office:string-value="input reg." calcext:value-type="string">
            <text:p>input reg.</text:p>
          </table:table-cell>
          <table:table-cell table:style-name="ce17" table:formula="of:=[$List.I219]" office:value-type="string" office:string-value="CUP1_CHANNEL1_SAMPLE" calcext:value-type="string">
            <text:p>CUP1_CHANNEL1_SAMPLE</text:p>
          </table:table-cell>
          <table:table-cell table:style-name="ce17" table:formula="of:=[$List.G219]" office:value-type="float" office:value="0" calcext:value-type="float">
            <text:p>0</text:p>
          </table:table-cell>
          <table:table-cell table:formula="of:=IF(AND(([.A219]=&quot;coil&quot;);([.C219]=&quot;true&quot;)); 1; &quot;&quot;)">
            <text:p/>
          </table:table-cell>
          <table:table-cell table:formula="of:=IF(AND(([.A219]=&quot;holding reg.&quot;);([.C219] &lt;&gt; 0)); 1; &quot;&quot;)">
            <text:p/>
          </table:table-cell>
          <table:table-cell/>
          <table:table-cell table:formula="of:=IF([.D219]=1; COM.MICROSOFT.CONCAT(&quot;ModbusCoils[coilIndexFromAddress(MODBUS_ADDR_&quot;; [.B219]; &quot;)] = &quot;; [.C219]; &quot;;&quot;); IF([.E219]=1; COM.MICROSOFT.CONCAT(&quot;ModbusHoldingRegisters[holdingIndexFromAddress(MODBUS_ADDR_&quot;; [.B219]; &quot;)] = &quot;; [.C219]; &quot;u;&quot;); &quot;&quot;))">
            <text:p/>
          </table:table-cell>
        </table:table-row>
        <table:table-row table:style-name="ro1">
          <table:table-cell table:style-name="ce17" table:formula="of:=[$List.B220]" office:value-type="string" office:string-value="input reg." calcext:value-type="string">
            <text:p>input reg.</text:p>
          </table:table-cell>
          <table:table-cell table:style-name="ce17" table:formula="of:=[$List.I220]" office:value-type="string" office:string-value="CUP1_CHANNEL2_SAMPLE" calcext:value-type="string">
            <text:p>CUP1_CHANNEL2_SAMPLE</text:p>
          </table:table-cell>
          <table:table-cell table:style-name="ce17" table:formula="of:=[$List.G220]" office:value-type="float" office:value="0" calcext:value-type="float">
            <text:p>0</text:p>
          </table:table-cell>
          <table:table-cell table:formula="of:=IF(AND(([.A220]=&quot;coil&quot;);([.C220]=&quot;true&quot;)); 1; &quot;&quot;)">
            <text:p/>
          </table:table-cell>
          <table:table-cell table:formula="of:=IF(AND(([.A220]=&quot;holding reg.&quot;);([.C220] &lt;&gt; 0)); 1; &quot;&quot;)">
            <text:p/>
          </table:table-cell>
          <table:table-cell/>
          <table:table-cell table:formula="of:=IF([.D220]=1; COM.MICROSOFT.CONCAT(&quot;ModbusCoils[coilIndexFromAddress(MODBUS_ADDR_&quot;; [.B220]; &quot;)] = &quot;; [.C220]; &quot;;&quot;); IF([.E220]=1; COM.MICROSOFT.CONCAT(&quot;ModbusHoldingRegisters[holdingIndexFromAddress(MODBUS_ADDR_&quot;; [.B220]; &quot;)] = &quot;; [.C220]; &quot;u;&quot;); &quot;&quot;))">
            <text:p/>
          </table:table-cell>
        </table:table-row>
        <table:table-row table:style-name="ro1">
          <table:table-cell table:style-name="ce17" table:formula="of:=[$List.B221]" office:value-type="string" office:string-value="input reg." calcext:value-type="string">
            <text:p>input reg.</text:p>
          </table:table-cell>
          <table:table-cell table:style-name="ce17" table:formula="of:=[$List.I221]" office:value-type="string" office:string-value="CUP1_CHANNEL3_SAMPLE" calcext:value-type="string">
            <text:p>CUP1_CHANNEL3_SAMPLE</text:p>
          </table:table-cell>
          <table:table-cell table:style-name="ce17" table:formula="of:=[$List.G221]" office:value-type="float" office:value="0" calcext:value-type="float">
            <text:p>0</text:p>
          </table:table-cell>
          <table:table-cell table:formula="of:=IF(AND(([.A221]=&quot;coil&quot;);([.C221]=&quot;true&quot;)); 1; &quot;&quot;)">
            <text:p/>
          </table:table-cell>
          <table:table-cell table:formula="of:=IF(AND(([.A221]=&quot;holding reg.&quot;);([.C221] &lt;&gt; 0)); 1; &quot;&quot;)">
            <text:p/>
          </table:table-cell>
          <table:table-cell/>
          <table:table-cell table:formula="of:=IF([.D221]=1; COM.MICROSOFT.CONCAT(&quot;ModbusCoils[coilIndexFromAddress(MODBUS_ADDR_&quot;; [.B221]; &quot;)] = &quot;; [.C221]; &quot;;&quot;); IF([.E221]=1; COM.MICROSOFT.CONCAT(&quot;ModbusHoldingRegisters[holdingIndexFromAddress(MODBUS_ADDR_&quot;; [.B221]; &quot;)] = &quot;; [.C221]; &quot;u;&quot;); &quot;&quot;))">
            <text:p/>
          </table:table-cell>
        </table:table-row>
        <table:table-row table:style-name="ro1">
          <table:table-cell table:style-name="ce17" table:formula="of:=[$List.B222]" office:value-type="string" office:string-value="input reg." calcext:value-type="string">
            <text:p>input reg.</text:p>
          </table:table-cell>
          <table:table-cell table:style-name="ce17" table:formula="of:=[$List.I222]" office:value-type="string" office:string-value="CUP1_CHANNEL4_SAMPLE" calcext:value-type="string">
            <text:p>CUP1_CHANNEL4_SAMPLE</text:p>
          </table:table-cell>
          <table:table-cell table:style-name="ce17" table:formula="of:=[$List.G222]" office:value-type="float" office:value="0" calcext:value-type="float">
            <text:p>0</text:p>
          </table:table-cell>
          <table:table-cell table:formula="of:=IF(AND(([.A222]=&quot;coil&quot;);([.C222]=&quot;true&quot;)); 1; &quot;&quot;)">
            <text:p/>
          </table:table-cell>
          <table:table-cell table:formula="of:=IF(AND(([.A222]=&quot;holding reg.&quot;);([.C222] &lt;&gt; 0)); 1; &quot;&quot;)">
            <text:p/>
          </table:table-cell>
          <table:table-cell/>
          <table:table-cell table:formula="of:=IF([.D222]=1; COM.MICROSOFT.CONCAT(&quot;ModbusCoils[coilIndexFromAddress(MODBUS_ADDR_&quot;; [.B222]; &quot;)] = &quot;; [.C222]; &quot;;&quot;); IF([.E222]=1; COM.MICROSOFT.CONCAT(&quot;ModbusHoldingRegisters[holdingIndexFromAddress(MODBUS_ADDR_&quot;; [.B222]; &quot;)] = &quot;; [.C222]; &quot;u;&quot;); &quot;&quot;))">
            <text:p/>
          </table:table-cell>
        </table:table-row>
        <table:table-row table:style-name="ro1">
          <table:table-cell table:style-name="ce17" table:formula="of:=[$List.B223]" office:value-type="string" office:string-value="input reg." calcext:value-type="string">
            <text:p>input reg.</text:p>
          </table:table-cell>
          <table:table-cell table:style-name="ce17" table:formula="of:=[$List.I223]" office:value-type="string" office:string-value="CUP1_CHANNEL_ERROR" calcext:value-type="string">
            <text:p>CUP1_CHANNEL_ERROR</text:p>
          </table:table-cell>
          <table:table-cell table:style-name="ce17" table:formula="of:=[$List.G223]" office:value-type="float" office:value="0" calcext:value-type="float">
            <text:p>0</text:p>
          </table:table-cell>
          <table:table-cell table:formula="of:=IF(AND(([.A223]=&quot;coil&quot;);([.C223]=&quot;true&quot;)); 1; &quot;&quot;)">
            <text:p/>
          </table:table-cell>
          <table:table-cell table:formula="of:=IF(AND(([.A223]=&quot;holding reg.&quot;);([.C223] &lt;&gt; 0)); 1; &quot;&quot;)">
            <text:p/>
          </table:table-cell>
          <table:table-cell/>
          <table:table-cell table:formula="of:=IF([.D223]=1; COM.MICROSOFT.CONCAT(&quot;ModbusCoils[coilIndexFromAddress(MODBUS_ADDR_&quot;; [.B223]; &quot;)] = &quot;; [.C223]; &quot;;&quot;); IF([.E223]=1; COM.MICROSOFT.CONCAT(&quot;ModbusHoldingRegisters[holdingIndexFromAddress(MODBUS_ADDR_&quot;; [.B223]; &quot;)] = &quot;; [.C223]; &quot;u;&quot;); &quot;&quot;))">
            <text:p/>
          </table:table-cell>
        </table:table-row>
        <table:table-row table:style-name="ro1">
          <table:table-cell table:style-name="ce17" table:formula="of:=[$List.B224]" office:value-type="float" office:value="0" calcext:value-type="float">
            <text:p>0</text:p>
          </table:table-cell>
          <table:table-cell table:style-name="ce17" table:formula="of:=[$List.I224]">
            <text:p/>
          </table:table-cell>
          <table:table-cell table:style-name="ce17" table:formula="of:=[$List.G224]" office:value-type="float" office:value="0" calcext:value-type="float">
            <text:p>0</text:p>
          </table:table-cell>
          <table:table-cell table:formula="of:=IF(AND(([.A224]=&quot;coil&quot;);([.C224]=&quot;true&quot;)); 1; &quot;&quot;)">
            <text:p/>
          </table:table-cell>
          <table:table-cell table:formula="of:=IF(AND(([.A224]=&quot;holding reg.&quot;);([.C224] &lt;&gt; 0)); 1; &quot;&quot;)">
            <text:p/>
          </table:table-cell>
          <table:table-cell/>
          <table:table-cell table:formula="of:=IF([.D224]=1; COM.MICROSOFT.CONCAT(&quot;ModbusCoils[coilIndexFromAddress(MODBUS_ADDR_&quot;; [.B224]; &quot;)] = &quot;; [.C224]; &quot;;&quot;); IF([.E224]=1; COM.MICROSOFT.CONCAT(&quot;ModbusHoldingRegisters[holdingIndexFromAddress(MODBUS_ADDR_&quot;; [.B224]; &quot;)] = &quot;; [.C224]; &quot;u;&quot;); &quot;&quot;))">
            <text:p/>
          </table:table-cell>
        </table:table-row>
        <table:table-row table:style-name="ro1">
          <table:table-cell table:style-name="ce17" table:formula="of:=[$List.B225]" office:value-type="string" office:string-value="input reg." calcext:value-type="string">
            <text:p>input reg.</text:p>
          </table:table-cell>
          <table:table-cell table:style-name="ce17" table:formula="of:=[$List.I225]" office:value-type="string" office:string-value="CUP2_CHANNEL1_SAMPLE" calcext:value-type="string">
            <text:p>CUP2_CHANNEL1_SAMPLE</text:p>
          </table:table-cell>
          <table:table-cell table:style-name="ce17" table:formula="of:=[$List.G225]" office:value-type="float" office:value="0" calcext:value-type="float">
            <text:p>0</text:p>
          </table:table-cell>
          <table:table-cell table:formula="of:=IF(AND(([.A225]=&quot;coil&quot;);([.C225]=&quot;true&quot;)); 1; &quot;&quot;)">
            <text:p/>
          </table:table-cell>
          <table:table-cell table:formula="of:=IF(AND(([.A225]=&quot;holding reg.&quot;);([.C225] &lt;&gt; 0)); 1; &quot;&quot;)">
            <text:p/>
          </table:table-cell>
          <table:table-cell/>
          <table:table-cell table:formula="of:=IF([.D225]=1; COM.MICROSOFT.CONCAT(&quot;ModbusCoils[coilIndexFromAddress(MODBUS_ADDR_&quot;; [.B225]; &quot;)] = &quot;; [.C225]; &quot;;&quot;); IF([.E225]=1; COM.MICROSOFT.CONCAT(&quot;ModbusHoldingRegisters[holdingIndexFromAddress(MODBUS_ADDR_&quot;; [.B225]; &quot;)] = &quot;; [.C225]; &quot;u;&quot;); &quot;&quot;))">
            <text:p/>
          </table:table-cell>
        </table:table-row>
        <table:table-row table:style-name="ro1">
          <table:table-cell table:style-name="ce17" table:formula="of:=[$List.B226]" office:value-type="string" office:string-value="input reg." calcext:value-type="string">
            <text:p>input reg.</text:p>
          </table:table-cell>
          <table:table-cell table:style-name="ce17" table:formula="of:=[$List.I226]" office:value-type="string" office:string-value="CUP2_CHANNEL2_SAMPLE" calcext:value-type="string">
            <text:p>CUP2_CHANNEL2_SAMPLE</text:p>
          </table:table-cell>
          <table:table-cell table:style-name="ce17" table:formula="of:=[$List.G226]" office:value-type="float" office:value="0" calcext:value-type="float">
            <text:p>0</text:p>
          </table:table-cell>
          <table:table-cell table:formula="of:=IF(AND(([.A226]=&quot;coil&quot;);([.C226]=&quot;true&quot;)); 1; &quot;&quot;)">
            <text:p/>
          </table:table-cell>
          <table:table-cell table:formula="of:=IF(AND(([.A226]=&quot;holding reg.&quot;);([.C226] &lt;&gt; 0)); 1; &quot;&quot;)">
            <text:p/>
          </table:table-cell>
          <table:table-cell/>
          <table:table-cell table:formula="of:=IF([.D226]=1; COM.MICROSOFT.CONCAT(&quot;ModbusCoils[coilIndexFromAddress(MODBUS_ADDR_&quot;; [.B226]; &quot;)] = &quot;; [.C226]; &quot;;&quot;); IF([.E226]=1; COM.MICROSOFT.CONCAT(&quot;ModbusHoldingRegisters[holdingIndexFromAddress(MODBUS_ADDR_&quot;; [.B226]; &quot;)] = &quot;; [.C226]; &quot;u;&quot;); &quot;&quot;))">
            <text:p/>
          </table:table-cell>
        </table:table-row>
        <table:table-row table:style-name="ro1">
          <table:table-cell table:style-name="ce17" table:formula="of:=[$List.B227]" office:value-type="string" office:string-value="input reg." calcext:value-type="string">
            <text:p>input reg.</text:p>
          </table:table-cell>
          <table:table-cell table:style-name="ce17" table:formula="of:=[$List.I227]" office:value-type="string" office:string-value="CUP2_CHANNEL3_SAMPLE" calcext:value-type="string">
            <text:p>CUP2_CHANNEL3_SAMPLE</text:p>
          </table:table-cell>
          <table:table-cell table:style-name="ce17" table:formula="of:=[$List.G227]" office:value-type="float" office:value="0" calcext:value-type="float">
            <text:p>0</text:p>
          </table:table-cell>
          <table:table-cell table:formula="of:=IF(AND(([.A227]=&quot;coil&quot;);([.C227]=&quot;true&quot;)); 1; &quot;&quot;)">
            <text:p/>
          </table:table-cell>
          <table:table-cell table:formula="of:=IF(AND(([.A227]=&quot;holding reg.&quot;);([.C227] &lt;&gt; 0)); 1; &quot;&quot;)">
            <text:p/>
          </table:table-cell>
          <table:table-cell/>
          <table:table-cell table:formula="of:=IF([.D227]=1; COM.MICROSOFT.CONCAT(&quot;ModbusCoils[coilIndexFromAddress(MODBUS_ADDR_&quot;; [.B227]; &quot;)] = &quot;; [.C227]; &quot;;&quot;); IF([.E227]=1; COM.MICROSOFT.CONCAT(&quot;ModbusHoldingRegisters[holdingIndexFromAddress(MODBUS_ADDR_&quot;; [.B227]; &quot;)] = &quot;; [.C227]; &quot;u;&quot;); &quot;&quot;))">
            <text:p/>
          </table:table-cell>
        </table:table-row>
        <table:table-row table:style-name="ro1">
          <table:table-cell table:style-name="ce17" table:formula="of:=[$List.B228]" office:value-type="string" office:string-value="input reg." calcext:value-type="string">
            <text:p>input reg.</text:p>
          </table:table-cell>
          <table:table-cell table:style-name="ce17" table:formula="of:=[$List.I228]" office:value-type="string" office:string-value="CUP2_CHANNEL4_SAMPLE" calcext:value-type="string">
            <text:p>CUP2_CHANNEL4_SAMPLE</text:p>
          </table:table-cell>
          <table:table-cell table:style-name="ce17" table:formula="of:=[$List.G228]" office:value-type="float" office:value="0" calcext:value-type="float">
            <text:p>0</text:p>
          </table:table-cell>
          <table:table-cell table:formula="of:=IF(AND(([.A228]=&quot;coil&quot;);([.C228]=&quot;true&quot;)); 1; &quot;&quot;)">
            <text:p/>
          </table:table-cell>
          <table:table-cell table:formula="of:=IF(AND(([.A228]=&quot;holding reg.&quot;);([.C228] &lt;&gt; 0)); 1; &quot;&quot;)">
            <text:p/>
          </table:table-cell>
          <table:table-cell/>
          <table:table-cell table:formula="of:=IF([.D228]=1; COM.MICROSOFT.CONCAT(&quot;ModbusCoils[coilIndexFromAddress(MODBUS_ADDR_&quot;; [.B228]; &quot;)] = &quot;; [.C228]; &quot;;&quot;); IF([.E228]=1; COM.MICROSOFT.CONCAT(&quot;ModbusHoldingRegisters[holdingIndexFromAddress(MODBUS_ADDR_&quot;; [.B228]; &quot;)] = &quot;; [.C228]; &quot;u;&quot;); &quot;&quot;))">
            <text:p/>
          </table:table-cell>
        </table:table-row>
        <table:table-row table:style-name="ro1">
          <table:table-cell table:style-name="ce17" table:formula="of:=[$List.B229]" office:value-type="string" office:string-value="input reg." calcext:value-type="string">
            <text:p>input reg.</text:p>
          </table:table-cell>
          <table:table-cell table:style-name="ce17" table:formula="of:=[$List.I229]" office:value-type="string" office:string-value="CUP2_CHANNEL_ERROR" calcext:value-type="string">
            <text:p>CUP2_CHANNEL_ERROR</text:p>
          </table:table-cell>
          <table:table-cell table:style-name="ce17" table:formula="of:=[$List.G229]" office:value-type="float" office:value="0" calcext:value-type="float">
            <text:p>0</text:p>
          </table:table-cell>
          <table:table-cell table:formula="of:=IF(AND(([.A229]=&quot;coil&quot;);([.C229]=&quot;true&quot;)); 1; &quot;&quot;)">
            <text:p/>
          </table:table-cell>
          <table:table-cell table:formula="of:=IF(AND(([.A229]=&quot;holding reg.&quot;);([.C229] &lt;&gt; 0)); 1; &quot;&quot;)">
            <text:p/>
          </table:table-cell>
          <table:table-cell/>
          <table:table-cell table:formula="of:=IF([.D229]=1; COM.MICROSOFT.CONCAT(&quot;ModbusCoils[coilIndexFromAddress(MODBUS_ADDR_&quot;; [.B229]; &quot;)] = &quot;; [.C229]; &quot;;&quot;); IF([.E229]=1; COM.MICROSOFT.CONCAT(&quot;ModbusHoldingRegisters[holdingIndexFromAddress(MODBUS_ADDR_&quot;; [.B229]; &quot;)] = &quot;; [.C229]; &quot;u;&quot;); &quot;&quot;))">
            <text:p/>
          </table:table-cell>
        </table:table-row>
        <table:table-row table:style-name="ro1">
          <table:table-cell table:style-name="ce17" table:formula="of:=[$List.B230]" office:value-type="float" office:value="0" calcext:value-type="float">
            <text:p>0</text:p>
          </table:table-cell>
          <table:table-cell table:style-name="ce17" table:formula="of:=[$List.I230]">
            <text:p/>
          </table:table-cell>
          <table:table-cell table:style-name="ce17" table:formula="of:=[$List.G230]" office:value-type="float" office:value="0" calcext:value-type="float">
            <text:p>0</text:p>
          </table:table-cell>
          <table:table-cell table:formula="of:=IF(AND(([.A230]=&quot;coil&quot;);([.C230]=&quot;true&quot;)); 1; &quot;&quot;)">
            <text:p/>
          </table:table-cell>
          <table:table-cell table:formula="of:=IF(AND(([.A230]=&quot;holding reg.&quot;);([.C230] &lt;&gt; 0)); 1; &quot;&quot;)">
            <text:p/>
          </table:table-cell>
          <table:table-cell/>
          <table:table-cell table:formula="of:=IF([.D230]=1; COM.MICROSOFT.CONCAT(&quot;ModbusCoils[coilIndexFromAddress(MODBUS_ADDR_&quot;; [.B230]; &quot;)] = &quot;; [.C230]; &quot;;&quot;); IF([.E230]=1; COM.MICROSOFT.CONCAT(&quot;ModbusHoldingRegisters[holdingIndexFromAddress(MODBUS_ADDR_&quot;; [.B230]; &quot;)] = &quot;; [.C230]; &quot;u;&quot;); &quot;&quot;))">
            <text:p/>
          </table:table-cell>
        </table:table-row>
        <table:table-row table:style-name="ro1">
          <table:table-cell table:style-name="ce17" table:formula="of:=[$List.B231]" office:value-type="string" office:string-value="input reg." calcext:value-type="string">
            <text:p>input reg.</text:p>
          </table:table-cell>
          <table:table-cell table:style-name="ce17" table:formula="of:=[$List.I231]" office:value-type="string" office:string-value="CUP3_CHANNEL1_SAMPLE" calcext:value-type="string">
            <text:p>CUP3_CHANNEL1_SAMPLE</text:p>
          </table:table-cell>
          <table:table-cell table:style-name="ce17" table:formula="of:=[$List.G231]" office:value-type="float" office:value="0" calcext:value-type="float">
            <text:p>0</text:p>
          </table:table-cell>
          <table:table-cell table:formula="of:=IF(AND(([.A231]=&quot;coil&quot;);([.C231]=&quot;true&quot;)); 1; &quot;&quot;)">
            <text:p/>
          </table:table-cell>
          <table:table-cell table:formula="of:=IF(AND(([.A231]=&quot;holding reg.&quot;);([.C231] &lt;&gt; 0)); 1; &quot;&quot;)">
            <text:p/>
          </table:table-cell>
          <table:table-cell/>
          <table:table-cell table:formula="of:=IF([.D231]=1; COM.MICROSOFT.CONCAT(&quot;ModbusCoils[coilIndexFromAddress(MODBUS_ADDR_&quot;; [.B231]; &quot;)] = &quot;; [.C231]; &quot;;&quot;); IF([.E231]=1; COM.MICROSOFT.CONCAT(&quot;ModbusHoldingRegisters[holdingIndexFromAddress(MODBUS_ADDR_&quot;; [.B231]; &quot;)] = &quot;; [.C231]; &quot;u;&quot;); &quot;&quot;))">
            <text:p/>
          </table:table-cell>
        </table:table-row>
        <table:table-row table:style-name="ro1">
          <table:table-cell table:style-name="ce17" table:formula="of:=[$List.B232]" office:value-type="string" office:string-value="input reg." calcext:value-type="string">
            <text:p>input reg.</text:p>
          </table:table-cell>
          <table:table-cell table:style-name="ce17" table:formula="of:=[$List.I232]" office:value-type="string" office:string-value="CUP3_CHANNEL2_SAMPLE" calcext:value-type="string">
            <text:p>CUP3_CHANNEL2_SAMPLE</text:p>
          </table:table-cell>
          <table:table-cell table:style-name="ce17" table:formula="of:=[$List.G232]" office:value-type="float" office:value="0" calcext:value-type="float">
            <text:p>0</text:p>
          </table:table-cell>
          <table:table-cell table:formula="of:=IF(AND(([.A232]=&quot;coil&quot;);([.C232]=&quot;true&quot;)); 1; &quot;&quot;)">
            <text:p/>
          </table:table-cell>
          <table:table-cell table:formula="of:=IF(AND(([.A232]=&quot;holding reg.&quot;);([.C232] &lt;&gt; 0)); 1; &quot;&quot;)">
            <text:p/>
          </table:table-cell>
          <table:table-cell/>
          <table:table-cell table:formula="of:=IF([.D232]=1; COM.MICROSOFT.CONCAT(&quot;ModbusCoils[coilIndexFromAddress(MODBUS_ADDR_&quot;; [.B232]; &quot;)] = &quot;; [.C232]; &quot;;&quot;); IF([.E232]=1; COM.MICROSOFT.CONCAT(&quot;ModbusHoldingRegisters[holdingIndexFromAddress(MODBUS_ADDR_&quot;; [.B232]; &quot;)] = &quot;; [.C232]; &quot;u;&quot;); &quot;&quot;))">
            <text:p/>
          </table:table-cell>
        </table:table-row>
        <table:table-row table:style-name="ro1">
          <table:table-cell table:style-name="ce17" table:formula="of:=[$List.B233]" office:value-type="string" office:string-value="input reg." calcext:value-type="string">
            <text:p>input reg.</text:p>
          </table:table-cell>
          <table:table-cell table:style-name="ce17" table:formula="of:=[$List.I233]" office:value-type="string" office:string-value="CUP3_CHANNEL3_SAMPLE" calcext:value-type="string">
            <text:p>CUP3_CHANNEL3_SAMPLE</text:p>
          </table:table-cell>
          <table:table-cell table:style-name="ce17" table:formula="of:=[$List.G233]" office:value-type="float" office:value="0" calcext:value-type="float">
            <text:p>0</text:p>
          </table:table-cell>
          <table:table-cell table:formula="of:=IF(AND(([.A233]=&quot;coil&quot;);([.C233]=&quot;true&quot;)); 1; &quot;&quot;)">
            <text:p/>
          </table:table-cell>
          <table:table-cell table:formula="of:=IF(AND(([.A233]=&quot;holding reg.&quot;);([.C233] &lt;&gt; 0)); 1; &quot;&quot;)">
            <text:p/>
          </table:table-cell>
          <table:table-cell/>
          <table:table-cell table:formula="of:=IF([.D233]=1; COM.MICROSOFT.CONCAT(&quot;ModbusCoils[coilIndexFromAddress(MODBUS_ADDR_&quot;; [.B233]; &quot;)] = &quot;; [.C233]; &quot;;&quot;); IF([.E233]=1; COM.MICROSOFT.CONCAT(&quot;ModbusHoldingRegisters[holdingIndexFromAddress(MODBUS_ADDR_&quot;; [.B233]; &quot;)] = &quot;; [.C233]; &quot;u;&quot;); &quot;&quot;))">
            <text:p/>
          </table:table-cell>
        </table:table-row>
        <table:table-row table:style-name="ro1">
          <table:table-cell table:style-name="ce17" table:formula="of:=[$List.B234]" office:value-type="string" office:string-value="input reg." calcext:value-type="string">
            <text:p>input reg.</text:p>
          </table:table-cell>
          <table:table-cell table:style-name="ce17" table:formula="of:=[$List.I234]" office:value-type="string" office:string-value="CUP3_CHANNEL4_SAMPLE" calcext:value-type="string">
            <text:p>CUP3_CHANNEL4_SAMPLE</text:p>
          </table:table-cell>
          <table:table-cell table:style-name="ce17" table:formula="of:=[$List.G234]" office:value-type="float" office:value="0" calcext:value-type="float">
            <text:p>0</text:p>
          </table:table-cell>
          <table:table-cell table:formula="of:=IF(AND(([.A234]=&quot;coil&quot;);([.C234]=&quot;true&quot;)); 1; &quot;&quot;)">
            <text:p/>
          </table:table-cell>
          <table:table-cell table:formula="of:=IF(AND(([.A234]=&quot;holding reg.&quot;);([.C234] &lt;&gt; 0)); 1; &quot;&quot;)">
            <text:p/>
          </table:table-cell>
          <table:table-cell/>
          <table:table-cell table:formula="of:=IF([.D234]=1; COM.MICROSOFT.CONCAT(&quot;ModbusCoils[coilIndexFromAddress(MODBUS_ADDR_&quot;; [.B234]; &quot;)] = &quot;; [.C234]; &quot;;&quot;); IF([.E234]=1; COM.MICROSOFT.CONCAT(&quot;ModbusHoldingRegisters[holdingIndexFromAddress(MODBUS_ADDR_&quot;; [.B234]; &quot;)] = &quot;; [.C234]; &quot;u;&quot;); &quot;&quot;))">
            <text:p/>
          </table:table-cell>
        </table:table-row>
        <table:table-row table:style-name="ro1">
          <table:table-cell table:style-name="ce17" table:formula="of:=[$List.B235]" office:value-type="string" office:string-value="input reg." calcext:value-type="string">
            <text:p>input reg.</text:p>
          </table:table-cell>
          <table:table-cell table:style-name="ce17" table:formula="of:=[$List.I235]" office:value-type="string" office:string-value="CUP3_CHANNEL_ERROR" calcext:value-type="string">
            <text:p>CUP3_CHANNEL_ERROR</text:p>
          </table:table-cell>
          <table:table-cell table:style-name="ce17" table:formula="of:=[$List.G235]" office:value-type="float" office:value="0" calcext:value-type="float">
            <text:p>0</text:p>
          </table:table-cell>
          <table:table-cell table:formula="of:=IF(AND(([.A235]=&quot;coil&quot;);([.C235]=&quot;true&quot;)); 1; &quot;&quot;)">
            <text:p/>
          </table:table-cell>
          <table:table-cell table:formula="of:=IF(AND(([.A235]=&quot;holding reg.&quot;);([.C235] &lt;&gt; 0)); 1; &quot;&quot;)">
            <text:p/>
          </table:table-cell>
          <table:table-cell/>
          <table:table-cell table:formula="of:=IF([.D235]=1; COM.MICROSOFT.CONCAT(&quot;ModbusCoils[coilIndexFromAddress(MODBUS_ADDR_&quot;; [.B235]; &quot;)] = &quot;; [.C235]; &quot;;&quot;); IF([.E235]=1; COM.MICROSOFT.CONCAT(&quot;ModbusHoldingRegisters[holdingIndexFromAddress(MODBUS_ADDR_&quot;; [.B235]; &quot;)] = &quot;; [.C235]; &quot;u;&quot;); &quot;&quot;))">
            <text:p/>
          </table:table-cell>
        </table:table-row>
        <table:table-row table:style-name="ro1">
          <table:table-cell table:style-name="ce17" table:formula="of:=[$List.B236]" office:value-type="float" office:value="0" calcext:value-type="float">
            <text:p>0</text:p>
          </table:table-cell>
          <table:table-cell table:style-name="ce17" table:formula="of:=[$List.I236]" office:value-type="float" office:value="0" calcext:value-type="float">
            <text:p>0</text:p>
          </table:table-cell>
          <table:table-cell table:style-name="ce17" table:formula="of:=[$List.G236]" office:value-type="float" office:value="0" calcext:value-type="float">
            <text:p>0</text:p>
          </table:table-cell>
          <table:table-cell table:formula="of:=IF(AND(([.A236]=&quot;coil&quot;);([.C236]=&quot;true&quot;)); 1; &quot;&quot;)">
            <text:p/>
          </table:table-cell>
          <table:table-cell table:formula="of:=IF(AND(([.A236]=&quot;holding reg.&quot;);([.C236] &lt;&gt; 0)); 1; &quot;&quot;)">
            <text:p/>
          </table:table-cell>
          <table:table-cell/>
          <table:table-cell table:formula="of:=IF([.D236]=1; COM.MICROSOFT.CONCAT(&quot;ModbusCoils[coilIndexFromAddress(MODBUS_ADDR_&quot;; [.B236]; &quot;)] = &quot;; [.C236]; &quot;;&quot;); IF([.E236]=1; COM.MICROSOFT.CONCAT(&quot;ModbusHoldingRegisters[holdingIndexFromAddress(MODBUS_ADDR_&quot;; [.B236]; &quot;)] = &quot;; [.C236]; &quot;u;&quot;); &quot;&quot;))">
            <text:p/>
          </table:table-cell>
        </table:table-row>
        <table:table-row table:style-name="ro1">
          <table:table-cell table:style-name="ce17" table:formula="of:=[$List.B237]" office:value-type="float" office:value="0" calcext:value-type="float">
            <text:p>0</text:p>
          </table:table-cell>
          <table:table-cell table:style-name="ce17" table:formula="of:=[$List.I237]" office:value-type="float" office:value="0" calcext:value-type="float">
            <text:p>0</text:p>
          </table:table-cell>
          <table:table-cell table:style-name="ce17" table:formula="of:=[$List.G237]" office:value-type="float" office:value="0" calcext:value-type="float">
            <text:p>0</text:p>
          </table:table-cell>
          <table:table-cell table:formula="of:=IF(AND(([.A237]=&quot;coil&quot;);([.C237]=&quot;true&quot;)); 1; &quot;&quot;)">
            <text:p/>
          </table:table-cell>
          <table:table-cell table:formula="of:=IF(AND(([.A237]=&quot;holding reg.&quot;);([.C237] &lt;&gt; 0)); 1; &quot;&quot;)">
            <text:p/>
          </table:table-cell>
          <table:table-cell/>
          <table:table-cell table:formula="of:=IF([.D237]=1; COM.MICROSOFT.CONCAT(&quot;ModbusCoils[coilIndexFromAddress(MODBUS_ADDR_&quot;; [.B237]; &quot;)] = &quot;; [.C237]; &quot;;&quot;); IF([.E237]=1; COM.MICROSOFT.CONCAT(&quot;ModbusHoldingRegisters[holdingIndexFromAddress(MODBUS_ADDR_&quot;; [.B237]; &quot;)] = &quot;; [.C237]; &quot;u;&quot;); &quot;&quot;))">
            <text:p/>
          </table:table-cell>
        </table:table-row>
        <table:table-row table:style-name="ro1">
          <table:table-cell table:style-name="ce17" table:formula="of:=[$List.B238]" office:value-type="float" office:value="0" calcext:value-type="float">
            <text:p>0</text:p>
          </table:table-cell>
          <table:table-cell table:style-name="ce17" table:formula="of:=[$List.I238]" office:value-type="float" office:value="0" calcext:value-type="float">
            <text:p>0</text:p>
          </table:table-cell>
          <table:table-cell table:style-name="ce17" table:formula="of:=[$List.G238]" office:value-type="float" office:value="0" calcext:value-type="float">
            <text:p>0</text:p>
          </table:table-cell>
          <table:table-cell table:formula="of:=IF(AND(([.A238]=&quot;coil&quot;);([.C238]=&quot;true&quot;)); 1; &quot;&quot;)">
            <text:p/>
          </table:table-cell>
          <table:table-cell table:formula="of:=IF(AND(([.A238]=&quot;holding reg.&quot;);([.C238] &lt;&gt; 0)); 1; &quot;&quot;)">
            <text:p/>
          </table:table-cell>
          <table:table-cell/>
          <table:table-cell table:formula="of:=IF([.D238]=1; COM.MICROSOFT.CONCAT(&quot;ModbusCoils[coilIndexFromAddress(MODBUS_ADDR_&quot;; [.B238]; &quot;)] = &quot;; [.C238]; &quot;;&quot;); IF([.E238]=1; COM.MICROSOFT.CONCAT(&quot;ModbusHoldingRegisters[holdingIndexFromAddress(MODBUS_ADDR_&quot;; [.B238]; &quot;)] = &quot;; [.C238]; &quot;u;&quot;); &quot;&quot;))">
            <text:p/>
          </table:table-cell>
        </table:table-row>
        <table:table-row table:style-name="ro1">
          <table:table-cell table:style-name="ce17" table:formula="of:=[$List.B239]" office:value-type="float" office:value="0" calcext:value-type="float">
            <text:p>0</text:p>
          </table:table-cell>
          <table:table-cell table:style-name="ce17" table:formula="of:=[$List.I239]" office:value-type="float" office:value="0" calcext:value-type="float">
            <text:p>0</text:p>
          </table:table-cell>
          <table:table-cell table:style-name="ce17" table:formula="of:=[$List.G239]" office:value-type="float" office:value="0" calcext:value-type="float">
            <text:p>0</text:p>
          </table:table-cell>
          <table:table-cell table:formula="of:=IF(AND(([.A239]=&quot;coil&quot;);([.C239]=&quot;true&quot;)); 1; &quot;&quot;)">
            <text:p/>
          </table:table-cell>
          <table:table-cell table:formula="of:=IF(AND(([.A239]=&quot;holding reg.&quot;);([.C239] &lt;&gt; 0)); 1; &quot;&quot;)">
            <text:p/>
          </table:table-cell>
          <table:table-cell/>
          <table:table-cell table:formula="of:=IF([.D239]=1; COM.MICROSOFT.CONCAT(&quot;ModbusCoils[coilIndexFromAddress(MODBUS_ADDR_&quot;; [.B239]; &quot;)] = &quot;; [.C239]; &quot;;&quot;); IF([.E239]=1; COM.MICROSOFT.CONCAT(&quot;ModbusHoldingRegisters[holdingIndexFromAddress(MODBUS_ADDR_&quot;; [.B239]; &quot;)] = &quot;; [.C239]; &quot;u;&quot;); &quot;&quot;))">
            <text:p/>
          </table:table-cell>
        </table:table-row>
        <table:table-row table:style-name="ro1">
          <table:table-cell table:style-name="ce17" table:formula="of:=[$List.B240]" office:value-type="float" office:value="0" calcext:value-type="float">
            <text:p>0</text:p>
          </table:table-cell>
          <table:table-cell table:style-name="ce17" table:formula="of:=[$List.I240]" office:value-type="float" office:value="0" calcext:value-type="float">
            <text:p>0</text:p>
          </table:table-cell>
          <table:table-cell table:style-name="ce17" table:formula="of:=[$List.G240]" office:value-type="float" office:value="0" calcext:value-type="float">
            <text:p>0</text:p>
          </table:table-cell>
          <table:table-cell table:formula="of:=IF(AND(([.A240]=&quot;coil&quot;);([.C240]=&quot;true&quot;)); 1; &quot;&quot;)">
            <text:p/>
          </table:table-cell>
          <table:table-cell table:formula="of:=IF(AND(([.A240]=&quot;holding reg.&quot;);([.C240] &lt;&gt; 0)); 1; &quot;&quot;)">
            <text:p/>
          </table:table-cell>
          <table:table-cell/>
          <table:table-cell table:formula="of:=IF([.D240]=1; COM.MICROSOFT.CONCAT(&quot;ModbusCoils[coilIndexFromAddress(MODBUS_ADDR_&quot;; [.B240]; &quot;)] = &quot;; [.C240]; &quot;;&quot;); IF([.E240]=1; COM.MICROSOFT.CONCAT(&quot;ModbusHoldingRegisters[holdingIndexFromAddress(MODBUS_ADDR_&quot;; [.B240]; &quot;)] = &quot;; [.C240]; &quot;u;&quot;); &quot;&quot;))">
            <text:p/>
          </table:table-cell>
        </table:table-row>
        <table:table-row table:style-name="ro1">
          <table:table-cell table:style-name="ce17" table:formula="of:=[$List.B241]" office:value-type="float" office:value="0" calcext:value-type="float">
            <text:p>0</text:p>
          </table:table-cell>
          <table:table-cell table:style-name="ce17" table:formula="of:=[$List.I241]" office:value-type="float" office:value="0" calcext:value-type="float">
            <text:p>0</text:p>
          </table:table-cell>
          <table:table-cell table:style-name="ce17" table:formula="of:=[$List.G241]" office:value-type="float" office:value="0" calcext:value-type="float">
            <text:p>0</text:p>
          </table:table-cell>
          <table:table-cell table:formula="of:=IF(AND(([.A241]=&quot;coil&quot;);([.C241]=&quot;true&quot;)); 1; &quot;&quot;)">
            <text:p/>
          </table:table-cell>
          <table:table-cell table:formula="of:=IF(AND(([.A241]=&quot;holding reg.&quot;);([.C241] &lt;&gt; 0)); 1; &quot;&quot;)">
            <text:p/>
          </table:table-cell>
          <table:table-cell/>
          <table:table-cell table:formula="of:=IF([.D241]=1; COM.MICROSOFT.CONCAT(&quot;ModbusCoils[coilIndexFromAddress(MODBUS_ADDR_&quot;; [.B241]; &quot;)] = &quot;; [.C241]; &quot;;&quot;); IF([.E241]=1; COM.MICROSOFT.CONCAT(&quot;ModbusHoldingRegisters[holdingIndexFromAddress(MODBUS_ADDR_&quot;; [.B241]; &quot;)] = &quot;; [.C241]; &quot;u;&quot;); &quot;&quot;))">
            <text:p/>
          </table:table-cell>
        </table:table-row>
        <table:table-row table:style-name="ro1">
          <table:table-cell table:style-name="ce17" table:formula="of:=[$List.B242]" office:value-type="float" office:value="0" calcext:value-type="float">
            <text:p>0</text:p>
          </table:table-cell>
          <table:table-cell table:style-name="ce17" table:formula="of:=[$List.I242]" office:value-type="float" office:value="0" calcext:value-type="float">
            <text:p>0</text:p>
          </table:table-cell>
          <table:table-cell table:style-name="ce17" table:formula="of:=[$List.G242]" office:value-type="float" office:value="0" calcext:value-type="float">
            <text:p>0</text:p>
          </table:table-cell>
          <table:table-cell table:formula="of:=IF(AND(([.A242]=&quot;coil&quot;);([.C242]=&quot;true&quot;)); 1; &quot;&quot;)">
            <text:p/>
          </table:table-cell>
          <table:table-cell table:formula="of:=IF(AND(([.A242]=&quot;holding reg.&quot;);([.C242] &lt;&gt; 0)); 1; &quot;&quot;)">
            <text:p/>
          </table:table-cell>
          <table:table-cell/>
          <table:table-cell table:formula="of:=IF([.D242]=1; COM.MICROSOFT.CONCAT(&quot;ModbusCoils[coilIndexFromAddress(MODBUS_ADDR_&quot;; [.B242]; &quot;)] = &quot;; [.C242]; &quot;;&quot;); IF([.E242]=1; COM.MICROSOFT.CONCAT(&quot;ModbusHoldingRegisters[holdingIndexFromAddress(MODBUS_ADDR_&quot;; [.B242]; &quot;)] = &quot;; [.C242]; &quot;u;&quot;); &quot;&quot;))">
            <text:p/>
          </table:table-cell>
        </table:table-row>
        <table:table-row table:style-name="ro1">
          <table:table-cell table:style-name="ce17" table:formula="of:=[$List.B243]" office:value-type="float" office:value="0" calcext:value-type="float">
            <text:p>0</text:p>
          </table:table-cell>
          <table:table-cell table:style-name="ce17" table:formula="of:=[$List.I243]" office:value-type="float" office:value="0" calcext:value-type="float">
            <text:p>0</text:p>
          </table:table-cell>
          <table:table-cell table:style-name="ce17" table:formula="of:=[$List.G243]" office:value-type="float" office:value="0" calcext:value-type="float">
            <text:p>0</text:p>
          </table:table-cell>
          <table:table-cell table:formula="of:=IF(AND(([.A243]=&quot;coil&quot;);([.C243]=&quot;true&quot;)); 1; &quot;&quot;)">
            <text:p/>
          </table:table-cell>
          <table:table-cell table:formula="of:=IF(AND(([.A243]=&quot;holding reg.&quot;);([.C243] &lt;&gt; 0)); 1; &quot;&quot;)">
            <text:p/>
          </table:table-cell>
          <table:table-cell/>
          <table:table-cell table:formula="of:=IF([.D243]=1; COM.MICROSOFT.CONCAT(&quot;ModbusCoils[coilIndexFromAddress(MODBUS_ADDR_&quot;; [.B243]; &quot;)] = &quot;; [.C243]; &quot;;&quot;); IF([.E243]=1; COM.MICROSOFT.CONCAT(&quot;ModbusHoldingRegisters[holdingIndexFromAddress(MODBUS_ADDR_&quot;; [.B243]; &quot;)] = &quot;; [.C243]; &quot;u;&quot;); &quot;&quot;))">
            <text:p/>
          </table:table-cell>
        </table:table-row>
        <table:table-row table:style-name="ro1">
          <table:table-cell table:style-name="ce17" table:formula="of:=[$List.B244]" office:value-type="float" office:value="0" calcext:value-type="float">
            <text:p>0</text:p>
          </table:table-cell>
          <table:table-cell table:style-name="ce17" table:formula="of:=[$List.I244]" office:value-type="float" office:value="0" calcext:value-type="float">
            <text:p>0</text:p>
          </table:table-cell>
          <table:table-cell table:style-name="ce17" table:formula="of:=[$List.G244]" office:value-type="float" office:value="0" calcext:value-type="float">
            <text:p>0</text:p>
          </table:table-cell>
          <table:table-cell table:formula="of:=IF(AND(([.A244]=&quot;coil&quot;);([.C244]=&quot;true&quot;)); 1; &quot;&quot;)">
            <text:p/>
          </table:table-cell>
          <table:table-cell table:formula="of:=IF(AND(([.A244]=&quot;holding reg.&quot;);([.C244] &lt;&gt; 0)); 1; &quot;&quot;)">
            <text:p/>
          </table:table-cell>
          <table:table-cell/>
          <table:table-cell table:formula="of:=IF([.D244]=1; COM.MICROSOFT.CONCAT(&quot;ModbusCoils[coilIndexFromAddress(MODBUS_ADDR_&quot;; [.B244]; &quot;)] = &quot;; [.C244]; &quot;;&quot;); IF([.E244]=1; COM.MICROSOFT.CONCAT(&quot;ModbusHoldingRegisters[holdingIndexFromAddress(MODBUS_ADDR_&quot;; [.B244]; &quot;)] = &quot;; [.C244]; &quot;u;&quot;); &quot;&quot;))">
            <text:p/>
          </table:table-cell>
        </table:table-row>
        <table:table-row table:style-name="ro1">
          <table:table-cell table:style-name="ce17" table:formula="of:=[$List.B245]" office:value-type="float" office:value="0" calcext:value-type="float">
            <text:p>0</text:p>
          </table:table-cell>
          <table:table-cell table:style-name="ce17" table:formula="of:=[$List.I245]" office:value-type="float" office:value="0" calcext:value-type="float">
            <text:p>0</text:p>
          </table:table-cell>
          <table:table-cell table:style-name="ce17" table:formula="of:=[$List.G245]" office:value-type="float" office:value="0" calcext:value-type="float">
            <text:p>0</text:p>
          </table:table-cell>
          <table:table-cell table:formula="of:=IF(AND(([.A245]=&quot;coil&quot;);([.C245]=&quot;true&quot;)); 1; &quot;&quot;)">
            <text:p/>
          </table:table-cell>
          <table:table-cell table:formula="of:=IF(AND(([.A245]=&quot;holding reg.&quot;);([.C245] &lt;&gt; 0)); 1; &quot;&quot;)">
            <text:p/>
          </table:table-cell>
          <table:table-cell/>
          <table:table-cell table:formula="of:=IF([.D245]=1; COM.MICROSOFT.CONCAT(&quot;ModbusCoils[coilIndexFromAddress(MODBUS_ADDR_&quot;; [.B245]; &quot;)] = &quot;; [.C245]; &quot;;&quot;); IF([.E245]=1; COM.MICROSOFT.CONCAT(&quot;ModbusHoldingRegisters[holdingIndexFromAddress(MODBUS_ADDR_&quot;; [.B245]; &quot;)] = &quot;; [.C245]; &quot;u;&quot;); &quot;&quot;))">
            <text:p/>
          </table:table-cell>
        </table:table-row>
        <table:table-row table:style-name="ro1">
          <table:table-cell table:style-name="ce17" table:formula="of:=[$List.B246]" office:value-type="float" office:value="0" calcext:value-type="float">
            <text:p>0</text:p>
          </table:table-cell>
          <table:table-cell table:style-name="ce17" table:formula="of:=[$List.I246]" office:value-type="float" office:value="0" calcext:value-type="float">
            <text:p>0</text:p>
          </table:table-cell>
          <table:table-cell table:style-name="ce17" table:formula="of:=[$List.G246]" office:value-type="float" office:value="0" calcext:value-type="float">
            <text:p>0</text:p>
          </table:table-cell>
          <table:table-cell table:formula="of:=IF(AND(([.A246]=&quot;coil&quot;);([.C246]=&quot;true&quot;)); 1; &quot;&quot;)">
            <text:p/>
          </table:table-cell>
          <table:table-cell table:formula="of:=IF(AND(([.A246]=&quot;holding reg.&quot;);([.C246] &lt;&gt; 0)); 1; &quot;&quot;)">
            <text:p/>
          </table:table-cell>
          <table:table-cell/>
          <table:table-cell table:formula="of:=IF([.D246]=1; COM.MICROSOFT.CONCAT(&quot;ModbusCoils[coilIndexFromAddress(MODBUS_ADDR_&quot;; [.B246]; &quot;)] = &quot;; [.C246]; &quot;;&quot;); IF([.E246]=1; COM.MICROSOFT.CONCAT(&quot;ModbusHoldingRegisters[holdingIndexFromAddress(MODBUS_ADDR_&quot;; [.B246]; &quot;)] = &quot;; [.C246]; &quot;u;&quot;); &quot;&quot;))">
            <text:p/>
          </table:table-cell>
        </table:table-row>
        <table:table-row table:style-name="ro1">
          <table:table-cell table:style-name="ce17" table:formula="of:=[$List.B247]" office:value-type="float" office:value="0" calcext:value-type="float">
            <text:p>0</text:p>
          </table:table-cell>
          <table:table-cell table:style-name="ce17" table:formula="of:=[$List.I247]" office:value-type="float" office:value="0" calcext:value-type="float">
            <text:p>0</text:p>
          </table:table-cell>
          <table:table-cell table:style-name="ce17" table:formula="of:=[$List.G247]" office:value-type="float" office:value="0" calcext:value-type="float">
            <text:p>0</text:p>
          </table:table-cell>
          <table:table-cell table:formula="of:=IF(AND(([.A247]=&quot;coil&quot;);([.C247]=&quot;true&quot;)); 1; &quot;&quot;)">
            <text:p/>
          </table:table-cell>
          <table:table-cell table:formula="of:=IF(AND(([.A247]=&quot;holding reg.&quot;);([.C247] &lt;&gt; 0)); 1; &quot;&quot;)">
            <text:p/>
          </table:table-cell>
          <table:table-cell/>
          <table:table-cell table:formula="of:=IF([.D247]=1; COM.MICROSOFT.CONCAT(&quot;ModbusCoils[coilIndexFromAddress(MODBUS_ADDR_&quot;; [.B247]; &quot;)] = &quot;; [.C247]; &quot;;&quot;); IF([.E247]=1; COM.MICROSOFT.CONCAT(&quot;ModbusHoldingRegisters[holdingIndexFromAddress(MODBUS_ADDR_&quot;; [.B247]; &quot;)] = &quot;; [.C247]; &quot;u;&quot;); &quot;&quot;))">
            <text:p/>
          </table:table-cell>
        </table:table-row>
        <table:table-row table:style-name="ro1">
          <table:table-cell table:style-name="ce17" table:formula="of:=[$List.B248]" office:value-type="float" office:value="0" calcext:value-type="float">
            <text:p>0</text:p>
          </table:table-cell>
          <table:table-cell table:style-name="ce17" table:formula="of:=[$List.I248]" office:value-type="float" office:value="0" calcext:value-type="float">
            <text:p>0</text:p>
          </table:table-cell>
          <table:table-cell table:style-name="ce17" table:formula="of:=[$List.G248]" office:value-type="float" office:value="0" calcext:value-type="float">
            <text:p>0</text:p>
          </table:table-cell>
          <table:table-cell table:formula="of:=IF(AND(([.A248]=&quot;coil&quot;);([.C248]=&quot;true&quot;)); 1; &quot;&quot;)">
            <text:p/>
          </table:table-cell>
          <table:table-cell table:formula="of:=IF(AND(([.A248]=&quot;holding reg.&quot;);([.C248] &lt;&gt; 0)); 1; &quot;&quot;)">
            <text:p/>
          </table:table-cell>
          <table:table-cell/>
          <table:table-cell table:formula="of:=IF([.D248]=1; COM.MICROSOFT.CONCAT(&quot;ModbusCoils[coilIndexFromAddress(MODBUS_ADDR_&quot;; [.B248]; &quot;)] = &quot;; [.C248]; &quot;;&quot;); IF([.E248]=1; COM.MICROSOFT.CONCAT(&quot;ModbusHoldingRegisters[holdingIndexFromAddress(MODBUS_ADDR_&quot;; [.B248]; &quot;)] = &quot;; [.C248]; &quot;u;&quot;); &quot;&quot;))">
            <text:p/>
          </table:table-cell>
        </table:table-row>
        <table:table-row table:style-name="ro1">
          <table:table-cell table:style-name="ce17" table:formula="of:=[$List.B249]" office:value-type="float" office:value="0" calcext:value-type="float">
            <text:p>0</text:p>
          </table:table-cell>
          <table:table-cell table:style-name="ce17" table:formula="of:=[$List.I249]" office:value-type="float" office:value="0" calcext:value-type="float">
            <text:p>0</text:p>
          </table:table-cell>
          <table:table-cell table:style-name="ce17" table:formula="of:=[$List.G249]" office:value-type="float" office:value="0" calcext:value-type="float">
            <text:p>0</text:p>
          </table:table-cell>
          <table:table-cell table:formula="of:=IF(AND(([.A249]=&quot;coil&quot;);([.C249]=&quot;true&quot;)); 1; &quot;&quot;)">
            <text:p/>
          </table:table-cell>
          <table:table-cell table:formula="of:=IF(AND(([.A249]=&quot;holding reg.&quot;);([.C249] &lt;&gt; 0)); 1; &quot;&quot;)">
            <text:p/>
          </table:table-cell>
          <table:table-cell/>
          <table:table-cell table:formula="of:=IF([.D249]=1; COM.MICROSOFT.CONCAT(&quot;ModbusCoils[coilIndexFromAddress(MODBUS_ADDR_&quot;; [.B249]; &quot;)] = &quot;; [.C249]; &quot;;&quot;); IF([.E249]=1; COM.MICROSOFT.CONCAT(&quot;ModbusHoldingRegisters[holdingIndexFromAddress(MODBUS_ADDR_&quot;; [.B249]; &quot;)] = &quot;; [.C249]; &quot;u;&quot;); &quot;&quot;))">
            <text:p/>
          </table:table-cell>
        </table:table-row>
        <table:table-row table:style-name="ro1">
          <table:table-cell table:style-name="ce17" table:formula="of:=[$List.B250]" office:value-type="float" office:value="0" calcext:value-type="float">
            <text:p>0</text:p>
          </table:table-cell>
          <table:table-cell table:style-name="ce17" table:formula="of:=[$List.I250]" office:value-type="float" office:value="0" calcext:value-type="float">
            <text:p>0</text:p>
          </table:table-cell>
          <table:table-cell table:style-name="ce17" table:formula="of:=[$List.G250]" office:value-type="float" office:value="0" calcext:value-type="float">
            <text:p>0</text:p>
          </table:table-cell>
          <table:table-cell table:formula="of:=IF(AND(([.A250]=&quot;coil&quot;);([.C250]=&quot;true&quot;)); 1; &quot;&quot;)">
            <text:p/>
          </table:table-cell>
          <table:table-cell table:formula="of:=IF(AND(([.A250]=&quot;holding reg.&quot;);([.C250] &lt;&gt; 0)); 1; &quot;&quot;)">
            <text:p/>
          </table:table-cell>
          <table:table-cell/>
          <table:table-cell table:formula="of:=IF([.D250]=1; COM.MICROSOFT.CONCAT(&quot;ModbusCoils[coilIndexFromAddress(MODBUS_ADDR_&quot;; [.B250]; &quot;)] = &quot;; [.C250]; &quot;;&quot;); IF([.E250]=1; COM.MICROSOFT.CONCAT(&quot;ModbusHoldingRegisters[holdingIndexFromAddress(MODBUS_ADDR_&quot;; [.B250]; &quot;)] = &quot;; [.C250]; &quot;u;&quot;); &quot;&quot;))">
            <text:p/>
          </table:table-cell>
        </table:table-row>
        <table:table-row table:style-name="ro1" table:number-rows-repeated="104832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1" number:min-decimal-places="1" number:min-integer-digits="1"/>
    </number:number-style>
    <number:number-style style:name="N132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4">00/00/0000</text:date>, <text:time style:data-style-name="N2" text:time-value="09:01:58.604901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4:47:36.211344767</meta:creation-date>
    <dc:date>2026-06-24T09:54:06.755678349</dc:date>
    <meta:editing-duration>P1DT21H34M59S</meta:editing-duration>
    <meta:editing-cycles>218</meta:editing-cycles>
    <meta:generator>LibreOffice/24.2.7.2$Linux_X86_64 LibreOffice_project/420$Build-2</meta:generator>
    <meta:document-statistic meta:table-count="3" meta:cell-count="4708" meta:object-count="0"/>
  </office:meta>
</office:document-meta>
</file>