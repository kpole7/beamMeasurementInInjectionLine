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1ErrorRecovery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ERROR_RECOVERY" calcext:value-type="string">
            <text:p>CUP1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eset the Faraday cup #1 at the user's request; change false to true =&gt; clear the error and try to restore the inserted position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2ErrorRecovery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ERROR_RECOVERY" calcext:value-type="string">
            <text:p>CUP2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2 <text:s text:c="5"/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up3ErrorRecovery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ERROR_RECOVERY" calcext:value-type="string">
            <text:p>CUP3_ERROR_RECOVER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 <text:s text:c="15"/>#3 <text:s text:c="5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3"/>
          <table:table-cell table:style-name="ce2" table:number-columns-repeated="3"/>
          <table:table-cell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#REF!=1; TYPE(#REF!)=8); #REF!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7]&lt;&gt;&quot;&quot;; UPPER(ORG.LIBREOFFICE.REGEX([.H27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8]&lt;&gt;&quot;&quot;; UPPER(ORG.LIBREOFFICE.REGEX([.H28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1]&lt;&gt;&quot;&quot;; UPPER(ORG.LIBREOFFICE.REGEX([.H3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3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6]&lt;&gt;&quot;&quot;; UPPER(ORG.LIBREOFFICE.REGEX([.H3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9]&lt;&gt;&quot;&quot;; UPPER(ORG.LIBREOFFICE.REGEX([.H39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41]&lt;&gt;&quot;&quot;; UPPER(ORG.LIBREOFFICE.REGEX([.H41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43]&lt;&gt;&quot;&quot;; UPPER(ORG.LIBREOFFICE.REGEX([.H4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Cup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5]&lt;&gt;&quot;&quot;; UPPER(ORG.LIBREOFFICE.REGEX([.H45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5]=1; TYPE([.A45])=8); [.A45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5]=1; TYPE([.A45])=8); [.A45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4]&lt;&gt;&quot;&quot;; UPPER(ORG.LIBREOFFICE.REGEX([.H54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8]&lt;&gt;&quot;&quot;; UPPER(ORG.LIBREOFFICE.REGEX([.H5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62]&lt;&gt;&quot;&quot;; UPPER(ORG.LIBREOFFICE.REGEX([.H62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pneumatic mechanism with 1 limit switch and lock functionality; 2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2Type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p3Type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6]&lt;&gt;&quot;&quot;; UPPER(ORG.LIBREOFFICE.REGEX([.H66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4169" calcext:value-type="float">
            <text:p>24169</text:p>
          </table:table-cell>
          <table:table-cell office:value-type="string" calcext:value-type="string">
            <text:p>CalibrationCurrent1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ALIBRATION_CURRENT1" calcext:value-type="string">
            <text:p>CALIBRATION_CURR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Calibration current value #1 (unit = 10nA)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410" calcext:value-type="float">
            <text:p>2410</text:p>
          </table:table-cell>
          <table:table-cell office:value-type="string" calcext:value-type="string">
            <text:p>CalibrationCurrent2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ALIBRATION_CURRENT2" calcext:value-type="string">
            <text:p>CALIBRATION_CURRE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2 <text:s text:c="4"/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2198" calcext:value-type="float">
            <text:p>2198</text:p>
          </table:table-cell>
          <table:table-cell office:value-type="string" calcext:value-type="string">
            <text:p>CalibrationCurrent3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ALIBRATION_CURRENT3" calcext:value-type="string">
            <text:p>CALIBRATION_CURRE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3 <text:s text:c="4"/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style-name="ce17" office:value-type="float" office:value="158" calcext:value-type="float">
            <text:p>158</text:p>
          </table:table-cell>
          <table:table-cell office:value-type="string" calcext:value-type="string">
            <text:p>CalibrationCurrent4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ALIBRATION_CURRENT4" calcext:value-type="string">
            <text:p>CALIBRATION_CURRE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5"/>- // - <text:s text:c="14"/>#4 <text:s text:c="4"/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up1Channel1GainLowPoint1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1_CHANNEL1_GAIN_LOW_POINT1" calcext:value-type="string">
            <text:p>CUP1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1 is selected and calibration current #1 is applied to the input (ADC1 = low-gain signal); default values = experimentally measured values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up1Channel1GainLowPoint2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1_CHANNEL1_GAIN_LOW_POINT2" calcext:value-type="string">
            <text:p>CUP1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up1Channel1GainLowPoint3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1_CHANNEL1_GAIN_LOW_POINT3" calcext:value-type="string">
            <text:p>CUP1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66]=1; TYPE([.A66])=8); [.A66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Cup1Channel1GainHighPoint2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1_CHANNEL1_GAIN_HIGH_POINT2" calcext:value-type="string">
            <text:p>CUP1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Cup1Channel1GainHighPoint3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1_CHANNEL1_GAIN_HIGH_POINT3" calcext:value-type="string">
            <text:p>CUP1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up1Channel1GainHighPoint4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1_CHANNEL1_GAIN_HIGH_POINT4" calcext:value-type="string">
            <text:p>CUP1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Cup1Channel2GainLowPoint1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2_GAIN_LOW_POINT1" calcext:value-type="string">
            <text:p>CUP1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up1Channel2GainLowPoint2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1_CHANNEL2_GAIN_LOW_POINT2" calcext:value-type="string">
            <text:p>CUP1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up1Channel2GainLowPoint3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1_CHANNEL2_GAIN_LOW_POINT3" calcext:value-type="string">
            <text:p>CUP1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Cup1Channel2GainHighPoint2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1_CHANNEL2_GAIN_HIGH_POINT2" calcext:value-type="string">
            <text:p>CUP1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Cup1Channel2GainHighPoint3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1_CHANNEL2_GAIN_HIGH_POINT3" calcext:value-type="string">
            <text:p>CUP1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up1Channel2GainHighPoint4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1_CHANNEL2_GAIN_HIGH_POINT4" calcext:value-type="string">
            <text:p>CUP1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Cup1Channel3GainLowPoint1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1_CHANNEL3_GAIN_LOW_POINT1" calcext:value-type="string">
            <text:p>CUP1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up1Channel3GainLowPoint2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1_CHANNEL3_GAIN_LOW_POINT2" calcext:value-type="string">
            <text:p>CUP1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up1Channel3GainLowPoint3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1_CHANNEL3_GAIN_LOW_POINT3" calcext:value-type="string">
            <text:p>CUP1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Cup1Channel3GainHighPoint2</text:p>
          </table:table-cell>
          <table:table-cell table:style-name="ce11" table:formula="of:=IF([.H87]&lt;&gt;&quot;&quot;; UPPER(ORG.LIBREOFFICE.REGEX([.H87];&quot;([a-z0-9])([A-Z])&quot;;&quot;$1_$2&quot;;&quot;g&quot;)); &quot;&quot;)" office:value-type="string" office:string-value="CUP1_CHANNEL3_GAIN_HIGH_POINT2" calcext:value-type="string">
            <text:p>CUP1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Cup1Channel3GainHighPoint3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1_CHANNEL3_GAIN_HIGH_POINT3" calcext:value-type="string">
            <text:p>CUP1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up1Channel3GainHighPoint4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1_CHANNEL3_GAIN_HIGH_POINT4" calcext:value-type="string">
            <text:p>CUP1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Cup1Channel4GainLowPoint1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1_CHANNEL4_GAIN_LOW_POINT1" calcext:value-type="string">
            <text:p>CUP1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1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up1Channel4GainLowPoint2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4_GAIN_LOW_POINT2" calcext:value-type="string">
            <text:p>CUP1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up1Channel4GainLowPoint3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1_CHANNEL4_GAIN_LOW_POINT3" calcext:value-type="string">
            <text:p>CUP1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Cup1Channel4GainHighPoint2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1_CHANNEL4_GAIN_HIGH_POINT2" calcext:value-type="string">
            <text:p>CUP1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1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Cup1Channel4GainHighPoint3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1_CHANNEL4_GAIN_HIGH_POINT3" calcext:value-type="string">
            <text:p>CUP1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p1Channel4GainHighPoint4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1_CHANNEL4_GAIN_HIGH_POINT4" calcext:value-type="string">
            <text:p>CUP1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96]&lt;&gt;&quot;&quot;; UPPER(ORG.LIBREOFFICE.REGEX([.H9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Cup2Channel1GainLowPoint1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2_CHANNEL1_GAIN_LOW_POINT1" calcext:value-type="string">
            <text:p>CUP2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1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up2Channel1GainLowPoint2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2_CHANNEL1_GAIN_LOW_POINT2" calcext:value-type="string">
            <text:p>CUP2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up2Channel1GainLowPoint3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2_CHANNEL1_GAIN_LOW_POINT3" calcext:value-type="string">
            <text:p>CUP2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Cup2Channel1GainHighPoint2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2_CHANNEL1_GAIN_HIGH_POINT2" calcext:value-type="string">
            <text:p>CUP2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Cup2Channel1GainHighPoint3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2_CHANNEL1_GAIN_HIGH_POINT3" calcext:value-type="string">
            <text:p>CUP2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up2Channel1GainHighPoint4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2_CHANNEL1_GAIN_HIGH_POINT4" calcext:value-type="string">
            <text:p>CUP2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Cup2Channel2GainLowPoint1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2_CHANNEL2_GAIN_LOW_POINT1" calcext:value-type="string">
            <text:p>CUP2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up2Channel2GainLowPoint2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2_CHANNEL2_GAIN_LOW_POINT2" calcext:value-type="string">
            <text:p>CUP2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up2Channel2GainLowPoint3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2_CHANNEL2_GAIN_LOW_POINT3" calcext:value-type="string">
            <text:p>CUP2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Cup2Channel2GainHighPoint2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2_CHANNEL2_GAIN_HIGH_POINT2" calcext:value-type="string">
            <text:p>CUP2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Cup2Channel2GainHighPoint3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2_GAIN_HIGH_POINT3" calcext:value-type="string">
            <text:p>CUP2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up2Channel2GainHighPoint4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2_CHANNEL2_GAIN_HIGH_POINT4" calcext:value-type="string">
            <text:p>CUP2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Cup2Channel3GainLowPoint1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2_CHANNEL3_GAIN_LOW_POINT1" calcext:value-type="string">
            <text:p>CUP2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up2Channel3GainLowPoint2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2_CHANNEL3_GAIN_LOW_POINT2" calcext:value-type="string">
            <text:p>CUP2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up2Channel3GainLowPoint3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2_CHANNEL3_GAIN_LOW_POINT3" calcext:value-type="string">
            <text:p>CUP2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Cup2Channel3GainHighPoint2</text:p>
          </table:table-cell>
          <table:table-cell table:style-name="ce11" table:formula="of:=IF([.H112]&lt;&gt;&quot;&quot;; UPPER(ORG.LIBREOFFICE.REGEX([.H112];&quot;([a-z0-9])([A-Z])&quot;;&quot;$1_$2&quot;;&quot;g&quot;)); &quot;&quot;)" office:value-type="string" office:string-value="CUP2_CHANNEL3_GAIN_HIGH_POINT2" calcext:value-type="string">
            <text:p>CUP2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Cup2Channel3GainHighPoint3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CUP2_CHANNEL3_GAIN_HIGH_POINT3" calcext:value-type="string">
            <text:p>CUP2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p2Channel3GainHighPoint4</text:p>
          </table:table-cell>
          <table:table-cell table:style-name="ce11" table:formula="of:=IF([.H114]&lt;&gt;&quot;&quot;; UPPER(ORG.LIBREOFFICE.REGEX([.H114];&quot;([a-z0-9])([A-Z])&quot;;&quot;$1_$2&quot;;&quot;g&quot;)); &quot;&quot;)" office:value-type="string" office:string-value="CUP2_CHANNEL3_GAIN_HIGH_POINT4" calcext:value-type="string">
            <text:p>CUP2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Cup2Channel4GainLowPoint1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2_CHANNEL4_GAIN_LOW_POINT1" calcext:value-type="string">
            <text:p>CUP2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2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up2Channel4GainLowPoint2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CUP2_CHANNEL4_GAIN_LOW_POINT2" calcext:value-type="string">
            <text:p>CUP2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up2Channel4GainLowPoint3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CUP2_CHANNEL4_GAIN_LOW_POINT3" calcext:value-type="string">
            <text:p>CUP2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Cup2Channel4GainHighPoint2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2_CHANNEL4_GAIN_HIGH_POINT2" calcext:value-type="string">
            <text:p>CUP2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2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Cup2Channel4GainHighPoint3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2_CHANNEL4_GAIN_HIGH_POINT3" calcext:value-type="string">
            <text:p>CUP2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up2Channel4GainHighPoint4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2_CHANNEL4_GAIN_HIGH_POINT4" calcext:value-type="string">
            <text:p>CUP2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up3Channel1GainLowPoint1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3_CHANNEL1_GAIN_LOW_POINT1" calcext:value-type="string">
            <text:p>CUP3_CHANNEL1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1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1GainLowPoint2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3_CHANNEL1_GAIN_LOW_POINT2" calcext:value-type="string">
            <text:p>CUP3_CHANNEL1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up3Channel1GainLowPoint3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3_CHANNEL1_GAIN_LOW_POINT3" calcext:value-type="string">
            <text:p>CUP3_CHANNEL1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Cup3Channel1GainHighPoint2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3_CHANNEL1_GAIN_HIGH_POINT2" calcext:value-type="string">
            <text:p>CUP3_CHANNEL1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1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Cup3Channel1GainHighPoint3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1_GAIN_HIGH_POINT3" calcext:value-type="string">
            <text:p>CUP3_CHANNEL1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up3Channel1GainHighPoint4</text:p>
          </table:table-cell>
          <table:table-cell table:style-name="ce11" table:formula="of:=IF([.H127]&lt;&gt;&quot;&quot;; UPPER(ORG.LIBREOFFICE.REGEX([.H127];&quot;([a-z0-9])([A-Z])&quot;;&quot;$1_$2&quot;;&quot;g&quot;)); &quot;&quot;)" office:value-type="string" office:string-value="CUP3_CHANNEL1_GAIN_HIGH_POINT4" calcext:value-type="string">
            <text:p>CUP3_CHANNEL1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2GainLowPoint1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3_CHANNEL2_GAIN_LOW_POINT1" calcext:value-type="string">
            <text:p>CUP3_CHANNEL2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2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2GainLowPoint2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3_CHANNEL2_GAIN_LOW_POINT2" calcext:value-type="string">
            <text:p>CUP3_CHANNEL2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up3Channel2GainLowPoint3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3_CHANNEL2_GAIN_LOW_POINT3" calcext:value-type="string">
            <text:p>CUP3_CHANNEL2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Cup3Channel2GainHighPoint2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3_CHANNEL2_GAIN_HIGH_POINT2" calcext:value-type="string">
            <text:p>CUP3_CHANNEL2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2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Cup3Channel2GainHighPoint3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3_CHANNEL2_GAIN_HIGH_POINT3" calcext:value-type="string">
            <text:p>CUP3_CHANNEL2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up3Channel2GainHighPoint4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3_CHANNEL2_GAIN_HIGH_POINT4" calcext:value-type="string">
            <text:p>CUP3_CHANNEL2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3GainLowPoint1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3_CHANNEL3_GAIN_LOW_POINT1" calcext:value-type="string">
            <text:p>CUP3_CHANNEL3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3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up3Channel3GainLowPoint2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3_CHANNEL3_GAIN_LOW_POINT2" calcext:value-type="string">
            <text:p>CUP3_CHANNEL3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up3Channel3GainLowPoint3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3_CHANNEL3_GAIN_LOW_POINT3" calcext:value-type="string">
            <text:p>CUP3_CHANNEL3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Cup3Channel3GainHighPoint2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3_CHANNEL3_GAIN_HIGH_POINT2" calcext:value-type="string">
            <text:p>CUP3_CHANNEL3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3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Cup3Channel3GainHighPoint3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3_CHANNEL3_GAIN_HIGH_POINT3" calcext:value-type="string">
            <text:p>CUP3_CHANNEL3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p3Channel3GainHighPoint4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3_GAIN_HIGH_POINT4" calcext:value-type="string">
            <text:p>CUP3_CHANNEL3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up3Channel4GainLowPoint1</text:p>
          </table:table-cell>
          <table:table-cell table:style-name="ce11" table:formula="of:=IF([.H140]&lt;&gt;&quot;&quot;; UPPER(ORG.LIBREOFFICE.REGEX([.H140];&quot;([a-z0-9])([A-Z])&quot;;&quot;$1_$2&quot;;&quot;g&quot;)); &quot;&quot;)" office:value-type="string" office:string-value="CUP3_CHANNEL4_GAIN_LOW_POINT1" calcext:value-type="string">
            <text:p>CUP3_CHANNEL4_GAIN_LOW_POI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1 value when cup 3, channel 4 is selected and calibration current #1 is applied to the input (ADC1 = low-gain signal)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p3Channel4GainLowPoint2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CUP3_CHANNEL4_GAIN_LOW_POINT2" calcext:value-type="string">
            <text:p>CUP3_CHANNEL4_GAIN_LOW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up3Channel4GainLowPoint3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CUP3_CHANNEL4_GAIN_LOW_POINT3" calcext:value-type="string">
            <text:p>CUP3_CHANNEL4_GAIN_LOW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Cup3Channel4GainHighPoint2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CUP3_CHANNEL4_GAIN_HIGH_POINT2" calcext:value-type="string">
            <text:p>CUP3_CHANNEL4_GAIN_HIGH_POI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ADC0 value when cup 3, channel 4 is selected and calibration current #1 is applied to the input (ADC0 = high-gain signal)</text:p>
          </table:table-cell>
          <table:table-cell table:number-columns-repeated="16372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Cup3Channel4GainHighPoint3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CUP3_CHANNEL4_GAIN_HIGH_POINT3" calcext:value-type="string">
            <text:p>CUP3_CHANNEL4_GAIN_HIGH_POINT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2 <text:s text:c="13"/>- // -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up3Channel4GainHighPoint4</text:p>
          </table:table-cell>
          <table:table-cell table:style-name="ce11" table:formula="of:=IF([.H145]&lt;&gt;&quot;&quot;; UPPER(ORG.LIBREOFFICE.REGEX([.H145];&quot;([a-z0-9])([A-Z])&quot;;&quot;$1_$2&quot;;&quot;g&quot;)); &quot;&quot;)" office:value-type="string" office:string-value="CUP3_CHANNEL4_GAIN_HIGH_POINT4" calcext:value-type="string">
            <text:p>CUP3_CHANNEL4_GAIN_HIGH_POINT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<text:s text:c="11"/>- // - <text:s text:c="55"/>#3 <text:s text:c="13"/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50]&lt;&gt;&quot;&quot;; UPPER(ORG.LIBREOFFICE.REGEX([.H150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57]&lt;&gt;&quot;&quot;; UPPER(ORG.LIBREOFFICE.REGEX([.H157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59]&lt;&gt;&quot;&quot;; UPPER(ORG.LIBREOFFICE.REGEX([.H15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70]&lt;&gt;&quot;&quot;; UPPER(ORG.LIBREOFFICE.REGEX([.H170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2]&lt;&gt;&quot;&quot;; UPPER(ORG.LIBREOFFICE.REGEX([.H17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sErrorStorage</text:p>
          </table:table-cell>
          <table:table-cell table:style-name="ce11" table:formula="of:=IF([.H173]&lt;&gt;&quot;&quot;; UPPER(ORG.LIBREOFFICE.REGEX([.H173];&quot;([a-z0-9])([A-Z])&quot;;&quot;$1_$2&quot;;&quot;g&quot;)); &quot;&quot;)" office:value-type="string" office:string-value="ANALOG_INPUTS_ERROR_STORAGE" calcext:value-type="string">
            <text:p>ANALOG_INPUTS_ERROR_STORAG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analog inputs (measurements, calibration, calculations)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2]=1; TYPE([.A172])=8); [.A172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77]&lt;&gt;&quot;&quot;; UPPER(ORG.LIBREOFFICE.REGEX([.H177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79]&lt;&gt;&quot;&quot;; UPPER(ORG.LIBREOFFICE.REGEX([.H179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82]&lt;&gt;&quot;&quot;; UPPER(ORG.LIBREOFFICE.REGEX([.H182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84]&lt;&gt;&quot;&quot;; UPPER(ORG.LIBREOFFICE.REGEX([.H18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4]=1; TYPE([.A184])=8); [.A184]+1; IF( OR([.A183]=1; TYPE([.A183])=8); [.A183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85]&lt;&gt;&quot;&quot;; UPPER(ORG.LIBREOFFICE.REGEX([.H185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5]=1; TYPE([.A185])=8); [.A185]+1; IF( OR([.A184]=1; TYPE([.A184])=8); [.A184]+1; 0))" office:value-type="float" office:value="1139" calcext:value-type="float">
            <text:p>11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86]&lt;&gt;&quot;&quot;; UPPER(ORG.LIBREOFFICE.REGEX([.H186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1140" calcext:value-type="float">
            <text:p>11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7]=1; TYPE([.A187])=8); [.A187]+1; IF( OR([.A186]=1; TYPE([.A186])=8); [.A186]+1; 0))" office:value-type="float" office:value="1141" calcext:value-type="float">
            <text:p>11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88]=1; TYPE([.A188])=8); [.A188]+1; IF( OR([.A187]=1; TYPE([.A187])=8); [.A187]+1; 0))" office:value-type="float" office:value="1142" calcext:value-type="float">
            <text:p>11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89]&lt;&gt;&quot;&quot;; UPPER(ORG.LIBREOFFICE.REGEX([.H189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1143" calcext:value-type="float">
            <text:p>11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1144" calcext:value-type="float">
            <text:p>11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92]&lt;&gt;&quot;&quot;; UPPER(ORG.LIBREOFFICE.REGEX([.H192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89]=1; TYPE([.A189])=8); [.A189]+1; 0))" office:value-type="float" office:value="1145" calcext:value-type="float">
            <text:p>11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1146" calcext:value-type="float">
            <text:p>11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1147" calcext:value-type="float">
            <text:p>11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1148" calcext:value-type="float">
            <text:p>11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1149" calcext:value-type="float">
            <text:p>11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1150" calcext:value-type="float">
            <text:p>11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98]&lt;&gt;&quot;&quot;; UPPER(ORG.LIBREOFFICE.REGEX([.H198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1151" calcext:value-type="float">
            <text:p>11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1152" calcext:value-type="float">
            <text:p>11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1153" calcext:value-type="float">
            <text:p>11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1154" calcext:value-type="float">
            <text:p>11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1155" calcext:value-type="float">
            <text:p>11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4]&lt;&gt;&quot;&quot;; UPPER(ORG.LIBREOFFICE.REGEX([.H20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04]=1; TYPE([.A204])=8); [.A204]+1; IF( OR([.A203]=1; TYPE([.A203])=8); [.A203]+1; 0))" office:value-type="float" office:value="1156" calcext:value-type="float">
            <text:p>11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205]&lt;&gt;&quot;&quot;; UPPER(ORG.LIBREOFFICE.REGEX([.H205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205]=1; TYPE([.A205])=8); [.A205]+1; IF( OR([.A204]=1; TYPE([.A204])=8); [.A204]+1; 0))" office:value-type="float" office:value="1157" calcext:value-type="float">
            <text:p>11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206]&lt;&gt;&quot;&quot;; UPPER(ORG.LIBREOFFICE.REGEX([.H206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07]&lt;&gt;&quot;&quot;; UPPER(ORG.LIBREOFFICE.REGEX([.H20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07]=1; TYPE([.A207])=8); [.A207]+1; IF( OR([.A206]=1; TYPE([.A206])=8); [.A206]+1; 0))" office:value-type="float" office:value="1158" calcext:value-type="float">
            <text:p>11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208]&lt;&gt;&quot;&quot;; UPPER(ORG.LIBREOFFICE.REGEX([.H208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208]=1; TYPE([.A208])=8); [.A208]+1; IF( OR([.A207]=1; TYPE([.A207])=8); [.A207]+1; 0))" office:value-type="float" office:value="1159" calcext:value-type="float">
            <text:p>11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209]&lt;&gt;&quot;&quot;; UPPER(ORG.LIBREOFFICE.REGEX([.H209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209]=1; TYPE([.A209])=8); [.A209]+1; IF( OR([.A208]=1; TYPE([.A208])=8); [.A208]+1; 0))" office:value-type="float" office:value="1160" calcext:value-type="float">
            <text:p>11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210]&lt;&gt;&quot;&quot;; UPPER(ORG.LIBREOFFICE.REGEX([.H210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1]&lt;&gt;&quot;&quot;; UPPER(ORG.LIBREOFFICE.REGEX([.H21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11]=1; TYPE([.A211])=8); [.A211]+1; IF( OR([.A210]=1; TYPE([.A210])=8); [.A210]+1; 0))" office:value-type="float" office:value="1161" calcext:value-type="float">
            <text:p>11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212]&lt;&gt;&quot;&quot;; UPPER(ORG.LIBREOFFICE.REGEX([.H212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212]=1; TYPE([.A212])=8); [.A212]+1; IF( OR([.A211]=1; TYPE([.A211])=8); [.A211]+1; 0))" office:value-type="float" office:value="1162" calcext:value-type="float">
            <text:p>11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213]&lt;&gt;&quot;&quot;; UPPER(ORG.LIBREOFFICE.REGEX([.H213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213]=1; TYPE([.A213])=8); [.A213]+1; IF( OR([.A212]=1; TYPE([.A212])=8); [.A212]+1; 0))" office:value-type="float" office:value="1163" calcext:value-type="float">
            <text:p>11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214]&lt;&gt;&quot;&quot;; UPPER(ORG.LIBREOFFICE.REGEX([.H214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214]=1; TYPE([.A214])=8); [.A214]+1; IF( OR([.A213]=1; TYPE([.A213])=8); [.A213]+1; 0))" office:value-type="float" office:value="1164" calcext:value-type="float">
            <text:p>11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215]&lt;&gt;&quot;&quot;; UPPER(ORG.LIBREOFFICE.REGEX([.H215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6]&lt;&gt;&quot;&quot;; UPPER(ORG.LIBREOFFICE.REGEX([.H21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216]=1; TYPE([.A216])=8); [.A216]+1; IF( OR([.A215]=1; TYPE([.A215])=8); [.A215]+1; 0))" office:value-type="float" office:value="1165" calcext:value-type="float">
            <text:p>11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217]&lt;&gt;&quot;&quot;; UPPER(ORG.LIBREOFFICE.REGEX([.H217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217]=1; TYPE([.A217])=8); [.A217]+1; IF( OR([.A216]=1; TYPE([.A216])=8); [.A216]+1; 0))" office:value-type="float" office:value="1166" calcext:value-type="float">
            <text:p>11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218]&lt;&gt;&quot;&quot;; UPPER(ORG.LIBREOFFICE.REGEX([.H218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218]=1; TYPE([.A218])=8); [.A218]+1; IF( OR([.A217]=1; TYPE([.A217])=8); [.A217]+1; 0))" office:value-type="float" office:value="1167" calcext:value-type="float">
            <text:p>11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2</text:p>
          </table:table-cell>
          <table:table-cell table:style-name="ce11" table:formula="of:=IF([.H219]&lt;&gt;&quot;&quot;; UPPER(ORG.LIBREOFFICE.REGEX([.H219];&quot;([a-z0-9])([A-Z])&quot;;&quot;$1_$2&quot;;&quot;g&quot;)); &quot;&quot;)" office:value-type="string" office:string-value="DEBUG_ARGUMENT2" calcext:value-type="string">
            <text:p>DEBUG_ARGUMENT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221]&lt;&gt;&quot;&quot;; UPPER(ORG.LIBREOFFICE.REGEX([.H221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Sample</text:p>
          </table:table-cell>
          <table:table-cell table:style-name="ce11" table:formula="of:=IF([.H222]&lt;&gt;&quot;&quot;; UPPER(ORG.LIBREOFFICE.REGEX([.H222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222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Sample</text:p>
          </table:table-cell>
          <table:table-cell table:style-name="ce11" table:formula="of:=IF([.H223]&lt;&gt;&quot;&quot;; UPPER(ORG.LIBREOFFICE.REGEX([.H223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3]=1; TYPE([.A223])=8); [.A223]+1; IF( OR([.A222]=1; TYPE([.A222])=8); [.A222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Sample</text:p>
          </table:table-cell>
          <table:table-cell table:style-name="ce11" table:formula="of:=IF([.H224]&lt;&gt;&quot;&quot;; UPPER(ORG.LIBREOFFICE.REGEX([.H224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4]=1; TYPE([.A224])=8); [.A224]+1; IF( OR([.A223]=1; TYPE([.A223])=8); [.A223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Sample</text:p>
          </table:table-cell>
          <table:table-cell table:style-name="ce11" table:formula="of:=IF([.H225]&lt;&gt;&quot;&quot;; UPPER(ORG.LIBREOFFICE.REGEX([.H225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5]=1; TYPE([.A225])=8); [.A225]+1; IF( OR([.A224]=1; TYPE([.A224])=8); [.A224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Error</text:p>
          </table:table-cell>
          <table:table-cell table:style-name="ce11" table:formula="of:=IF([.H226]&lt;&gt;&quot;&quot;; UPPER(ORG.LIBREOFFICE.REGEX([.H226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27]&lt;&gt;&quot;&quot;; UPPER(ORG.LIBREOFFICE.REGEX([.H22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27]=1; TYPE([.A227])=8); [.A227]+1; IF( OR([.A226]=1; TYPE([.A226])=8); [.A226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Sample</text:p>
          </table:table-cell>
          <table:table-cell table:style-name="ce11" table:formula="of:=IF([.H228]&lt;&gt;&quot;&quot;; UPPER(ORG.LIBREOFFICE.REGEX([.H228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8]=1; TYPE([.A228])=8); [.A228]+1; IF( OR([.A227]=1; TYPE([.A227])=8); [.A227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Sample</text:p>
          </table:table-cell>
          <table:table-cell table:style-name="ce11" table:formula="of:=IF([.H229]&lt;&gt;&quot;&quot;; UPPER(ORG.LIBREOFFICE.REGEX([.H229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29]=1; TYPE([.A229])=8); [.A229]+1; IF( OR([.A228]=1; TYPE([.A228])=8); [.A228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Sample</text:p>
          </table:table-cell>
          <table:table-cell table:style-name="ce11" table:formula="of:=IF([.H230]&lt;&gt;&quot;&quot;; UPPER(ORG.LIBREOFFICE.REGEX([.H230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0]=1; TYPE([.A230])=8); [.A230]+1; IF( OR([.A229]=1; TYPE([.A229])=8); [.A229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Sample</text:p>
          </table:table-cell>
          <table:table-cell table:style-name="ce11" table:formula="of:=IF([.H231]&lt;&gt;&quot;&quot;; UPPER(ORG.LIBREOFFICE.REGEX([.H231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1]=1; TYPE([.A231])=8); [.A231]+1; IF( OR([.A230]=1; TYPE([.A230])=8); [.A230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Error</text:p>
          </table:table-cell>
          <table:table-cell table:style-name="ce11" table:formula="of:=IF([.H232]&lt;&gt;&quot;&quot;; UPPER(ORG.LIBREOFFICE.REGEX([.H232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33]&lt;&gt;&quot;&quot;; UPPER(ORG.LIBREOFFICE.REGEX([.H233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33]=1; TYPE([.A233])=8); [.A233]+1; IF( OR([.A232]=1; TYPE([.A232])=8); [.A232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Sample</text:p>
          </table:table-cell>
          <table:table-cell table:style-name="ce11" table:formula="of:=IF([.H234]&lt;&gt;&quot;&quot;; UPPER(ORG.LIBREOFFICE.REGEX([.H234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4]=1; TYPE([.A234])=8); [.A234]+1; IF( OR([.A233]=1; TYPE([.A233])=8); [.A233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35]&lt;&gt;&quot;&quot;; UPPER(ORG.LIBREOFFICE.REGEX([.H235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5]=1; TYPE([.A235])=8); [.A235]+1; IF( OR([.A234]=1; TYPE([.A234])=8); [.A234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36]&lt;&gt;&quot;&quot;; UPPER(ORG.LIBREOFFICE.REGEX([.H236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6]=1; TYPE([.A236])=8); [.A236]+1; IF( OR([.A235]=1; TYPE([.A235])=8); [.A235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37]&lt;&gt;&quot;&quot;; UPPER(ORG.LIBREOFFICE.REGEX([.H237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37]=1; TYPE([.A237])=8); [.A237]+1; IF( OR([.A236]=1; TYPE([.A236])=8); [.A236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Error</text:p>
          </table:table-cell>
          <table:table-cell table:style-name="ce11" table:formula="of:=IF([.H238]&lt;&gt;&quot;&quot;; UPPER(ORG.LIBREOFFICE.REGEX([.H238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ERROR_RECOVERY" calcext:value-type="string">
            <text:p>CUP1_ERROR_RECOVERY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ERROR_RECOVERY 13" calcext:value-type="string">
            <text:p>#define MODBUS_ADDR_CUP1_ERROR_RECOVERY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ERROR_RECOVERY" calcext:value-type="string">
            <text:p>CUP2_ERROR_RECOVERY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ERROR_RECOVERY 14" calcext:value-type="string">
            <text:p>#define MODBUS_ADDR_CUP2_ERROR_RECOVERY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ERROR_RECOVERY" calcext:value-type="string">
            <text:p>CUP3_ERROR_RECOVERY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ERROR_RECOVERY 15" calcext:value-type="string">
            <text:p>#define MODBUS_ADDR_CUP3_ERROR_RECOVERY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CUP1_REQUESTED_STATE" calcext:value-type="string">
            <text:p>CUP1_REQUESTED_STATE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#define MODBUS_ADDR_CUP1_REQUESTED_STATE 16" calcext:value-type="string">
            <text:p>#define MODBUS_ADDR_CUP1_REQUESTED_STATE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CUP2_REQUESTED_STATE" calcext:value-type="string">
            <text:p>CUP2_REQUESTED_STATE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#define MODBUS_ADDR_CUP2_REQUESTED_STATE 17" calcext:value-type="string">
            <text:p>#define MODBUS_ADDR_CUP2_REQUESTED_STATE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CUP3_REQUESTED_STATE" calcext:value-type="string">
            <text:p>CUP3_REQUESTED_STATE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#define MODBUS_ADDR_CUP3_REQUESTED_STATE 18" calcext:value-type="string">
            <text:p>#define MODBUS_ADDR_CUP3_REQUESTED_STATE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>
            <text:p/>
          </table:table-cell>
          <table:table-cell table:formula="of:=IF([$List.A25] &lt;&gt;&quot;&quot;; [$List.A25]; &quot;&quot;)">
            <text:p/>
          </table:table-cell>
          <table:table-cell/>
          <table:table-cell table:formula="of:=IF([.A25]&lt;&gt;&quot;&quot;; COM.MICROSOFT.CONCAT(&quot;#define MODBUS_ADDR_&quot;; [.A25]; &quot; &quot;; [.B25]); &quot;&quot;)">
            <text:p/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1_CONTROL" calcext:value-type="string">
            <text:p>ACTUATOR1_CONTROL</text:p>
          </table:table-cell>
          <table:table-cell table:formula="of:=IF([$List.A26] &lt;&gt;&quot;&quot;; [$List.A26]; &quot;&quot;)" office:value-type="float" office:value="19" calcext:value-type="float">
            <text:p>19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#define MODBUS_ADDR_ACTUATOR1_CONTROL 19" calcext:value-type="string">
            <text:p>#define MODBUS_ADDR_ACTUATOR1_CONTROL 19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 office:value-type="string" office:string-value="ACTUATOR2_CONTROL" calcext:value-type="string">
            <text:p>ACTUATOR2_CONTROL</text:p>
          </table:table-cell>
          <table:table-cell table:formula="of:=IF([$List.A27] &lt;&gt;&quot;&quot;; [$List.A27]; &quot;&quot;)" office:value-type="float" office:value="20" calcext:value-type="float">
            <text:p>20</text:p>
          </table:table-cell>
          <table:table-cell/>
          <table:table-cell table:formula="of:=IF([.A27]&lt;&gt;&quot;&quot;; COM.MICROSOFT.CONCAT(&quot;#define MODBUS_ADDR_&quot;; [.A27]; &quot; &quot;; [.B27]); &quot;&quot;)" office:value-type="string" office:string-value="#define MODBUS_ADDR_ACTUATOR2_CONTROL 20" calcext:value-type="string">
            <text:p>#define MODBUS_ADDR_ACTUATOR2_CONTROL 20</text:p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 office:value-type="string" office:string-value="ACTUATOR3_CONTROL_IN" calcext:value-type="string">
            <text:p>ACTUATOR3_CONTROL_IN</text:p>
          </table:table-cell>
          <table:table-cell table:formula="of:=IF([$List.A28] &lt;&gt;&quot;&quot;; [$List.A28]; &quot;&quot;)" office:value-type="float" office:value="21" calcext:value-type="float">
            <text:p>21</text:p>
          </table:table-cell>
          <table:table-cell/>
          <table:table-cell table:formula="of:=IF([.A28]&lt;&gt;&quot;&quot;; COM.MICROSOFT.CONCAT(&quot;#define MODBUS_ADDR_&quot;; [.A28]; &quot; &quot;; [.B28]); &quot;&quot;)" office:value-type="string" office:string-value="#define MODBUS_ADDR_ACTUATOR3_CONTROL_IN 21" calcext:value-type="string">
            <text:p>#define MODBUS_ADDR_ACTUATOR3_CONTROL_IN 21</text:p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ACTUATOR3_CONTROL_OUT" calcext:value-type="string">
            <text:p>ACTUATOR3_CONTROL_OUT</text:p>
          </table:table-cell>
          <table:table-cell table:formula="of:=IF([$List.A29] &lt;&gt;&quot;&quot;; [$List.A29]; &quot;&quot;)" office:value-type="float" office:value="22" calcext:value-type="float">
            <text:p>22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ACTUATOR3_CONTROL_OUT 22" calcext:value-type="string">
            <text:p>#define MODBUS_ADDR_ACTUATOR3_CONTROL_OUT 22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ACTUATOR3_CONTROL_BRAKE" calcext:value-type="string">
            <text:p>ACTUATOR3_CONTROL_BRAKE</text:p>
          </table:table-cell>
          <table:table-cell table:formula="of:=IF([$List.A30] &lt;&gt;&quot;&quot;; [$List.A30]; &quot;&quot;)" office:value-type="float" office:value="23" calcext:value-type="float">
            <text:p>23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ACTUATOR3_CONTROL_BRAKE 23" calcext:value-type="string">
            <text:p>#define MODBUS_ADDR_ACTUATOR3_CONTROL_BRAKE 23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>
            <text:p/>
          </table:table-cell>
          <table:table-cell table:formula="of:=IF([$List.A31] &lt;&gt;&quot;&quot;; [$List.A31]; &quot;&quot;)">
            <text:p/>
          </table:table-cell>
          <table:table-cell/>
          <table:table-cell table:formula="of:=IF([.A31]&lt;&gt;&quot;&quot;; COM.MICROSOFT.CONCAT(&quot;#define MODBUS_ADDR_&quot;; [.A31]; &quot; &quot;; [.B31]); &quot;&quot;)">
            <text:p/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2]&lt;&gt;&quot;&quot;; COM.MICROSOFT.CONCAT(&quot;#define MODBUS_ADDR_&quot;; [.A32]; &quot; &quot;; [.B32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ERROR_CODE" calcext:value-type="string">
            <text:p>ERROR_CODE</text:p>
          </table:table-cell>
          <table:table-cell table:formula="of:=IF([$List.A33] &lt;&gt;&quot;&quot;; [$List.A33]; &quot;&quot;)" office:value-type="float" office:value="1000" calcext:value-type="float">
            <text:p>1000</text:p>
          </table:table-cell>
          <table:table-cell/>
          <table:table-cell table:formula="of:=IF([.A33]&lt;&gt;&quot;&quot;; COM.MICROSOFT.CONCAT(&quot;#define MODBUS_ADDR_&quot;; [.A33]; &quot; &quot;; [.B33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LAST_ERROR" calcext:value-type="string">
            <text:p>LAST_ERROR</text:p>
          </table:table-cell>
          <table:table-cell table:formula="of:=IF([$List.A34] &lt;&gt;&quot;&quot;; [$List.A34]; &quot;&quot;)" office:value-type="float" office:value="1001" calcext:value-type="float">
            <text:p>1001</text:p>
          </table:table-cell>
          <table:table-cell/>
          <table:table-cell table:formula="of:=IF([.A34]&lt;&gt;&quot;&quot;; COM.MICROSOFT.CONCAT(&quot;#define MODBUS_ADDR_&quot;; [.A34]; &quot; &quot;; [.B34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ERROR_STORAGE" calcext:value-type="string">
            <text:p>ERROR_STORAGE</text:p>
          </table:table-cell>
          <table:table-cell table:formula="of:=IF([$List.A35] &lt;&gt;&quot;&quot;; [$List.A35]; &quot;&quot;)" office:value-type="float" office:value="1002" calcext:value-type="float">
            <text:p>1002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>
            <text:p/>
          </table:table-cell>
          <table:table-cell table:formula="of:=IF([$List.A36] &lt;&gt;&quot;&quot;; [$List.A36]; &quot;&quot;)">
            <text:p/>
          </table:table-cell>
          <table:table-cell/>
          <table:table-cell table:formula="of:=IF([.A36]&lt;&gt;&quot;&quot;; COM.MICROSOFT.CONCAT(&quot;#define MODBUS_ADDR_&quot;; [.A36]; &quot; &quot;; [.B36]); &quot;&quot;)">
            <text:p/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INSERTING1" calcext:value-type="string">
            <text:p>TIME_LIMIT_INSERTING1</text:p>
          </table:table-cell>
          <table:table-cell table:formula="of:=IF([$List.A37] &lt;&gt;&quot;&quot;; [$List.A37]; &quot;&quot;)" office:value-type="float" office:value="1003" calcext:value-type="float">
            <text:p>1003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INSERTING2" calcext:value-type="string">
            <text:p>TIME_LIMIT_INSERTING2</text:p>
          </table:table-cell>
          <table:table-cell table:formula="of:=IF([$List.A38] &lt;&gt;&quot;&quot;; [$List.A38]; &quot;&quot;)" office:value-type="float" office:value="1004" calcext:value-type="float">
            <text:p>1004</text:p>
          </table:table-cell>
          <table:table-cell/>
          <table:table-cell table:formula="of:=IF([.A38]&lt;&gt;&quot;&quot;; COM.MICROSOFT.CONCAT(&quot;#define MODBUS_ADDR_&quot;; [.A38]; &quot; &quot;; [.B38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 office:value-type="string" office:string-value="TIME_LIMIT_INSERTING3" calcext:value-type="string">
            <text:p>TIME_LIMIT_INSERTING3</text:p>
          </table:table-cell>
          <table:table-cell table:formula="of:=IF([$List.A39] &lt;&gt;&quot;&quot;; [$List.A39]; &quot;&quot;)" office:value-type="float" office:value="1005" calcext:value-type="float">
            <text:p>1005</text:p>
          </table:table-cell>
          <table:table-cell/>
          <table:table-cell table:formula="of:=IF([.A39]&lt;&gt;&quot;&quot;; COM.MICROSOFT.CONCAT(&quot;#define MODBUS_ADDR_&quot;; [.A39]; &quot; &quot;; [.B39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TIME_LIMIT_WITHDRAWING1" calcext:value-type="string">
            <text:p>TIME_LIMIT_WITHDRAWING1</text:p>
          </table:table-cell>
          <table:table-cell table:formula="of:=IF([$List.A40] &lt;&gt;&quot;&quot;; [$List.A40]; &quot;&quot;)" office:value-type="float" office:value="1006" calcext:value-type="float">
            <text:p>1006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 office:value-type="string" office:string-value="TIME_LIMIT_WITHDRAWING2" calcext:value-type="string">
            <text:p>TIME_LIMIT_WITHDRAWING2</text:p>
          </table:table-cell>
          <table:table-cell table:formula="of:=IF([$List.A41] &lt;&gt;&quot;&quot;; [$List.A41]; &quot;&quot;)" office:value-type="float" office:value="1007" calcext:value-type="float">
            <text:p>1007</text:p>
          </table:table-cell>
          <table:table-cell/>
          <table:table-cell table:formula="of:=IF([.A41]&lt;&gt;&quot;&quot;; COM.MICROSOFT.CONCAT(&quot;#define MODBUS_ADDR_&quot;; [.A41]; &quot; &quot;; [.B41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TIME_LIMIT_WITHDRAWING3" calcext:value-type="string">
            <text:p>TIME_LIMIT_WITHDRAWING3</text:p>
          </table:table-cell>
          <table:table-cell table:formula="of:=IF([$List.A42] &lt;&gt;&quot;&quot;; [$List.A42]; &quot;&quot;)" office:value-type="float" office:value="1008" calcext:value-type="float">
            <text:p>1008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>
            <text:p/>
          </table:table-cell>
          <table:table-cell table:formula="of:=IF([$List.A43] &lt;&gt;&quot;&quot;; [$List.A43]; &quot;&quot;)">
            <text:p/>
          </table:table-cell>
          <table:table-cell/>
          <table:table-cell table:formula="of:=IF([.A43]&lt;&gt;&quot;&quot;; COM.MICROSOFT.CONCAT(&quot;#define MODBUS_ADDR_&quot;; [.A43]; &quot; &quot;; [.B43]); &quot;&quot;)">
            <text:p/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ACTIVE_CUP" calcext:value-type="string">
            <text:p>ACTIVE_CUP</text:p>
          </table:table-cell>
          <table:table-cell table:formula="of:=IF([$List.A44] &lt;&gt;&quot;&quot;; [$List.A44]; &quot;&quot;)" office:value-type="float" office:value="1009" calcext:value-type="float">
            <text:p>1009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>
            <text:p/>
          </table:table-cell>
          <table:table-cell table:formula="of:=IF([$List.A45] &lt;&gt;&quot;&quot;; [$List.A45]; &quot;&quot;)">
            <text:p/>
          </table:table-cell>
          <table:table-cell/>
          <table:table-cell table:formula="of:=IF([.A45]&lt;&gt;&quot;&quot;; COM.MICROSOFT.CONCAT(&quot;#define MODBUS_ADDR_&quot;; [.A45]; &quot; &quot;; [.B45]); &quot;&quot;)">
            <text:p/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1_FSM_STATE" calcext:value-type="string">
            <text:p>CUP1_FSM_STATE</text:p>
          </table:table-cell>
          <table:table-cell table:formula="of:=IF([$List.A46] &lt;&gt;&quot;&quot;; [$List.A46]; &quot;&quot;)" office:value-type="float" office:value="1010" calcext:value-type="float">
            <text:p>1010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2_FSM_STATE" calcext:value-type="string">
            <text:p>CUP2_FSM_STATE</text:p>
          </table:table-cell>
          <table:table-cell table:formula="of:=IF([$List.A47] &lt;&gt;&quot;&quot;; [$List.A47]; &quot;&quot;)" office:value-type="float" office:value="1011" calcext:value-type="float">
            <text:p>1011</text:p>
          </table:table-cell>
          <table:table-cell/>
          <table:table-cell table:formula="of:=IF([.A47]&lt;&gt;&quot;&quot;; COM.MICROSOFT.CONCAT(&quot;#define MODBUS_ADDR_&quot;; [.A47]; &quot; &quot;; [.B47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3_FSM_STATE" calcext:value-type="string">
            <text:p>CUP3_FSM_STATE</text:p>
          </table:table-cell>
          <table:table-cell table:formula="of:=IF([$List.A48] &lt;&gt;&quot;&quot;; [$List.A48]; &quot;&quot;)" office:value-type="float" office:value="1012" calcext:value-type="float">
            <text:p>1012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1_ERROR" calcext:value-type="string">
            <text:p>CUP1_ERROR</text:p>
          </table:table-cell>
          <table:table-cell table:formula="of:=IF([$List.A49] &lt;&gt;&quot;&quot;; [$List.A49]; &quot;&quot;)" office:value-type="float" office:value="1013" calcext:value-type="float">
            <text:p>1013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2_ERROR" calcext:value-type="string">
            <text:p>CUP2_ERROR</text:p>
          </table:table-cell>
          <table:table-cell table:formula="of:=IF([$List.A50] &lt;&gt;&quot;&quot;; [$List.A50]; &quot;&quot;)" office:value-type="float" office:value="1014" calcext:value-type="float">
            <text:p>1014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3_ERROR" calcext:value-type="string">
            <text:p>CUP3_ERROR</text:p>
          </table:table-cell>
          <table:table-cell table:formula="of:=IF([$List.A51] &lt;&gt;&quot;&quot;; [$List.A51]; &quot;&quot;)" office:value-type="float" office:value="1015" calcext:value-type="float">
            <text:p>1015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1_LAST_ERROR" calcext:value-type="string">
            <text:p>CUP1_LAST_ERROR</text:p>
          </table:table-cell>
          <table:table-cell table:formula="of:=IF([$List.A52] &lt;&gt;&quot;&quot;; [$List.A52]; &quot;&quot;)" office:value-type="float" office:value="1016" calcext:value-type="float">
            <text:p>1016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2_LAST_ERROR" calcext:value-type="string">
            <text:p>CUP2_LAST_ERROR</text:p>
          </table:table-cell>
          <table:table-cell table:formula="of:=IF([$List.A53] &lt;&gt;&quot;&quot;; [$List.A53]; &quot;&quot;)" office:value-type="float" office:value="1017" calcext:value-type="float">
            <text:p>1017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 office:value-type="string" office:string-value="CUP3_LAST_ERROR" calcext:value-type="string">
            <text:p>CUP3_LAST_ERROR</text:p>
          </table:table-cell>
          <table:table-cell table:formula="of:=IF([$List.A54] &lt;&gt;&quot;&quot;; [$List.A54]; &quot;&quot;)" office:value-type="float" office:value="1018" calcext:value-type="float">
            <text:p>1018</text:p>
          </table:table-cell>
          <table:table-cell/>
          <table:table-cell table:formula="of:=IF([.A54]&lt;&gt;&quot;&quot;; COM.MICROSOFT.CONCAT(&quot;#define MODBUS_ADDR_&quot;; [.A54]; &quot; &quot;; [.B54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CUP1_ERROR_STORAGE" calcext:value-type="string">
            <text:p>CUP1_ERROR_STORAGE</text:p>
          </table:table-cell>
          <table:table-cell table:formula="of:=IF([$List.A55] &lt;&gt;&quot;&quot;; [$List.A55]; &quot;&quot;)" office:value-type="float" office:value="1019" calcext:value-type="float">
            <text:p>1019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CUP2_ERROR_STORAGE" calcext:value-type="string">
            <text:p>CUP2_ERROR_STORAGE</text:p>
          </table:table-cell>
          <table:table-cell table:formula="of:=IF([$List.A56] &lt;&gt;&quot;&quot;; [$List.A56]; &quot;&quot;)" office:value-type="float" office:value="1020" calcext:value-type="float">
            <text:p>1020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CUP3_ERROR_STORAGE" calcext:value-type="string">
            <text:p>CUP3_ERROR_STORAGE</text:p>
          </table:table-cell>
          <table:table-cell table:formula="of:=IF([$List.A57] &lt;&gt;&quot;&quot;; [$List.A57]; &quot;&quot;)" office:value-type="float" office:value="1021" calcext:value-type="float">
            <text:p>1021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>
            <text:p/>
          </table:table-cell>
          <table:table-cell table:formula="of:=IF([$List.A58] &lt;&gt;&quot;&quot;; [$List.A58]; &quot;&quot;)">
            <text:p/>
          </table:table-cell>
          <table:table-cell/>
          <table:table-cell table:formula="of:=IF([.A58]&lt;&gt;&quot;&quot;; COM.MICROSOFT.CONCAT(&quot;#define MODBUS_ADDR_&quot;; [.A58]; &quot; &quot;; [.B58]); &quot;&quot;)">
            <text:p/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INSTALLED_CUPS" calcext:value-type="string">
            <text:p>INSTALLED_CUPS</text:p>
          </table:table-cell>
          <table:table-cell table:formula="of:=IF([$List.A59] &lt;&gt;&quot;&quot;; [$List.A59]; &quot;&quot;)" office:value-type="float" office:value="1022" calcext:value-type="float">
            <text:p>1022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ELECTRODES_CUP1" calcext:value-type="string">
            <text:p>ELECTRODES_CUP1</text:p>
          </table:table-cell>
          <table:table-cell table:formula="of:=IF([$List.A60] &lt;&gt;&quot;&quot;; [$List.A60]; &quot;&quot;)" office:value-type="float" office:value="1023" calcext:value-type="float">
            <text:p>1023</text:p>
          </table:table-cell>
          <table:table-cell/>
          <table:table-cell table:formula="of:=IF([.A60]&lt;&gt;&quot;&quot;; COM.MICROSOFT.CONCAT(&quot;#define MODBUS_ADDR_&quot;; [.A60]; &quot; &quot;; [.B60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ELECTRODES_CUP2" calcext:value-type="string">
            <text:p>ELECTRODES_CUP2</text:p>
          </table:table-cell>
          <table:table-cell table:formula="of:=IF([$List.A61] &lt;&gt;&quot;&quot;; [$List.A61]; &quot;&quot;)" office:value-type="float" office:value="1024" calcext:value-type="float">
            <text:p>1024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 office:value-type="string" office:string-value="ELECTRODES_CUP3" calcext:value-type="string">
            <text:p>ELECTRODES_CUP3</text:p>
          </table:table-cell>
          <table:table-cell table:formula="of:=IF([$List.A62] &lt;&gt;&quot;&quot;; [$List.A62]; &quot;&quot;)" office:value-type="float" office:value="1025" calcext:value-type="float">
            <text:p>1025</text:p>
          </table:table-cell>
          <table:table-cell/>
          <table:table-cell table:formula="of:=IF([.A62]&lt;&gt;&quot;&quot;; COM.MICROSOFT.CONCAT(&quot;#define MODBUS_ADDR_&quot;; [.A62]; &quot; &quot;; [.B62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TYPE" calcext:value-type="string">
            <text:p>CUP1_TYPE</text:p>
          </table:table-cell>
          <table:table-cell table:formula="of:=IF([$List.A63] &lt;&gt;&quot;&quot;; [$List.A63]; &quot;&quot;)" office:value-type="float" office:value="1026" calcext:value-type="float">
            <text:p>1026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2_TYPE" calcext:value-type="string">
            <text:p>CUP2_TYPE</text:p>
          </table:table-cell>
          <table:table-cell table:formula="of:=IF([$List.A64] &lt;&gt;&quot;&quot;; [$List.A64]; &quot;&quot;)" office:value-type="float" office:value="1027" calcext:value-type="float">
            <text:p>1027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3_TYPE" calcext:value-type="string">
            <text:p>CUP3_TYPE</text:p>
          </table:table-cell>
          <table:table-cell table:formula="of:=IF([$List.A65] &lt;&gt;&quot;&quot;; [$List.A65]; &quot;&quot;)" office:value-type="float" office:value="1028" calcext:value-type="float">
            <text:p>1028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>
            <text:p/>
          </table:table-cell>
          <table:table-cell table:formula="of:=IF([$List.A66] &lt;&gt;&quot;&quot;; [$List.A66]; &quot;&quot;)">
            <text:p/>
          </table:table-cell>
          <table:table-cell/>
          <table:table-cell table:formula="of:=IF([.A66]&lt;&gt;&quot;&quot;; COM.MICROSOFT.CONCAT(&quot;#define MODBUS_ADDR_&quot;; [.A66]; &quot; &quot;; [.B66]); &quot;&quot;)">
            <text:p/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ALIBRATION_CURRENT1" calcext:value-type="string">
            <text:p>CALIBRATION_CURRENT1</text:p>
          </table:table-cell>
          <table:table-cell table:formula="of:=IF([$List.A67] &lt;&gt;&quot;&quot;; [$List.A67]; &quot;&quot;)" office:value-type="float" office:value="1029" calcext:value-type="float">
            <text:p>1029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ALIBRATION_CURRENT1 1029" calcext:value-type="string">
            <text:p>#define MODBUS_ADDR_CALIBRATION_CURRENT1 1029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ALIBRATION_CURRENT2" calcext:value-type="string">
            <text:p>CALIBRATION_CURRENT2</text:p>
          </table:table-cell>
          <table:table-cell table:formula="of:=IF([$List.A68] &lt;&gt;&quot;&quot;; [$List.A68]; &quot;&quot;)" office:value-type="float" office:value="1030" calcext:value-type="float">
            <text:p>1030</text:p>
          </table:table-cell>
          <table:table-cell/>
          <table:table-cell table:formula="of:=IF([.A68]&lt;&gt;&quot;&quot;; COM.MICROSOFT.CONCAT(&quot;#define MODBUS_ADDR_&quot;; [.A68]; &quot; &quot;; [.B68]); &quot;&quot;)" office:value-type="string" office:string-value="#define MODBUS_ADDR_CALIBRATION_CURRENT2 1030" calcext:value-type="string">
            <text:p>#define MODBUS_ADDR_CALIBRATION_CURRENT2 1030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ALIBRATION_CURRENT3" calcext:value-type="string">
            <text:p>CALIBRATION_CURRENT3</text:p>
          </table:table-cell>
          <table:table-cell table:formula="of:=IF([$List.A69] &lt;&gt;&quot;&quot;; [$List.A69]; &quot;&quot;)" office:value-type="float" office:value="1031" calcext:value-type="float">
            <text:p>1031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ALIBRATION_CURRENT3 1031" calcext:value-type="string">
            <text:p>#define MODBUS_ADDR_CALIBRATION_CURRENT3 1031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ALIBRATION_CURRENT4" calcext:value-type="string">
            <text:p>CALIBRATION_CURRENT4</text:p>
          </table:table-cell>
          <table:table-cell table:formula="of:=IF([$List.A70] &lt;&gt;&quot;&quot;; [$List.A70]; &quot;&quot;)" office:value-type="float" office:value="1032" calcext:value-type="float">
            <text:p>1032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ALIBRATION_CURRENT4 1032" calcext:value-type="string">
            <text:p>#define MODBUS_ADDR_CALIBRATION_CURRENT4 1032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>
            <text:p/>
          </table:table-cell>
          <table:table-cell table:formula="of:=IF([$List.A71] &lt;&gt;&quot;&quot;; [$List.A71]; &quot;&quot;)">
            <text:p/>
          </table:table-cell>
          <table:table-cell/>
          <table:table-cell table:formula="of:=IF([.A71]&lt;&gt;&quot;&quot;; COM.MICROSOFT.CONCAT(&quot;#define MODBUS_ADDR_&quot;; [.A71]; &quot; &quot;; [.B71]); &quot;&quot;)">
            <text:p/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1_CHANNEL1_GAIN_LOW_POINT1" calcext:value-type="string">
            <text:p>CUP1_CHANNEL1_GAIN_LOW_POINT1</text:p>
          </table:table-cell>
          <table:table-cell table:formula="of:=IF([$List.A72] &lt;&gt;&quot;&quot;; [$List.A72]; &quot;&quot;)" office:value-type="float" office:value="1033" calcext:value-type="float">
            <text:p>1033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1_CHANNEL1_GAIN_LOW_POINT1 1033" calcext:value-type="string">
            <text:p>#define MODBUS_ADDR_CUP1_CHANNEL1_GAIN_LOW_POINT1 1033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1_CHANNEL1_GAIN_LOW_POINT2" calcext:value-type="string">
            <text:p>CUP1_CHANNEL1_GAIN_LOW_POINT2</text:p>
          </table:table-cell>
          <table:table-cell table:formula="of:=IF([$List.A73] &lt;&gt;&quot;&quot;; [$List.A73]; &quot;&quot;)" office:value-type="float" office:value="1034" calcext:value-type="float">
            <text:p>1034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1_CHANNEL1_GAIN_LOW_POINT2 1034" calcext:value-type="string">
            <text:p>#define MODBUS_ADDR_CUP1_CHANNEL1_GAIN_LOW_POINT2 1034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1_CHANNEL1_GAIN_LOW_POINT3" calcext:value-type="string">
            <text:p>CUP1_CHANNEL1_GAIN_LOW_POINT3</text:p>
          </table:table-cell>
          <table:table-cell table:formula="of:=IF([$List.A74] &lt;&gt;&quot;&quot;; [$List.A74]; &quot;&quot;)" office:value-type="float" office:value="1035" calcext:value-type="float">
            <text:p>1035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1_CHANNEL1_GAIN_LOW_POINT3 1035" calcext:value-type="string">
            <text:p>#define MODBUS_ADDR_CUP1_CHANNEL1_GAIN_LOW_POINT3 1035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1_CHANNEL1_GAIN_HIGH_POINT2" calcext:value-type="string">
            <text:p>CUP1_CHANNEL1_GAIN_HIGH_POINT2</text:p>
          </table:table-cell>
          <table:table-cell table:formula="of:=IF([$List.A75] &lt;&gt;&quot;&quot;; [$List.A75]; &quot;&quot;)" office:value-type="float" office:value="1036" calcext:value-type="float">
            <text:p>1036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1_CHANNEL1_GAIN_HIGH_POINT2 1036" calcext:value-type="string">
            <text:p>#define MODBUS_ADDR_CUP1_CHANNEL1_GAIN_HIGH_POINT2 1036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1_CHANNEL1_GAIN_HIGH_POINT3" calcext:value-type="string">
            <text:p>CUP1_CHANNEL1_GAIN_HIGH_POINT3</text:p>
          </table:table-cell>
          <table:table-cell table:formula="of:=IF([$List.A76] &lt;&gt;&quot;&quot;; [$List.A76]; &quot;&quot;)" office:value-type="float" office:value="1037" calcext:value-type="float">
            <text:p>1037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1_CHANNEL1_GAIN_HIGH_POINT3 1037" calcext:value-type="string">
            <text:p>#define MODBUS_ADDR_CUP1_CHANNEL1_GAIN_HIGH_POINT3 1037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1_CHANNEL1_GAIN_HIGH_POINT4" calcext:value-type="string">
            <text:p>CUP1_CHANNEL1_GAIN_HIGH_POINT4</text:p>
          </table:table-cell>
          <table:table-cell table:formula="of:=IF([$List.A77] &lt;&gt;&quot;&quot;; [$List.A77]; &quot;&quot;)" office:value-type="float" office:value="1038" calcext:value-type="float">
            <text:p>1038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1_CHANNEL1_GAIN_HIGH_POINT4 1038" calcext:value-type="string">
            <text:p>#define MODBUS_ADDR_CUP1_CHANNEL1_GAIN_HIGH_POINT4 1038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1_CHANNEL2_GAIN_LOW_POINT1" calcext:value-type="string">
            <text:p>CUP1_CHANNEL2_GAIN_LOW_POINT1</text:p>
          </table:table-cell>
          <table:table-cell table:formula="of:=IF([$List.A78] &lt;&gt;&quot;&quot;; [$List.A78]; &quot;&quot;)" office:value-type="float" office:value="1039" calcext:value-type="float">
            <text:p>1039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1_CHANNEL2_GAIN_LOW_POINT1 1039" calcext:value-type="string">
            <text:p>#define MODBUS_ADDR_CUP1_CHANNEL2_GAIN_LOW_POINT1 1039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1_CHANNEL2_GAIN_LOW_POINT2" calcext:value-type="string">
            <text:p>CUP1_CHANNEL2_GAIN_LOW_POINT2</text:p>
          </table:table-cell>
          <table:table-cell table:formula="of:=IF([$List.A79] &lt;&gt;&quot;&quot;; [$List.A79]; &quot;&quot;)" office:value-type="float" office:value="1040" calcext:value-type="float">
            <text:p>1040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1_CHANNEL2_GAIN_LOW_POINT2 1040" calcext:value-type="string">
            <text:p>#define MODBUS_ADDR_CUP1_CHANNEL2_GAIN_LOW_POINT2 1040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1_CHANNEL2_GAIN_LOW_POINT3" calcext:value-type="string">
            <text:p>CUP1_CHANNEL2_GAIN_LOW_POINT3</text:p>
          </table:table-cell>
          <table:table-cell table:formula="of:=IF([$List.A80] &lt;&gt;&quot;&quot;; [$List.A80]; &quot;&quot;)" office:value-type="float" office:value="1041" calcext:value-type="float">
            <text:p>1041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1_CHANNEL2_GAIN_LOW_POINT3 1041" calcext:value-type="string">
            <text:p>#define MODBUS_ADDR_CUP1_CHANNEL2_GAIN_LOW_POINT3 1041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1_CHANNEL2_GAIN_HIGH_POINT2" calcext:value-type="string">
            <text:p>CUP1_CHANNEL2_GAIN_HIGH_POINT2</text:p>
          </table:table-cell>
          <table:table-cell table:formula="of:=IF([$List.A81] &lt;&gt;&quot;&quot;; [$List.A81]; &quot;&quot;)" office:value-type="float" office:value="1042" calcext:value-type="float">
            <text:p>1042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1_CHANNEL2_GAIN_HIGH_POINT2 1042" calcext:value-type="string">
            <text:p>#define MODBUS_ADDR_CUP1_CHANNEL2_GAIN_HIGH_POINT2 1042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1_CHANNEL2_GAIN_HIGH_POINT3" calcext:value-type="string">
            <text:p>CUP1_CHANNEL2_GAIN_HIGH_POINT3</text:p>
          </table:table-cell>
          <table:table-cell table:formula="of:=IF([$List.A82] &lt;&gt;&quot;&quot;; [$List.A82]; &quot;&quot;)" office:value-type="float" office:value="1043" calcext:value-type="float">
            <text:p>1043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1_CHANNEL2_GAIN_HIGH_POINT3 1043" calcext:value-type="string">
            <text:p>#define MODBUS_ADDR_CUP1_CHANNEL2_GAIN_HIGH_POINT3 1043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1_CHANNEL2_GAIN_HIGH_POINT4" calcext:value-type="string">
            <text:p>CUP1_CHANNEL2_GAIN_HIGH_POINT4</text:p>
          </table:table-cell>
          <table:table-cell table:formula="of:=IF([$List.A83] &lt;&gt;&quot;&quot;; [$List.A83]; &quot;&quot;)" office:value-type="float" office:value="1044" calcext:value-type="float">
            <text:p>1044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1_CHANNEL2_GAIN_HIGH_POINT4 1044" calcext:value-type="string">
            <text:p>#define MODBUS_ADDR_CUP1_CHANNEL2_GAIN_HIGH_POINT4 1044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1_CHANNEL3_GAIN_LOW_POINT1" calcext:value-type="string">
            <text:p>CUP1_CHANNEL3_GAIN_LOW_POINT1</text:p>
          </table:table-cell>
          <table:table-cell table:formula="of:=IF([$List.A84] &lt;&gt;&quot;&quot;; [$List.A84]; &quot;&quot;)" office:value-type="float" office:value="1045" calcext:value-type="float">
            <text:p>1045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1_CHANNEL3_GAIN_LOW_POINT1 1045" calcext:value-type="string">
            <text:p>#define MODBUS_ADDR_CUP1_CHANNEL3_GAIN_LOW_POINT1 1045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1_CHANNEL3_GAIN_LOW_POINT2" calcext:value-type="string">
            <text:p>CUP1_CHANNEL3_GAIN_LOW_POINT2</text:p>
          </table:table-cell>
          <table:table-cell table:formula="of:=IF([$List.A85] &lt;&gt;&quot;&quot;; [$List.A85]; &quot;&quot;)" office:value-type="float" office:value="1046" calcext:value-type="float">
            <text:p>1046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1_CHANNEL3_GAIN_LOW_POINT2 1046" calcext:value-type="string">
            <text:p>#define MODBUS_ADDR_CUP1_CHANNEL3_GAIN_LOW_POINT2 1046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1_CHANNEL3_GAIN_LOW_POINT3" calcext:value-type="string">
            <text:p>CUP1_CHANNEL3_GAIN_LOW_POINT3</text:p>
          </table:table-cell>
          <table:table-cell table:formula="of:=IF([$List.A86] &lt;&gt;&quot;&quot;; [$List.A86]; &quot;&quot;)" office:value-type="float" office:value="1047" calcext:value-type="float">
            <text:p>1047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1_CHANNEL3_GAIN_LOW_POINT3 1047" calcext:value-type="string">
            <text:p>#define MODBUS_ADDR_CUP1_CHANNEL3_GAIN_LOW_POINT3 1047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 office:value-type="string" office:string-value="CUP1_CHANNEL3_GAIN_HIGH_POINT2" calcext:value-type="string">
            <text:p>CUP1_CHANNEL3_GAIN_HIGH_POINT2</text:p>
          </table:table-cell>
          <table:table-cell table:formula="of:=IF([$List.A87] &lt;&gt;&quot;&quot;; [$List.A87]; &quot;&quot;)" office:value-type="float" office:value="1048" calcext:value-type="float">
            <text:p>1048</text:p>
          </table:table-cell>
          <table:table-cell/>
          <table:table-cell table:formula="of:=IF([.A87]&lt;&gt;&quot;&quot;; COM.MICROSOFT.CONCAT(&quot;#define MODBUS_ADDR_&quot;; [.A87]; &quot; &quot;; [.B87]); &quot;&quot;)" office:value-type="string" office:string-value="#define MODBUS_ADDR_CUP1_CHANNEL3_GAIN_HIGH_POINT2 1048" calcext:value-type="string">
            <text:p>#define MODBUS_ADDR_CUP1_CHANNEL3_GAIN_HIGH_POINT2 1048</text:p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1_CHANNEL3_GAIN_HIGH_POINT3" calcext:value-type="string">
            <text:p>CUP1_CHANNEL3_GAIN_HIGH_POINT3</text:p>
          </table:table-cell>
          <table:table-cell table:formula="of:=IF([$List.A88] &lt;&gt;&quot;&quot;; [$List.A88]; &quot;&quot;)" office:value-type="float" office:value="1049" calcext:value-type="float">
            <text:p>1049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1_CHANNEL3_GAIN_HIGH_POINT3 1049" calcext:value-type="string">
            <text:p>#define MODBUS_ADDR_CUP1_CHANNEL3_GAIN_HIGH_POINT3 1049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1_CHANNEL3_GAIN_HIGH_POINT4" calcext:value-type="string">
            <text:p>CUP1_CHANNEL3_GAIN_HIGH_POINT4</text:p>
          </table:table-cell>
          <table:table-cell table:formula="of:=IF([$List.A89] &lt;&gt;&quot;&quot;; [$List.A89]; &quot;&quot;)" office:value-type="float" office:value="1050" calcext:value-type="float">
            <text:p>1050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1_CHANNEL3_GAIN_HIGH_POINT4 1050" calcext:value-type="string">
            <text:p>#define MODBUS_ADDR_CUP1_CHANNEL3_GAIN_HIGH_POINT4 1050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1_CHANNEL4_GAIN_LOW_POINT1" calcext:value-type="string">
            <text:p>CUP1_CHANNEL4_GAIN_LOW_POINT1</text:p>
          </table:table-cell>
          <table:table-cell table:formula="of:=IF([$List.A90] &lt;&gt;&quot;&quot;; [$List.A90]; &quot;&quot;)" office:value-type="float" office:value="1051" calcext:value-type="float">
            <text:p>1051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1_CHANNEL4_GAIN_LOW_POINT1 1051" calcext:value-type="string">
            <text:p>#define MODBUS_ADDR_CUP1_CHANNEL4_GAIN_LOW_POINT1 1051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 office:value-type="string" office:string-value="CUP1_CHANNEL4_GAIN_LOW_POINT2" calcext:value-type="string">
            <text:p>CUP1_CHANNEL4_GAIN_LOW_POINT2</text:p>
          </table:table-cell>
          <table:table-cell table:formula="of:=IF([$List.A91] &lt;&gt;&quot;&quot;; [$List.A91]; &quot;&quot;)" office:value-type="float" office:value="1052" calcext:value-type="float">
            <text:p>1052</text:p>
          </table:table-cell>
          <table:table-cell/>
          <table:table-cell table:formula="of:=IF([.A91]&lt;&gt;&quot;&quot;; COM.MICROSOFT.CONCAT(&quot;#define MODBUS_ADDR_&quot;; [.A91]; &quot; &quot;; [.B91]); &quot;&quot;)" office:value-type="string" office:string-value="#define MODBUS_ADDR_CUP1_CHANNEL4_GAIN_LOW_POINT2 1052" calcext:value-type="string">
            <text:p>#define MODBUS_ADDR_CUP1_CHANNEL4_GAIN_LOW_POINT2 1052</text:p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1_CHANNEL4_GAIN_LOW_POINT3" calcext:value-type="string">
            <text:p>CUP1_CHANNEL4_GAIN_LOW_POINT3</text:p>
          </table:table-cell>
          <table:table-cell table:formula="of:=IF([$List.A92] &lt;&gt;&quot;&quot;; [$List.A92]; &quot;&quot;)" office:value-type="float" office:value="1053" calcext:value-type="float">
            <text:p>1053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1_CHANNEL4_GAIN_LOW_POINT3 1053" calcext:value-type="string">
            <text:p>#define MODBUS_ADDR_CUP1_CHANNEL4_GAIN_LOW_POINT3 1053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1_CHANNEL4_GAIN_HIGH_POINT2" calcext:value-type="string">
            <text:p>CUP1_CHANNEL4_GAIN_HIGH_POINT2</text:p>
          </table:table-cell>
          <table:table-cell table:formula="of:=IF([$List.A93] &lt;&gt;&quot;&quot;; [$List.A93]; &quot;&quot;)" office:value-type="float" office:value="1054" calcext:value-type="float">
            <text:p>1054</text:p>
          </table:table-cell>
          <table:table-cell/>
          <table:table-cell table:formula="of:=IF([.A93]&lt;&gt;&quot;&quot;; COM.MICROSOFT.CONCAT(&quot;#define MODBUS_ADDR_&quot;; [.A93]; &quot; &quot;; [.B93]); &quot;&quot;)" office:value-type="string" office:string-value="#define MODBUS_ADDR_CUP1_CHANNEL4_GAIN_HIGH_POINT2 1054" calcext:value-type="string">
            <text:p>#define MODBUS_ADDR_CUP1_CHANNEL4_GAIN_HIGH_POINT2 1054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1_CHANNEL4_GAIN_HIGH_POINT3" calcext:value-type="string">
            <text:p>CUP1_CHANNEL4_GAIN_HIGH_POINT3</text:p>
          </table:table-cell>
          <table:table-cell table:formula="of:=IF([$List.A94] &lt;&gt;&quot;&quot;; [$List.A94]; &quot;&quot;)" office:value-type="float" office:value="1055" calcext:value-type="float">
            <text:p>1055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1_CHANNEL4_GAIN_HIGH_POINT3 1055" calcext:value-type="string">
            <text:p>#define MODBUS_ADDR_CUP1_CHANNEL4_GAIN_HIGH_POINT3 1055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1_CHANNEL4_GAIN_HIGH_POINT4" calcext:value-type="string">
            <text:p>CUP1_CHANNEL4_GAIN_HIGH_POINT4</text:p>
          </table:table-cell>
          <table:table-cell table:formula="of:=IF([$List.A95] &lt;&gt;&quot;&quot;; [$List.A95]; &quot;&quot;)" office:value-type="float" office:value="1056" calcext:value-type="float">
            <text:p>1056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1_CHANNEL4_GAIN_HIGH_POINT4 1056" calcext:value-type="string">
            <text:p>#define MODBUS_ADDR_CUP1_CHANNEL4_GAIN_HIGH_POINT4 1056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>
            <text:p/>
          </table:table-cell>
          <table:table-cell table:formula="of:=IF([$List.A96] &lt;&gt;&quot;&quot;; [$List.A96]; &quot;&quot;)">
            <text:p/>
          </table:table-cell>
          <table:table-cell/>
          <table:table-cell table:formula="of:=IF([.A96]&lt;&gt;&quot;&quot;; COM.MICROSOFT.CONCAT(&quot;#define MODBUS_ADDR_&quot;; [.A96]; &quot; &quot;; [.B96]); &quot;&quot;)">
            <text:p/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2_CHANNEL1_GAIN_LOW_POINT1" calcext:value-type="string">
            <text:p>CUP2_CHANNEL1_GAIN_LOW_POINT1</text:p>
          </table:table-cell>
          <table:table-cell table:formula="of:=IF([$List.A97] &lt;&gt;&quot;&quot;; [$List.A97]; &quot;&quot;)" office:value-type="float" office:value="1057" calcext:value-type="float">
            <text:p>1057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2_CHANNEL1_GAIN_LOW_POINT1 1057" calcext:value-type="string">
            <text:p>#define MODBUS_ADDR_CUP2_CHANNEL1_GAIN_LOW_POINT1 1057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2_CHANNEL1_GAIN_LOW_POINT2" calcext:value-type="string">
            <text:p>CUP2_CHANNEL1_GAIN_LOW_POINT2</text:p>
          </table:table-cell>
          <table:table-cell table:formula="of:=IF([$List.A98] &lt;&gt;&quot;&quot;; [$List.A98]; &quot;&quot;)" office:value-type="float" office:value="1058" calcext:value-type="float">
            <text:p>1058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2_CHANNEL1_GAIN_LOW_POINT2 1058" calcext:value-type="string">
            <text:p>#define MODBUS_ADDR_CUP2_CHANNEL1_GAIN_LOW_POINT2 1058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2_CHANNEL1_GAIN_LOW_POINT3" calcext:value-type="string">
            <text:p>CUP2_CHANNEL1_GAIN_LOW_POINT3</text:p>
          </table:table-cell>
          <table:table-cell table:formula="of:=IF([$List.A99] &lt;&gt;&quot;&quot;; [$List.A99]; &quot;&quot;)" office:value-type="float" office:value="1059" calcext:value-type="float">
            <text:p>1059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2_CHANNEL1_GAIN_LOW_POINT3 1059" calcext:value-type="string">
            <text:p>#define MODBUS_ADDR_CUP2_CHANNEL1_GAIN_LOW_POINT3 1059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2_CHANNEL1_GAIN_HIGH_POINT2" calcext:value-type="string">
            <text:p>CUP2_CHANNEL1_GAIN_HIGH_POINT2</text:p>
          </table:table-cell>
          <table:table-cell table:formula="of:=IF([$List.A100] &lt;&gt;&quot;&quot;; [$List.A100]; &quot;&quot;)" office:value-type="float" office:value="1060" calcext:value-type="float">
            <text:p>1060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2_CHANNEL1_GAIN_HIGH_POINT2 1060" calcext:value-type="string">
            <text:p>#define MODBUS_ADDR_CUP2_CHANNEL1_GAIN_HIGH_POINT2 1060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2_CHANNEL1_GAIN_HIGH_POINT3" calcext:value-type="string">
            <text:p>CUP2_CHANNEL1_GAIN_HIGH_POINT3</text:p>
          </table:table-cell>
          <table:table-cell table:formula="of:=IF([$List.A101] &lt;&gt;&quot;&quot;; [$List.A101]; &quot;&quot;)" office:value-type="float" office:value="1061" calcext:value-type="float">
            <text:p>1061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2_CHANNEL1_GAIN_HIGH_POINT3 1061" calcext:value-type="string">
            <text:p>#define MODBUS_ADDR_CUP2_CHANNEL1_GAIN_HIGH_POINT3 1061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2_CHANNEL1_GAIN_HIGH_POINT4" calcext:value-type="string">
            <text:p>CUP2_CHANNEL1_GAIN_HIGH_POINT4</text:p>
          </table:table-cell>
          <table:table-cell table:formula="of:=IF([$List.A102] &lt;&gt;&quot;&quot;; [$List.A102]; &quot;&quot;)" office:value-type="float" office:value="1062" calcext:value-type="float">
            <text:p>1062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2_CHANNEL1_GAIN_HIGH_POINT4 1062" calcext:value-type="string">
            <text:p>#define MODBUS_ADDR_CUP2_CHANNEL1_GAIN_HIGH_POINT4 1062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2_CHANNEL2_GAIN_LOW_POINT1" calcext:value-type="string">
            <text:p>CUP2_CHANNEL2_GAIN_LOW_POINT1</text:p>
          </table:table-cell>
          <table:table-cell table:formula="of:=IF([$List.A103] &lt;&gt;&quot;&quot;; [$List.A103]; &quot;&quot;)" office:value-type="float" office:value="1063" calcext:value-type="float">
            <text:p>1063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2_CHANNEL2_GAIN_LOW_POINT1 1063" calcext:value-type="string">
            <text:p>#define MODBUS_ADDR_CUP2_CHANNEL2_GAIN_LOW_POINT1 1063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2_CHANNEL2_GAIN_LOW_POINT2" calcext:value-type="string">
            <text:p>CUP2_CHANNEL2_GAIN_LOW_POINT2</text:p>
          </table:table-cell>
          <table:table-cell table:formula="of:=IF([$List.A104] &lt;&gt;&quot;&quot;; [$List.A104]; &quot;&quot;)" office:value-type="float" office:value="1064" calcext:value-type="float">
            <text:p>1064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2_CHANNEL2_GAIN_LOW_POINT2 1064" calcext:value-type="string">
            <text:p>#define MODBUS_ADDR_CUP2_CHANNEL2_GAIN_LOW_POINT2 1064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2_CHANNEL2_GAIN_LOW_POINT3" calcext:value-type="string">
            <text:p>CUP2_CHANNEL2_GAIN_LOW_POINT3</text:p>
          </table:table-cell>
          <table:table-cell table:formula="of:=IF([$List.A105] &lt;&gt;&quot;&quot;; [$List.A105]; &quot;&quot;)" office:value-type="float" office:value="1065" calcext:value-type="float">
            <text:p>1065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2_CHANNEL2_GAIN_LOW_POINT3 1065" calcext:value-type="string">
            <text:p>#define MODBUS_ADDR_CUP2_CHANNEL2_GAIN_LOW_POINT3 1065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2_CHANNEL2_GAIN_HIGH_POINT2" calcext:value-type="string">
            <text:p>CUP2_CHANNEL2_GAIN_HIGH_POINT2</text:p>
          </table:table-cell>
          <table:table-cell table:formula="of:=IF([$List.A106] &lt;&gt;&quot;&quot;; [$List.A106]; &quot;&quot;)" office:value-type="float" office:value="1066" calcext:value-type="float">
            <text:p>1066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2_CHANNEL2_GAIN_HIGH_POINT2 1066" calcext:value-type="string">
            <text:p>#define MODBUS_ADDR_CUP2_CHANNEL2_GAIN_HIGH_POINT2 1066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2_CHANNEL2_GAIN_HIGH_POINT3" calcext:value-type="string">
            <text:p>CUP2_CHANNEL2_GAIN_HIGH_POINT3</text:p>
          </table:table-cell>
          <table:table-cell table:formula="of:=IF([$List.A107] &lt;&gt;&quot;&quot;; [$List.A107]; &quot;&quot;)" office:value-type="float" office:value="1067" calcext:value-type="float">
            <text:p>1067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2_CHANNEL2_GAIN_HIGH_POINT3 1067" calcext:value-type="string">
            <text:p>#define MODBUS_ADDR_CUP2_CHANNEL2_GAIN_HIGH_POINT3 1067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2_CHANNEL2_GAIN_HIGH_POINT4" calcext:value-type="string">
            <text:p>CUP2_CHANNEL2_GAIN_HIGH_POINT4</text:p>
          </table:table-cell>
          <table:table-cell table:formula="of:=IF([$List.A108] &lt;&gt;&quot;&quot;; [$List.A108]; &quot;&quot;)" office:value-type="float" office:value="1068" calcext:value-type="float">
            <text:p>1068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2_CHANNEL2_GAIN_HIGH_POINT4 1068" calcext:value-type="string">
            <text:p>#define MODBUS_ADDR_CUP2_CHANNEL2_GAIN_HIGH_POINT4 1068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2_CHANNEL3_GAIN_LOW_POINT1" calcext:value-type="string">
            <text:p>CUP2_CHANNEL3_GAIN_LOW_POINT1</text:p>
          </table:table-cell>
          <table:table-cell table:formula="of:=IF([$List.A109] &lt;&gt;&quot;&quot;; [$List.A109]; &quot;&quot;)" office:value-type="float" office:value="1069" calcext:value-type="float">
            <text:p>1069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2_CHANNEL3_GAIN_LOW_POINT1 1069" calcext:value-type="string">
            <text:p>#define MODBUS_ADDR_CUP2_CHANNEL3_GAIN_LOW_POINT1 1069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2_CHANNEL3_GAIN_LOW_POINT2" calcext:value-type="string">
            <text:p>CUP2_CHANNEL3_GAIN_LOW_POINT2</text:p>
          </table:table-cell>
          <table:table-cell table:formula="of:=IF([$List.A110] &lt;&gt;&quot;&quot;; [$List.A110]; &quot;&quot;)" office:value-type="float" office:value="1070" calcext:value-type="float">
            <text:p>1070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2_CHANNEL3_GAIN_LOW_POINT2 1070" calcext:value-type="string">
            <text:p>#define MODBUS_ADDR_CUP2_CHANNEL3_GAIN_LOW_POINT2 1070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2_CHANNEL3_GAIN_LOW_POINT3" calcext:value-type="string">
            <text:p>CUP2_CHANNEL3_GAIN_LOW_POINT3</text:p>
          </table:table-cell>
          <table:table-cell table:formula="of:=IF([$List.A111] &lt;&gt;&quot;&quot;; [$List.A111]; &quot;&quot;)" office:value-type="float" office:value="1071" calcext:value-type="float">
            <text:p>1071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2_CHANNEL3_GAIN_LOW_POINT3 1071" calcext:value-type="string">
            <text:p>#define MODBUS_ADDR_CUP2_CHANNEL3_GAIN_LOW_POINT3 1071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 office:value-type="string" office:string-value="CUP2_CHANNEL3_GAIN_HIGH_POINT2" calcext:value-type="string">
            <text:p>CUP2_CHANNEL3_GAIN_HIGH_POINT2</text:p>
          </table:table-cell>
          <table:table-cell table:formula="of:=IF([$List.A112] &lt;&gt;&quot;&quot;; [$List.A112]; &quot;&quot;)" office:value-type="float" office:value="1072" calcext:value-type="float">
            <text:p>1072</text:p>
          </table:table-cell>
          <table:table-cell/>
          <table:table-cell table:formula="of:=IF([.A112]&lt;&gt;&quot;&quot;; COM.MICROSOFT.CONCAT(&quot;#define MODBUS_ADDR_&quot;; [.A112]; &quot; &quot;; [.B112]); &quot;&quot;)" office:value-type="string" office:string-value="#define MODBUS_ADDR_CUP2_CHANNEL3_GAIN_HIGH_POINT2 1072" calcext:value-type="string">
            <text:p>#define MODBUS_ADDR_CUP2_CHANNEL3_GAIN_HIGH_POINT2 1072</text:p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CUP2_CHANNEL3_GAIN_HIGH_POINT3" calcext:value-type="string">
            <text:p>CUP2_CHANNEL3_GAIN_HIGH_POINT3</text:p>
          </table:table-cell>
          <table:table-cell table:formula="of:=IF([$List.A113] &lt;&gt;&quot;&quot;; [$List.A113]; &quot;&quot;)" office:value-type="float" office:value="1073" calcext:value-type="float">
            <text:p>1073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CUP2_CHANNEL3_GAIN_HIGH_POINT3 1073" calcext:value-type="string">
            <text:p>#define MODBUS_ADDR_CUP2_CHANNEL3_GAIN_HIGH_POINT3 1073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 office:value-type="string" office:string-value="CUP2_CHANNEL3_GAIN_HIGH_POINT4" calcext:value-type="string">
            <text:p>CUP2_CHANNEL3_GAIN_HIGH_POINT4</text:p>
          </table:table-cell>
          <table:table-cell table:formula="of:=IF([$List.A114] &lt;&gt;&quot;&quot;; [$List.A114]; &quot;&quot;)" office:value-type="float" office:value="1074" calcext:value-type="float">
            <text:p>1074</text:p>
          </table:table-cell>
          <table:table-cell/>
          <table:table-cell table:formula="of:=IF([.A114]&lt;&gt;&quot;&quot;; COM.MICROSOFT.CONCAT(&quot;#define MODBUS_ADDR_&quot;; [.A114]; &quot; &quot;; [.B114]); &quot;&quot;)" office:value-type="string" office:string-value="#define MODBUS_ADDR_CUP2_CHANNEL3_GAIN_HIGH_POINT4 1074" calcext:value-type="string">
            <text:p>#define MODBUS_ADDR_CUP2_CHANNEL3_GAIN_HIGH_POINT4 1074</text:p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2_CHANNEL4_GAIN_LOW_POINT1" calcext:value-type="string">
            <text:p>CUP2_CHANNEL4_GAIN_LOW_POINT1</text:p>
          </table:table-cell>
          <table:table-cell table:formula="of:=IF([$List.A115] &lt;&gt;&quot;&quot;; [$List.A115]; &quot;&quot;)" office:value-type="float" office:value="1075" calcext:value-type="float">
            <text:p>1075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2_CHANNEL4_GAIN_LOW_POINT1 1075" calcext:value-type="string">
            <text:p>#define MODBUS_ADDR_CUP2_CHANNEL4_GAIN_LOW_POINT1 1075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 office:value-type="string" office:string-value="CUP2_CHANNEL4_GAIN_LOW_POINT2" calcext:value-type="string">
            <text:p>CUP2_CHANNEL4_GAIN_LOW_POINT2</text:p>
          </table:table-cell>
          <table:table-cell table:formula="of:=IF([$List.A116] &lt;&gt;&quot;&quot;; [$List.A116]; &quot;&quot;)" office:value-type="float" office:value="1076" calcext:value-type="float">
            <text:p>1076</text:p>
          </table:table-cell>
          <table:table-cell/>
          <table:table-cell table:formula="of:=IF([.A116]&lt;&gt;&quot;&quot;; COM.MICROSOFT.CONCAT(&quot;#define MODBUS_ADDR_&quot;; [.A116]; &quot; &quot;; [.B116]); &quot;&quot;)" office:value-type="string" office:string-value="#define MODBUS_ADDR_CUP2_CHANNEL4_GAIN_LOW_POINT2 1076" calcext:value-type="string">
            <text:p>#define MODBUS_ADDR_CUP2_CHANNEL4_GAIN_LOW_POINT2 1076</text:p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CUP2_CHANNEL4_GAIN_LOW_POINT3" calcext:value-type="string">
            <text:p>CUP2_CHANNEL4_GAIN_LOW_POINT3</text:p>
          </table:table-cell>
          <table:table-cell table:formula="of:=IF([$List.A117] &lt;&gt;&quot;&quot;; [$List.A117]; &quot;&quot;)" office:value-type="float" office:value="1077" calcext:value-type="float">
            <text:p>1077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CUP2_CHANNEL4_GAIN_LOW_POINT3 1077" calcext:value-type="string">
            <text:p>#define MODBUS_ADDR_CUP2_CHANNEL4_GAIN_LOW_POINT3 1077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 office:value-type="string" office:string-value="CUP2_CHANNEL4_GAIN_HIGH_POINT2" calcext:value-type="string">
            <text:p>CUP2_CHANNEL4_GAIN_HIGH_POINT2</text:p>
          </table:table-cell>
          <table:table-cell table:formula="of:=IF([$List.A118] &lt;&gt;&quot;&quot;; [$List.A118]; &quot;&quot;)" office:value-type="float" office:value="1078" calcext:value-type="float">
            <text:p>1078</text:p>
          </table:table-cell>
          <table:table-cell/>
          <table:table-cell table:formula="of:=IF([.A118]&lt;&gt;&quot;&quot;; COM.MICROSOFT.CONCAT(&quot;#define MODBUS_ADDR_&quot;; [.A118]; &quot; &quot;; [.B118]); &quot;&quot;)" office:value-type="string" office:string-value="#define MODBUS_ADDR_CUP2_CHANNEL4_GAIN_HIGH_POINT2 1078" calcext:value-type="string">
            <text:p>#define MODBUS_ADDR_CUP2_CHANNEL4_GAIN_HIGH_POINT2 1078</text:p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2_CHANNEL4_GAIN_HIGH_POINT3" calcext:value-type="string">
            <text:p>CUP2_CHANNEL4_GAIN_HIGH_POINT3</text:p>
          </table:table-cell>
          <table:table-cell table:formula="of:=IF([$List.A119] &lt;&gt;&quot;&quot;; [$List.A119]; &quot;&quot;)" office:value-type="float" office:value="1079" calcext:value-type="float">
            <text:p>1079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CUP2_CHANNEL4_GAIN_HIGH_POINT3 1079" calcext:value-type="string">
            <text:p>#define MODBUS_ADDR_CUP2_CHANNEL4_GAIN_HIGH_POINT3 1079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2_CHANNEL4_GAIN_HIGH_POINT4" calcext:value-type="string">
            <text:p>CUP2_CHANNEL4_GAIN_HIGH_POINT4</text:p>
          </table:table-cell>
          <table:table-cell table:formula="of:=IF([$List.A120] &lt;&gt;&quot;&quot;; [$List.A120]; &quot;&quot;)" office:value-type="float" office:value="1080" calcext:value-type="float">
            <text:p>1080</text:p>
          </table:table-cell>
          <table:table-cell/>
          <table:table-cell table:formula="of:=IF([.A120]&lt;&gt;&quot;&quot;; COM.MICROSOFT.CONCAT(&quot;#define MODBUS_ADDR_&quot;; [.A120]; &quot; &quot;; [.B120]); &quot;&quot;)" office:value-type="string" office:string-value="#define MODBUS_ADDR_CUP2_CHANNEL4_GAIN_HIGH_POINT4 1080" calcext:value-type="string">
            <text:p>#define MODBUS_ADDR_CUP2_CHANNEL4_GAIN_HIGH_POINT4 1080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>
            <text:p/>
          </table:table-cell>
          <table:table-cell table:formula="of:=IF([$List.A121] &lt;&gt;&quot;&quot;; [$List.A121]; &quot;&quot;)">
            <text:p/>
          </table:table-cell>
          <table:table-cell/>
          <table:table-cell table:formula="of:=IF([.A121]&lt;&gt;&quot;&quot;; COM.MICROSOFT.CONCAT(&quot;#define MODBUS_ADDR_&quot;; [.A121]; &quot; &quot;; [.B121]); &quot;&quot;)">
            <text:p/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3_CHANNEL1_GAIN_LOW_POINT1" calcext:value-type="string">
            <text:p>CUP3_CHANNEL1_GAIN_LOW_POINT1</text:p>
          </table:table-cell>
          <table:table-cell table:formula="of:=IF([$List.A122] &lt;&gt;&quot;&quot;; [$List.A122]; &quot;&quot;)" office:value-type="float" office:value="1081" calcext:value-type="float">
            <text:p>1081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3_CHANNEL1_GAIN_LOW_POINT1 1081" calcext:value-type="string">
            <text:p>#define MODBUS_ADDR_CUP3_CHANNEL1_GAIN_LOW_POINT1 1081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3_CHANNEL1_GAIN_LOW_POINT2" calcext:value-type="string">
            <text:p>CUP3_CHANNEL1_GAIN_LOW_POINT2</text:p>
          </table:table-cell>
          <table:table-cell table:formula="of:=IF([$List.A123] &lt;&gt;&quot;&quot;; [$List.A123]; &quot;&quot;)" office:value-type="float" office:value="1082" calcext:value-type="float">
            <text:p>1082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3_CHANNEL1_GAIN_LOW_POINT2 1082" calcext:value-type="string">
            <text:p>#define MODBUS_ADDR_CUP3_CHANNEL1_GAIN_LOW_POINT2 1082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3_CHANNEL1_GAIN_LOW_POINT3" calcext:value-type="string">
            <text:p>CUP3_CHANNEL1_GAIN_LOW_POINT3</text:p>
          </table:table-cell>
          <table:table-cell table:formula="of:=IF([$List.A124] &lt;&gt;&quot;&quot;; [$List.A124]; &quot;&quot;)" office:value-type="float" office:value="1083" calcext:value-type="float">
            <text:p>1083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3_CHANNEL1_GAIN_LOW_POINT3 1083" calcext:value-type="string">
            <text:p>#define MODBUS_ADDR_CUP3_CHANNEL1_GAIN_LOW_POINT3 1083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3_CHANNEL1_GAIN_HIGH_POINT2" calcext:value-type="string">
            <text:p>CUP3_CHANNEL1_GAIN_HIGH_POINT2</text:p>
          </table:table-cell>
          <table:table-cell table:formula="of:=IF([$List.A125] &lt;&gt;&quot;&quot;; [$List.A125]; &quot;&quot;)" office:value-type="float" office:value="1084" calcext:value-type="float">
            <text:p>1084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3_CHANNEL1_GAIN_HIGH_POINT2 1084" calcext:value-type="string">
            <text:p>#define MODBUS_ADDR_CUP3_CHANNEL1_GAIN_HIGH_POINT2 1084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3_CHANNEL1_GAIN_HIGH_POINT3" calcext:value-type="string">
            <text:p>CUP3_CHANNEL1_GAIN_HIGH_POINT3</text:p>
          </table:table-cell>
          <table:table-cell table:formula="of:=IF([$List.A126] &lt;&gt;&quot;&quot;; [$List.A126]; &quot;&quot;)" office:value-type="float" office:value="1085" calcext:value-type="float">
            <text:p>1085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3_CHANNEL1_GAIN_HIGH_POINT3 1085" calcext:value-type="string">
            <text:p>#define MODBUS_ADDR_CUP3_CHANNEL1_GAIN_HIGH_POINT3 1085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 office:value-type="string" office:string-value="CUP3_CHANNEL1_GAIN_HIGH_POINT4" calcext:value-type="string">
            <text:p>CUP3_CHANNEL1_GAIN_HIGH_POINT4</text:p>
          </table:table-cell>
          <table:table-cell table:formula="of:=IF([$List.A127] &lt;&gt;&quot;&quot;; [$List.A127]; &quot;&quot;)" office:value-type="float" office:value="1086" calcext:value-type="float">
            <text:p>1086</text:p>
          </table:table-cell>
          <table:table-cell/>
          <table:table-cell table:formula="of:=IF([.A127]&lt;&gt;&quot;&quot;; COM.MICROSOFT.CONCAT(&quot;#define MODBUS_ADDR_&quot;; [.A127]; &quot; &quot;; [.B127]); &quot;&quot;)" office:value-type="string" office:string-value="#define MODBUS_ADDR_CUP3_CHANNEL1_GAIN_HIGH_POINT4 1086" calcext:value-type="string">
            <text:p>#define MODBUS_ADDR_CUP3_CHANNEL1_GAIN_HIGH_POINT4 1086</text:p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3_CHANNEL2_GAIN_LOW_POINT1" calcext:value-type="string">
            <text:p>CUP3_CHANNEL2_GAIN_LOW_POINT1</text:p>
          </table:table-cell>
          <table:table-cell table:formula="of:=IF([$List.A128] &lt;&gt;&quot;&quot;; [$List.A128]; &quot;&quot;)" office:value-type="float" office:value="1087" calcext:value-type="float">
            <text:p>1087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3_CHANNEL2_GAIN_LOW_POINT1 1087" calcext:value-type="string">
            <text:p>#define MODBUS_ADDR_CUP3_CHANNEL2_GAIN_LOW_POINT1 1087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3_CHANNEL2_GAIN_LOW_POINT2" calcext:value-type="string">
            <text:p>CUP3_CHANNEL2_GAIN_LOW_POINT2</text:p>
          </table:table-cell>
          <table:table-cell table:formula="of:=IF([$List.A129] &lt;&gt;&quot;&quot;; [$List.A129]; &quot;&quot;)" office:value-type="float" office:value="1088" calcext:value-type="float">
            <text:p>1088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3_CHANNEL2_GAIN_LOW_POINT2 1088" calcext:value-type="string">
            <text:p>#define MODBUS_ADDR_CUP3_CHANNEL2_GAIN_LOW_POINT2 1088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3_CHANNEL2_GAIN_LOW_POINT3" calcext:value-type="string">
            <text:p>CUP3_CHANNEL2_GAIN_LOW_POINT3</text:p>
          </table:table-cell>
          <table:table-cell table:formula="of:=IF([$List.A130] &lt;&gt;&quot;&quot;; [$List.A130]; &quot;&quot;)" office:value-type="float" office:value="1089" calcext:value-type="float">
            <text:p>1089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3_CHANNEL2_GAIN_LOW_POINT3 1089" calcext:value-type="string">
            <text:p>#define MODBUS_ADDR_CUP3_CHANNEL2_GAIN_LOW_POINT3 1089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 office:value-type="string" office:string-value="CUP3_CHANNEL2_GAIN_HIGH_POINT2" calcext:value-type="string">
            <text:p>CUP3_CHANNEL2_GAIN_HIGH_POINT2</text:p>
          </table:table-cell>
          <table:table-cell table:formula="of:=IF([$List.A131] &lt;&gt;&quot;&quot;; [$List.A131]; &quot;&quot;)" office:value-type="float" office:value="1090" calcext:value-type="float">
            <text:p>1090</text:p>
          </table:table-cell>
          <table:table-cell/>
          <table:table-cell table:formula="of:=IF([.A131]&lt;&gt;&quot;&quot;; COM.MICROSOFT.CONCAT(&quot;#define MODBUS_ADDR_&quot;; [.A131]; &quot; &quot;; [.B131]); &quot;&quot;)" office:value-type="string" office:string-value="#define MODBUS_ADDR_CUP3_CHANNEL2_GAIN_HIGH_POINT2 1090" calcext:value-type="string">
            <text:p>#define MODBUS_ADDR_CUP3_CHANNEL2_GAIN_HIGH_POINT2 1090</text:p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3_CHANNEL2_GAIN_HIGH_POINT3" calcext:value-type="string">
            <text:p>CUP3_CHANNEL2_GAIN_HIGH_POINT3</text:p>
          </table:table-cell>
          <table:table-cell table:formula="of:=IF([$List.A132] &lt;&gt;&quot;&quot;; [$List.A132]; &quot;&quot;)" office:value-type="float" office:value="1091" calcext:value-type="float">
            <text:p>1091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3_CHANNEL2_GAIN_HIGH_POINT3 1091" calcext:value-type="string">
            <text:p>#define MODBUS_ADDR_CUP3_CHANNEL2_GAIN_HIGH_POINT3 1091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3_CHANNEL2_GAIN_HIGH_POINT4" calcext:value-type="string">
            <text:p>CUP3_CHANNEL2_GAIN_HIGH_POINT4</text:p>
          </table:table-cell>
          <table:table-cell table:formula="of:=IF([$List.A133] &lt;&gt;&quot;&quot;; [$List.A133]; &quot;&quot;)" office:value-type="float" office:value="1092" calcext:value-type="float">
            <text:p>1092</text:p>
          </table:table-cell>
          <table:table-cell/>
          <table:table-cell table:formula="of:=IF([.A133]&lt;&gt;&quot;&quot;; COM.MICROSOFT.CONCAT(&quot;#define MODBUS_ADDR_&quot;; [.A133]; &quot; &quot;; [.B133]); &quot;&quot;)" office:value-type="string" office:string-value="#define MODBUS_ADDR_CUP3_CHANNEL2_GAIN_HIGH_POINT4 1092" calcext:value-type="string">
            <text:p>#define MODBUS_ADDR_CUP3_CHANNEL2_GAIN_HIGH_POINT4 1092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3_CHANNEL3_GAIN_LOW_POINT1" calcext:value-type="string">
            <text:p>CUP3_CHANNEL3_GAIN_LOW_POINT1</text:p>
          </table:table-cell>
          <table:table-cell table:formula="of:=IF([$List.A134] &lt;&gt;&quot;&quot;; [$List.A134]; &quot;&quot;)" office:value-type="float" office:value="1093" calcext:value-type="float">
            <text:p>1093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3_CHANNEL3_GAIN_LOW_POINT1 1093" calcext:value-type="string">
            <text:p>#define MODBUS_ADDR_CUP3_CHANNEL3_GAIN_LOW_POINT1 1093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3_CHANNEL3_GAIN_LOW_POINT2" calcext:value-type="string">
            <text:p>CUP3_CHANNEL3_GAIN_LOW_POINT2</text:p>
          </table:table-cell>
          <table:table-cell table:formula="of:=IF([$List.A135] &lt;&gt;&quot;&quot;; [$List.A135]; &quot;&quot;)" office:value-type="float" office:value="1094" calcext:value-type="float">
            <text:p>1094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3_CHANNEL3_GAIN_LOW_POINT2 1094" calcext:value-type="string">
            <text:p>#define MODBUS_ADDR_CUP3_CHANNEL3_GAIN_LOW_POINT2 1094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3_CHANNEL3_GAIN_LOW_POINT3" calcext:value-type="string">
            <text:p>CUP3_CHANNEL3_GAIN_LOW_POINT3</text:p>
          </table:table-cell>
          <table:table-cell table:formula="of:=IF([$List.A136] &lt;&gt;&quot;&quot;; [$List.A136]; &quot;&quot;)" office:value-type="float" office:value="1095" calcext:value-type="float">
            <text:p>1095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3_CHANNEL3_GAIN_LOW_POINT3 1095" calcext:value-type="string">
            <text:p>#define MODBUS_ADDR_CUP3_CHANNEL3_GAIN_LOW_POINT3 1095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3_CHANNEL3_GAIN_HIGH_POINT2" calcext:value-type="string">
            <text:p>CUP3_CHANNEL3_GAIN_HIGH_POINT2</text:p>
          </table:table-cell>
          <table:table-cell table:formula="of:=IF([$List.A137] &lt;&gt;&quot;&quot;; [$List.A137]; &quot;&quot;)" office:value-type="float" office:value="1096" calcext:value-type="float">
            <text:p>1096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3_CHANNEL3_GAIN_HIGH_POINT2 1096" calcext:value-type="string">
            <text:p>#define MODBUS_ADDR_CUP3_CHANNEL3_GAIN_HIGH_POINT2 1096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3_CHANNEL3_GAIN_HIGH_POINT3" calcext:value-type="string">
            <text:p>CUP3_CHANNEL3_GAIN_HIGH_POINT3</text:p>
          </table:table-cell>
          <table:table-cell table:formula="of:=IF([$List.A138] &lt;&gt;&quot;&quot;; [$List.A138]; &quot;&quot;)" office:value-type="float" office:value="1097" calcext:value-type="float">
            <text:p>1097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3_CHANNEL3_GAIN_HIGH_POINT3 1097" calcext:value-type="string">
            <text:p>#define MODBUS_ADDR_CUP3_CHANNEL3_GAIN_HIGH_POINT3 1097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3_CHANNEL3_GAIN_HIGH_POINT4" calcext:value-type="string">
            <text:p>CUP3_CHANNEL3_GAIN_HIGH_POINT4</text:p>
          </table:table-cell>
          <table:table-cell table:formula="of:=IF([$List.A139] &lt;&gt;&quot;&quot;; [$List.A139]; &quot;&quot;)" office:value-type="float" office:value="1098" calcext:value-type="float">
            <text:p>1098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3_CHANNEL3_GAIN_HIGH_POINT4 1098" calcext:value-type="string">
            <text:p>#define MODBUS_ADDR_CUP3_CHANNEL3_GAIN_HIGH_POINT4 1098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 office:value-type="string" office:string-value="CUP3_CHANNEL4_GAIN_LOW_POINT1" calcext:value-type="string">
            <text:p>CUP3_CHANNEL4_GAIN_LOW_POINT1</text:p>
          </table:table-cell>
          <table:table-cell table:formula="of:=IF([$List.A140] &lt;&gt;&quot;&quot;; [$List.A140]; &quot;&quot;)" office:value-type="float" office:value="1099" calcext:value-type="float">
            <text:p>1099</text:p>
          </table:table-cell>
          <table:table-cell/>
          <table:table-cell table:formula="of:=IF([.A140]&lt;&gt;&quot;&quot;; COM.MICROSOFT.CONCAT(&quot;#define MODBUS_ADDR_&quot;; [.A140]; &quot; &quot;; [.B140]); &quot;&quot;)" office:value-type="string" office:string-value="#define MODBUS_ADDR_CUP3_CHANNEL4_GAIN_LOW_POINT1 1099" calcext:value-type="string">
            <text:p>#define MODBUS_ADDR_CUP3_CHANNEL4_GAIN_LOW_POINT1 1099</text:p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CUP3_CHANNEL4_GAIN_LOW_POINT2" calcext:value-type="string">
            <text:p>CUP3_CHANNEL4_GAIN_LOW_POINT2</text:p>
          </table:table-cell>
          <table:table-cell table:formula="of:=IF([$List.A141] &lt;&gt;&quot;&quot;; [$List.A141]; &quot;&quot;)" office:value-type="float" office:value="1100" calcext:value-type="float">
            <text:p>1100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CUP3_CHANNEL4_GAIN_LOW_POINT2 1100" calcext:value-type="string">
            <text:p>#define MODBUS_ADDR_CUP3_CHANNEL4_GAIN_LOW_POINT2 1100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CUP3_CHANNEL4_GAIN_LOW_POINT3" calcext:value-type="string">
            <text:p>CUP3_CHANNEL4_GAIN_LOW_POINT3</text:p>
          </table:table-cell>
          <table:table-cell table:formula="of:=IF([$List.A142] &lt;&gt;&quot;&quot;; [$List.A142]; &quot;&quot;)" office:value-type="float" office:value="1101" calcext:value-type="float">
            <text:p>1101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CUP3_CHANNEL4_GAIN_LOW_POINT3 1101" calcext:value-type="string">
            <text:p>#define MODBUS_ADDR_CUP3_CHANNEL4_GAIN_LOW_POINT3 1101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CUP3_CHANNEL4_GAIN_HIGH_POINT2" calcext:value-type="string">
            <text:p>CUP3_CHANNEL4_GAIN_HIGH_POINT2</text:p>
          </table:table-cell>
          <table:table-cell table:formula="of:=IF([$List.A143] &lt;&gt;&quot;&quot;; [$List.A143]; &quot;&quot;)" office:value-type="float" office:value="1102" calcext:value-type="float">
            <text:p>1102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CUP3_CHANNEL4_GAIN_HIGH_POINT2 1102" calcext:value-type="string">
            <text:p>#define MODBUS_ADDR_CUP3_CHANNEL4_GAIN_HIGH_POINT2 1102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 office:value-type="string" office:string-value="CUP3_CHANNEL4_GAIN_HIGH_POINT3" calcext:value-type="string">
            <text:p>CUP3_CHANNEL4_GAIN_HIGH_POINT3</text:p>
          </table:table-cell>
          <table:table-cell table:formula="of:=IF([$List.A144] &lt;&gt;&quot;&quot;; [$List.A144]; &quot;&quot;)" office:value-type="float" office:value="1103" calcext:value-type="float">
            <text:p>1103</text:p>
          </table:table-cell>
          <table:table-cell/>
          <table:table-cell table:formula="of:=IF([.A144]&lt;&gt;&quot;&quot;; COM.MICROSOFT.CONCAT(&quot;#define MODBUS_ADDR_&quot;; [.A144]; &quot; &quot;; [.B144]); &quot;&quot;)" office:value-type="string" office:string-value="#define MODBUS_ADDR_CUP3_CHANNEL4_GAIN_HIGH_POINT3 1103" calcext:value-type="string">
            <text:p>#define MODBUS_ADDR_CUP3_CHANNEL4_GAIN_HIGH_POINT3 1103</text:p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 office:value-type="string" office:string-value="CUP3_CHANNEL4_GAIN_HIGH_POINT4" calcext:value-type="string">
            <text:p>CUP3_CHANNEL4_GAIN_HIGH_POINT4</text:p>
          </table:table-cell>
          <table:table-cell table:formula="of:=IF([$List.A145] &lt;&gt;&quot;&quot;; [$List.A145]; &quot;&quot;)" office:value-type="float" office:value="1104" calcext:value-type="float">
            <text:p>1104</text:p>
          </table:table-cell>
          <table:table-cell/>
          <table:table-cell table:formula="of:=IF([.A145]&lt;&gt;&quot;&quot;; COM.MICROSOFT.CONCAT(&quot;#define MODBUS_ADDR_&quot;; [.A145]; &quot; &quot;; [.B145]); &quot;&quot;)" office:value-type="string" office:string-value="#define MODBUS_ADDR_CUP3_CHANNEL4_GAIN_HIGH_POINT4 1104" calcext:value-type="string">
            <text:p>#define MODBUS_ADDR_CUP3_CHANNEL4_GAIN_HIGH_POINT4 1104</text:p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>
            <text:p/>
          </table:table-cell>
          <table:table-cell table:formula="of:=IF([$List.A146] &lt;&gt;&quot;&quot;; [$List.A146]; &quot;&quot;)">
            <text:p/>
          </table:table-cell>
          <table:table-cell/>
          <table:table-cell table:formula="of:=IF([.A146]&lt;&gt;&quot;&quot;; COM.MICROSOFT.CONCAT(&quot;#define MODBUS_ADDR_&quot;; [.A146]; &quot; &quot;; [.B146]); &quot;&quot;)">
            <text:p/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CUP1_CHANNEL1_LOWER_LIMIT" calcext:value-type="string">
            <text:p>CUP1_CHANNEL1_LOWER_LIMIT</text:p>
          </table:table-cell>
          <table:table-cell table:formula="of:=IF([$List.A147] &lt;&gt;&quot;&quot;; [$List.A147]; &quot;&quot;)" office:value-type="float" office:value="1105" calcext:value-type="float">
            <text:p>1105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CUP1_CHANNEL1_LOWER_LIMIT 1105" calcext:value-type="string">
            <text:p>#define MODBUS_ADDR_CUP1_CHANNEL1_LOWER_LIMIT 1105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CUP1_CHANNEL2_LOWER_LIMIT" calcext:value-type="string">
            <text:p>CUP1_CHANNEL2_LOWER_LIMIT</text:p>
          </table:table-cell>
          <table:table-cell table:formula="of:=IF([$List.A148] &lt;&gt;&quot;&quot;; [$List.A148]; &quot;&quot;)" office:value-type="float" office:value="1106" calcext:value-type="float">
            <text:p>1106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CUP1_CHANNEL2_LOWER_LIMIT 1106" calcext:value-type="string">
            <text:p>#define MODBUS_ADDR_CUP1_CHANNEL2_LOWER_LIMIT 1106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 office:value-type="string" office:string-value="CUP1_CHANNEL3_LOWER_LIMIT" calcext:value-type="string">
            <text:p>CUP1_CHANNEL3_LOWER_LIMIT</text:p>
          </table:table-cell>
          <table:table-cell table:formula="of:=IF([$List.A149] &lt;&gt;&quot;&quot;; [$List.A149]; &quot;&quot;)" office:value-type="float" office:value="1107" calcext:value-type="float">
            <text:p>1107</text:p>
          </table:table-cell>
          <table:table-cell/>
          <table:table-cell table:formula="of:=IF([.A149]&lt;&gt;&quot;&quot;; COM.MICROSOFT.CONCAT(&quot;#define MODBUS_ADDR_&quot;; [.A149]; &quot; &quot;; [.B149]); &quot;&quot;)" office:value-type="string" office:string-value="#define MODBUS_ADDR_CUP1_CHANNEL3_LOWER_LIMIT 1107" calcext:value-type="string">
            <text:p>#define MODBUS_ADDR_CUP1_CHANNEL3_LOWER_LIMIT 1107</text:p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 office:value-type="string" office:string-value="CUP1_CHANNEL4_LOWER_LIMIT" calcext:value-type="string">
            <text:p>CUP1_CHANNEL4_LOWER_LIMIT</text:p>
          </table:table-cell>
          <table:table-cell table:formula="of:=IF([$List.A150] &lt;&gt;&quot;&quot;; [$List.A150]; &quot;&quot;)" office:value-type="float" office:value="1108" calcext:value-type="float">
            <text:p>1108</text:p>
          </table:table-cell>
          <table:table-cell/>
          <table:table-cell table:formula="of:=IF([.A150]&lt;&gt;&quot;&quot;; COM.MICROSOFT.CONCAT(&quot;#define MODBUS_ADDR_&quot;; [.A150]; &quot; &quot;; [.B150]); &quot;&quot;)" office:value-type="string" office:string-value="#define MODBUS_ADDR_CUP1_CHANNEL4_LOWER_LIMIT 1108" calcext:value-type="string">
            <text:p>#define MODBUS_ADDR_CUP1_CHANNEL4_LOWER_LIMIT 1108</text:p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CUP2_CHANNEL1_LOWER_LIMIT" calcext:value-type="string">
            <text:p>CUP2_CHANNEL1_LOWER_LIMIT</text:p>
          </table:table-cell>
          <table:table-cell table:formula="of:=IF([$List.A151] &lt;&gt;&quot;&quot;; [$List.A151]; &quot;&quot;)" office:value-type="float" office:value="1109" calcext:value-type="float">
            <text:p>1109</text:p>
          </table:table-cell>
          <table:table-cell/>
          <table:table-cell table:formula="of:=IF([.A151]&lt;&gt;&quot;&quot;; COM.MICROSOFT.CONCAT(&quot;#define MODBUS_ADDR_&quot;; [.A151]; &quot; &quot;; [.B151]); &quot;&quot;)" office:value-type="string" office:string-value="#define MODBUS_ADDR_CUP2_CHANNEL1_LOWER_LIMIT 1109" calcext:value-type="string">
            <text:p>#define MODBUS_ADDR_CUP2_CHANNEL1_LOWER_LIMIT 1109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CUP2_CHANNEL2_LOWER_LIMIT" calcext:value-type="string">
            <text:p>CUP2_CHANNEL2_LOWER_LIMIT</text:p>
          </table:table-cell>
          <table:table-cell table:formula="of:=IF([$List.A152] &lt;&gt;&quot;&quot;; [$List.A152]; &quot;&quot;)" office:value-type="float" office:value="1110" calcext:value-type="float">
            <text:p>1110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CUP2_CHANNEL2_LOWER_LIMIT 1110" calcext:value-type="string">
            <text:p>#define MODBUS_ADDR_CUP2_CHANNEL2_LOWER_LIMIT 1110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CUP2_CHANNEL3_LOWER_LIMIT" calcext:value-type="string">
            <text:p>CUP2_CHANNEL3_LOWER_LIMIT</text:p>
          </table:table-cell>
          <table:table-cell table:formula="of:=IF([$List.A153] &lt;&gt;&quot;&quot;; [$List.A153]; &quot;&quot;)" office:value-type="float" office:value="1111" calcext:value-type="float">
            <text:p>1111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CUP2_CHANNEL3_LOWER_LIMIT 1111" calcext:value-type="string">
            <text:p>#define MODBUS_ADDR_CUP2_CHANNEL3_LOWER_LIMIT 1111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 office:value-type="string" office:string-value="CUP2_CHANNEL4_LOWER_LIMIT" calcext:value-type="string">
            <text:p>CUP2_CHANNEL4_LOWER_LIMIT</text:p>
          </table:table-cell>
          <table:table-cell table:formula="of:=IF([$List.A154] &lt;&gt;&quot;&quot;; [$List.A154]; &quot;&quot;)" office:value-type="float" office:value="1112" calcext:value-type="float">
            <text:p>1112</text:p>
          </table:table-cell>
          <table:table-cell/>
          <table:table-cell table:formula="of:=IF([.A154]&lt;&gt;&quot;&quot;; COM.MICROSOFT.CONCAT(&quot;#define MODBUS_ADDR_&quot;; [.A154]; &quot; &quot;; [.B154]); &quot;&quot;)" office:value-type="string" office:string-value="#define MODBUS_ADDR_CUP2_CHANNEL4_LOWER_LIMIT 1112" calcext:value-type="string">
            <text:p>#define MODBUS_ADDR_CUP2_CHANNEL4_LOWER_LIMIT 1112</text:p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CUP3_CHANNEL1_LOWER_LIMIT" calcext:value-type="string">
            <text:p>CUP3_CHANNEL1_LOWER_LIMIT</text:p>
          </table:table-cell>
          <table:table-cell table:formula="of:=IF([$List.A155] &lt;&gt;&quot;&quot;; [$List.A155]; &quot;&quot;)" office:value-type="float" office:value="1113" calcext:value-type="float">
            <text:p>1113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CUP3_CHANNEL1_LOWER_LIMIT 1113" calcext:value-type="string">
            <text:p>#define MODBUS_ADDR_CUP3_CHANNEL1_LOWER_LIMIT 1113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CUP3_CHANNEL2_LOWER_LIMIT" calcext:value-type="string">
            <text:p>CUP3_CHANNEL2_LOWER_LIMIT</text:p>
          </table:table-cell>
          <table:table-cell table:formula="of:=IF([$List.A156] &lt;&gt;&quot;&quot;; [$List.A156]; &quot;&quot;)" office:value-type="float" office:value="1114" calcext:value-type="float">
            <text:p>1114</text:p>
          </table:table-cell>
          <table:table-cell/>
          <table:table-cell table:formula="of:=IF([.A156]&lt;&gt;&quot;&quot;; COM.MICROSOFT.CONCAT(&quot;#define MODBUS_ADDR_&quot;; [.A156]; &quot; &quot;; [.B156]); &quot;&quot;)" office:value-type="string" office:string-value="#define MODBUS_ADDR_CUP3_CHANNEL2_LOWER_LIMIT 1114" calcext:value-type="string">
            <text:p>#define MODBUS_ADDR_CUP3_CHANNEL2_LOWER_LIMIT 1114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 office:value-type="string" office:string-value="CUP3_CHANNEL3_LOWER_LIMIT" calcext:value-type="string">
            <text:p>CUP3_CHANNEL3_LOWER_LIMIT</text:p>
          </table:table-cell>
          <table:table-cell table:formula="of:=IF([$List.A157] &lt;&gt;&quot;&quot;; [$List.A157]; &quot;&quot;)" office:value-type="float" office:value="1115" calcext:value-type="float">
            <text:p>1115</text:p>
          </table:table-cell>
          <table:table-cell/>
          <table:table-cell table:formula="of:=IF([.A157]&lt;&gt;&quot;&quot;; COM.MICROSOFT.CONCAT(&quot;#define MODBUS_ADDR_&quot;; [.A157]; &quot; &quot;; [.B157]); &quot;&quot;)" office:value-type="string" office:string-value="#define MODBUS_ADDR_CUP3_CHANNEL3_LOWER_LIMIT 1115" calcext:value-type="string">
            <text:p>#define MODBUS_ADDR_CUP3_CHANNEL3_LOWER_LIMIT 1115</text:p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CUP3_CHANNEL4_LOWER_LIMIT" calcext:value-type="string">
            <text:p>CUP3_CHANNEL4_LOWER_LIMIT</text:p>
          </table:table-cell>
          <table:table-cell table:formula="of:=IF([$List.A158] &lt;&gt;&quot;&quot;; [$List.A158]; &quot;&quot;)" office:value-type="float" office:value="1116" calcext:value-type="float">
            <text:p>1116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CUP3_CHANNEL4_LOWER_LIMIT 1116" calcext:value-type="string">
            <text:p>#define MODBUS_ADDR_CUP3_CHANNEL4_LOWER_LIMIT 1116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>
            <text:p/>
          </table:table-cell>
          <table:table-cell table:formula="of:=IF([$List.A159] &lt;&gt;&quot;&quot;; [$List.A159]; &quot;&quot;)">
            <text:p/>
          </table:table-cell>
          <table:table-cell/>
          <table:table-cell table:formula="of:=IF([.A159]&lt;&gt;&quot;&quot;; COM.MICROSOFT.CONCAT(&quot;#define MODBUS_ADDR_&quot;; [.A159]; &quot; &quot;; [.B159]); &quot;&quot;)">
            <text:p/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CUP1_CHANNEL1_UPPER_LIMIT" calcext:value-type="string">
            <text:p>CUP1_CHANNEL1_UPPER_LIMIT</text:p>
          </table:table-cell>
          <table:table-cell table:formula="of:=IF([$List.A160] &lt;&gt;&quot;&quot;; [$List.A160]; &quot;&quot;)" office:value-type="float" office:value="1117" calcext:value-type="float">
            <text:p>1117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CUP1_CHANNEL1_UPPER_LIMIT 1117" calcext:value-type="string">
            <text:p>#define MODBUS_ADDR_CUP1_CHANNEL1_UPPER_LIMIT 1117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 office:value-type="string" office:string-value="CUP1_CHANNEL2_UPPER_LIMIT" calcext:value-type="string">
            <text:p>CUP1_CHANNEL2_UPPER_LIMIT</text:p>
          </table:table-cell>
          <table:table-cell table:formula="of:=IF([$List.A161] &lt;&gt;&quot;&quot;; [$List.A161]; &quot;&quot;)" office:value-type="float" office:value="1118" calcext:value-type="float">
            <text:p>1118</text:p>
          </table:table-cell>
          <table:table-cell/>
          <table:table-cell table:formula="of:=IF([.A161]&lt;&gt;&quot;&quot;; COM.MICROSOFT.CONCAT(&quot;#define MODBUS_ADDR_&quot;; [.A161]; &quot; &quot;; [.B161]); &quot;&quot;)" office:value-type="string" office:string-value="#define MODBUS_ADDR_CUP1_CHANNEL2_UPPER_LIMIT 1118" calcext:value-type="string">
            <text:p>#define MODBUS_ADDR_CUP1_CHANNEL2_UPPER_LIMIT 1118</text:p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CUP1_CHANNEL3_UPPER_LIMIT" calcext:value-type="string">
            <text:p>CUP1_CHANNEL3_UPPER_LIMIT</text:p>
          </table:table-cell>
          <table:table-cell table:formula="of:=IF([$List.A162] &lt;&gt;&quot;&quot;; [$List.A162]; &quot;&quot;)" office:value-type="float" office:value="1119" calcext:value-type="float">
            <text:p>1119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CUP1_CHANNEL3_UPPER_LIMIT 1119" calcext:value-type="string">
            <text:p>#define MODBUS_ADDR_CUP1_CHANNEL3_UPPER_LIMIT 1119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CUP1_CHANNEL4_UPPER_LIMIT" calcext:value-type="string">
            <text:p>CUP1_CHANNEL4_UPPER_LIMIT</text:p>
          </table:table-cell>
          <table:table-cell table:formula="of:=IF([$List.A163] &lt;&gt;&quot;&quot;; [$List.A163]; &quot;&quot;)" office:value-type="float" office:value="1120" calcext:value-type="float">
            <text:p>1120</text:p>
          </table:table-cell>
          <table:table-cell/>
          <table:table-cell table:formula="of:=IF([.A163]&lt;&gt;&quot;&quot;; COM.MICROSOFT.CONCAT(&quot;#define MODBUS_ADDR_&quot;; [.A163]; &quot; &quot;; [.B163]); &quot;&quot;)" office:value-type="string" office:string-value="#define MODBUS_ADDR_CUP1_CHANNEL4_UPPER_LIMIT 1120" calcext:value-type="string">
            <text:p>#define MODBUS_ADDR_CUP1_CHANNEL4_UPPER_LIMIT 1120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CUP2_CHANNEL1_UPPER_LIMIT" calcext:value-type="string">
            <text:p>CUP2_CHANNEL1_UPPER_LIMIT</text:p>
          </table:table-cell>
          <table:table-cell table:formula="of:=IF([$List.A164] &lt;&gt;&quot;&quot;; [$List.A164]; &quot;&quot;)" office:value-type="float" office:value="1121" calcext:value-type="float">
            <text:p>1121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CUP2_CHANNEL1_UPPER_LIMIT 1121" calcext:value-type="string">
            <text:p>#define MODBUS_ADDR_CUP2_CHANNEL1_UPPER_LIMIT 1121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CUP2_CHANNEL2_UPPER_LIMIT" calcext:value-type="string">
            <text:p>CUP2_CHANNEL2_UPPER_LIMIT</text:p>
          </table:table-cell>
          <table:table-cell table:formula="of:=IF([$List.A165] &lt;&gt;&quot;&quot;; [$List.A165]; &quot;&quot;)" office:value-type="float" office:value="1122" calcext:value-type="float">
            <text:p>1122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CUP2_CHANNEL2_UPPER_LIMIT 1122" calcext:value-type="string">
            <text:p>#define MODBUS_ADDR_CUP2_CHANNEL2_UPPER_LIMIT 1122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CUP2_CHANNEL3_UPPER_LIMIT" calcext:value-type="string">
            <text:p>CUP2_CHANNEL3_UPPER_LIMIT</text:p>
          </table:table-cell>
          <table:table-cell table:formula="of:=IF([$List.A166] &lt;&gt;&quot;&quot;; [$List.A166]; &quot;&quot;)" office:value-type="float" office:value="1123" calcext:value-type="float">
            <text:p>1123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CUP2_CHANNEL3_UPPER_LIMIT 1123" calcext:value-type="string">
            <text:p>#define MODBUS_ADDR_CUP2_CHANNEL3_UPPER_LIMIT 1123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CUP2_CHANNEL4_UPPER_LIMIT" calcext:value-type="string">
            <text:p>CUP2_CHANNEL4_UPPER_LIMIT</text:p>
          </table:table-cell>
          <table:table-cell table:formula="of:=IF([$List.A167] &lt;&gt;&quot;&quot;; [$List.A167]; &quot;&quot;)" office:value-type="float" office:value="1124" calcext:value-type="float">
            <text:p>1124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CUP2_CHANNEL4_UPPER_LIMIT 1124" calcext:value-type="string">
            <text:p>#define MODBUS_ADDR_CUP2_CHANNEL4_UPPER_LIMIT 1124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CUP3_CHANNEL1_UPPER_LIMIT" calcext:value-type="string">
            <text:p>CUP3_CHANNEL1_UPPER_LIMIT</text:p>
          </table:table-cell>
          <table:table-cell table:formula="of:=IF([$List.A168] &lt;&gt;&quot;&quot;; [$List.A168]; &quot;&quot;)" office:value-type="float" office:value="1125" calcext:value-type="float">
            <text:p>1125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CUP3_CHANNEL1_UPPER_LIMIT 1125" calcext:value-type="string">
            <text:p>#define MODBUS_ADDR_CUP3_CHANNEL1_UPPER_LIMIT 1125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CUP3_CHANNEL2_UPPER_LIMIT" calcext:value-type="string">
            <text:p>CUP3_CHANNEL2_UPPER_LIMIT</text:p>
          </table:table-cell>
          <table:table-cell table:formula="of:=IF([$List.A169] &lt;&gt;&quot;&quot;; [$List.A169]; &quot;&quot;)" office:value-type="float" office:value="1126" calcext:value-type="float">
            <text:p>1126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CUP3_CHANNEL2_UPPER_LIMIT 1126" calcext:value-type="string">
            <text:p>#define MODBUS_ADDR_CUP3_CHANNEL2_UPPER_LIMIT 1126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 office:value-type="string" office:string-value="CUP3_CHANNEL3_UPPER_LIMIT" calcext:value-type="string">
            <text:p>CUP3_CHANNEL3_UPPER_LIMIT</text:p>
          </table:table-cell>
          <table:table-cell table:formula="of:=IF([$List.A170] &lt;&gt;&quot;&quot;; [$List.A170]; &quot;&quot;)" office:value-type="float" office:value="1127" calcext:value-type="float">
            <text:p>1127</text:p>
          </table:table-cell>
          <table:table-cell/>
          <table:table-cell table:formula="of:=IF([.A170]&lt;&gt;&quot;&quot;; COM.MICROSOFT.CONCAT(&quot;#define MODBUS_ADDR_&quot;; [.A170]; &quot; &quot;; [.B170]); &quot;&quot;)" office:value-type="string" office:string-value="#define MODBUS_ADDR_CUP3_CHANNEL3_UPPER_LIMIT 1127" calcext:value-type="string">
            <text:p>#define MODBUS_ADDR_CUP3_CHANNEL3_UPPER_LIMIT 1127</text:p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CUP3_CHANNEL4_UPPER_LIMIT" calcext:value-type="string">
            <text:p>CUP3_CHANNEL4_UPPER_LIMIT</text:p>
          </table:table-cell>
          <table:table-cell table:formula="of:=IF([$List.A171] &lt;&gt;&quot;&quot;; [$List.A171]; &quot;&quot;)" office:value-type="float" office:value="1128" calcext:value-type="float">
            <text:p>1128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CUP3_CHANNEL4_UPPER_LIMIT 1128" calcext:value-type="string">
            <text:p>#define MODBUS_ADDR_CUP3_CHANNEL4_UPPER_LIMIT 1128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>
            <text:p/>
          </table:table-cell>
          <table:table-cell table:formula="of:=IF([$List.A172] &lt;&gt;&quot;&quot;; [$List.A172]; &quot;&quot;)">
            <text:p/>
          </table:table-cell>
          <table:table-cell/>
          <table:table-cell table:formula="of:=IF([.A172]&lt;&gt;&quot;&quot;; COM.MICROSOFT.CONCAT(&quot;#define MODBUS_ADDR_&quot;; [.A172]; &quot; &quot;; [.B172]); &quot;&quot;)">
            <text:p/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 office:value-type="string" office:string-value="ANALOG_INPUTS_ERROR_STORAGE" calcext:value-type="string">
            <text:p>ANALOG_INPUTS_ERROR_STORAGE</text:p>
          </table:table-cell>
          <table:table-cell table:formula="of:=IF([$List.A173] &lt;&gt;&quot;&quot;; [$List.A173]; &quot;&quot;)" office:value-type="float" office:value="1129" calcext:value-type="float">
            <text:p>1129</text:p>
          </table:table-cell>
          <table:table-cell/>
          <table:table-cell table:formula="of:=IF([.A173]&lt;&gt;&quot;&quot;; COM.MICROSOFT.CONCAT(&quot;#define MODBUS_ADDR_&quot;; [.A173]; &quot; &quot;; [.B173]); &quot;&quot;)" office:value-type="string" office:string-value="#define MODBUS_ADDR_ANALOG_INPUTS_ERROR_STORAGE 1129" calcext:value-type="string">
            <text:p>#define MODBUS_ADDR_ANALOG_INPUTS_ERROR_STORAGE 1129</text:p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>
            <text:p/>
          </table:table-cell>
          <table:table-cell table:formula="of:=IF([$List.A174] &lt;&gt;&quot;&quot;; [$List.A174]; &quot;&quot;)">
            <text:p/>
          </table:table-cell>
          <table:table-cell/>
          <table:table-cell table:formula="of:=IF([.A174]&lt;&gt;&quot;&quot;; COM.MICROSOFT.CONCAT(&quot;#define MODBUS_ADDR_&quot;; [.A174]; &quot; &quot;; [.B174]); &quot;&quot;)">
            <text:p/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MECHANISM_PROPAGATION1_IN" calcext:value-type="string">
            <text:p>SIM_MECHANISM_PROPAGATION1_IN</text:p>
          </table:table-cell>
          <table:table-cell table:formula="of:=IF([$List.A175] &lt;&gt;&quot;&quot;; [$List.A175]; &quot;&quot;)" office:value-type="float" office:value="1130" calcext:value-type="float">
            <text:p>1130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MECHANISM_PROPAGATION1_IN 1130" calcext:value-type="string">
            <text:p>#define MODBUS_ADDR_SIM_MECHANISM_PROPAGATION1_IN 1130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76] &lt;&gt;&quot;&quot;; [$List.A176]; &quot;&quot;)" office:value-type="float" office:value="1131" calcext:value-type="float">
            <text:p>1131</text:p>
          </table:table-cell>
          <table:table-cell/>
          <table:table-cell table:formula="of:=IF([.A176]&lt;&gt;&quot;&quot;; COM.MICROSOFT.CONCAT(&quot;#define MODBUS_ADDR_&quot;; [.A176]; &quot; &quot;; [.B176]); &quot;&quot;)" office:value-type="string" office:string-value="#define MODBUS_ADDR_SIM_MECHANISM_PROPAGATION1_IN_RAND 1131" calcext:value-type="string">
            <text:p>#define MODBUS_ADDR_SIM_MECHANISM_PROPAGATION1_IN_RAND 1131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 office:value-type="string" office:string-value="SIM_MECHANISM_PROPAGATION1_OUT" calcext:value-type="string">
            <text:p>SIM_MECHANISM_PROPAGATION1_OUT</text:p>
          </table:table-cell>
          <table:table-cell table:formula="of:=IF([$List.A177] &lt;&gt;&quot;&quot;; [$List.A177]; &quot;&quot;)" office:value-type="float" office:value="1132" calcext:value-type="float">
            <text:p>1132</text:p>
          </table:table-cell>
          <table:table-cell/>
          <table:table-cell table:formula="of:=IF([.A177]&lt;&gt;&quot;&quot;; COM.MICROSOFT.CONCAT(&quot;#define MODBUS_ADDR_&quot;; [.A177]; &quot; &quot;; [.B177]); &quot;&quot;)" office:value-type="string" office:string-value="#define MODBUS_ADDR_SIM_MECHANISM_PROPAGATION1_OUT 1132" calcext:value-type="string">
            <text:p>#define MODBUS_ADDR_SIM_MECHANISM_PROPAGATION1_OUT 1132</text:p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78] &lt;&gt;&quot;&quot;; [$List.A178]; &quot;&quot;)" office:value-type="float" office:value="1133" calcext:value-type="float">
            <text:p>1133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MECHANISM_PROPAGATION1_OUT_RAND 1133" calcext:value-type="string">
            <text:p>#define MODBUS_ADDR_SIM_MECHANISM_PROPAGATION1_OUT_RAND 1133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>
            <text:p/>
          </table:table-cell>
          <table:table-cell table:formula="of:=IF([$List.A179] &lt;&gt;&quot;&quot;; [$List.A179]; &quot;&quot;)">
            <text:p/>
          </table:table-cell>
          <table:table-cell/>
          <table:table-cell table:formula="of:=IF([.A179]&lt;&gt;&quot;&quot;; COM.MICROSOFT.CONCAT(&quot;#define MODBUS_ADDR_&quot;; [.A179]; &quot; &quot;; [.B179]); &quot;&quot;)">
            <text:p/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MECHANISM_PROPAGATION2_IN" calcext:value-type="string">
            <text:p>SIM_MECHANISM_PROPAGATION2_IN</text:p>
          </table:table-cell>
          <table:table-cell table:formula="of:=IF([$List.A180] &lt;&gt;&quot;&quot;; [$List.A180]; &quot;&quot;)" office:value-type="float" office:value="1134" calcext:value-type="float">
            <text:p>1134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MECHANISM_PROPAGATION2_IN 1134" calcext:value-type="string">
            <text:p>#define MODBUS_ADDR_SIM_MECHANISM_PROPAGATION2_IN 1134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81] &lt;&gt;&quot;&quot;; [$List.A181]; &quot;&quot;)" office:value-type="float" office:value="1135" calcext:value-type="float">
            <text:p>1135</text:p>
          </table:table-cell>
          <table:table-cell/>
          <table:table-cell table:formula="of:=IF([.A181]&lt;&gt;&quot;&quot;; COM.MICROSOFT.CONCAT(&quot;#define MODBUS_ADDR_&quot;; [.A181]; &quot; &quot;; [.B181]); &quot;&quot;)" office:value-type="string" office:string-value="#define MODBUS_ADDR_SIM_MECHANISM_PROPAGATION2_IN_RAND 1135" calcext:value-type="string">
            <text:p>#define MODBUS_ADDR_SIM_MECHANISM_PROPAGATION2_IN_RAND 1135</text:p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 office:value-type="string" office:string-value="SIM_MECHANISM_PROPAGATION2_OUT" calcext:value-type="string">
            <text:p>SIM_MECHANISM_PROPAGATION2_OUT</text:p>
          </table:table-cell>
          <table:table-cell table:formula="of:=IF([$List.A182] &lt;&gt;&quot;&quot;; [$List.A182]; &quot;&quot;)" office:value-type="float" office:value="1136" calcext:value-type="float">
            <text:p>1136</text:p>
          </table:table-cell>
          <table:table-cell/>
          <table:table-cell table:formula="of:=IF([.A182]&lt;&gt;&quot;&quot;; COM.MICROSOFT.CONCAT(&quot;#define MODBUS_ADDR_&quot;; [.A182]; &quot; &quot;; [.B182]); &quot;&quot;)" office:value-type="string" office:string-value="#define MODBUS_ADDR_SIM_MECHANISM_PROPAGATION2_OUT 1136" calcext:value-type="string">
            <text:p>#define MODBUS_ADDR_SIM_MECHANISM_PROPAGATION2_OUT 1136</text:p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83] &lt;&gt;&quot;&quot;; [$List.A183]; &quot;&quot;)" office:value-type="float" office:value="1137" calcext:value-type="float">
            <text:p>1137</text:p>
          </table:table-cell>
          <table:table-cell/>
          <table:table-cell table:formula="of:=IF([.A183]&lt;&gt;&quot;&quot;; COM.MICROSOFT.CONCAT(&quot;#define MODBUS_ADDR_&quot;; [.A183]; &quot; &quot;; [.B183]); &quot;&quot;)" office:value-type="string" office:string-value="#define MODBUS_ADDR_SIM_MECHANISM_PROPAGATION2_OUT_RAND 1137" calcext:value-type="string">
            <text:p>#define MODBUS_ADDR_SIM_MECHANISM_PROPAGATION2_OUT_RAND 1137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>
            <text:p/>
          </table:table-cell>
          <table:table-cell table:formula="of:=IF([$List.A184] &lt;&gt;&quot;&quot;; [$List.A184]; &quot;&quot;)">
            <text:p/>
          </table:table-cell>
          <table:table-cell/>
          <table:table-cell table:formula="of:=IF([.A184]&lt;&gt;&quot;&quot;; COM.MICROSOFT.CONCAT(&quot;#define MODBUS_ADDR_&quot;; [.A184]; &quot; &quot;; [.B184]); &quot;&quot;)">
            <text:p/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 office:value-type="string" office:string-value="SIM_MECHANISM_PROPAGATION3_IN" calcext:value-type="string">
            <text:p>SIM_MECHANISM_PROPAGATION3_IN</text:p>
          </table:table-cell>
          <table:table-cell table:formula="of:=IF([$List.A185] &lt;&gt;&quot;&quot;; [$List.A185]; &quot;&quot;)" office:value-type="float" office:value="1138" calcext:value-type="float">
            <text:p>1138</text:p>
          </table:table-cell>
          <table:table-cell/>
          <table:table-cell table:formula="of:=IF([.A185]&lt;&gt;&quot;&quot;; COM.MICROSOFT.CONCAT(&quot;#define MODBUS_ADDR_&quot;; [.A185]; &quot; &quot;; [.B185]); &quot;&quot;)" office:value-type="string" office:string-value="#define MODBUS_ADDR_SIM_MECHANISM_PROPAGATION3_IN 1138" calcext:value-type="string">
            <text:p>#define MODBUS_ADDR_SIM_MECHANISM_PROPAGATION3_IN 1138</text:p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86] &lt;&gt;&quot;&quot;; [$List.A186]; &quot;&quot;)" office:value-type="float" office:value="1139" calcext:value-type="float">
            <text:p>1139</text:p>
          </table:table-cell>
          <table:table-cell/>
          <table:table-cell table:formula="of:=IF([.A186]&lt;&gt;&quot;&quot;; COM.MICROSOFT.CONCAT(&quot;#define MODBUS_ADDR_&quot;; [.A186]; &quot; &quot;; [.B186]); &quot;&quot;)" office:value-type="string" office:string-value="#define MODBUS_ADDR_SIM_MECHANISM_PROPAGATION3_IN_RAND 1139" calcext:value-type="string">
            <text:p>#define MODBUS_ADDR_SIM_MECHANISM_PROPAGATION3_IN_RAND 1139</text:p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SIM_MECHANISM_PROPAGATION3_OUT" calcext:value-type="string">
            <text:p>SIM_MECHANISM_PROPAGATION3_OUT</text:p>
          </table:table-cell>
          <table:table-cell table:formula="of:=IF([$List.A187] &lt;&gt;&quot;&quot;; [$List.A187]; &quot;&quot;)" office:value-type="float" office:value="1140" calcext:value-type="float">
            <text:p>1140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SIM_MECHANISM_PROPAGATION3_OUT 1140" calcext:value-type="string">
            <text:p>#define MODBUS_ADDR_SIM_MECHANISM_PROPAGATION3_OUT 1140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88] &lt;&gt;&quot;&quot;; [$List.A188]; &quot;&quot;)" office:value-type="float" office:value="1141" calcext:value-type="float">
            <text:p>1141</text:p>
          </table:table-cell>
          <table:table-cell/>
          <table:table-cell table:formula="of:=IF([.A188]&lt;&gt;&quot;&quot;; COM.MICROSOFT.CONCAT(&quot;#define MODBUS_ADDR_&quot;; [.A188]; &quot; &quot;; [.B188]); &quot;&quot;)" office:value-type="string" office:string-value="#define MODBUS_ADDR_SIM_MECHANISM_PROPAGATION3_OUT_RAND 1141" calcext:value-type="string">
            <text:p>#define MODBUS_ADDR_SIM_MECHANISM_PROPAGATION3_OUT_RAND 1141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 office:value-type="string" office:string-value="SIM_MECHANISM3_INERTIAL_MOTION" calcext:value-type="string">
            <text:p>SIM_MECHANISM3_INERTIAL_MOTION</text:p>
          </table:table-cell>
          <table:table-cell table:formula="of:=IF([$List.A189] &lt;&gt;&quot;&quot;; [$List.A189]; &quot;&quot;)" office:value-type="float" office:value="1142" calcext:value-type="float">
            <text:p>1142</text:p>
          </table:table-cell>
          <table:table-cell/>
          <table:table-cell table:formula="of:=IF([.A189]&lt;&gt;&quot;&quot;; COM.MICROSOFT.CONCAT(&quot;#define MODBUS_ADDR_&quot;; [.A189]; &quot; &quot;; [.B189]); &quot;&quot;)" office:value-type="string" office:string-value="#define MODBUS_ADDR_SIM_MECHANISM3_INERTIAL_MOTION 1142" calcext:value-type="string">
            <text:p>#define MODBUS_ADDR_SIM_MECHANISM3_INERTIAL_MOTION 1142</text:p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 office:value-type="string" office:string-value="SIM_MECHANISM3_BRAKED_MOTION" calcext:value-type="string">
            <text:p>SIM_MECHANISM3_BRAKED_MOTION</text:p>
          </table:table-cell>
          <table:table-cell table:formula="of:=IF([$List.A190] &lt;&gt;&quot;&quot;; [$List.A190]; &quot;&quot;)" office:value-type="float" office:value="1143" calcext:value-type="float">
            <text:p>1143</text:p>
          </table:table-cell>
          <table:table-cell/>
          <table:table-cell table:formula="of:=IF([.A190]&lt;&gt;&quot;&quot;; COM.MICROSOFT.CONCAT(&quot;#define MODBUS_ADDR_&quot;; [.A190]; &quot; &quot;; [.B190]); &quot;&quot;)" office:value-type="string" office:string-value="#define MODBUS_ADDR_SIM_MECHANISM3_BRAKED_MOTION 1143" calcext:value-type="string">
            <text:p>#define MODBUS_ADDR_SIM_MECHANISM3_BRAKED_MOTION 1143</text:p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>
            <text:p/>
          </table:table-cell>
          <table:table-cell table:formula="of:=IF([$List.A191] &lt;&gt;&quot;&quot;; [$List.A191]; &quot;&quot;)">
            <text:p/>
          </table:table-cell>
          <table:table-cell/>
          <table:table-cell table:formula="of:=IF([.A191]&lt;&gt;&quot;&quot;; COM.MICROSOFT.CONCAT(&quot;#define MODBUS_ADDR_&quot;; [.A191]; &quot; &quot;; [.B191]); &quot;&quot;)">
            <text:p/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 office:value-type="string" office:string-value="SIM_AMPLIFIER_CUP1_ELECTRODE1" calcext:value-type="string">
            <text:p>SIM_AMPLIFIER_CUP1_ELECTRODE1</text:p>
          </table:table-cell>
          <table:table-cell table:formula="of:=IF([$List.A192] &lt;&gt;&quot;&quot;; [$List.A192]; &quot;&quot;)" office:value-type="float" office:value="1144" calcext:value-type="float">
            <text:p>1144</text:p>
          </table:table-cell>
          <table:table-cell/>
          <table:table-cell table:formula="of:=IF([.A192]&lt;&gt;&quot;&quot;; COM.MICROSOFT.CONCAT(&quot;#define MODBUS_ADDR_&quot;; [.A192]; &quot; &quot;; [.B192]); &quot;&quot;)" office:value-type="string" office:string-value="#define MODBUS_ADDR_SIM_AMPLIFIER_CUP1_ELECTRODE1 1144" calcext:value-type="string">
            <text:p>#define MODBUS_ADDR_SIM_AMPLIFIER_CUP1_ELECTRODE1 1144</text:p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SIM_AMPLIFIER_CUP1_ELECTRODE2" calcext:value-type="string">
            <text:p>SIM_AMPLIFIER_CUP1_ELECTRODE2</text:p>
          </table:table-cell>
          <table:table-cell table:formula="of:=IF([$List.A193] &lt;&gt;&quot;&quot;; [$List.A193]; &quot;&quot;)" office:value-type="float" office:value="1145" calcext:value-type="float">
            <text:p>1145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SIM_AMPLIFIER_CUP1_ELECTRODE2 1145" calcext:value-type="string">
            <text:p>#define MODBUS_ADDR_SIM_AMPLIFIER_CUP1_ELECTRODE2 1145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SIM_AMPLIFIER_CUP1_ELECTRODE3" calcext:value-type="string">
            <text:p>SIM_AMPLIFIER_CUP1_ELECTRODE3</text:p>
          </table:table-cell>
          <table:table-cell table:formula="of:=IF([$List.A194] &lt;&gt;&quot;&quot;; [$List.A194]; &quot;&quot;)" office:value-type="float" office:value="1146" calcext:value-type="float">
            <text:p>1146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SIM_AMPLIFIER_CUP1_ELECTRODE3 1146" calcext:value-type="string">
            <text:p>#define MODBUS_ADDR_SIM_AMPLIFIER_CUP1_ELECTRODE3 1146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SIM_AMPLIFIER_CUP1_ELECTRODE4" calcext:value-type="string">
            <text:p>SIM_AMPLIFIER_CUP1_ELECTRODE4</text:p>
          </table:table-cell>
          <table:table-cell table:formula="of:=IF([$List.A195] &lt;&gt;&quot;&quot;; [$List.A195]; &quot;&quot;)" office:value-type="float" office:value="1147" calcext:value-type="float">
            <text:p>1147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SIM_AMPLIFIER_CUP1_ELECTRODE4 1147" calcext:value-type="string">
            <text:p>#define MODBUS_ADDR_SIM_AMPLIFIER_CUP1_ELECTRODE4 1147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 office:value-type="string" office:string-value="SIM_AMPLIFIER_CUP2_ELECTRODE1" calcext:value-type="string">
            <text:p>SIM_AMPLIFIER_CUP2_ELECTRODE1</text:p>
          </table:table-cell>
          <table:table-cell table:formula="of:=IF([$List.A196] &lt;&gt;&quot;&quot;; [$List.A196]; &quot;&quot;)" office:value-type="float" office:value="1148" calcext:value-type="float">
            <text:p>1148</text:p>
          </table:table-cell>
          <table:table-cell/>
          <table:table-cell table:formula="of:=IF([.A196]&lt;&gt;&quot;&quot;; COM.MICROSOFT.CONCAT(&quot;#define MODBUS_ADDR_&quot;; [.A196]; &quot; &quot;; [.B196]); &quot;&quot;)" office:value-type="string" office:string-value="#define MODBUS_ADDR_SIM_AMPLIFIER_CUP2_ELECTRODE1 1148" calcext:value-type="string">
            <text:p>#define MODBUS_ADDR_SIM_AMPLIFIER_CUP2_ELECTRODE1 1148</text:p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SIM_AMPLIFIER_CUP2_ELECTRODE2" calcext:value-type="string">
            <text:p>SIM_AMPLIFIER_CUP2_ELECTRODE2</text:p>
          </table:table-cell>
          <table:table-cell table:formula="of:=IF([$List.A197] &lt;&gt;&quot;&quot;; [$List.A197]; &quot;&quot;)" office:value-type="float" office:value="1149" calcext:value-type="float">
            <text:p>1149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SIM_AMPLIFIER_CUP2_ELECTRODE2 1149" calcext:value-type="string">
            <text:p>#define MODBUS_ADDR_SIM_AMPLIFIER_CUP2_ELECTRODE2 1149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 office:value-type="string" office:string-value="SIM_AMPLIFIER_CUP2_ELECTRODE3" calcext:value-type="string">
            <text:p>SIM_AMPLIFIER_CUP2_ELECTRODE3</text:p>
          </table:table-cell>
          <table:table-cell table:formula="of:=IF([$List.A198] &lt;&gt;&quot;&quot;; [$List.A198]; &quot;&quot;)" office:value-type="float" office:value="1150" calcext:value-type="float">
            <text:p>1150</text:p>
          </table:table-cell>
          <table:table-cell/>
          <table:table-cell table:formula="of:=IF([.A198]&lt;&gt;&quot;&quot;; COM.MICROSOFT.CONCAT(&quot;#define MODBUS_ADDR_&quot;; [.A198]; &quot; &quot;; [.B198]); &quot;&quot;)" office:value-type="string" office:string-value="#define MODBUS_ADDR_SIM_AMPLIFIER_CUP2_ELECTRODE3 1150" calcext:value-type="string">
            <text:p>#define MODBUS_ADDR_SIM_AMPLIFIER_CUP2_ELECTRODE3 1150</text:p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SIM_AMPLIFIER_CUP2_ELECTRODE4" calcext:value-type="string">
            <text:p>SIM_AMPLIFIER_CUP2_ELECTRODE4</text:p>
          </table:table-cell>
          <table:table-cell table:formula="of:=IF([$List.A199] &lt;&gt;&quot;&quot;; [$List.A199]; &quot;&quot;)" office:value-type="float" office:value="1151" calcext:value-type="float">
            <text:p>1151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SIM_AMPLIFIER_CUP2_ELECTRODE4 1151" calcext:value-type="string">
            <text:p>#define MODBUS_ADDR_SIM_AMPLIFIER_CUP2_ELECTRODE4 1151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SIM_AMPLIFIER_CUP3_ELECTRODE1" calcext:value-type="string">
            <text:p>SIM_AMPLIFIER_CUP3_ELECTRODE1</text:p>
          </table:table-cell>
          <table:table-cell table:formula="of:=IF([$List.A200] &lt;&gt;&quot;&quot;; [$List.A200]; &quot;&quot;)" office:value-type="float" office:value="1152" calcext:value-type="float">
            <text:p>1152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SIM_AMPLIFIER_CUP3_ELECTRODE1 1152" calcext:value-type="string">
            <text:p>#define MODBUS_ADDR_SIM_AMPLIFIER_CUP3_ELECTRODE1 1152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SIM_AMPLIFIER_CUP3_ELECTRODE2" calcext:value-type="string">
            <text:p>SIM_AMPLIFIER_CUP3_ELECTRODE2</text:p>
          </table:table-cell>
          <table:table-cell table:formula="of:=IF([$List.A201] &lt;&gt;&quot;&quot;; [$List.A201]; &quot;&quot;)" office:value-type="float" office:value="1153" calcext:value-type="float">
            <text:p>1153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SIM_AMPLIFIER_CUP3_ELECTRODE2 1153" calcext:value-type="string">
            <text:p>#define MODBUS_ADDR_SIM_AMPLIFIER_CUP3_ELECTRODE2 1153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 office:value-type="string" office:string-value="SIM_AMPLIFIER_CUP3_ELECTRODE3" calcext:value-type="string">
            <text:p>SIM_AMPLIFIER_CUP3_ELECTRODE3</text:p>
          </table:table-cell>
          <table:table-cell table:formula="of:=IF([$List.A202] &lt;&gt;&quot;&quot;; [$List.A202]; &quot;&quot;)" office:value-type="float" office:value="1154" calcext:value-type="float">
            <text:p>1154</text:p>
          </table:table-cell>
          <table:table-cell/>
          <table:table-cell table:formula="of:=IF([.A202]&lt;&gt;&quot;&quot;; COM.MICROSOFT.CONCAT(&quot;#define MODBUS_ADDR_&quot;; [.A202]; &quot; &quot;; [.B202]); &quot;&quot;)" office:value-type="string" office:string-value="#define MODBUS_ADDR_SIM_AMPLIFIER_CUP3_ELECTRODE3 1154" calcext:value-type="string">
            <text:p>#define MODBUS_ADDR_SIM_AMPLIFIER_CUP3_ELECTRODE3 1154</text:p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SIM_AMPLIFIER_CUP3_ELECTRODE4" calcext:value-type="string">
            <text:p>SIM_AMPLIFIER_CUP3_ELECTRODE4</text:p>
          </table:table-cell>
          <table:table-cell table:formula="of:=IF([$List.A203] &lt;&gt;&quot;&quot;; [$List.A203]; &quot;&quot;)" office:value-type="float" office:value="1155" calcext:value-type="float">
            <text:p>1155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SIM_AMPLIFIER_CUP3_ELECTRODE4 1155" calcext:value-type="string">
            <text:p>#define MODBUS_ADDR_SIM_AMPLIFIER_CUP3_ELECTRODE4 1155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>
            <text:p/>
          </table:table-cell>
          <table:table-cell table:formula="of:=IF([$List.A204] &lt;&gt;&quot;&quot;; [$List.A204]; &quot;&quot;)">
            <text:p/>
          </table:table-cell>
          <table:table-cell/>
          <table:table-cell table:formula="of:=IF([.A204]&lt;&gt;&quot;&quot;; COM.MICROSOFT.CONCAT(&quot;#define MODBUS_ADDR_&quot;; [.A204]; &quot; &quot;; [.B204]); &quot;&quot;)">
            <text:p/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 office:value-type="string" office:string-value="SIM_AMPLIFIER_RANDOM_RATE" calcext:value-type="string">
            <text:p>SIM_AMPLIFIER_RANDOM_RATE</text:p>
          </table:table-cell>
          <table:table-cell table:formula="of:=IF([$List.A205] &lt;&gt;&quot;&quot;; [$List.A205]; &quot;&quot;)" office:value-type="float" office:value="1156" calcext:value-type="float">
            <text:p>1156</text:p>
          </table:table-cell>
          <table:table-cell/>
          <table:table-cell table:formula="of:=IF([.A205]&lt;&gt;&quot;&quot;; COM.MICROSOFT.CONCAT(&quot;#define MODBUS_ADDR_&quot;; [.A205]; &quot; &quot;; [.B205]); &quot;&quot;)" office:value-type="string" office:string-value="#define MODBUS_ADDR_SIM_AMPLIFIER_RANDOM_RATE 1156" calcext:value-type="string">
            <text:p>#define MODBUS_ADDR_SIM_AMPLIFIER_RANDOM_RATE 1156</text:p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 office:value-type="string" office:string-value="SIM_AMPLIFIER_RANDOM_OFFSET" calcext:value-type="string">
            <text:p>SIM_AMPLIFIER_RANDOM_OFFSET</text:p>
          </table:table-cell>
          <table:table-cell table:formula="of:=IF([$List.A206] &lt;&gt;&quot;&quot;; [$List.A206]; &quot;&quot;)" office:value-type="float" office:value="1157" calcext:value-type="float">
            <text:p>1157</text:p>
          </table:table-cell>
          <table:table-cell/>
          <table:table-cell table:formula="of:=IF([.A206]&lt;&gt;&quot;&quot;; COM.MICROSOFT.CONCAT(&quot;#define MODBUS_ADDR_&quot;; [.A206]; &quot; &quot;; [.B206]); &quot;&quot;)" office:value-type="string" office:string-value="#define MODBUS_ADDR_SIM_AMPLIFIER_RANDOM_OFFSET 1157" calcext:value-type="string">
            <text:p>#define MODBUS_ADDR_SIM_AMPLIFIER_RANDOM_OFFSET 1157</text:p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>
            <text:p/>
          </table:table-cell>
          <table:table-cell table:formula="of:=IF([$List.A207] &lt;&gt;&quot;&quot;; [$List.A207]; &quot;&quot;)">
            <text:p/>
          </table:table-cell>
          <table:table-cell/>
          <table:table-cell table:formula="of:=IF([.A207]&lt;&gt;&quot;&quot;; COM.MICROSOFT.CONCAT(&quot;#define MODBUS_ADDR_&quot;; [.A207]; &quot; &quot;; [.B207]); &quot;&quot;)">
            <text:p/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 office:value-type="string" office:string-value="SIM_EXTERNAL_LOCK_PERIOD" calcext:value-type="string">
            <text:p>SIM_EXTERNAL_LOCK_PERIOD</text:p>
          </table:table-cell>
          <table:table-cell table:formula="of:=IF([$List.A208] &lt;&gt;&quot;&quot;; [$List.A208]; &quot;&quot;)" office:value-type="float" office:value="1158" calcext:value-type="float">
            <text:p>1158</text:p>
          </table:table-cell>
          <table:table-cell/>
          <table:table-cell table:formula="of:=IF([.A208]&lt;&gt;&quot;&quot;; COM.MICROSOFT.CONCAT(&quot;#define MODBUS_ADDR_&quot;; [.A208]; &quot; &quot;; [.B208]); &quot;&quot;)" office:value-type="string" office:string-value="#define MODBUS_ADDR_SIM_EXTERNAL_LOCK_PERIOD 1158" calcext:value-type="string">
            <text:p>#define MODBUS_ADDR_SIM_EXTERNAL_LOCK_PERIOD 1158</text:p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 office:value-type="string" office:string-value="SIM_EXTERNAL_LOCK_DURATION" calcext:value-type="string">
            <text:p>SIM_EXTERNAL_LOCK_DURATION</text:p>
          </table:table-cell>
          <table:table-cell table:formula="of:=IF([$List.A209] &lt;&gt;&quot;&quot;; [$List.A209]; &quot;&quot;)" office:value-type="float" office:value="1159" calcext:value-type="float">
            <text:p>1159</text:p>
          </table:table-cell>
          <table:table-cell/>
          <table:table-cell table:formula="of:=IF([.A209]&lt;&gt;&quot;&quot;; COM.MICROSOFT.CONCAT(&quot;#define MODBUS_ADDR_&quot;; [.A209]; &quot; &quot;; [.B209]); &quot;&quot;)" office:value-type="string" office:string-value="#define MODBUS_ADDR_SIM_EXTERNAL_LOCK_DURATION 1159" calcext:value-type="string">
            <text:p>#define MODBUS_ADDR_SIM_EXTERNAL_LOCK_DURATION 1159</text:p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 office:value-type="string" office:string-value="SIM_EXTERNAL_LOCK_DELAY" calcext:value-type="string">
            <text:p>SIM_EXTERNAL_LOCK_DELAY</text:p>
          </table:table-cell>
          <table:table-cell table:formula="of:=IF([$List.A210] &lt;&gt;&quot;&quot;; [$List.A210]; &quot;&quot;)" office:value-type="float" office:value="1160" calcext:value-type="float">
            <text:p>1160</text:p>
          </table:table-cell>
          <table:table-cell/>
          <table:table-cell table:formula="of:=IF([.A210]&lt;&gt;&quot;&quot;; COM.MICROSOFT.CONCAT(&quot;#define MODBUS_ADDR_&quot;; [.A210]; &quot; &quot;; [.B210]); &quot;&quot;)" office:value-type="string" office:string-value="#define MODBUS_ADDR_SIM_EXTERNAL_LOCK_DELAY 1160" calcext:value-type="string">
            <text:p>#define MODBUS_ADDR_SIM_EXTERNAL_LOCK_DELAY 1160</text:p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>
            <text:p/>
          </table:table-cell>
          <table:table-cell table:formula="of:=IF([$List.A211] &lt;&gt;&quot;&quot;; [$List.A211]; &quot;&quot;)">
            <text:p/>
          </table:table-cell>
          <table:table-cell/>
          <table:table-cell table:formula="of:=IF([.A211]&lt;&gt;&quot;&quot;; COM.MICROSOFT.CONCAT(&quot;#define MODBUS_ADDR_&quot;; [.A211]; &quot; &quot;; [.B211]); &quot;&quot;)">
            <text:p/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 office:value-type="string" office:string-value="SIM_EVENT_CODE" calcext:value-type="string">
            <text:p>SIM_EVENT_CODE</text:p>
          </table:table-cell>
          <table:table-cell table:formula="of:=IF([$List.A212] &lt;&gt;&quot;&quot;; [$List.A212]; &quot;&quot;)" office:value-type="float" office:value="1161" calcext:value-type="float">
            <text:p>1161</text:p>
          </table:table-cell>
          <table:table-cell/>
          <table:table-cell table:formula="of:=IF([.A212]&lt;&gt;&quot;&quot;; COM.MICROSOFT.CONCAT(&quot;#define MODBUS_ADDR_&quot;; [.A212]; &quot; &quot;; [.B212]); &quot;&quot;)" office:value-type="string" office:string-value="#define MODBUS_ADDR_SIM_EVENT_CODE 1161" calcext:value-type="string">
            <text:p>#define MODBUS_ADDR_SIM_EVENT_CODE 1161</text:p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 office:value-type="string" office:string-value="SIM_EVENT_PERIOD" calcext:value-type="string">
            <text:p>SIM_EVENT_PERIOD</text:p>
          </table:table-cell>
          <table:table-cell table:formula="of:=IF([$List.A213] &lt;&gt;&quot;&quot;; [$List.A213]; &quot;&quot;)" office:value-type="float" office:value="1162" calcext:value-type="float">
            <text:p>1162</text:p>
          </table:table-cell>
          <table:table-cell/>
          <table:table-cell table:formula="of:=IF([.A213]&lt;&gt;&quot;&quot;; COM.MICROSOFT.CONCAT(&quot;#define MODBUS_ADDR_&quot;; [.A213]; &quot; &quot;; [.B213]); &quot;&quot;)" office:value-type="string" office:string-value="#define MODBUS_ADDR_SIM_EVENT_PERIOD 1162" calcext:value-type="string">
            <text:p>#define MODBUS_ADDR_SIM_EVENT_PERIOD 1162</text:p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 office:value-type="string" office:string-value="SIM_EVENT_DURATION" calcext:value-type="string">
            <text:p>SIM_EVENT_DURATION</text:p>
          </table:table-cell>
          <table:table-cell table:formula="of:=IF([$List.A214] &lt;&gt;&quot;&quot;; [$List.A214]; &quot;&quot;)" office:value-type="float" office:value="1163" calcext:value-type="float">
            <text:p>1163</text:p>
          </table:table-cell>
          <table:table-cell/>
          <table:table-cell table:formula="of:=IF([.A214]&lt;&gt;&quot;&quot;; COM.MICROSOFT.CONCAT(&quot;#define MODBUS_ADDR_&quot;; [.A214]; &quot; &quot;; [.B214]); &quot;&quot;)" office:value-type="string" office:string-value="#define MODBUS_ADDR_SIM_EVENT_DURATION 1163" calcext:value-type="string">
            <text:p>#define MODBUS_ADDR_SIM_EVENT_DURATION 1163</text:p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 office:value-type="string" office:string-value="SIM_EVENT_DELAY" calcext:value-type="string">
            <text:p>SIM_EVENT_DELAY</text:p>
          </table:table-cell>
          <table:table-cell table:formula="of:=IF([$List.A215] &lt;&gt;&quot;&quot;; [$List.A215]; &quot;&quot;)" office:value-type="float" office:value="1164" calcext:value-type="float">
            <text:p>1164</text:p>
          </table:table-cell>
          <table:table-cell/>
          <table:table-cell table:formula="of:=IF([.A215]&lt;&gt;&quot;&quot;; COM.MICROSOFT.CONCAT(&quot;#define MODBUS_ADDR_&quot;; [.A215]; &quot; &quot;; [.B215]); &quot;&quot;)" office:value-type="string" office:string-value="#define MODBUS_ADDR_SIM_EVENT_DELAY 1164" calcext:value-type="string">
            <text:p>#define MODBUS_ADDR_SIM_EVENT_DELAY 1164</text:p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>
            <text:p/>
          </table:table-cell>
          <table:table-cell table:formula="of:=IF([$List.A216] &lt;&gt;&quot;&quot;; [$List.A216]; &quot;&quot;)">
            <text:p/>
          </table:table-cell>
          <table:table-cell/>
          <table:table-cell table:formula="of:=IF([.A216]&lt;&gt;&quot;&quot;; COM.MICROSOFT.CONCAT(&quot;#define MODBUS_ADDR_&quot;; [.A216]; &quot; &quot;; [.B216]); &quot;&quot;)">
            <text:p/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 office:value-type="string" office:string-value="DEBUG_PRINTOUTS" calcext:value-type="string">
            <text:p>DEBUG_PRINTOUTS</text:p>
          </table:table-cell>
          <table:table-cell table:formula="of:=IF([$List.A217] &lt;&gt;&quot;&quot;; [$List.A217]; &quot;&quot;)" office:value-type="float" office:value="1165" calcext:value-type="float">
            <text:p>1165</text:p>
          </table:table-cell>
          <table:table-cell/>
          <table:table-cell table:formula="of:=IF([.A217]&lt;&gt;&quot;&quot;; COM.MICROSOFT.CONCAT(&quot;#define MODBUS_ADDR_&quot;; [.A217]; &quot; &quot;; [.B217]); &quot;&quot;)" office:value-type="string" office:string-value="#define MODBUS_ADDR_DEBUG_PRINTOUTS 1165" calcext:value-type="string">
            <text:p>#define MODBUS_ADDR_DEBUG_PRINTOUTS 1165</text:p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 office:value-type="string" office:string-value="DEBUG_ARGUMENT1" calcext:value-type="string">
            <text:p>DEBUG_ARGUMENT1</text:p>
          </table:table-cell>
          <table:table-cell table:formula="of:=IF([$List.A218] &lt;&gt;&quot;&quot;; [$List.A218]; &quot;&quot;)" office:value-type="float" office:value="1166" calcext:value-type="float">
            <text:p>1166</text:p>
          </table:table-cell>
          <table:table-cell/>
          <table:table-cell table:formula="of:=IF([.A218]&lt;&gt;&quot;&quot;; COM.MICROSOFT.CONCAT(&quot;#define MODBUS_ADDR_&quot;; [.A218]; &quot; &quot;; [.B218]); &quot;&quot;)" office:value-type="string" office:string-value="#define MODBUS_ADDR_DEBUG_ARGUMENT1 1166" calcext:value-type="string">
            <text:p>#define MODBUS_ADDR_DEBUG_ARGUMENT1 1166</text:p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 office:value-type="string" office:string-value="DEBUG_ARGUMENT2" calcext:value-type="string">
            <text:p>DEBUG_ARGUMENT2</text:p>
          </table:table-cell>
          <table:table-cell table:formula="of:=IF([$List.A219] &lt;&gt;&quot;&quot;; [$List.A219]; &quot;&quot;)" office:value-type="float" office:value="1167" calcext:value-type="float">
            <text:p>1167</text:p>
          </table:table-cell>
          <table:table-cell/>
          <table:table-cell table:formula="of:=IF([.A219]&lt;&gt;&quot;&quot;; COM.MICROSOFT.CONCAT(&quot;#define MODBUS_ADDR_&quot;; [.A219]; &quot; &quot;; [.B219]); &quot;&quot;)" office:value-type="string" office:string-value="#define MODBUS_ADDR_DEBUG_ARGUMENT2 1167" calcext:value-type="string">
            <text:p>#define MODBUS_ADDR_DEBUG_ARGUMENT2 1167</text:p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>
            <text:p/>
          </table:table-cell>
          <table:table-cell table:formula="of:=IF([$List.A220] &lt;&gt;&quot;&quot;; [$List.A220]; &quot;&quot;)">
            <text:p/>
          </table:table-cell>
          <table:table-cell/>
          <table:table-cell table:formula="of:=IF([.A220]&lt;&gt;&quot;&quot;; COM.MICROSOFT.CONCAT(&quot;#define MODBUS_ADDR_&quot;; [.A220]; &quot; &quot;; [.B220]); &quot;&quot;)">
            <text:p/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>
            <text:p/>
          </table:table-cell>
          <table:table-cell table:formula="of:=IF([$List.A221] &lt;&gt;&quot;&quot;; [$List.A221]; &quot;&quot;)">
            <text:p/>
          </table:table-cell>
          <table:table-cell/>
          <table:table-cell table:formula="of:=IF([.A221]&lt;&gt;&quot;&quot;; COM.MICROSOFT.CONCAT(&quot;#define MODBUS_ADDR_&quot;; [.A221]; &quot; &quot;; [.B221]); &quot;&quot;)">
            <text:p/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 office:value-type="string" office:string-value="CUP1_CHANNEL1_SAMPLE" calcext:value-type="string">
            <text:p>CUP1_CHANNEL1_SAMPLE</text:p>
          </table:table-cell>
          <table:table-cell table:formula="of:=IF([$List.A222] &lt;&gt;&quot;&quot;; [$List.A222]; &quot;&quot;)" office:value-type="float" office:value="3001" calcext:value-type="float">
            <text:p>3001</text:p>
          </table:table-cell>
          <table:table-cell/>
          <table:table-cell table:formula="of:=IF([.A222]&lt;&gt;&quot;&quot;; COM.MICROSOFT.CONCAT(&quot;#define MODBUS_ADDR_&quot;; [.A222]; &quot; &quot;; [.B222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 office:value-type="string" office:string-value="CUP1_CHANNEL2_SAMPLE" calcext:value-type="string">
            <text:p>CUP1_CHANNEL2_SAMPLE</text:p>
          </table:table-cell>
          <table:table-cell table:formula="of:=IF([$List.A223] &lt;&gt;&quot;&quot;; [$List.A223]; &quot;&quot;)" office:value-type="float" office:value="3002" calcext:value-type="float">
            <text:p>3002</text:p>
          </table:table-cell>
          <table:table-cell/>
          <table:table-cell table:formula="of:=IF([.A223]&lt;&gt;&quot;&quot;; COM.MICROSOFT.CONCAT(&quot;#define MODBUS_ADDR_&quot;; [.A223]; &quot; &quot;; [.B223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 office:value-type="string" office:string-value="CUP1_CHANNEL3_SAMPLE" calcext:value-type="string">
            <text:p>CUP1_CHANNEL3_SAMPLE</text:p>
          </table:table-cell>
          <table:table-cell table:formula="of:=IF([$List.A224] &lt;&gt;&quot;&quot;; [$List.A224]; &quot;&quot;)" office:value-type="float" office:value="3003" calcext:value-type="float">
            <text:p>3003</text:p>
          </table:table-cell>
          <table:table-cell/>
          <table:table-cell table:formula="of:=IF([.A224]&lt;&gt;&quot;&quot;; COM.MICROSOFT.CONCAT(&quot;#define MODBUS_ADDR_&quot;; [.A224]; &quot; &quot;; [.B224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225] &lt;&gt;&quot;&quot;; [$List.I225]; &quot;&quot;)" office:value-type="string" office:string-value="CUP1_CHANNEL4_SAMPLE" calcext:value-type="string">
            <text:p>CUP1_CHANNEL4_SAMPLE</text:p>
          </table:table-cell>
          <table:table-cell table:formula="of:=IF([$List.A225] &lt;&gt;&quot;&quot;; [$List.A225]; &quot;&quot;)" office:value-type="float" office:value="3004" calcext:value-type="float">
            <text:p>3004</text:p>
          </table:table-cell>
          <table:table-cell/>
          <table:table-cell table:formula="of:=IF([.A225]&lt;&gt;&quot;&quot;; COM.MICROSOFT.CONCAT(&quot;#define MODBUS_ADDR_&quot;; [.A225]; &quot; &quot;; [.B225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226] &lt;&gt;&quot;&quot;; [$List.I226]; &quot;&quot;)" office:value-type="string" office:string-value="CUP1_CHANNEL_ERROR" calcext:value-type="string">
            <text:p>CUP1_CHANNEL_ERROR</text:p>
          </table:table-cell>
          <table:table-cell table:formula="of:=IF([$List.A226] &lt;&gt;&quot;&quot;; [$List.A226]; &quot;&quot;)" office:value-type="float" office:value="3005" calcext:value-type="float">
            <text:p>3005</text:p>
          </table:table-cell>
          <table:table-cell/>
          <table:table-cell table:formula="of:=IF([.A226]&lt;&gt;&quot;&quot;; COM.MICROSOFT.CONCAT(&quot;#define MODBUS_ADDR_&quot;; [.A226]; &quot; &quot;; [.B226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227] &lt;&gt;&quot;&quot;; [$List.I227]; &quot;&quot;)">
            <text:p/>
          </table:table-cell>
          <table:table-cell table:formula="of:=IF([$List.A227] &lt;&gt;&quot;&quot;; [$List.A227]; &quot;&quot;)">
            <text:p/>
          </table:table-cell>
          <table:table-cell/>
          <table:table-cell table:formula="of:=IF([.A227]&lt;&gt;&quot;&quot;; COM.MICROSOFT.CONCAT(&quot;#define MODBUS_ADDR_&quot;; [.A227]; &quot; &quot;; [.B227]); &quot;&quot;)">
            <text:p/>
          </table:table-cell>
          <table:table-cell table:number-columns-repeated="16378"/>
        </table:table-row>
        <table:table-row table:style-name="ro1">
          <table:table-cell table:formula="of:=IF([$List.A228] &lt;&gt;&quot;&quot;; [$List.I228]; &quot;&quot;)" office:value-type="string" office:string-value="CUP2_CHANNEL1_SAMPLE" calcext:value-type="string">
            <text:p>CUP2_CHANNEL1_SAMPLE</text:p>
          </table:table-cell>
          <table:table-cell table:formula="of:=IF([$List.A228] &lt;&gt;&quot;&quot;; [$List.A228]; &quot;&quot;)" office:value-type="float" office:value="3006" calcext:value-type="float">
            <text:p>3006</text:p>
          </table:table-cell>
          <table:table-cell/>
          <table:table-cell table:formula="of:=IF([.A228]&lt;&gt;&quot;&quot;; COM.MICROSOFT.CONCAT(&quot;#define MODBUS_ADDR_&quot;; [.A228]; &quot; &quot;; [.B228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229] &lt;&gt;&quot;&quot;; [$List.I229]; &quot;&quot;)" office:value-type="string" office:string-value="CUP2_CHANNEL2_SAMPLE" calcext:value-type="string">
            <text:p>CUP2_CHANNEL2_SAMPLE</text:p>
          </table:table-cell>
          <table:table-cell table:formula="of:=IF([$List.A229] &lt;&gt;&quot;&quot;; [$List.A229]; &quot;&quot;)" office:value-type="float" office:value="3007" calcext:value-type="float">
            <text:p>3007</text:p>
          </table:table-cell>
          <table:table-cell/>
          <table:table-cell table:formula="of:=IF([.A229]&lt;&gt;&quot;&quot;; COM.MICROSOFT.CONCAT(&quot;#define MODBUS_ADDR_&quot;; [.A229]; &quot; &quot;; [.B229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230] &lt;&gt;&quot;&quot;; [$List.I230]; &quot;&quot;)" office:value-type="string" office:string-value="CUP2_CHANNEL3_SAMPLE" calcext:value-type="string">
            <text:p>CUP2_CHANNEL3_SAMPLE</text:p>
          </table:table-cell>
          <table:table-cell table:formula="of:=IF([$List.A230] &lt;&gt;&quot;&quot;; [$List.A230]; &quot;&quot;)" office:value-type="float" office:value="3008" calcext:value-type="float">
            <text:p>3008</text:p>
          </table:table-cell>
          <table:table-cell/>
          <table:table-cell table:formula="of:=IF([.A230]&lt;&gt;&quot;&quot;; COM.MICROSOFT.CONCAT(&quot;#define MODBUS_ADDR_&quot;; [.A230]; &quot; &quot;; [.B230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231] &lt;&gt;&quot;&quot;; [$List.I231]; &quot;&quot;)" office:value-type="string" office:string-value="CUP2_CHANNEL4_SAMPLE" calcext:value-type="string">
            <text:p>CUP2_CHANNEL4_SAMPLE</text:p>
          </table:table-cell>
          <table:table-cell table:formula="of:=IF([$List.A231] &lt;&gt;&quot;&quot;; [$List.A231]; &quot;&quot;)" office:value-type="float" office:value="3009" calcext:value-type="float">
            <text:p>3009</text:p>
          </table:table-cell>
          <table:table-cell/>
          <table:table-cell table:formula="of:=IF([.A231]&lt;&gt;&quot;&quot;; COM.MICROSOFT.CONCAT(&quot;#define MODBUS_ADDR_&quot;; [.A231]; &quot; &quot;; [.B231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232] &lt;&gt;&quot;&quot;; [$List.I232]; &quot;&quot;)" office:value-type="string" office:string-value="CUP2_CHANNEL_ERROR" calcext:value-type="string">
            <text:p>CUP2_CHANNEL_ERROR</text:p>
          </table:table-cell>
          <table:table-cell table:formula="of:=IF([$List.A232] &lt;&gt;&quot;&quot;; [$List.A232]; &quot;&quot;)" office:value-type="float" office:value="3010" calcext:value-type="float">
            <text:p>3010</text:p>
          </table:table-cell>
          <table:table-cell/>
          <table:table-cell table:formula="of:=IF([.A232]&lt;&gt;&quot;&quot;; COM.MICROSOFT.CONCAT(&quot;#define MODBUS_ADDR_&quot;; [.A232]; &quot; &quot;; [.B232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233] &lt;&gt;&quot;&quot;; [$List.I233]; &quot;&quot;)">
            <text:p/>
          </table:table-cell>
          <table:table-cell table:formula="of:=IF([$List.A233] &lt;&gt;&quot;&quot;; [$List.A233]; &quot;&quot;)">
            <text:p/>
          </table:table-cell>
          <table:table-cell/>
          <table:table-cell table:formula="of:=IF([.A233]&lt;&gt;&quot;&quot;; COM.MICROSOFT.CONCAT(&quot;#define MODBUS_ADDR_&quot;; [.A233]; &quot; &quot;; [.B233]); &quot;&quot;)">
            <text:p/>
          </table:table-cell>
          <table:table-cell table:number-columns-repeated="16378"/>
        </table:table-row>
        <table:table-row table:style-name="ro1">
          <table:table-cell table:formula="of:=IF([$List.A234] &lt;&gt;&quot;&quot;; [$List.I234]; &quot;&quot;)" office:value-type="string" office:string-value="CUP3_CHANNEL1_SAMPLE" calcext:value-type="string">
            <text:p>CUP3_CHANNEL1_SAMPLE</text:p>
          </table:table-cell>
          <table:table-cell table:formula="of:=IF([$List.A234] &lt;&gt;&quot;&quot;; [$List.A234]; &quot;&quot;)" office:value-type="float" office:value="3011" calcext:value-type="float">
            <text:p>3011</text:p>
          </table:table-cell>
          <table:table-cell/>
          <table:table-cell table:formula="of:=IF([.A234]&lt;&gt;&quot;&quot;; COM.MICROSOFT.CONCAT(&quot;#define MODBUS_ADDR_&quot;; [.A234]; &quot; &quot;; [.B234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35] &lt;&gt;&quot;&quot;; [$List.I235]; &quot;&quot;)" office:value-type="string" office:string-value="CUP3_CHANNEL2_SAMPLE" calcext:value-type="string">
            <text:p>CUP3_CHANNEL2_SAMPLE</text:p>
          </table:table-cell>
          <table:table-cell table:formula="of:=IF([$List.A235] &lt;&gt;&quot;&quot;; [$List.A235]; &quot;&quot;)" office:value-type="float" office:value="3012" calcext:value-type="float">
            <text:p>3012</text:p>
          </table:table-cell>
          <table:table-cell/>
          <table:table-cell table:formula="of:=IF([.A235]&lt;&gt;&quot;&quot;; COM.MICROSOFT.CONCAT(&quot;#define MODBUS_ADDR_&quot;; [.A235]; &quot; &quot;; [.B235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36] &lt;&gt;&quot;&quot;; [$List.I236]; &quot;&quot;)" office:value-type="string" office:string-value="CUP3_CHANNEL3_SAMPLE" calcext:value-type="string">
            <text:p>CUP3_CHANNEL3_SAMPLE</text:p>
          </table:table-cell>
          <table:table-cell table:formula="of:=IF([$List.A236] &lt;&gt;&quot;&quot;; [$List.A236]; &quot;&quot;)" office:value-type="float" office:value="3013" calcext:value-type="float">
            <text:p>3013</text:p>
          </table:table-cell>
          <table:table-cell/>
          <table:table-cell table:formula="of:=IF([.A236]&lt;&gt;&quot;&quot;; COM.MICROSOFT.CONCAT(&quot;#define MODBUS_ADDR_&quot;; [.A236]; &quot; &quot;; [.B236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37] &lt;&gt;&quot;&quot;; [$List.I237]; &quot;&quot;)" office:value-type="string" office:string-value="CUP3_CHANNEL4_SAMPLE" calcext:value-type="string">
            <text:p>CUP3_CHANNEL4_SAMPLE</text:p>
          </table:table-cell>
          <table:table-cell table:formula="of:=IF([$List.A237] &lt;&gt;&quot;&quot;; [$List.A237]; &quot;&quot;)" office:value-type="float" office:value="3014" calcext:value-type="float">
            <text:p>3014</text:p>
          </table:table-cell>
          <table:table-cell/>
          <table:table-cell table:formula="of:=IF([.A237]&lt;&gt;&quot;&quot;; COM.MICROSOFT.CONCAT(&quot;#define MODBUS_ADDR_&quot;; [.A237]; &quot; &quot;; [.B237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38] &lt;&gt;&quot;&quot;; [$List.I238]; &quot;&quot;)" office:value-type="string" office:string-value="CUP3_CHANNEL_ERROR" calcext:value-type="string">
            <text:p>CUP3_CHANNEL_ERROR</text:p>
          </table:table-cell>
          <table:table-cell table:formula="of:=IF([$List.A238] &lt;&gt;&quot;&quot;; [$List.A238]; &quot;&quot;)" office:value-type="float" office:value="3015" calcext:value-type="float">
            <text:p>3015</text:p>
          </table:table-cell>
          <table:table-cell/>
          <table:table-cell table:formula="of:=IF([.A238]&lt;&gt;&quot;&quot;; COM.MICROSOFT.CONCAT(&quot;#define MODBUS_ADDR_&quot;; [.A238]; &quot; &quot;; [.B238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39] &lt;&gt;&quot;&quot;; [$List.I239]; &quot;&quot;)">
            <text:p/>
          </table:table-cell>
          <table:table-cell table:formula="of:=IF([$List.A239] &lt;&gt;&quot;&quot;; [$List.A239]; &quot;&quot;)">
            <text:p/>
          </table:table-cell>
          <table:table-cell/>
          <table:table-cell table:formula="of:=IF([.A239]&lt;&gt;&quot;&quot;; COM.MICROSOFT.CONCAT(&quot;#define MODBUS_ADDR_&quot;; [.A239]; &quot; &quot;; [.B239]); &quot;&quot;)">
            <text:p/>
          </table:table-cell>
          <table:table-cell table:number-columns-repeated="16378"/>
        </table:table-row>
        <table:table-row table:style-name="ro1">
          <table:table-cell table:formula="of:=IF([$List.A240] &lt;&gt;&quot;&quot;; [$List.I240]; &quot;&quot;)">
            <text:p/>
          </table:table-cell>
          <table:table-cell table:formula="of:=IF([$List.A240] &lt;&gt;&quot;&quot;; [$List.A240]; &quot;&quot;)">
            <text:p/>
          </table:table-cell>
          <table:table-cell/>
          <table:table-cell table:formula="of:=IF([.A240]&lt;&gt;&quot;&quot;; COM.MICROSOFT.CONCAT(&quot;#define MODBUS_ADDR_&quot;; [.A240]; &quot; &quot;; [.B240]); &quot;&quot;)">
            <text:p/>
          </table:table-cell>
          <table:table-cell table:number-columns-repeated="16378"/>
        </table:table-row>
        <table:table-row table:style-name="ro1">
          <table:table-cell table:formula="of:=IF([$List.A241] &lt;&gt;&quot;&quot;; [$List.I241]; &quot;&quot;)">
            <text:p/>
          </table:table-cell>
          <table:table-cell table:formula="of:=IF([$List.A241] &lt;&gt;&quot;&quot;; [$List.A241]; &quot;&quot;)">
            <text:p/>
          </table:table-cell>
          <table:table-cell/>
          <table:table-cell table:formula="of:=IF([.A241]&lt;&gt;&quot;&quot;; COM.MICROSOFT.CONCAT(&quot;#define MODBUS_ADDR_&quot;; [.A241]; &quot; &quot;; [.B241]); &quot;&quot;)">
            <text:p/>
          </table:table-cell>
          <table:table-cell table:number-columns-repeated="16378"/>
        </table:table-row>
        <table:table-row table:style-name="ro1">
          <table:table-cell table:formula="of:=IF([$List.A242] &lt;&gt;&quot;&quot;; [$List.I242]; &quot;&quot;)">
            <text:p/>
          </table:table-cell>
          <table:table-cell table:formula="of:=IF([$List.A242] &lt;&gt;&quot;&quot;; [$List.A242]; &quot;&quot;)">
            <text:p/>
          </table:table-cell>
          <table:table-cell/>
          <table:table-cell table:formula="of:=IF([.A242]&lt;&gt;&quot;&quot;; COM.MICROSOFT.CONCAT(&quot;#define MODBUS_ADDR_&quot;; [.A242]; &quot; &quot;; [.B242]); &quot;&quot;)">
            <text:p/>
          </table:table-cell>
          <table:table-cell table:number-columns-repeated="16378"/>
        </table:table-row>
        <table:table-row table:style-name="ro1">
          <table:table-cell table:formula="of:=IF([$List.A243] &lt;&gt;&quot;&quot;; [$List.I243]; &quot;&quot;)">
            <text:p/>
          </table:table-cell>
          <table:table-cell table:formula="of:=IF([$List.A243] &lt;&gt;&quot;&quot;; [$List.A243]; &quot;&quot;)">
            <text:p/>
          </table:table-cell>
          <table:table-cell/>
          <table:table-cell table:formula="of:=IF([.A243]&lt;&gt;&quot;&quot;; COM.MICROSOFT.CONCAT(&quot;#define MODBUS_ADDR_&quot;; [.A243]; &quot; &quot;; [.B243]); &quot;&quot;)">
            <text:p/>
          </table:table-cell>
          <table:table-cell table:number-columns-repeated="16378"/>
        </table:table-row>
        <table:table-row table:style-name="ro1">
          <table:table-cell table:formula="of:=IF([$List.A244] &lt;&gt;&quot;&quot;; [$List.I244]; &quot;&quot;)">
            <text:p/>
          </table:table-cell>
          <table:table-cell table:formula="of:=IF([$List.A244] &lt;&gt;&quot;&quot;; [$List.A244]; &quot;&quot;)">
            <text:p/>
          </table:table-cell>
          <table:table-cell/>
          <table:table-cell table:formula="of:=IF([.A244]&lt;&gt;&quot;&quot;; COM.MICROSOFT.CONCAT(&quot;#define MODBUS_ADDR_&quot;; [.A244]; &quot; &quot;; [.B244]); &quot;&quot;)">
            <text:p/>
          </table:table-cell>
          <table:table-cell table:number-columns-repeated="16378"/>
        </table:table-row>
        <table:table-row table:style-name="ro1">
          <table:table-cell table:formula="of:=IF([$List.A245] &lt;&gt;&quot;&quot;; [$List.I245]; &quot;&quot;)">
            <text:p/>
          </table:table-cell>
          <table:table-cell table:formula="of:=IF([$List.A245] &lt;&gt;&quot;&quot;; [$List.A245]; &quot;&quot;)">
            <text:p/>
          </table:table-cell>
          <table:table-cell/>
          <table:table-cell table:formula="of:=IF([.A245]&lt;&gt;&quot;&quot;; COM.MICROSOFT.CONCAT(&quot;#define MODBUS_ADDR_&quot;; [.A245]; &quot; &quot;; [.B245]); &quot;&quot;)">
            <text:p/>
          </table:table-cell>
          <table:table-cell table:number-columns-repeated="16378"/>
        </table:table-row>
        <table:table-row table:style-name="ro1">
          <table:table-cell table:formula="of:=IF([$List.A246] &lt;&gt;&quot;&quot;; [$List.I246]; &quot;&quot;)">
            <text:p/>
          </table:table-cell>
          <table:table-cell table:formula="of:=IF([$List.A246] &lt;&gt;&quot;&quot;; [$List.A246]; &quot;&quot;)">
            <text:p/>
          </table:table-cell>
          <table:table-cell/>
          <table:table-cell table:formula="of:=IF([.A246]&lt;&gt;&quot;&quot;; COM.MICROSOFT.CONCAT(&quot;#define MODBUS_ADDR_&quot;; [.A246]; &quot; &quot;; [.B246]); &quot;&quot;)">
            <text:p/>
          </table:table-cell>
          <table:table-cell table:number-columns-repeated="16378"/>
        </table:table-row>
        <table:table-row table:style-name="ro1">
          <table:table-cell table:formula="of:=IF([$List.A247] &lt;&gt;&quot;&quot;; [$List.I247]; &quot;&quot;)">
            <text:p/>
          </table:table-cell>
          <table:table-cell table:formula="of:=IF([$List.A247] &lt;&gt;&quot;&quot;; [$List.A247]; &quot;&quot;)">
            <text:p/>
          </table:table-cell>
          <table:table-cell/>
          <table:table-cell table:formula="of:=IF([.A247]&lt;&gt;&quot;&quot;; COM.MICROSOFT.CONCAT(&quot;#define MODBUS_ADDR_&quot;; [.A247]; &quot; &quot;; [.B247]); &quot;&quot;)">
            <text:p/>
          </table:table-cell>
          <table:table-cell table:number-columns-repeated="16378"/>
        </table:table-row>
        <table:table-row table:style-name="ro1">
          <table:table-cell table:formula="of:=IF([$List.A248] &lt;&gt;&quot;&quot;; [$List.I248]; &quot;&quot;)">
            <text:p/>
          </table:table-cell>
          <table:table-cell table:formula="of:=IF([$List.A248] &lt;&gt;&quot;&quot;; [$List.A248]; &quot;&quot;)">
            <text:p/>
          </table:table-cell>
          <table:table-cell/>
          <table:table-cell table:formula="of:=IF([.A248]&lt;&gt;&quot;&quot;; COM.MICROSOFT.CONCAT(&quot;#define MODBUS_ADDR_&quot;; [.A248]; &quot; &quot;; [.B248]); &quot;&quot;)">
            <text:p/>
          </table:table-cell>
          <table:table-cell table:number-columns-repeated="16378"/>
        </table:table-row>
        <table:table-row table:style-name="ro1">
          <table:table-cell table:formula="of:=IF([$List.A249] &lt;&gt;&quot;&quot;; [$List.I249]; &quot;&quot;)">
            <text:p/>
          </table:table-cell>
          <table:table-cell table:formula="of:=IF([$List.A249] &lt;&gt;&quot;&quot;; [$List.A249]; &quot;&quot;)">
            <text:p/>
          </table:table-cell>
          <table:table-cell/>
          <table:table-cell table:formula="of:=IF([.A249]&lt;&gt;&quot;&quot;; COM.MICROSOFT.CONCAT(&quot;#define MODBUS_ADDR_&quot;; [.A249]; &quot; &quot;; [.B249]); &quot;&quot;)">
            <text:p/>
          </table:table-cell>
          <table:table-cell table:number-columns-repeated="16378"/>
        </table:table-row>
        <table:table-row table:style-name="ro1">
          <table:table-cell table:formula="of:=IF([$List.A250] &lt;&gt;&quot;&quot;; [$List.I250]; &quot;&quot;)">
            <text:p/>
          </table:table-cell>
          <table:table-cell table:formula="of:=IF([$List.A250] &lt;&gt;&quot;&quot;; [$List.A250]; &quot;&quot;)">
            <text:p/>
          </table:table-cell>
          <table:table-cell/>
          <table:table-cell table:formula="of:=IF([.A250]&lt;&gt;&quot;&quot;; COM.MICROSOFT.CONCAT(&quot;#define MODBUS_ADDR_&quot;; [.A250]; &quot; &quot;; [.B250]); &quot;&quot;)">
            <text:p/>
          </table:table-cell>
          <table:table-cell table:number-columns-repeated="16378"/>
        </table:table-row>
        <table:table-row table:style-name="ro1" table:number-rows-repeated="104832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true" calcext:value-type="string">
            <text:p>true</text:p>
          </table:table-cell>
          <table:table-cell table:formula="of:=IF(AND(([.A5]=&quot;coil&quot;);([.C5]=&quot;true&quot;)); 1; &quot;&quot;)" office:value-type="float" office:value="1" calcext:value-type="float">
            <text:p>1</text:p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 office:value-type="string" office:string-value="ModbusCoils[coilIndexFromAddress(MODBUS_ADDR_CUP1_SWITCH)] = true;" calcext:value-type="string">
            <text:p>ModbusCoils[coilIndexFromAddress(MODBUS_ADDR_CUP1_SWITCH)] = true;</text:p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false" calcext:value-type="string">
            <text:p>false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true" calcext:value-type="string">
            <text:p>true</text:p>
          </table:table-cell>
          <table:table-cell table:formula="of:=IF(AND(([.A10]=&quot;coil&quot;);([.C10]=&quot;true&quot;)); 1; &quot;&quot;)" office:value-type="float" office:value="1" calcext:value-type="float">
            <text:p>1</text:p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 office:value-type="string" office:string-value="ModbusCoils[coilIndexFromAddress(MODBUS_ADDR_CUP2_SWITCH)] = true;" calcext:value-type="string">
            <text:p>ModbusCoils[coilIndexFromAddress(MODBUS_ADDR_CUP2_SWITCH)] = true;</text:p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false" calcext:value-type="string">
            <text:p>false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false" calcext:value-type="string">
            <text:p>false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ERROR_RECOVERY" calcext:value-type="string">
            <text:p>CUP1_ERROR_RECOVERY</text:p>
          </table:table-cell>
          <table:table-cell table:style-name="ce17" table:formula="of:=[$List.G18]" office:value-type="string" office:string-value="false" calcext:value-type="string">
            <text:p>false</text:p>
          </table:table-cell>
          <table:table-cell table:formula="of:=IF(AND(([.A18]=&quot;coil&quot;);([.C18]=&quot;true&quot;)); 1; &quot;&quot;)">
            <text:p/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>
            <text:p/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ERROR_RECOVERY" calcext:value-type="string">
            <text:p>CUP2_ERROR_RECOVERY</text:p>
          </table:table-cell>
          <table:table-cell table:style-name="ce17" table:formula="of:=[$List.G19]" office:value-type="string" office:string-value="false" calcext:value-type="string">
            <text:p>false</text:p>
          </table:table-cell>
          <table:table-cell table:formula="of:=IF(AND(([.A19]=&quot;coil&quot;);([.C19]=&quot;true&quot;)); 1; &quot;&quot;)">
            <text:p/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>
            <text:p/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ERROR_RECOVERY" calcext:value-type="string">
            <text:p>CUP3_ERROR_RECOVERY</text:p>
          </table:table-cell>
          <table:table-cell table:style-name="ce17" table:formula="of:=[$List.G20]" office:value-type="string" office:string-value="false" calcext:value-type="string">
            <text:p>false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 office:value-type="float" office:value="0" calcext:value-type="float">
            <text:p>0</text:p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CUP1_REQUESTED_STATE" calcext:value-type="string">
            <text:p>CUP1_REQUESTED_STATE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2]=&quot;coil&quot;);([.C22]=&quot;true&quot;)); 1; &quot;&quot;)" office:value-type="float" office:value="1" calcext:value-type="float">
            <text:p>1</text:p>
          </table:table-cell>
          <table:table-cell table:formula="of:=IF(AND(([.A22]=&quot;holding reg.&quot;);([.C22] &lt;&gt; 0)); 1; &quot;&quot;)">
            <text:p/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CUP2_REQUESTED_STATE" calcext:value-type="string">
            <text:p>CUP2_REQUESTED_STATE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3]=&quot;coil&quot;);([.C23]=&quot;true&quot;)); 1; &quot;&quot;)" office:value-type="float" office:value="1" calcext:value-type="float">
            <text:p>1</text:p>
          </table:table-cell>
          <table:table-cell table:formula="of:=IF(AND(([.A23]=&quot;holding reg.&quot;);([.C23] &lt;&gt; 0)); 1; &quot;&quot;)">
            <text:p/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CUP3_REQUESTED_STATE" calcext:value-type="string">
            <text:p>CUP3_REQUESTED_STATE</text:p>
          </table:table-cell>
          <table:table-cell table:style-name="ce17" table:formula="of:=[$List.G24]" office:value-type="string" office:string-value="true" calcext:value-type="string">
            <text:p>true</text:p>
          </table:table-cell>
          <table:table-cell table:formula="of:=IF(AND(([.A24]=&quot;coil&quot;);([.C24]=&quot;true&quot;)); 1; &quot;&quot;)" office:value-type="float" office:value="1" calcext:value-type="float">
            <text:p>1</text:p>
          </table:table-cell>
          <table:table-cell table:formula="of:=IF(AND(([.A24]=&quot;holding reg.&quot;);([.C24] &lt;&gt; 0)); 1; &quot;&quot;)">
            <text:p/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 office:value-type="string" office:string-value="ModbusCoils[coilIndexFromAddress(MODBUS_ADDR_CUP3_REQUESTED_STATE)] = true;" calcext:value-type="string">
            <text:p>ModbusCoils[coilIndexFromAddress(MODBUS_ADDR_CUP3_REQUESTED_STATE)] = true;</text:p>
          </table:table-cell>
        </table:table-row>
        <table:table-row table:style-name="ro1">
          <table:table-cell table:style-name="ce17" table:formula="of:=[$List.B25]" office:value-type="float" office:value="0" calcext:value-type="float">
            <text:p>0</text:p>
          </table:table-cell>
          <table:table-cell table:style-name="ce17" table:formula="of:=[$List.I25]" office:value-type="float" office:value="0" calcext:value-type="float">
            <text:p>0</text:p>
          </table:table-cell>
          <table:table-cell table:style-name="ce17" table:formula="of:=[$List.G25]" office:value-type="float" office:value="0" calcext:value-type="float">
            <text:p>0</text:p>
          </table:table-cell>
          <table:table-cell table:formula="of:=IF(AND(([.A25]=&quot;coil&quot;);([.C25]=&quot;true&quot;)); 1; &quot;&quot;)">
            <text:p/>
          </table:table-cell>
          <table:table-cell table:formula="of:=IF(AND(([.A25]=&quot;holding reg.&quot;);([.C25] &lt;&gt; 0)); 1; &quot;&quot;)">
            <text:p/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1_CONTROL" calcext:value-type="string">
            <text:p>ACTUATOR1_CONTROL</text:p>
          </table:table-cell>
          <table:table-cell table:style-name="ce17" table:formula="of:=[$List.G26]" office:value-type="string" office:string-value="true" calcext:value-type="string">
            <text:p>true</text:p>
          </table:table-cell>
          <table:table-cell table:formula="of:=IF(AND(([.A26]=&quot;coil&quot;);([.C26]=&quot;true&quot;)); 1; &quot;&quot;)" office:value-type="float" office:value="1" calcext:value-type="float">
            <text:p>1</text:p>
          </table:table-cell>
          <table:table-cell table:formula="of:=IF(AND(([.A26]=&quot;holding reg.&quot;);([.C26] &lt;&gt; 0)); 1; &quot;&quot;)">
            <text:p/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7]" office:value-type="string" office:string-value="coil" calcext:value-type="string">
            <text:p>coil</text:p>
          </table:table-cell>
          <table:table-cell table:style-name="ce17" table:formula="of:=[$List.I27]" office:value-type="string" office:string-value="ACTUATOR2_CONTROL" calcext:value-type="string">
            <text:p>ACTUATOR2_CONTROL</text:p>
          </table:table-cell>
          <table:table-cell table:style-name="ce17" table:formula="of:=[$List.G27]" office:value-type="string" office:string-value="true" calcext:value-type="string">
            <text:p>true</text:p>
          </table:table-cell>
          <table:table-cell table:formula="of:=IF(AND(([.A27]=&quot;coil&quot;);([.C27]=&quot;true&quot;)); 1; &quot;&quot;)" office:value-type="float" office:value="1" calcext:value-type="float">
            <text:p>1</text:p>
          </table:table-cell>
          <table:table-cell table:formula="of:=IF(AND(([.A27]=&quot;holding reg.&quot;);([.C27] &lt;&gt; 0)); 1; &quot;&quot;)">
            <text:p/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8]" office:value-type="string" office:string-value="coil" calcext:value-type="string">
            <text:p>coil</text:p>
          </table:table-cell>
          <table:table-cell table:style-name="ce17" table:formula="of:=[$List.I28]" office:value-type="string" office:string-value="ACTUATOR3_CONTROL_IN" calcext:value-type="string">
            <text:p>ACTUATOR3_CONTROL_IN</text:p>
          </table:table-cell>
          <table:table-cell table:style-name="ce17" table:formula="of:=[$List.G28]" office:value-type="string" office:string-value="false" calcext:value-type="string">
            <text:p>false</text:p>
          </table:table-cell>
          <table:table-cell table:formula="of:=IF(AND(([.A28]=&quot;coil&quot;);([.C28]=&quot;true&quot;)); 1; &quot;&quot;)">
            <text:p/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coil" calcext:value-type="string">
            <text:p>coil</text:p>
          </table:table-cell>
          <table:table-cell table:style-name="ce17" table:formula="of:=[$List.I29]" office:value-type="string" office:string-value="ACTUATOR3_CONTROL_OUT" calcext:value-type="string">
            <text:p>ACTUATOR3_CONTROL_OUT</text:p>
          </table:table-cell>
          <table:table-cell table:style-name="ce17" table:formula="of:=[$List.G29]" office:value-type="string" office:string-value="false" calcext:value-type="string">
            <text:p>false</text:p>
          </table:table-cell>
          <table:table-cell table:formula="of:=IF(AND(([.A29]=&quot;coil&quot;);([.C29]=&quot;true&quot;)); 1; &quot;&quot;)">
            <text:p/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coil" calcext:value-type="string">
            <text:p>coil</text:p>
          </table:table-cell>
          <table:table-cell table:style-name="ce17" table:formula="of:=[$List.I30]" office:value-type="string" office:string-value="ACTUATOR3_CONTROL_BRAKE" calcext:value-type="string">
            <text:p>ACTUATOR3_CONTROL_BRAKE</text:p>
          </table:table-cell>
          <table:table-cell table:style-name="ce17" table:formula="of:=[$List.G30]" office:value-type="string" office:string-value="false" calcext:value-type="string">
            <text:p>false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31]" office:value-type="float" office:value="0" calcext:value-type="float">
            <text:p>0</text:p>
          </table:table-cell>
          <table:table-cell table:style-name="ce17" table:formula="of:=[$List.I31]">
            <text:p/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ERROR_CODE" calcext:value-type="string">
            <text:p>ERROR_CODE</text:p>
          </table:table-cell>
          <table:table-cell table:style-name="ce17" table:formula="of:=[$List.G33]" office:value-type="float" office:value="0" calcext:value-type="float">
            <text:p>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>
            <text:p/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>
            <text:p/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LAST_ERROR" calcext:value-type="string">
            <text:p>LAST_ERROR</text:p>
          </table:table-cell>
          <table:table-cell table:style-name="ce17" table:formula="of:=[$List.G34]" office:value-type="float" office:value="0" calcext:value-type="float">
            <text:p>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>
            <text:p/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>
            <text:p/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ERROR_STORAGE" calcext:value-type="string">
            <text:p>ERROR_STORAGE</text:p>
          </table:table-cell>
          <table:table-cell table:style-name="ce17" table:formula="of:=[$List.G35]" office:value-type="float" office:value="0" calcext:value-type="float">
            <text:p>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>
            <text:p/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>
            <text:p/>
          </table:table-cell>
        </table:table-row>
        <table:table-row table:style-name="ro1">
          <table:table-cell table:style-name="ce17" table:formula="of:=[$List.B36]" office:value-type="float" office:value="0" calcext:value-type="float">
            <text:p>0</text:p>
          </table:table-cell>
          <table:table-cell table:style-name="ce17" table:formula="of:=[$List.I36]">
            <text:p/>
          </table:table-cell>
          <table:table-cell table:style-name="ce17" table:formula="of:=[$List.G36]" office:value-type="float" office:value="0" calcext:value-type="float">
            <text:p>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>
            <text:p/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>
            <text:p/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INSERTING1" calcext:value-type="string">
            <text:p>TIME_LIMIT_INSERTING1</text:p>
          </table:table-cell>
          <table:table-cell table:style-name="ce17" table:formula="of:=[$List.G37]" office:value-type="float" office:value="700" calcext:value-type="float">
            <text:p>70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 office:value-type="float" office:value="1" calcext:value-type="float">
            <text:p>1</text:p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INSERTING2" calcext:value-type="string">
            <text:p>TIME_LIMIT_INSERTING2</text:p>
          </table:table-cell>
          <table:table-cell table:style-name="ce17" table:formula="of:=[$List.G38]" office:value-type="float" office:value="700" calcext:value-type="float">
            <text:p>70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 office:value-type="float" office:value="1" calcext:value-type="float">
            <text:p>1</text:p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9]" office:value-type="string" office:string-value="holding reg." calcext:value-type="string">
            <text:p>holding reg.</text:p>
          </table:table-cell>
          <table:table-cell table:style-name="ce17" table:formula="of:=[$List.I39]" office:value-type="string" office:string-value="TIME_LIMIT_INSERTING3" calcext:value-type="string">
            <text:p>TIME_LIMIT_INSERTING3</text:p>
          </table:table-cell>
          <table:table-cell table:style-name="ce17" table:formula="of:=[$List.G39]" office:value-type="float" office:value="4000" calcext:value-type="float">
            <text:p>400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 office:value-type="float" office:value="1" calcext:value-type="float">
            <text:p>1</text:p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TIME_LIMIT_WITHDRAWING1" calcext:value-type="string">
            <text:p>TIME_LIMIT_WITHDRAWING1</text:p>
          </table:table-cell>
          <table:table-cell table:style-name="ce17" table:formula="of:=[$List.G40]" office:value-type="float" office:value="300" calcext:value-type="float">
            <text:p>30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41]" office:value-type="string" office:string-value="holding reg." calcext:value-type="string">
            <text:p>holding reg.</text:p>
          </table:table-cell>
          <table:table-cell table:style-name="ce17" table:formula="of:=[$List.I41]" office:value-type="string" office:string-value="TIME_LIMIT_WITHDRAWING2" calcext:value-type="string">
            <text:p>TIME_LIMIT_WITHDRAWING2</text:p>
          </table:table-cell>
          <table:table-cell table:style-name="ce17" table:formula="of:=[$List.G41]" office:value-type="float" office:value="300" calcext:value-type="float">
            <text:p>30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 office:value-type="float" office:value="1" calcext:value-type="float">
            <text:p>1</text:p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TIME_LIMIT_WITHDRAWING3" calcext:value-type="string">
            <text:p>TIME_LIMIT_WITHDRAWING3</text:p>
          </table:table-cell>
          <table:table-cell table:style-name="ce17" table:formula="of:=[$List.G42]" office:value-type="float" office:value="4400" calcext:value-type="float">
            <text:p>440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 office:value-type="float" office:value="1" calcext:value-type="float">
            <text:p>1</text:p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43]" office:value-type="float" office:value="0" calcext:value-type="float">
            <text:p>0</text:p>
          </table:table-cell>
          <table:table-cell table:style-name="ce17" table:formula="of:=[$List.I43]">
            <text:p/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>
            <text:p/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ACTIVE_CUP" calcext:value-type="string">
            <text:p>ACTIVE_CUP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>
            <text:p/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>
            <text:p/>
          </table:table-cell>
        </table:table-row>
        <table:table-row table:style-name="ro1">
          <table:table-cell table:style-name="ce17" table:formula="of:=[$List.B45]" office:value-type="float" office:value="0" calcext:value-type="float">
            <text:p>0</text:p>
          </table:table-cell>
          <table:table-cell table:style-name="ce17" table:formula="of:=[$List.I45]">
            <text:p/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1_FSM_STATE" calcext:value-type="string">
            <text:p>CUP1_FSM_STATE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>
            <text:p/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2_FSM_STATE" calcext:value-type="string">
            <text:p>CUP2_FSM_STATE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3_FSM_STATE" calcext:value-type="string">
            <text:p>CUP3_FSM_STATE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1_ERROR" calcext:value-type="string">
            <text:p>CUP1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2_ERROR" calcext:value-type="string">
            <text:p>CUP2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3_ERROR" calcext:value-type="string">
            <text:p>CUP3_ERROR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1_LAST_ERROR" calcext:value-type="string">
            <text:p>CUP1_LAST_ERROR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2_LAST_ERROR" calcext:value-type="string">
            <text:p>CUP2_LAST_ERROR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54]" office:value-type="string" office:string-value="holding reg." calcext:value-type="string">
            <text:p>holding reg.</text:p>
          </table:table-cell>
          <table:table-cell table:style-name="ce17" table:formula="of:=[$List.I54]" office:value-type="string" office:string-value="CUP3_LAST_ERROR" calcext:value-type="string">
            <text:p>CUP3_LAST_ERROR</text:p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CUP1_ERROR_STORAGE" calcext:value-type="string">
            <text:p>CUP1_ERROR_STORAGE</text:p>
          </table:table-cell>
          <table:table-cell table:style-name="ce17" table:formula="of:=[$List.G55]" office:value-type="float" office:value="0" calcext:value-type="float">
            <text:p>0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>
            <text:p/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>
            <text:p/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CUP2_ERROR_STORAGE" calcext:value-type="string">
            <text:p>CUP2_ERROR_STORAGE</text:p>
          </table:table-cell>
          <table:table-cell table:style-name="ce17" table:formula="of:=[$List.G56]" office:value-type="float" office:value="0" calcext:value-type="float">
            <text:p>0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>
            <text:p/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>
            <text:p/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CUP3_ERROR_STORAGE" calcext:value-type="string">
            <text:p>CUP3_ERROR_STORAGE</text:p>
          </table:table-cell>
          <table:table-cell table:style-name="ce17" table:formula="of:=[$List.G57]" office:value-type="float" office:value="0" calcext:value-type="float">
            <text:p>0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>
            <text:p/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>
            <text:p/>
          </table:table-cell>
        </table:table-row>
        <table:table-row table:style-name="ro1">
          <table:table-cell table:style-name="ce17" table:formula="of:=[$List.B58]" office:value-type="float" office:value="0" calcext:value-type="float">
            <text:p>0</text:p>
          </table:table-cell>
          <table:table-cell table:style-name="ce17" table:formula="of:=[$List.I58]">
            <text:p/>
          </table:table-cell>
          <table:table-cell table:style-name="ce17" table:formula="of:=[$List.G58]" office:value-type="float" office:value="0" calcext:value-type="float">
            <text:p>0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>
            <text:p/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>
            <text:p/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INSTALLED_CUPS" calcext:value-type="string">
            <text:p>INSTALLED_CUPS</text:p>
          </table:table-cell>
          <table:table-cell table:style-name="ce17" table:formula="of:=[$List.G59]" office:value-type="float" office:value="3" calcext:value-type="float">
            <text:p>3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 office:value-type="float" office:value="1" calcext:value-type="float">
            <text:p>1</text:p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ELECTRODES_CUP1" calcext:value-type="string">
            <text:p>ELECTRODES_CUP1</text:p>
          </table:table-cell>
          <table:table-cell table:style-name="ce17" table:formula="of:=[$List.G60]" office:value-type="float" office:value="4" calcext:value-type="float">
            <text:p>4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 office:value-type="float" office:value="1" calcext:value-type="float">
            <text:p>1</text:p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ELECTRODES_CUP2" calcext:value-type="string">
            <text:p>ELECTRODES_CUP2</text:p>
          </table:table-cell>
          <table:table-cell table:style-name="ce17" table:formula="of:=[$List.G61]" office:value-type="float" office:value="4" calcext:value-type="float">
            <text:p>4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62]" office:value-type="string" office:string-value="holding reg." calcext:value-type="string">
            <text:p>holding reg.</text:p>
          </table:table-cell>
          <table:table-cell table:style-name="ce17" table:formula="of:=[$List.I62]" office:value-type="string" office:string-value="ELECTRODES_CUP3" calcext:value-type="string">
            <text:p>ELECTRODES_CUP3</text:p>
          </table:table-cell>
          <table:table-cell table:style-name="ce17" table:formula="of:=[$List.G62]" office:value-type="float" office:value="4" calcext:value-type="float">
            <text:p>4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 office:value-type="float" office:value="1" calcext:value-type="float">
            <text:p>1</text:p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TYPE" calcext:value-type="string">
            <text:p>CUP1_TYPE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>
            <text:p/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2_TYPE" calcext:value-type="string">
            <text:p>CUP2_TYPE</text:p>
          </table:table-cell>
          <table:table-cell table:style-name="ce17" table:formula="of:=[$List.G64]" office:value-type="float" office:value="1" calcext:value-type="float">
            <text:p>1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 office:value-type="float" office:value="1" calcext:value-type="float">
            <text:p>1</text:p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 office:value-type="string" office:string-value="ModbusHoldingRegisters[holdingIndexFromAddress(MODBUS_ADDR_CUP2_TYPE)] = 1u;" calcext:value-type="string">
            <text:p>ModbusHoldingRegisters[holdingIndexFromAddress(MODBUS_ADDR_CUP2_TYPE)] = 1u;</text:p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3_TYPE" calcext:value-type="string">
            <text:p>CUP3_TYPE</text:p>
          </table:table-cell>
          <table:table-cell table:style-name="ce17" table:formula="of:=[$List.G65]" office:value-type="float" office:value="2" calcext:value-type="float">
            <text:p>2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 office:value-type="float" office:value="1" calcext:value-type="float">
            <text:p>1</text:p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 office:value-type="string" office:string-value="ModbusHoldingRegisters[holdingIndexFromAddress(MODBUS_ADDR_CUP3_TYPE)] = 2u;" calcext:value-type="string">
            <text:p>ModbusHoldingRegisters[holdingIndexFromAddress(MODBUS_ADDR_CUP3_TYPE)] = 2u;</text:p>
          </table:table-cell>
        </table:table-row>
        <table:table-row table:style-name="ro1">
          <table:table-cell table:style-name="ce17" table:formula="of:=[$List.B66]" office:value-type="float" office:value="0" calcext:value-type="float">
            <text:p>0</text:p>
          </table:table-cell>
          <table:table-cell table:style-name="ce17" table:formula="of:=[$List.I66]">
            <text:p/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ALIBRATION_CURRENT1" calcext:value-type="string">
            <text:p>CALIBRATION_CURRENT1</text:p>
          </table:table-cell>
          <table:table-cell table:style-name="ce17" table:formula="of:=[$List.G67]" office:value-type="float" office:value="24169" calcext:value-type="float">
            <text:p>24169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 office:value-type="float" office:value="1" calcext:value-type="float">
            <text:p>1</text:p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 office:value-type="string" office:string-value="ModbusHoldingRegisters[holdingIndexFromAddress(MODBUS_ADDR_CALIBRATION_CURRENT1)] = 24169u;" calcext:value-type="string">
            <text:p>ModbusHoldingRegisters[holdingIndexFromAddress(MODBUS_ADDR_CALIBRATION_CURRENT1)] = 24169u;</text:p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ALIBRATION_CURRENT2" calcext:value-type="string">
            <text:p>CALIBRATION_CURRENT2</text:p>
          </table:table-cell>
          <table:table-cell table:style-name="ce17" table:formula="of:=[$List.G68]" office:value-type="float" office:value="2410" calcext:value-type="float">
            <text:p>241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 office:value-type="float" office:value="1" calcext:value-type="float">
            <text:p>1</text:p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 office:value-type="string" office:string-value="ModbusHoldingRegisters[holdingIndexFromAddress(MODBUS_ADDR_CALIBRATION_CURRENT2)] = 2410u;" calcext:value-type="string">
            <text:p>ModbusHoldingRegisters[holdingIndexFromAddress(MODBUS_ADDR_CALIBRATION_CURRENT2)] = 2410u;</text:p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ALIBRATION_CURRENT3" calcext:value-type="string">
            <text:p>CALIBRATION_CURRENT3</text:p>
          </table:table-cell>
          <table:table-cell table:style-name="ce17" table:formula="of:=[$List.G69]" office:value-type="float" office:value="2198" calcext:value-type="float">
            <text:p>2198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 office:value-type="float" office:value="1" calcext:value-type="float">
            <text:p>1</text:p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 office:value-type="string" office:string-value="ModbusHoldingRegisters[holdingIndexFromAddress(MODBUS_ADDR_CALIBRATION_CURRENT3)] = 2198u;" calcext:value-type="string">
            <text:p>ModbusHoldingRegisters[holdingIndexFromAddress(MODBUS_ADDR_CALIBRATION_CURRENT3)] = 2198u;</text:p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ALIBRATION_CURRENT4" calcext:value-type="string">
            <text:p>CALIBRATION_CURRENT4</text:p>
          </table:table-cell>
          <table:table-cell table:style-name="ce17" table:formula="of:=[$List.G70]" office:value-type="float" office:value="158" calcext:value-type="float">
            <text:p>158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 office:value-type="float" office:value="1" calcext:value-type="float">
            <text:p>1</text:p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 office:value-type="string" office:string-value="ModbusHoldingRegisters[holdingIndexFromAddress(MODBUS_ADDR_CALIBRATION_CURRENT4)] = 158u;" calcext:value-type="string">
            <text:p>ModbusHoldingRegisters[holdingIndexFromAddress(MODBUS_ADDR_CALIBRATION_CURRENT4)] = 158u;</text:p>
          </table:table-cell>
        </table:table-row>
        <table:table-row table:style-name="ro1">
          <table:table-cell table:style-name="ce17" table:formula="of:=[$List.B71]" office:value-type="float" office:value="0" calcext:value-type="float">
            <text:p>0</text:p>
          </table:table-cell>
          <table:table-cell table:style-name="ce17" table:formula="of:=[$List.I71]" office:value-type="float" office:value="0" calcext:value-type="float">
            <text:p>0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1_CHANNEL1_GAIN_LOW_POINT1" calcext:value-type="string">
            <text:p>CUP1_CHANNEL1_GAIN_LOW_POINT1</text:p>
          </table:table-cell>
          <table:table-cell table:style-name="ce17" table:formula="of:=[$List.G72]" office:value-type="float" office:value="1725" calcext:value-type="float">
            <text:p>1725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 office:value-type="float" office:value="1" calcext:value-type="float">
            <text:p>1</text:p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 office:value-type="string" office:string-value="ModbusHoldingRegisters[holdingIndexFromAddress(MODBUS_ADDR_CUP1_CHANNEL1_GAIN_LOW_POINT1)] = 1725u;" calcext:value-type="string">
            <text:p>ModbusHoldingRegisters[holdingIndexFromAddress(MODBUS_ADDR_CUP1_CHANNEL1_GAIN_LOW_POINT1)] = 1725u;</text:p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1_CHANNEL1_GAIN_LOW_POINT2" calcext:value-type="string">
            <text:p>CUP1_CHANNEL1_GAIN_LOW_POINT2</text:p>
          </table:table-cell>
          <table:table-cell table:style-name="ce17" table:formula="of:=[$List.G73]" office:value-type="float" office:value="180" calcext:value-type="float">
            <text:p>18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 office:value-type="float" office:value="1" calcext:value-type="float">
            <text:p>1</text:p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 office:value-type="string" office:string-value="ModbusHoldingRegisters[holdingIndexFromAddress(MODBUS_ADDR_CUP1_CHANNEL1_GAIN_LOW_POINT2)] = 180u;" calcext:value-type="string">
            <text:p>ModbusHoldingRegisters[holdingIndexFromAddress(MODBUS_ADDR_CUP1_CHANNEL1_GAIN_LOW_POINT2)] = 180u;</text:p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1_CHANNEL1_GAIN_LOW_POINT3" calcext:value-type="string">
            <text:p>CUP1_CHANNEL1_GAIN_LOW_POINT3</text:p>
          </table:table-cell>
          <table:table-cell table:style-name="ce17" table:formula="of:=[$List.G74]" office:value-type="float" office:value="164" calcext:value-type="float">
            <text:p>164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 office:value-type="float" office:value="1" calcext:value-type="float">
            <text:p>1</text:p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 office:value-type="string" office:string-value="ModbusHoldingRegisters[holdingIndexFromAddress(MODBUS_ADDR_CUP1_CHANNEL1_GAIN_LOW_POINT3)] = 164u;" calcext:value-type="string">
            <text:p>ModbusHoldingRegisters[holdingIndexFromAddress(MODBUS_ADDR_CUP1_CHANNEL1_GAIN_LOW_POINT3)] = 164u;</text:p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1_CHANNEL1_GAIN_HIGH_POINT2" calcext:value-type="string">
            <text:p>CUP1_CHANNEL1_GAIN_HIGH_POINT2</text:p>
          </table:table-cell>
          <table:table-cell table:style-name="ce17" table:formula="of:=[$List.G75]" office:value-type="float" office:value="1741" calcext:value-type="float">
            <text:p>1741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 office:value-type="float" office:value="1" calcext:value-type="float">
            <text:p>1</text:p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 office:value-type="string" office:string-value="ModbusHoldingRegisters[holdingIndexFromAddress(MODBUS_ADDR_CUP1_CHANNEL1_GAIN_HIGH_POINT2)] = 1741u;" calcext:value-type="string">
            <text:p>ModbusHoldingRegisters[holdingIndexFromAddress(MODBUS_ADDR_CUP1_CHANNEL1_GAIN_HIGH_POINT2)] = 1741u;</text:p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1_CHANNEL1_GAIN_HIGH_POINT3" calcext:value-type="string">
            <text:p>CUP1_CHANNEL1_GAIN_HIGH_POINT3</text:p>
          </table:table-cell>
          <table:table-cell table:style-name="ce17" table:formula="of:=[$List.G76]" office:value-type="float" office:value="1589" calcext:value-type="float">
            <text:p>1589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 office:value-type="float" office:value="1" calcext:value-type="float">
            <text:p>1</text:p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 office:value-type="string" office:string-value="ModbusHoldingRegisters[holdingIndexFromAddress(MODBUS_ADDR_CUP1_CHANNEL1_GAIN_HIGH_POINT3)] = 1589u;" calcext:value-type="string">
            <text:p>ModbusHoldingRegisters[holdingIndexFromAddress(MODBUS_ADDR_CUP1_CHANNEL1_GAIN_HIGH_POINT3)] = 1589u;</text:p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1_CHANNEL1_GAIN_HIGH_POINT4" calcext:value-type="string">
            <text:p>CUP1_CHANNEL1_GAIN_HIGH_POINT4</text:p>
          </table:table-cell>
          <table:table-cell table:style-name="ce17" table:formula="of:=[$List.G77]" office:value-type="float" office:value="43" calcext:value-type="float">
            <text:p>43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 office:value-type="float" office:value="1" calcext:value-type="float">
            <text:p>1</text:p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 office:value-type="string" office:string-value="ModbusHoldingRegisters[holdingIndexFromAddress(MODBUS_ADDR_CUP1_CHANNEL1_GAIN_HIGH_POINT4)] = 43u;" calcext:value-type="string">
            <text:p>ModbusHoldingRegisters[holdingIndexFromAddress(MODBUS_ADDR_CUP1_CHANNEL1_GAIN_HIGH_POINT4)] = 43u;</text:p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2_GAIN_LOW_POINT1" calcext:value-type="string">
            <text:p>CUP1_CHANNEL2_GAIN_LOW_POINT1</text:p>
          </table:table-cell>
          <table:table-cell table:style-name="ce17" table:formula="of:=[$List.G78]" office:value-type="float" office:value="1732" calcext:value-type="float">
            <text:p>1732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 office:value-type="float" office:value="1" calcext:value-type="float">
            <text:p>1</text:p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 office:value-type="string" office:string-value="ModbusHoldingRegisters[holdingIndexFromAddress(MODBUS_ADDR_CUP1_CHANNEL2_GAIN_LOW_POINT1)] = 1732u;" calcext:value-type="string">
            <text:p>ModbusHoldingRegisters[holdingIndexFromAddress(MODBUS_ADDR_CUP1_CHANNEL2_GAIN_LOW_POINT1)] = 1732u;</text:p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1_CHANNEL2_GAIN_LOW_POINT2" calcext:value-type="string">
            <text:p>CUP1_CHANNEL2_GAIN_LOW_POINT2</text:p>
          </table:table-cell>
          <table:table-cell table:style-name="ce17" table:formula="of:=[$List.G79]" office:value-type="float" office:value="184" calcext:value-type="float">
            <text:p>184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 office:value-type="float" office:value="1" calcext:value-type="float">
            <text:p>1</text:p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 office:value-type="string" office:string-value="ModbusHoldingRegisters[holdingIndexFromAddress(MODBUS_ADDR_CUP1_CHANNEL2_GAIN_LOW_POINT2)] = 184u;" calcext:value-type="string">
            <text:p>ModbusHoldingRegisters[holdingIndexFromAddress(MODBUS_ADDR_CUP1_CHANNEL2_GAIN_LOW_POINT2)] = 184u;</text:p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1_CHANNEL2_GAIN_LOW_POINT3" calcext:value-type="string">
            <text:p>CUP1_CHANNEL2_GAIN_LOW_POINT3</text:p>
          </table:table-cell>
          <table:table-cell table:style-name="ce17" table:formula="of:=[$List.G80]" office:value-type="float" office:value="166" calcext:value-type="float">
            <text:p>166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 office:value-type="float" office:value="1" calcext:value-type="float">
            <text:p>1</text:p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 office:value-type="string" office:string-value="ModbusHoldingRegisters[holdingIndexFromAddress(MODBUS_ADDR_CUP1_CHANNEL2_GAIN_LOW_POINT3)] = 166u;" calcext:value-type="string">
            <text:p>ModbusHoldingRegisters[holdingIndexFromAddress(MODBUS_ADDR_CUP1_CHANNEL2_GAIN_LOW_POINT3)] = 166u;</text:p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1_CHANNEL2_GAIN_HIGH_POINT2" calcext:value-type="string">
            <text:p>CUP1_CHANNEL2_GAIN_HIGH_POINT2</text:p>
          </table:table-cell>
          <table:table-cell table:style-name="ce17" table:formula="of:=[$List.G81]" office:value-type="float" office:value="1766" calcext:value-type="float">
            <text:p>1766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 office:value-type="float" office:value="1" calcext:value-type="float">
            <text:p>1</text:p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 office:value-type="string" office:string-value="ModbusHoldingRegisters[holdingIndexFromAddress(MODBUS_ADDR_CUP1_CHANNEL2_GAIN_HIGH_POINT2)] = 1766u;" calcext:value-type="string">
            <text:p>ModbusHoldingRegisters[holdingIndexFromAddress(MODBUS_ADDR_CUP1_CHANNEL2_GAIN_HIGH_POINT2)] = 1766u;</text:p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1_CHANNEL2_GAIN_HIGH_POINT3" calcext:value-type="string">
            <text:p>CUP1_CHANNEL2_GAIN_HIGH_POINT3</text:p>
          </table:table-cell>
          <table:table-cell table:style-name="ce17" table:formula="of:=[$List.G82]" office:value-type="float" office:value="1622" calcext:value-type="float">
            <text:p>1622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 office:value-type="float" office:value="1" calcext:value-type="float">
            <text:p>1</text:p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 office:value-type="string" office:string-value="ModbusHoldingRegisters[holdingIndexFromAddress(MODBUS_ADDR_CUP1_CHANNEL2_GAIN_HIGH_POINT3)] = 1622u;" calcext:value-type="string">
            <text:p>ModbusHoldingRegisters[holdingIndexFromAddress(MODBUS_ADDR_CUP1_CHANNEL2_GAIN_HIGH_POINT3)] = 1622u;</text:p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1_CHANNEL2_GAIN_HIGH_POINT4" calcext:value-type="string">
            <text:p>CUP1_CHANNEL2_GAIN_HIGH_POINT4</text:p>
          </table:table-cell>
          <table:table-cell table:style-name="ce17" table:formula="of:=[$List.G83]" office:value-type="float" office:value="66" calcext:value-type="float">
            <text:p>66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 office:value-type="float" office:value="1" calcext:value-type="float">
            <text:p>1</text:p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 office:value-type="string" office:string-value="ModbusHoldingRegisters[holdingIndexFromAddress(MODBUS_ADDR_CUP1_CHANNEL2_GAIN_HIGH_POINT4)] = 66u;" calcext:value-type="string">
            <text:p>ModbusHoldingRegisters[holdingIndexFromAddress(MODBUS_ADDR_CUP1_CHANNEL2_GAIN_HIGH_POINT4)] = 66u;</text:p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1_CHANNEL3_GAIN_LOW_POINT1" calcext:value-type="string">
            <text:p>CUP1_CHANNEL3_GAIN_LOW_POINT1</text:p>
          </table:table-cell>
          <table:table-cell table:style-name="ce17" table:formula="of:=[$List.G84]" office:value-type="float" office:value="1731" calcext:value-type="float">
            <text:p>1731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 office:value-type="float" office:value="1" calcext:value-type="float">
            <text:p>1</text:p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 office:value-type="string" office:string-value="ModbusHoldingRegisters[holdingIndexFromAddress(MODBUS_ADDR_CUP1_CHANNEL3_GAIN_LOW_POINT1)] = 1731u;" calcext:value-type="string">
            <text:p>ModbusHoldingRegisters[holdingIndexFromAddress(MODBUS_ADDR_CUP1_CHANNEL3_GAIN_LOW_POINT1)] = 1731u;</text:p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1_CHANNEL3_GAIN_LOW_POINT2" calcext:value-type="string">
            <text:p>CUP1_CHANNEL3_GAIN_LOW_POINT2</text:p>
          </table:table-cell>
          <table:table-cell table:style-name="ce17" table:formula="of:=[$List.G85]" office:value-type="float" office:value="187" calcext:value-type="float">
            <text:p>187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 office:value-type="float" office:value="1" calcext:value-type="float">
            <text:p>1</text:p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 office:value-type="string" office:string-value="ModbusHoldingRegisters[holdingIndexFromAddress(MODBUS_ADDR_CUP1_CHANNEL3_GAIN_LOW_POINT2)] = 187u;" calcext:value-type="string">
            <text:p>ModbusHoldingRegisters[holdingIndexFromAddress(MODBUS_ADDR_CUP1_CHANNEL3_GAIN_LOW_POINT2)] = 187u;</text:p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1_CHANNEL3_GAIN_LOW_POINT3" calcext:value-type="string">
            <text:p>CUP1_CHANNEL3_GAIN_LOW_POINT3</text:p>
          </table:table-cell>
          <table:table-cell table:style-name="ce17" table:formula="of:=[$List.G86]" office:value-type="float" office:value="171" calcext:value-type="float">
            <text:p>171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 office:value-type="float" office:value="1" calcext:value-type="float">
            <text:p>1</text:p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 office:value-type="string" office:string-value="ModbusHoldingRegisters[holdingIndexFromAddress(MODBUS_ADDR_CUP1_CHANNEL3_GAIN_LOW_POINT3)] = 171u;" calcext:value-type="string">
            <text:p>ModbusHoldingRegisters[holdingIndexFromAddress(MODBUS_ADDR_CUP1_CHANNEL3_GAIN_LOW_POINT3)] = 171u;</text:p>
          </table:table-cell>
        </table:table-row>
        <table:table-row table:style-name="ro1">
          <table:table-cell table:style-name="ce17" table:formula="of:=[$List.B87]" office:value-type="string" office:string-value="holding reg." calcext:value-type="string">
            <text:p>holding reg.</text:p>
          </table:table-cell>
          <table:table-cell table:style-name="ce17" table:formula="of:=[$List.I87]" office:value-type="string" office:string-value="CUP1_CHANNEL3_GAIN_HIGH_POINT2" calcext:value-type="string">
            <text:p>CUP1_CHANNEL3_GAIN_HIGH_POINT2</text:p>
          </table:table-cell>
          <table:table-cell table:style-name="ce17" table:formula="of:=[$List.G87]" office:value-type="float" office:value="1795" calcext:value-type="float">
            <text:p>1795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 office:value-type="float" office:value="1" calcext:value-type="float">
            <text:p>1</text:p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 office:value-type="string" office:string-value="ModbusHoldingRegisters[holdingIndexFromAddress(MODBUS_ADDR_CUP1_CHANNEL3_GAIN_HIGH_POINT2)] = 1795u;" calcext:value-type="string">
            <text:p>ModbusHoldingRegisters[holdingIndexFromAddress(MODBUS_ADDR_CUP1_CHANNEL3_GAIN_HIGH_POINT2)] = 1795u;</text:p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1_CHANNEL3_GAIN_HIGH_POINT3" calcext:value-type="string">
            <text:p>CUP1_CHANNEL3_GAIN_HIGH_POINT3</text:p>
          </table:table-cell>
          <table:table-cell table:style-name="ce17" table:formula="of:=[$List.G88]" office:value-type="float" office:value="1661" calcext:value-type="float">
            <text:p>1661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 office:value-type="float" office:value="1" calcext:value-type="float">
            <text:p>1</text:p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 office:value-type="string" office:string-value="ModbusHoldingRegisters[holdingIndexFromAddress(MODBUS_ADDR_CUP1_CHANNEL3_GAIN_HIGH_POINT3)] = 1661u;" calcext:value-type="string">
            <text:p>ModbusHoldingRegisters[holdingIndexFromAddress(MODBUS_ADDR_CUP1_CHANNEL3_GAIN_HIGH_POINT3)] = 1661u;</text:p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1_CHANNEL3_GAIN_HIGH_POINT4" calcext:value-type="string">
            <text:p>CUP1_CHANNEL3_GAIN_HIGH_POINT4</text:p>
          </table:table-cell>
          <table:table-cell table:style-name="ce17" table:formula="of:=[$List.G89]" office:value-type="float" office:value="108" calcext:value-type="float">
            <text:p>108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 office:value-type="float" office:value="1" calcext:value-type="float">
            <text:p>1</text:p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 office:value-type="string" office:string-value="ModbusHoldingRegisters[holdingIndexFromAddress(MODBUS_ADDR_CUP1_CHANNEL3_GAIN_HIGH_POINT4)] = 108u;" calcext:value-type="string">
            <text:p>ModbusHoldingRegisters[holdingIndexFromAddress(MODBUS_ADDR_CUP1_CHANNEL3_GAIN_HIGH_POINT4)] = 108u;</text:p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1_CHANNEL4_GAIN_LOW_POINT1" calcext:value-type="string">
            <text:p>CUP1_CHANNEL4_GAIN_LOW_POINT1</text:p>
          </table:table-cell>
          <table:table-cell table:style-name="ce17" table:formula="of:=[$List.G90]" office:value-type="float" office:value="1722" calcext:value-type="float">
            <text:p>1722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 office:value-type="float" office:value="1" calcext:value-type="float">
            <text:p>1</text:p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 office:value-type="string" office:string-value="ModbusHoldingRegisters[holdingIndexFromAddress(MODBUS_ADDR_CUP1_CHANNEL4_GAIN_LOW_POINT1)] = 1722u;" calcext:value-type="string">
            <text:p>ModbusHoldingRegisters[holdingIndexFromAddress(MODBUS_ADDR_CUP1_CHANNEL4_GAIN_LOW_POINT1)] = 1722u;</text:p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4_GAIN_LOW_POINT2" calcext:value-type="string">
            <text:p>CUP1_CHANNEL4_GAIN_LOW_POINT2</text:p>
          </table:table-cell>
          <table:table-cell table:style-name="ce17" table:formula="of:=[$List.G91]" office:value-type="float" office:value="177" calcext:value-type="float">
            <text:p>177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 office:value-type="float" office:value="1" calcext:value-type="float">
            <text:p>1</text:p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 office:value-type="string" office:string-value="ModbusHoldingRegisters[holdingIndexFromAddress(MODBUS_ADDR_CUP1_CHANNEL4_GAIN_LOW_POINT2)] = 177u;" calcext:value-type="string">
            <text:p>ModbusHoldingRegisters[holdingIndexFromAddress(MODBUS_ADDR_CUP1_CHANNEL4_GAIN_LOW_POINT2)] = 177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1_CHANNEL4_GAIN_LOW_POINT3" calcext:value-type="string">
            <text:p>CUP1_CHANNEL4_GAIN_LOW_POINT3</text:p>
          </table:table-cell>
          <table:table-cell table:style-name="ce17" table:formula="of:=[$List.G92]" office:value-type="float" office:value="162" calcext:value-type="float">
            <text:p>162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 office:value-type="float" office:value="1" calcext:value-type="float">
            <text:p>1</text:p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 office:value-type="string" office:string-value="ModbusHoldingRegisters[holdingIndexFromAddress(MODBUS_ADDR_CUP1_CHANNEL4_GAIN_LOW_POINT3)] = 162u;" calcext:value-type="string">
            <text:p>ModbusHoldingRegisters[holdingIndexFromAddress(MODBUS_ADDR_CUP1_CHANNEL4_GAIN_LOW_POINT3)] = 162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1_CHANNEL4_GAIN_HIGH_POINT2" calcext:value-type="string">
            <text:p>CUP1_CHANNEL4_GAIN_HIGH_POINT2</text:p>
          </table:table-cell>
          <table:table-cell table:style-name="ce17" table:formula="of:=[$List.G93]" office:value-type="float" office:value="1719" calcext:value-type="float">
            <text:p>1719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 office:value-type="float" office:value="1" calcext:value-type="float">
            <text:p>1</text:p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 office:value-type="string" office:string-value="ModbusHoldingRegisters[holdingIndexFromAddress(MODBUS_ADDR_CUP1_CHANNEL4_GAIN_HIGH_POINT2)] = 1719u;" calcext:value-type="string">
            <text:p>ModbusHoldingRegisters[holdingIndexFromAddress(MODBUS_ADDR_CUP1_CHANNEL4_GAIN_HIGH_POINT2)] = 1719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1_CHANNEL4_GAIN_HIGH_POINT3" calcext:value-type="string">
            <text:p>CUP1_CHANNEL4_GAIN_HIGH_POINT3</text:p>
          </table:table-cell>
          <table:table-cell table:style-name="ce17" table:formula="of:=[$List.G94]" office:value-type="float" office:value="1566" calcext:value-type="float">
            <text:p>1566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1_CHANNEL4_GAIN_HIGH_POINT3)] = 1566u;" calcext:value-type="string">
            <text:p>ModbusHoldingRegisters[holdingIndexFromAddress(MODBUS_ADDR_CUP1_CHANNEL4_GAIN_HIGH_POINT3)] = 1566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1_CHANNEL4_GAIN_HIGH_POINT4" calcext:value-type="string">
            <text:p>CUP1_CHANNEL4_GAIN_HIGH_POINT4</text:p>
          </table:table-cell>
          <table:table-cell table:style-name="ce17" table:formula="of:=[$List.G95]" office:value-type="float" office:value="22" calcext:value-type="float">
            <text:p>22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1_CHANNEL4_GAIN_HIGH_POINT4)] = 22u;" calcext:value-type="string">
            <text:p>ModbusHoldingRegisters[holdingIndexFromAddress(MODBUS_ADDR_CUP1_CHANNEL4_GAIN_HIGH_POINT4)] = 22u;</text:p>
          </table:table-cell>
        </table:table-row>
        <table:table-row table:style-name="ro1">
          <table:table-cell table:style-name="ce17" table:formula="of:=[$List.B96]" office:value-type="float" office:value="0" calcext:value-type="float">
            <text:p>0</text:p>
          </table:table-cell>
          <table:table-cell table:style-name="ce17" table:formula="of:=[$List.I96]">
            <text:p/>
          </table:table-cell>
          <table:table-cell table:style-name="ce17" table:formula="of:=[$List.G96]" office:value-type="float" office:value="0" calcext:value-type="float">
            <text:p>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>
            <text:p/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>
            <text:p/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2_CHANNEL1_GAIN_LOW_POINT1" calcext:value-type="string">
            <text:p>CUP2_CHANNEL1_GAIN_LOW_POINT1</text:p>
          </table:table-cell>
          <table:table-cell table:style-name="ce17" table:formula="of:=[$List.G97]" office:value-type="float" office:value="1727" calcext:value-type="float">
            <text:p>1727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2_CHANNEL1_GAIN_LOW_POINT1)] = 1727u;" calcext:value-type="string">
            <text:p>ModbusHoldingRegisters[holdingIndexFromAddress(MODBUS_ADDR_CUP2_CHANNEL1_GAIN_LOW_POINT1)] = 1727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2_CHANNEL1_GAIN_LOW_POINT2" calcext:value-type="string">
            <text:p>CUP2_CHANNEL1_GAIN_LOW_POINT2</text:p>
          </table:table-cell>
          <table:table-cell table:style-name="ce17" table:formula="of:=[$List.G98]" office:value-type="float" office:value="185" calcext:value-type="float">
            <text:p>185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2_CHANNEL1_GAIN_LOW_POINT2)] = 185u;" calcext:value-type="string">
            <text:p>ModbusHoldingRegisters[holdingIndexFromAddress(MODBUS_ADDR_CUP2_CHANNEL1_GAIN_LOW_POINT2)] = 185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2_CHANNEL1_GAIN_LOW_POINT3" calcext:value-type="string">
            <text:p>CUP2_CHANNEL1_GAIN_LOW_POINT3</text:p>
          </table:table-cell>
          <table:table-cell table:style-name="ce17" table:formula="of:=[$List.G99]" office:value-type="float" office:value="167" calcext:value-type="float">
            <text:p>167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2_CHANNEL1_GAIN_LOW_POINT3)] = 167u;" calcext:value-type="string">
            <text:p>ModbusHoldingRegisters[holdingIndexFromAddress(MODBUS_ADDR_CUP2_CHANNEL1_GAIN_LOW_POINT3)] = 167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2_CHANNEL1_GAIN_HIGH_POINT2" calcext:value-type="string">
            <text:p>CUP2_CHANNEL1_GAIN_HIGH_POINT2</text:p>
          </table:table-cell>
          <table:table-cell table:style-name="ce17" table:formula="of:=[$List.G100]" office:value-type="float" office:value="1770" calcext:value-type="float">
            <text:p>177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2_CHANNEL1_GAIN_HIGH_POINT2)] = 1770u;" calcext:value-type="string">
            <text:p>ModbusHoldingRegisters[holdingIndexFromAddress(MODBUS_ADDR_CUP2_CHANNEL1_GAIN_HIGH_POINT2)] = 177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2_CHANNEL1_GAIN_HIGH_POINT3" calcext:value-type="string">
            <text:p>CUP2_CHANNEL1_GAIN_HIGH_POINT3</text:p>
          </table:table-cell>
          <table:table-cell table:style-name="ce17" table:formula="of:=[$List.G101]" office:value-type="float" office:value="1625" calcext:value-type="float">
            <text:p>1625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2_CHANNEL1_GAIN_HIGH_POINT3)] = 1625u;" calcext:value-type="string">
            <text:p>ModbusHoldingRegisters[holdingIndexFromAddress(MODBUS_ADDR_CUP2_CHANNEL1_GAIN_HIGH_POINT3)] = 1625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2_CHANNEL1_GAIN_HIGH_POINT4" calcext:value-type="string">
            <text:p>CUP2_CHANNEL1_GAIN_HIGH_POINT4</text:p>
          </table:table-cell>
          <table:table-cell table:style-name="ce17" table:formula="of:=[$List.G102]" office:value-type="float" office:value="75" calcext:value-type="float">
            <text:p>75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2_CHANNEL1_GAIN_HIGH_POINT4)] = 75u;" calcext:value-type="string">
            <text:p>ModbusHoldingRegisters[holdingIndexFromAddress(MODBUS_ADDR_CUP2_CHANNEL1_GAIN_HIGH_POINT4)] = 75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2_CHANNEL2_GAIN_LOW_POINT1" calcext:value-type="string">
            <text:p>CUP2_CHANNEL2_GAIN_LOW_POINT1</text:p>
          </table:table-cell>
          <table:table-cell table:style-name="ce17" table:formula="of:=[$List.G103]" office:value-type="float" office:value="1728" calcext:value-type="float">
            <text:p>1728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2_CHANNEL2_GAIN_LOW_POINT1)] = 1728u;" calcext:value-type="string">
            <text:p>ModbusHoldingRegisters[holdingIndexFromAddress(MODBUS_ADDR_CUP2_CHANNEL2_GAIN_LOW_POINT1)] = 1728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2_CHANNEL2_GAIN_LOW_POINT2" calcext:value-type="string">
            <text:p>CUP2_CHANNEL2_GAIN_LOW_POINT2</text:p>
          </table:table-cell>
          <table:table-cell table:style-name="ce17" table:formula="of:=[$List.G104]" office:value-type="float" office:value="185" calcext:value-type="float">
            <text:p>185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2_CHANNEL2_GAIN_LOW_POINT2)] = 185u;" calcext:value-type="string">
            <text:p>ModbusHoldingRegisters[holdingIndexFromAddress(MODBUS_ADDR_CUP2_CHANNEL2_GAIN_LOW_POINT2)] = 185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2_CHANNEL2_GAIN_LOW_POINT3" calcext:value-type="string">
            <text:p>CUP2_CHANNEL2_GAIN_LOW_POINT3</text:p>
          </table:table-cell>
          <table:table-cell table:style-name="ce17" table:formula="of:=[$List.G105]" office:value-type="float" office:value="169" calcext:value-type="float">
            <text:p>169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2_CHANNEL2_GAIN_LOW_POINT3)] = 169u;" calcext:value-type="string">
            <text:p>ModbusHoldingRegisters[holdingIndexFromAddress(MODBUS_ADDR_CUP2_CHANNEL2_GAIN_LOW_POINT3)] = 169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2_CHANNEL2_GAIN_HIGH_POINT2" calcext:value-type="string">
            <text:p>CUP2_CHANNEL2_GAIN_HIGH_POINT2</text:p>
          </table:table-cell>
          <table:table-cell table:style-name="ce17" table:formula="of:=[$List.G106]" office:value-type="float" office:value="1774" calcext:value-type="float">
            <text:p>1774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2_CHANNEL2_GAIN_HIGH_POINT2)] = 1774u;" calcext:value-type="string">
            <text:p>ModbusHoldingRegisters[holdingIndexFromAddress(MODBUS_ADDR_CUP2_CHANNEL2_GAIN_HIGH_POINT2)] = 1774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2_GAIN_HIGH_POINT3" calcext:value-type="string">
            <text:p>CUP2_CHANNEL2_GAIN_HIGH_POINT3</text:p>
          </table:table-cell>
          <table:table-cell table:style-name="ce17" table:formula="of:=[$List.G107]" office:value-type="float" office:value="1632" calcext:value-type="float">
            <text:p>1632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2_CHANNEL2_GAIN_HIGH_POINT3)] = 1632u;" calcext:value-type="string">
            <text:p>ModbusHoldingRegisters[holdingIndexFromAddress(MODBUS_ADDR_CUP2_CHANNEL2_GAIN_HIGH_POINT3)] = 1632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2_CHANNEL2_GAIN_HIGH_POINT4" calcext:value-type="string">
            <text:p>CUP2_CHANNEL2_GAIN_HIGH_POINT4</text:p>
          </table:table-cell>
          <table:table-cell table:style-name="ce17" table:formula="of:=[$List.G108]" office:value-type="float" office:value="81" calcext:value-type="float">
            <text:p>81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2_CHANNEL2_GAIN_HIGH_POINT4)] = 81u;" calcext:value-type="string">
            <text:p>ModbusHoldingRegisters[holdingIndexFromAddress(MODBUS_ADDR_CUP2_CHANNEL2_GAIN_HIGH_POINT4)] = 81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2_CHANNEL3_GAIN_LOW_POINT1" calcext:value-type="string">
            <text:p>CUP2_CHANNEL3_GAIN_LOW_POINT1</text:p>
          </table:table-cell>
          <table:table-cell table:style-name="ce17" table:formula="of:=[$List.G109]" office:value-type="float" office:value="1718" calcext:value-type="float">
            <text:p>1718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2_CHANNEL3_GAIN_LOW_POINT1)] = 1718u;" calcext:value-type="string">
            <text:p>ModbusHoldingRegisters[holdingIndexFromAddress(MODBUS_ADDR_CUP2_CHANNEL3_GAIN_LOW_POINT1)] = 1718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2_CHANNEL3_GAIN_LOW_POINT2" calcext:value-type="string">
            <text:p>CUP2_CHANNEL3_GAIN_LOW_POINT2</text:p>
          </table:table-cell>
          <table:table-cell table:style-name="ce17" table:formula="of:=[$List.G110]" office:value-type="float" office:value="176" calcext:value-type="float">
            <text:p>176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2_CHANNEL3_GAIN_LOW_POINT2)] = 176u;" calcext:value-type="string">
            <text:p>ModbusHoldingRegisters[holdingIndexFromAddress(MODBUS_ADDR_CUP2_CHANNEL3_GAIN_LOW_POINT2)] = 176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2_CHANNEL3_GAIN_LOW_POINT3" calcext:value-type="string">
            <text:p>CUP2_CHANNEL3_GAIN_LOW_POINT3</text:p>
          </table:table-cell>
          <table:table-cell table:style-name="ce17" table:formula="of:=[$List.G111]" office:value-type="float" office:value="163" calcext:value-type="float">
            <text:p>163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2_CHANNEL3_GAIN_LOW_POINT3)] = 163u;" calcext:value-type="string">
            <text:p>ModbusHoldingRegisters[holdingIndexFromAddress(MODBUS_ADDR_CUP2_CHANNEL3_GAIN_LOW_POINT3)] = 163u;</text:p>
          </table:table-cell>
        </table:table-row>
        <table:table-row table:style-name="ro1">
          <table:table-cell table:style-name="ce17" table:formula="of:=[$List.B112]" office:value-type="string" office:string-value="holding reg." calcext:value-type="string">
            <text:p>holding reg.</text:p>
          </table:table-cell>
          <table:table-cell table:style-name="ce17" table:formula="of:=[$List.I112]" office:value-type="string" office:string-value="CUP2_CHANNEL3_GAIN_HIGH_POINT2" calcext:value-type="string">
            <text:p>CUP2_CHANNEL3_GAIN_HIGH_POINT2</text:p>
          </table:table-cell>
          <table:table-cell table:style-name="ce17" table:formula="of:=[$List.G112]" office:value-type="float" office:value="1713" calcext:value-type="float">
            <text:p>1713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 office:value-type="float" office:value="1" calcext:value-type="float">
            <text:p>1</text:p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 office:value-type="string" office:string-value="ModbusHoldingRegisters[holdingIndexFromAddress(MODBUS_ADDR_CUP2_CHANNEL3_GAIN_HIGH_POINT2)] = 1713u;" calcext:value-type="string">
            <text:p>ModbusHoldingRegisters[holdingIndexFromAddress(MODBUS_ADDR_CUP2_CHANNEL3_GAIN_HIGH_POINT2)] = 1713u;</text:p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CUP2_CHANNEL3_GAIN_HIGH_POINT3" calcext:value-type="string">
            <text:p>CUP2_CHANNEL3_GAIN_HIGH_POINT3</text:p>
          </table:table-cell>
          <table:table-cell table:style-name="ce17" table:formula="of:=[$List.G113]" office:value-type="float" office:value="1558" calcext:value-type="float">
            <text:p>1558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CUP2_CHANNEL3_GAIN_HIGH_POINT3)] = 1558u;" calcext:value-type="string">
            <text:p>ModbusHoldingRegisters[holdingIndexFromAddress(MODBUS_ADDR_CUP2_CHANNEL3_GAIN_HIGH_POINT3)] = 1558u;</text:p>
          </table:table-cell>
        </table:table-row>
        <table:table-row table:style-name="ro1">
          <table:table-cell table:style-name="ce17" table:formula="of:=[$List.B114]" office:value-type="string" office:string-value="holding reg." calcext:value-type="string">
            <text:p>holding reg.</text:p>
          </table:table-cell>
          <table:table-cell table:style-name="ce17" table:formula="of:=[$List.I114]" office:value-type="string" office:string-value="CUP2_CHANNEL3_GAIN_HIGH_POINT4" calcext:value-type="string">
            <text:p>CUP2_CHANNEL3_GAIN_HIGH_POINT4</text:p>
          </table:table-cell>
          <table:table-cell table:style-name="ce17" table:formula="of:=[$List.G114]" office:value-type="float" office:value="22" calcext:value-type="float">
            <text:p>22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 office:value-type="float" office:value="1" calcext:value-type="float">
            <text:p>1</text:p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 office:value-type="string" office:string-value="ModbusHoldingRegisters[holdingIndexFromAddress(MODBUS_ADDR_CUP2_CHANNEL3_GAIN_HIGH_POINT4)] = 22u;" calcext:value-type="string">
            <text:p>ModbusHoldingRegisters[holdingIndexFromAddress(MODBUS_ADDR_CUP2_CHANNEL3_GAIN_HIGH_POINT4)] = 22u;</text:p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2_CHANNEL4_GAIN_LOW_POINT1" calcext:value-type="string">
            <text:p>CUP2_CHANNEL4_GAIN_LOW_POINT1</text:p>
          </table:table-cell>
          <table:table-cell table:style-name="ce17" table:formula="of:=[$List.G115]" office:value-type="float" office:value="1741" calcext:value-type="float">
            <text:p>1741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 office:value-type="float" office:value="1" calcext:value-type="float">
            <text:p>1</text:p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 office:value-type="string" office:string-value="ModbusHoldingRegisters[holdingIndexFromAddress(MODBUS_ADDR_CUP2_CHANNEL4_GAIN_LOW_POINT1)] = 1741u;" calcext:value-type="string">
            <text:p>ModbusHoldingRegisters[holdingIndexFromAddress(MODBUS_ADDR_CUP2_CHANNEL4_GAIN_LOW_POINT1)] = 1741u;</text:p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CUP2_CHANNEL4_GAIN_LOW_POINT2" calcext:value-type="string">
            <text:p>CUP2_CHANNEL4_GAIN_LOW_POINT2</text:p>
          </table:table-cell>
          <table:table-cell table:style-name="ce17" table:formula="of:=[$List.G116]" office:value-type="float" office:value="198" calcext:value-type="float">
            <text:p>198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 office:value-type="float" office:value="1" calcext:value-type="float">
            <text:p>1</text:p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 office:value-type="string" office:string-value="ModbusHoldingRegisters[holdingIndexFromAddress(MODBUS_ADDR_CUP2_CHANNEL4_GAIN_LOW_POINT2)] = 198u;" calcext:value-type="string">
            <text:p>ModbusHoldingRegisters[holdingIndexFromAddress(MODBUS_ADDR_CUP2_CHANNEL4_GAIN_LOW_POINT2)] = 198u;</text:p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CUP2_CHANNEL4_GAIN_LOW_POINT3" calcext:value-type="string">
            <text:p>CUP2_CHANNEL4_GAIN_LOW_POINT3</text:p>
          </table:table-cell>
          <table:table-cell table:style-name="ce17" table:formula="of:=[$List.G117]" office:value-type="float" office:value="182" calcext:value-type="float">
            <text:p>182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 office:value-type="float" office:value="1" calcext:value-type="float">
            <text:p>1</text:p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 office:value-type="string" office:string-value="ModbusHoldingRegisters[holdingIndexFromAddress(MODBUS_ADDR_CUP2_CHANNEL4_GAIN_LOW_POINT3)] = 182u;" calcext:value-type="string">
            <text:p>ModbusHoldingRegisters[holdingIndexFromAddress(MODBUS_ADDR_CUP2_CHANNEL4_GAIN_LOW_POINT3)] = 182u;</text:p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2_CHANNEL4_GAIN_HIGH_POINT2" calcext:value-type="string">
            <text:p>CUP2_CHANNEL4_GAIN_HIGH_POINT2</text:p>
          </table:table-cell>
          <table:table-cell table:style-name="ce17" table:formula="of:=[$List.G118]" office:value-type="float" office:value="1851" calcext:value-type="float">
            <text:p>1851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 office:value-type="float" office:value="1" calcext:value-type="float">
            <text:p>1</text:p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 office:value-type="string" office:string-value="ModbusHoldingRegisters[holdingIndexFromAddress(MODBUS_ADDR_CUP2_CHANNEL4_GAIN_HIGH_POINT2)] = 1851u;" calcext:value-type="string">
            <text:p>ModbusHoldingRegisters[holdingIndexFromAddress(MODBUS_ADDR_CUP2_CHANNEL4_GAIN_HIGH_POINT2)] = 1851u;</text:p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2_CHANNEL4_GAIN_HIGH_POINT3" calcext:value-type="string">
            <text:p>CUP2_CHANNEL4_GAIN_HIGH_POINT3</text:p>
          </table:table-cell>
          <table:table-cell table:style-name="ce17" table:formula="of:=[$List.G119]" office:value-type="float" office:value="1752" calcext:value-type="float">
            <text:p>1752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 office:value-type="float" office:value="1" calcext:value-type="float">
            <text:p>1</text:p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 office:value-type="string" office:string-value="ModbusHoldingRegisters[holdingIndexFromAddress(MODBUS_ADDR_CUP2_CHANNEL4_GAIN_HIGH_POINT3)] = 1752u;" calcext:value-type="string">
            <text:p>ModbusHoldingRegisters[holdingIndexFromAddress(MODBUS_ADDR_CUP2_CHANNEL4_GAIN_HIGH_POINT3)] = 1752u;</text:p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2_CHANNEL4_GAIN_HIGH_POINT4" calcext:value-type="string">
            <text:p>CUP2_CHANNEL4_GAIN_HIGH_POINT4</text:p>
          </table:table-cell>
          <table:table-cell table:style-name="ce17" table:formula="of:=[$List.G120]" office:value-type="float" office:value="213" calcext:value-type="float">
            <text:p>213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 office:value-type="float" office:value="1" calcext:value-type="float">
            <text:p>1</text:p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 office:value-type="string" office:string-value="ModbusHoldingRegisters[holdingIndexFromAddress(MODBUS_ADDR_CUP2_CHANNEL4_GAIN_HIGH_POINT4)] = 213u;" calcext:value-type="string">
            <text:p>ModbusHoldingRegisters[holdingIndexFromAddress(MODBUS_ADDR_CUP2_CHANNEL4_GAIN_HIGH_POINT4)] = 213u;</text:p>
          </table:table-cell>
        </table:table-row>
        <table:table-row table:style-name="ro1">
          <table:table-cell table:style-name="ce17" table:formula="of:=[$List.B121]" office:value-type="float" office:value="0" calcext:value-type="float">
            <text:p>0</text:p>
          </table:table-cell>
          <table:table-cell table:style-name="ce17" table:formula="of:=[$List.I121]" office:value-type="float" office:value="0" calcext:value-type="float">
            <text:p>0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3_CHANNEL1_GAIN_LOW_POINT1" calcext:value-type="string">
            <text:p>CUP3_CHANNEL1_GAIN_LOW_POINT1</text:p>
          </table:table-cell>
          <table:table-cell table:style-name="ce17" table:formula="of:=[$List.G122]" office:value-type="float" office:value="1725" calcext:value-type="float">
            <text:p>1725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 office:value-type="float" office:value="1" calcext:value-type="float">
            <text:p>1</text:p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 office:value-type="string" office:string-value="ModbusHoldingRegisters[holdingIndexFromAddress(MODBUS_ADDR_CUP3_CHANNEL1_GAIN_LOW_POINT1)] = 1725u;" calcext:value-type="string">
            <text:p>ModbusHoldingRegisters[holdingIndexFromAddress(MODBUS_ADDR_CUP3_CHANNEL1_GAIN_LOW_POINT1)] = 1725u;</text:p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3_CHANNEL1_GAIN_LOW_POINT2" calcext:value-type="string">
            <text:p>CUP3_CHANNEL1_GAIN_LOW_POINT2</text:p>
          </table:table-cell>
          <table:table-cell table:style-name="ce17" table:formula="of:=[$List.G123]" office:value-type="float" office:value="181" calcext:value-type="float">
            <text:p>181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 office:value-type="float" office:value="1" calcext:value-type="float">
            <text:p>1</text:p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 office:value-type="string" office:string-value="ModbusHoldingRegisters[holdingIndexFromAddress(MODBUS_ADDR_CUP3_CHANNEL1_GAIN_LOW_POINT2)] = 181u;" calcext:value-type="string">
            <text:p>ModbusHoldingRegisters[holdingIndexFromAddress(MODBUS_ADDR_CUP3_CHANNEL1_GAIN_LOW_POINT2)] = 181u;</text:p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3_CHANNEL1_GAIN_LOW_POINT3" calcext:value-type="string">
            <text:p>CUP3_CHANNEL1_GAIN_LOW_POINT3</text:p>
          </table:table-cell>
          <table:table-cell table:style-name="ce17" table:formula="of:=[$List.G124]" office:value-type="float" office:value="165" calcext:value-type="float">
            <text:p>165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 office:value-type="float" office:value="1" calcext:value-type="float">
            <text:p>1</text:p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 office:value-type="string" office:string-value="ModbusHoldingRegisters[holdingIndexFromAddress(MODBUS_ADDR_CUP3_CHANNEL1_GAIN_LOW_POINT3)] = 165u;" calcext:value-type="string">
            <text:p>ModbusHoldingRegisters[holdingIndexFromAddress(MODBUS_ADDR_CUP3_CHANNEL1_GAIN_LOW_POINT3)] = 165u;</text:p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3_CHANNEL1_GAIN_HIGH_POINT2" calcext:value-type="string">
            <text:p>CUP3_CHANNEL1_GAIN_HIGH_POINT2</text:p>
          </table:table-cell>
          <table:table-cell table:style-name="ce17" table:formula="of:=[$List.G125]" office:value-type="float" office:value="1751" calcext:value-type="float">
            <text:p>1751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 office:value-type="float" office:value="1" calcext:value-type="float">
            <text:p>1</text:p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 office:value-type="string" office:string-value="ModbusHoldingRegisters[holdingIndexFromAddress(MODBUS_ADDR_CUP3_CHANNEL1_GAIN_HIGH_POINT2)] = 1751u;" calcext:value-type="string">
            <text:p>ModbusHoldingRegisters[holdingIndexFromAddress(MODBUS_ADDR_CUP3_CHANNEL1_GAIN_HIGH_POINT2)] = 1751u;</text:p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1_GAIN_HIGH_POINT3" calcext:value-type="string">
            <text:p>CUP3_CHANNEL1_GAIN_HIGH_POINT3</text:p>
          </table:table-cell>
          <table:table-cell table:style-name="ce17" table:formula="of:=[$List.G126]" office:value-type="float" office:value="1603" calcext:value-type="float">
            <text:p>1603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 office:value-type="float" office:value="1" calcext:value-type="float">
            <text:p>1</text:p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 office:value-type="string" office:string-value="ModbusHoldingRegisters[holdingIndexFromAddress(MODBUS_ADDR_CUP3_CHANNEL1_GAIN_HIGH_POINT3)] = 1603u;" calcext:value-type="string">
            <text:p>ModbusHoldingRegisters[holdingIndexFromAddress(MODBUS_ADDR_CUP3_CHANNEL1_GAIN_HIGH_POINT3)] = 1603u;</text:p>
          </table:table-cell>
        </table:table-row>
        <table:table-row table:style-name="ro1">
          <table:table-cell table:style-name="ce17" table:formula="of:=[$List.B127]" office:value-type="string" office:string-value="holding reg." calcext:value-type="string">
            <text:p>holding reg.</text:p>
          </table:table-cell>
          <table:table-cell table:style-name="ce17" table:formula="of:=[$List.I127]" office:value-type="string" office:string-value="CUP3_CHANNEL1_GAIN_HIGH_POINT4" calcext:value-type="string">
            <text:p>CUP3_CHANNEL1_GAIN_HIGH_POINT4</text:p>
          </table:table-cell>
          <table:table-cell table:style-name="ce17" table:formula="of:=[$List.G127]" office:value-type="float" office:value="55" calcext:value-type="float">
            <text:p>55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 office:value-type="float" office:value="1" calcext:value-type="float">
            <text:p>1</text:p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 office:value-type="string" office:string-value="ModbusHoldingRegisters[holdingIndexFromAddress(MODBUS_ADDR_CUP3_CHANNEL1_GAIN_HIGH_POINT4)] = 55u;" calcext:value-type="string">
            <text:p>ModbusHoldingRegisters[holdingIndexFromAddress(MODBUS_ADDR_CUP3_CHANNEL1_GAIN_HIGH_POINT4)] = 55u;</text:p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3_CHANNEL2_GAIN_LOW_POINT1" calcext:value-type="string">
            <text:p>CUP3_CHANNEL2_GAIN_LOW_POINT1</text:p>
          </table:table-cell>
          <table:table-cell table:style-name="ce17" table:formula="of:=[$List.G128]" office:value-type="float" office:value="1724" calcext:value-type="float">
            <text:p>1724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 office:value-type="float" office:value="1" calcext:value-type="float">
            <text:p>1</text:p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 office:value-type="string" office:string-value="ModbusHoldingRegisters[holdingIndexFromAddress(MODBUS_ADDR_CUP3_CHANNEL2_GAIN_LOW_POINT1)] = 1724u;" calcext:value-type="string">
            <text:p>ModbusHoldingRegisters[holdingIndexFromAddress(MODBUS_ADDR_CUP3_CHANNEL2_GAIN_LOW_POINT1)] = 1724u;</text:p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3_CHANNEL2_GAIN_LOW_POINT2" calcext:value-type="string">
            <text:p>CUP3_CHANNEL2_GAIN_LOW_POINT2</text:p>
          </table:table-cell>
          <table:table-cell table:style-name="ce17" table:formula="of:=[$List.G129]" office:value-type="float" office:value="181" calcext:value-type="float">
            <text:p>181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 office:value-type="float" office:value="1" calcext:value-type="float">
            <text:p>1</text:p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 office:value-type="string" office:string-value="ModbusHoldingRegisters[holdingIndexFromAddress(MODBUS_ADDR_CUP3_CHANNEL2_GAIN_LOW_POINT2)] = 181u;" calcext:value-type="string">
            <text:p>ModbusHoldingRegisters[holdingIndexFromAddress(MODBUS_ADDR_CUP3_CHANNEL2_GAIN_LOW_POINT2)] = 181u;</text:p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3_CHANNEL2_GAIN_LOW_POINT3" calcext:value-type="string">
            <text:p>CUP3_CHANNEL2_GAIN_LOW_POINT3</text:p>
          </table:table-cell>
          <table:table-cell table:style-name="ce17" table:formula="of:=[$List.G130]" office:value-type="float" office:value="166" calcext:value-type="float">
            <text:p>166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 office:value-type="float" office:value="1" calcext:value-type="float">
            <text:p>1</text:p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 office:value-type="string" office:string-value="ModbusHoldingRegisters[holdingIndexFromAddress(MODBUS_ADDR_CUP3_CHANNEL2_GAIN_LOW_POINT3)] = 166u;" calcext:value-type="string">
            <text:p>ModbusHoldingRegisters[holdingIndexFromAddress(MODBUS_ADDR_CUP3_CHANNEL2_GAIN_LOW_POINT3)] = 166u;</text:p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3_CHANNEL2_GAIN_HIGH_POINT2" calcext:value-type="string">
            <text:p>CUP3_CHANNEL2_GAIN_HIGH_POINT2</text:p>
          </table:table-cell>
          <table:table-cell table:style-name="ce17" table:formula="of:=[$List.G131]" office:value-type="float" office:value="1756" calcext:value-type="float">
            <text:p>1756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 office:value-type="float" office:value="1" calcext:value-type="float">
            <text:p>1</text:p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 office:value-type="string" office:string-value="ModbusHoldingRegisters[holdingIndexFromAddress(MODBUS_ADDR_CUP3_CHANNEL2_GAIN_HIGH_POINT2)] = 1756u;" calcext:value-type="string">
            <text:p>ModbusHoldingRegisters[holdingIndexFromAddress(MODBUS_ADDR_CUP3_CHANNEL2_GAIN_HIGH_POINT2)] = 1756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3_CHANNEL2_GAIN_HIGH_POINT3" calcext:value-type="string">
            <text:p>CUP3_CHANNEL2_GAIN_HIGH_POINT3</text:p>
          </table:table-cell>
          <table:table-cell table:style-name="ce17" table:formula="of:=[$List.G132]" office:value-type="float" office:value="1608" calcext:value-type="float">
            <text:p>1608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 office:value-type="float" office:value="1" calcext:value-type="float">
            <text:p>1</text:p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 office:value-type="string" office:string-value="ModbusHoldingRegisters[holdingIndexFromAddress(MODBUS_ADDR_CUP3_CHANNEL2_GAIN_HIGH_POINT3)] = 1608u;" calcext:value-type="string">
            <text:p>ModbusHoldingRegisters[holdingIndexFromAddress(MODBUS_ADDR_CUP3_CHANNEL2_GAIN_HIGH_POINT3)] = 1608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3_CHANNEL2_GAIN_HIGH_POINT4" calcext:value-type="string">
            <text:p>CUP3_CHANNEL2_GAIN_HIGH_POINT4</text:p>
          </table:table-cell>
          <table:table-cell table:style-name="ce17" table:formula="of:=[$List.G133]" office:value-type="float" office:value="59" calcext:value-type="float">
            <text:p>59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 office:value-type="float" office:value="1" calcext:value-type="float">
            <text:p>1</text:p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 office:value-type="string" office:string-value="ModbusHoldingRegisters[holdingIndexFromAddress(MODBUS_ADDR_CUP3_CHANNEL2_GAIN_HIGH_POINT4)] = 59u;" calcext:value-type="string">
            <text:p>ModbusHoldingRegisters[holdingIndexFromAddress(MODBUS_ADDR_CUP3_CHANNEL2_GAIN_HIGH_POINT4)] = 59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3_CHANNEL3_GAIN_LOW_POINT1" calcext:value-type="string">
            <text:p>CUP3_CHANNEL3_GAIN_LOW_POINT1</text:p>
          </table:table-cell>
          <table:table-cell table:style-name="ce17" table:formula="of:=[$List.G134]" office:value-type="float" office:value="1724" calcext:value-type="float">
            <text:p>1724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3_CHANNEL3_GAIN_LOW_POINT1)] = 1724u;" calcext:value-type="string">
            <text:p>ModbusHoldingRegisters[holdingIndexFromAddress(MODBUS_ADDR_CUP3_CHANNEL3_GAIN_LOW_POINT1)] = 1724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3_CHANNEL3_GAIN_LOW_POINT2" calcext:value-type="string">
            <text:p>CUP3_CHANNEL3_GAIN_LOW_POINT2</text:p>
          </table:table-cell>
          <table:table-cell table:style-name="ce17" table:formula="of:=[$List.G135]" office:value-type="float" office:value="180" calcext:value-type="float">
            <text:p>180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3_CHANNEL3_GAIN_LOW_POINT2)] = 180u;" calcext:value-type="string">
            <text:p>ModbusHoldingRegisters[holdingIndexFromAddress(MODBUS_ADDR_CUP3_CHANNEL3_GAIN_LOW_POINT2)] = 180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3_CHANNEL3_GAIN_LOW_POINT3" calcext:value-type="string">
            <text:p>CUP3_CHANNEL3_GAIN_LOW_POINT3</text:p>
          </table:table-cell>
          <table:table-cell table:style-name="ce17" table:formula="of:=[$List.G136]" office:value-type="float" office:value="165" calcext:value-type="float">
            <text:p>16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3_CHANNEL3_GAIN_LOW_POINT3)] = 165u;" calcext:value-type="string">
            <text:p>ModbusHoldingRegisters[holdingIndexFromAddress(MODBUS_ADDR_CUP3_CHANNEL3_GAIN_LOW_POINT3)] = 16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3_CHANNEL3_GAIN_HIGH_POINT2" calcext:value-type="string">
            <text:p>CUP3_CHANNEL3_GAIN_HIGH_POINT2</text:p>
          </table:table-cell>
          <table:table-cell table:style-name="ce17" table:formula="of:=[$List.G137]" office:value-type="float" office:value="1746" calcext:value-type="float">
            <text:p>1746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3_CHANNEL3_GAIN_HIGH_POINT2)] = 1746u;" calcext:value-type="string">
            <text:p>ModbusHoldingRegisters[holdingIndexFromAddress(MODBUS_ADDR_CUP3_CHANNEL3_GAIN_HIGH_POINT2)] = 1746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3_CHANNEL3_GAIN_HIGH_POINT3" calcext:value-type="string">
            <text:p>CUP3_CHANNEL3_GAIN_HIGH_POINT3</text:p>
          </table:table-cell>
          <table:table-cell table:style-name="ce17" table:formula="of:=[$List.G138]" office:value-type="float" office:value="1595" calcext:value-type="float">
            <text:p>159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3_CHANNEL3_GAIN_HIGH_POINT3)] = 1595u;" calcext:value-type="string">
            <text:p>ModbusHoldingRegisters[holdingIndexFromAddress(MODBUS_ADDR_CUP3_CHANNEL3_GAIN_HIGH_POINT3)] = 159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3_GAIN_HIGH_POINT4" calcext:value-type="string">
            <text:p>CUP3_CHANNEL3_GAIN_HIGH_POINT4</text:p>
          </table:table-cell>
          <table:table-cell table:style-name="ce17" table:formula="of:=[$List.G139]" office:value-type="float" office:value="49" calcext:value-type="float">
            <text:p>49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3_CHANNEL3_GAIN_HIGH_POINT4)] = 49u;" calcext:value-type="string">
            <text:p>ModbusHoldingRegisters[holdingIndexFromAddress(MODBUS_ADDR_CUP3_CHANNEL3_GAIN_HIGH_POINT4)] = 49u;</text:p>
          </table:table-cell>
        </table:table-row>
        <table:table-row table:style-name="ro1">
          <table:table-cell table:style-name="ce17" table:formula="of:=[$List.B140]" office:value-type="string" office:string-value="holding reg." calcext:value-type="string">
            <text:p>holding reg.</text:p>
          </table:table-cell>
          <table:table-cell table:style-name="ce17" table:formula="of:=[$List.I140]" office:value-type="string" office:string-value="CUP3_CHANNEL4_GAIN_LOW_POINT1" calcext:value-type="string">
            <text:p>CUP3_CHANNEL4_GAIN_LOW_POINT1</text:p>
          </table:table-cell>
          <table:table-cell table:style-name="ce17" table:formula="of:=[$List.G140]" office:value-type="float" office:value="1724" calcext:value-type="float">
            <text:p>1724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 office:value-type="float" office:value="1" calcext:value-type="float">
            <text:p>1</text:p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 office:value-type="string" office:string-value="ModbusHoldingRegisters[holdingIndexFromAddress(MODBUS_ADDR_CUP3_CHANNEL4_GAIN_LOW_POINT1)] = 1724u;" calcext:value-type="string">
            <text:p>ModbusHoldingRegisters[holdingIndexFromAddress(MODBUS_ADDR_CUP3_CHANNEL4_GAIN_LOW_POINT1)] = 1724u;</text:p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CUP3_CHANNEL4_GAIN_LOW_POINT2" calcext:value-type="string">
            <text:p>CUP3_CHANNEL4_GAIN_LOW_POINT2</text:p>
          </table:table-cell>
          <table:table-cell table:style-name="ce17" table:formula="of:=[$List.G141]" office:value-type="float" office:value="181" calcext:value-type="float">
            <text:p>181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CUP3_CHANNEL4_GAIN_LOW_POINT2)] = 181u;" calcext:value-type="string">
            <text:p>ModbusHoldingRegisters[holdingIndexFromAddress(MODBUS_ADDR_CUP3_CHANNEL4_GAIN_LOW_POINT2)] = 181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CUP3_CHANNEL4_GAIN_LOW_POINT3" calcext:value-type="string">
            <text:p>CUP3_CHANNEL4_GAIN_LOW_POINT3</text:p>
          </table:table-cell>
          <table:table-cell table:style-name="ce17" table:formula="of:=[$List.G142]" office:value-type="float" office:value="164" calcext:value-type="float">
            <text:p>164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 office:value-type="float" office:value="1" calcext:value-type="float">
            <text:p>1</text:p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 office:value-type="string" office:string-value="ModbusHoldingRegisters[holdingIndexFromAddress(MODBUS_ADDR_CUP3_CHANNEL4_GAIN_LOW_POINT3)] = 164u;" calcext:value-type="string">
            <text:p>ModbusHoldingRegisters[holdingIndexFromAddress(MODBUS_ADDR_CUP3_CHANNEL4_GAIN_LOW_POINT3)] = 164u;</text:p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CUP3_CHANNEL4_GAIN_HIGH_POINT2" calcext:value-type="string">
            <text:p>CUP3_CHANNEL4_GAIN_HIGH_POINT2</text:p>
          </table:table-cell>
          <table:table-cell table:style-name="ce17" table:formula="of:=[$List.G143]" office:value-type="float" office:value="1744" calcext:value-type="float">
            <text:p>1744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CUP3_CHANNEL4_GAIN_HIGH_POINT2)] = 1744u;" calcext:value-type="string">
            <text:p>ModbusHoldingRegisters[holdingIndexFromAddress(MODBUS_ADDR_CUP3_CHANNEL4_GAIN_HIGH_POINT2)] = 1744u;</text:p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CUP3_CHANNEL4_GAIN_HIGH_POINT3" calcext:value-type="string">
            <text:p>CUP3_CHANNEL4_GAIN_HIGH_POINT3</text:p>
          </table:table-cell>
          <table:table-cell table:style-name="ce17" table:formula="of:=[$List.G144]" office:value-type="float" office:value="1593" calcext:value-type="float">
            <text:p>1593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 office:value-type="float" office:value="1" calcext:value-type="float">
            <text:p>1</text:p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 office:value-type="string" office:string-value="ModbusHoldingRegisters[holdingIndexFromAddress(MODBUS_ADDR_CUP3_CHANNEL4_GAIN_HIGH_POINT3)] = 1593u;" calcext:value-type="string">
            <text:p>ModbusHoldingRegisters[holdingIndexFromAddress(MODBUS_ADDR_CUP3_CHANNEL4_GAIN_HIGH_POINT3)] = 1593u;</text:p>
          </table:table-cell>
        </table:table-row>
        <table:table-row table:style-name="ro1">
          <table:table-cell table:style-name="ce17" table:formula="of:=[$List.B145]" office:value-type="string" office:string-value="holding reg." calcext:value-type="string">
            <text:p>holding reg.</text:p>
          </table:table-cell>
          <table:table-cell table:style-name="ce17" table:formula="of:=[$List.I145]" office:value-type="string" office:string-value="CUP3_CHANNEL4_GAIN_HIGH_POINT4" calcext:value-type="string">
            <text:p>CUP3_CHANNEL4_GAIN_HIGH_POINT4</text:p>
          </table:table-cell>
          <table:table-cell table:style-name="ce17" table:formula="of:=[$List.G145]" office:value-type="float" office:value="44" calcext:value-type="float">
            <text:p>44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 office:value-type="float" office:value="1" calcext:value-type="float">
            <text:p>1</text:p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 office:value-type="string" office:string-value="ModbusHoldingRegisters[holdingIndexFromAddress(MODBUS_ADDR_CUP3_CHANNEL4_GAIN_HIGH_POINT4)] = 44u;" calcext:value-type="string">
            <text:p>ModbusHoldingRegisters[holdingIndexFromAddress(MODBUS_ADDR_CUP3_CHANNEL4_GAIN_HIGH_POINT4)] = 44u;</text:p>
          </table:table-cell>
        </table:table-row>
        <table:table-row table:style-name="ro1">
          <table:table-cell table:style-name="ce17" table:formula="of:=[$List.B146]" office:value-type="float" office:value="0" calcext:value-type="float">
            <text:p>0</text:p>
          </table:table-cell>
          <table:table-cell table:style-name="ce17" table:formula="of:=[$List.I146]" office:value-type="float" office:value="0" calcext:value-type="float">
            <text:p>0</text:p>
          </table:table-cell>
          <table:table-cell table:style-name="ce17" table:formula="of:=[$List.G146]" office:value-type="float" office:value="0" calcext:value-type="float">
            <text:p>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>
            <text:p/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>
            <text:p/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CUP1_CHANNEL1_LOWER_LIMIT" calcext:value-type="string">
            <text:p>CUP1_CHANNEL1_LOWER_LIMIT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>
            <text:p/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>
            <text:p/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CUP1_CHANNEL2_LOWER_LIMIT" calcext:value-type="string">
            <text:p>CUP1_CHANNEL2_LOWER_LIMIT</text:p>
          </table:table-cell>
          <table:table-cell table:style-name="ce17" table:formula="of:=[$List.G148]" office:value-type="float" office:value="0" calcext:value-type="float">
            <text:p>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>
            <text:p/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>
            <text:p/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CUP1_CHANNEL3_LOWER_LIMIT" calcext:value-type="string">
            <text:p>CUP1_CHANNEL3_LOWER_LIMIT</text:p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>
            <text:p/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>
            <text:p/>
          </table:table-cell>
        </table:table-row>
        <table:table-row table:style-name="ro1">
          <table:table-cell table:style-name="ce17" table:formula="of:=[$List.B150]" office:value-type="string" office:string-value="holding reg." calcext:value-type="string">
            <text:p>holding reg.</text:p>
          </table:table-cell>
          <table:table-cell table:style-name="ce17" table:formula="of:=[$List.I150]" office:value-type="string" office:string-value="CUP1_CHANNEL4_LOWER_LIMIT" calcext:value-type="string">
            <text:p>CUP1_CHANNEL4_LOWER_LIMIT</text:p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CUP2_CHANNEL1_LOWER_LIMIT" calcext:value-type="string">
            <text:p>CUP2_CHANNEL1_LOWER_LIMIT</text:p>
          </table:table-cell>
          <table:table-cell table:style-name="ce17" table:formula="of:=[$List.G151]" office:value-type="float" office:value="0" calcext:value-type="float">
            <text:p>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>
            <text:p/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>
            <text:p/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CUP2_CHANNEL2_LOWER_LIMIT" calcext:value-type="string">
            <text:p>CUP2_CHANNEL2_LOWER_LIMIT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>
            <text:p/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>
            <text:p/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CUP2_CHANNEL3_LOWER_LIMIT" calcext:value-type="string">
            <text:p>CUP2_CHANNEL3_LOWER_LIMIT</text:p>
          </table:table-cell>
          <table:table-cell table:style-name="ce17" table:formula="of:=[$List.G153]" office:value-type="float" office:value="0" calcext:value-type="float">
            <text:p>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>
            <text:p/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>
            <text:p/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CUP2_CHANNEL4_LOWER_LIMIT" calcext:value-type="string">
            <text:p>CUP2_CHANNEL4_LOWER_LIMIT</text:p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>
            <text:p/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CUP3_CHANNEL1_LOWER_LIMIT" calcext:value-type="string">
            <text:p>CUP3_CHANNEL1_LOWER_LIMIT</text:p>
          </table:table-cell>
          <table:table-cell table:style-name="ce17" table:formula="of:=[$List.G155]" office:value-type="float" office:value="0" calcext:value-type="float">
            <text:p>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>
            <text:p/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>
            <text:p/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CUP3_CHANNEL2_LOWER_LIMIT" calcext:value-type="string">
            <text:p>CUP3_CHANNEL2_LOWER_LIMIT</text:p>
          </table:table-cell>
          <table:table-cell table:style-name="ce17" table:formula="of:=[$List.G156]" office:value-type="float" office:value="0" calcext:value-type="float">
            <text:p>0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>
            <text:p/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>
            <text:p/>
          </table:table-cell>
        </table:table-row>
        <table:table-row table:style-name="ro1">
          <table:table-cell table:style-name="ce17" table:formula="of:=[$List.B157]" office:value-type="string" office:string-value="holding reg." calcext:value-type="string">
            <text:p>holding reg.</text:p>
          </table:table-cell>
          <table:table-cell table:style-name="ce17" table:formula="of:=[$List.I157]" office:value-type="string" office:string-value="CUP3_CHANNEL3_LOWER_LIMIT" calcext:value-type="string">
            <text:p>CUP3_CHANNEL3_LOWER_LIMIT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>
            <text:p/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CUP3_CHANNEL4_LOWER_LIMIT" calcext:value-type="string">
            <text:p>CUP3_CHANNEL4_LOWER_LIMIT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9]" office:value-type="float" office:value="0" calcext:value-type="float">
            <text:p>0</text:p>
          </table:table-cell>
          <table:table-cell table:style-name="ce17" table:formula="of:=[$List.I159]">
            <text:p/>
          </table:table-cell>
          <table:table-cell table:style-name="ce17" table:formula="of:=[$List.G159]" office:value-type="float" office:value="0" calcext:value-type="float">
            <text:p>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>
            <text:p/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>
            <text:p/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CUP1_CHANNEL1_UPPER_LIMIT" calcext:value-type="string">
            <text:p>CUP1_CHANNEL1_UPPER_LIMIT</text:p>
          </table:table-cell>
          <table:table-cell table:style-name="ce17" table:formula="of:=[$List.G160]" office:value-type="float" office:value="65535" calcext:value-type="float">
            <text:p>65535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 office:value-type="float" office:value="1" calcext:value-type="float">
            <text:p>1</text:p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CUP1_CHANNEL2_UPPER_LIMIT" calcext:value-type="string">
            <text:p>CUP1_CHANNEL2_UPPER_LIMIT</text:p>
          </table:table-cell>
          <table:table-cell table:style-name="ce17" table:formula="of:=[$List.G161]" office:value-type="float" office:value="65535" calcext:value-type="float">
            <text:p>65535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 office:value-type="float" office:value="1" calcext:value-type="float">
            <text:p>1</text:p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CUP1_CHANNEL3_UPPER_LIMIT" calcext:value-type="string">
            <text:p>CUP1_CHANNEL3_UPPER_LIMIT</text:p>
          </table:table-cell>
          <table:table-cell table:style-name="ce17" table:formula="of:=[$List.G162]" office:value-type="float" office:value="65535" calcext:value-type="float">
            <text:p>65535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 office:value-type="float" office:value="1" calcext:value-type="float">
            <text:p>1</text:p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CUP1_CHANNEL4_UPPER_LIMIT" calcext:value-type="string">
            <text:p>CUP1_CHANNEL4_UPPER_LIMIT</text:p>
          </table:table-cell>
          <table:table-cell table:style-name="ce17" table:formula="of:=[$List.G163]" office:value-type="float" office:value="65535" calcext:value-type="float">
            <text:p>65535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 office:value-type="float" office:value="1" calcext:value-type="float">
            <text:p>1</text:p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CUP2_CHANNEL1_UPPER_LIMIT" calcext:value-type="string">
            <text:p>CUP2_CHANNEL1_UPPER_LIMIT</text:p>
          </table:table-cell>
          <table:table-cell table:style-name="ce17" table:formula="of:=[$List.G164]" office:value-type="float" office:value="65535" calcext:value-type="float">
            <text:p>65535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 office:value-type="float" office:value="1" calcext:value-type="float">
            <text:p>1</text:p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CUP2_CHANNEL2_UPPER_LIMIT" calcext:value-type="string">
            <text:p>CUP2_CHANNEL2_UPPER_LIMIT</text:p>
          </table:table-cell>
          <table:table-cell table:style-name="ce17" table:formula="of:=[$List.G165]" office:value-type="float" office:value="65535" calcext:value-type="float">
            <text:p>65535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 office:value-type="float" office:value="1" calcext:value-type="float">
            <text:p>1</text:p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CUP2_CHANNEL3_UPPER_LIMIT" calcext:value-type="string">
            <text:p>CUP2_CHANNEL3_UPPER_LIMIT</text:p>
          </table:table-cell>
          <table:table-cell table:style-name="ce17" table:formula="of:=[$List.G166]" office:value-type="float" office:value="65535" calcext:value-type="float">
            <text:p>65535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 office:value-type="float" office:value="1" calcext:value-type="float">
            <text:p>1</text:p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CUP2_CHANNEL4_UPPER_LIMIT" calcext:value-type="string">
            <text:p>CUP2_CHANNEL4_UPPER_LIMIT</text:p>
          </table:table-cell>
          <table:table-cell table:style-name="ce17" table:formula="of:=[$List.G167]" office:value-type="float" office:value="65535" calcext:value-type="float">
            <text:p>65535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 office:value-type="float" office:value="1" calcext:value-type="float">
            <text:p>1</text:p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CUP3_CHANNEL1_UPPER_LIMIT" calcext:value-type="string">
            <text:p>CUP3_CHANNEL1_UPPER_LIMIT</text:p>
          </table:table-cell>
          <table:table-cell table:style-name="ce17" table:formula="of:=[$List.G168]" office:value-type="float" office:value="65535" calcext:value-type="float">
            <text:p>65535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 office:value-type="float" office:value="1" calcext:value-type="float">
            <text:p>1</text:p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CUP3_CHANNEL2_UPPER_LIMIT" calcext:value-type="string">
            <text:p>CUP3_CHANNEL2_UPPER_LIMIT</text:p>
          </table:table-cell>
          <table:table-cell table:style-name="ce17" table:formula="of:=[$List.G169]" office:value-type="float" office:value="65535" calcext:value-type="float">
            <text:p>65535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 office:value-type="float" office:value="1" calcext:value-type="float">
            <text:p>1</text:p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70]" office:value-type="string" office:string-value="holding reg." calcext:value-type="string">
            <text:p>holding reg.</text:p>
          </table:table-cell>
          <table:table-cell table:style-name="ce17" table:formula="of:=[$List.I170]" office:value-type="string" office:string-value="CUP3_CHANNEL3_UPPER_LIMIT" calcext:value-type="string">
            <text:p>CUP3_CHANNEL3_UPPER_LIMIT</text:p>
          </table:table-cell>
          <table:table-cell table:style-name="ce17" table:formula="of:=[$List.G170]" office:value-type="float" office:value="65535" calcext:value-type="float">
            <text:p>65535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 office:value-type="float" office:value="1" calcext:value-type="float">
            <text:p>1</text:p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CUP3_CHANNEL4_UPPER_LIMIT" calcext:value-type="string">
            <text:p>CUP3_CHANNEL4_UPPER_LIMIT</text:p>
          </table:table-cell>
          <table:table-cell table:style-name="ce17" table:formula="of:=[$List.G171]" office:value-type="float" office:value="65535" calcext:value-type="float">
            <text:p>65535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 office:value-type="float" office:value="1" calcext:value-type="float">
            <text:p>1</text:p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72]" office:value-type="float" office:value="0" calcext:value-type="float">
            <text:p>0</text:p>
          </table:table-cell>
          <table:table-cell table:style-name="ce17" table:formula="of:=[$List.I172]">
            <text:p/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73]" office:value-type="string" office:string-value="holding reg." calcext:value-type="string">
            <text:p>holding reg.</text:p>
          </table:table-cell>
          <table:table-cell table:style-name="ce17" table:formula="of:=[$List.I173]" office:value-type="string" office:string-value="ANALOG_INPUTS_ERROR_STORAGE" calcext:value-type="string">
            <text:p>ANALOG_INPUTS_ERROR_STORAGE</text:p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74]" office:value-type="float" office:value="0" calcext:value-type="float">
            <text:p>0</text:p>
          </table:table-cell>
          <table:table-cell table:style-name="ce17" table:formula="of:=[$List.I174]" office:value-type="float" office:value="0" calcext:value-type="float">
            <text:p>0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75]" office:value-type="float" office:value="300" calcext:value-type="float">
            <text:p>30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 office:value-type="float" office:value="1" calcext:value-type="float">
            <text:p>1</text:p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7]" office:value-type="string" office:string-value="holding reg." calcext:value-type="string">
            <text:p>holding reg.</text:p>
          </table:table-cell>
          <table:table-cell table:style-name="ce17" table:formula="of:=[$List.I177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77]" office:value-type="float" office:value="100" calcext:value-type="float">
            <text:p>10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 office:value-type="float" office:value="1" calcext:value-type="float">
            <text:p>1</text:p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9]" office:value-type="float" office:value="0" calcext:value-type="float">
            <text:p>0</text:p>
          </table:table-cell>
          <table:table-cell table:style-name="ce17" table:formula="of:=[$List.I179]">
            <text:p/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80]" office:value-type="float" office:value="300" calcext:value-type="float">
            <text:p>30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 office:value-type="float" office:value="1" calcext:value-type="float">
            <text:p>1</text:p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82]" office:value-type="string" office:string-value="holding reg." calcext:value-type="string">
            <text:p>holding reg.</text:p>
          </table:table-cell>
          <table:table-cell table:style-name="ce17" table:formula="of:=[$List.I182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82]" office:value-type="float" office:value="100" calcext:value-type="float">
            <text:p>10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 office:value-type="float" office:value="1" calcext:value-type="float">
            <text:p>1</text:p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84]" office:value-type="float" office:value="0" calcext:value-type="float">
            <text:p>0</text:p>
          </table:table-cell>
          <table:table-cell table:style-name="ce17" table:formula="of:=[$List.I184]">
            <text:p/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85]" office:value-type="string" office:string-value="holding reg." calcext:value-type="string">
            <text:p>holding reg.</text:p>
          </table:table-cell>
          <table:table-cell table:style-name="ce17" table:formula="of:=[$List.I185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85]" office:value-type="float" office:value="1500" calcext:value-type="float">
            <text:p>150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 office:value-type="float" office:value="1" calcext:value-type="float">
            <text:p>1</text:p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86]" office:value-type="string" office:string-value="holding reg." calcext:value-type="string">
            <text:p>holding reg.</text:p>
          </table:table-cell>
          <table:table-cell table:style-name="ce17" table:formula="of:=[$List.I186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holding reg." calcext:value-type="string">
            <text:p>holding reg.</text:p>
          </table:table-cell>
          <table:table-cell table:style-name="ce17" table:formula="of:=[$List.I187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87]" office:value-type="float" office:value="2000" calcext:value-type="float">
            <text:p>200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 office:value-type="float" office:value="1" calcext:value-type="float">
            <text:p>1</text:p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88]" office:value-type="string" office:string-value="holding reg." calcext:value-type="string">
            <text:p>holding reg.</text:p>
          </table:table-cell>
          <table:table-cell table:style-name="ce17" table:formula="of:=[$List.I188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88]" office:value-type="float" office:value="0" calcext:value-type="float">
            <text:p>0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9]" office:value-type="string" office:string-value="holding reg." calcext:value-type="string">
            <text:p>holding reg.</text:p>
          </table:table-cell>
          <table:table-cell table:style-name="ce17" table:formula="of:=[$List.I189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89]" office:value-type="float" office:value="70" calcext:value-type="float">
            <text:p>7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 office:value-type="float" office:value="1" calcext:value-type="float">
            <text:p>1</text:p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90]" office:value-type="string" office:string-value="holding reg." calcext:value-type="string">
            <text:p>holding reg.</text:p>
          </table:table-cell>
          <table:table-cell table:style-name="ce17" table:formula="of:=[$List.I190]" office:value-type="string" office:string-value="SIM_MECHANISM3_BRAKED_MOTION" calcext:value-type="string">
            <text:p>SIM_MECHANISM3_BRAKED_MOTION</text:p>
          </table:table-cell>
          <table:table-cell table:style-name="ce17" table:formula="of:=[$List.G190]" office:value-type="float" office:value="7" calcext:value-type="float">
            <text:p>7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 office:value-type="float" office:value="1" calcext:value-type="float">
            <text:p>1</text:p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91]" office:value-type="float" office:value="0" calcext:value-type="float">
            <text:p>0</text:p>
          </table:table-cell>
          <table:table-cell table:style-name="ce17" table:formula="of:=[$List.I191]" office:value-type="float" office:value="0" calcext:value-type="float">
            <text:p>0</text:p>
          </table:table-cell>
          <table:table-cell table:style-name="ce17" table:formula="of:=[$List.G191]" office:value-type="float" office:value="0" calcext:value-type="float">
            <text:p>0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92]" office:value-type="string" office:string-value="holding reg." calcext:value-type="string">
            <text:p>holding reg.</text:p>
          </table:table-cell>
          <table:table-cell table:style-name="ce17" table:formula="of:=[$List.I192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holding reg." calcext:value-type="string">
            <text:p>holding reg.</text:p>
          </table:table-cell>
          <table:table-cell table:style-name="ce17" table:formula="of:=[$List.I193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93]" office:value-type="float" office:value="0" calcext:value-type="float">
            <text:p>0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holding reg." calcext:value-type="string">
            <text:p>holding reg.</text:p>
          </table:table-cell>
          <table:table-cell table:style-name="ce17" table:formula="of:=[$List.I194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94]" office:value-type="float" office:value="0" calcext:value-type="float">
            <text:p>0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holding reg." calcext:value-type="string">
            <text:p>holding reg.</text:p>
          </table:table-cell>
          <table:table-cell table:style-name="ce17" table:formula="of:=[$List.I195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95]" office:value-type="float" office:value="0" calcext:value-type="float">
            <text:p>0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holding reg." calcext:value-type="string">
            <text:p>holding reg.</text:p>
          </table:table-cell>
          <table:table-cell table:style-name="ce17" table:formula="of:=[$List.I196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96]" office:value-type="float" office:value="0" calcext:value-type="float">
            <text:p>0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holding reg." calcext:value-type="string">
            <text:p>holding reg.</text:p>
          </table:table-cell>
          <table:table-cell table:style-name="ce17" table:formula="of:=[$List.I197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97]" office:value-type="float" office:value="0" calcext:value-type="float">
            <text:p>0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8]" office:value-type="string" office:string-value="holding reg." calcext:value-type="string">
            <text:p>holding reg.</text:p>
          </table:table-cell>
          <table:table-cell table:style-name="ce17" table:formula="of:=[$List.I198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holding reg." calcext:value-type="string">
            <text:p>holding reg.</text:p>
          </table:table-cell>
          <table:table-cell table:style-name="ce17" table:formula="of:=[$List.I199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99]" office:value-type="float" office:value="0" calcext:value-type="float">
            <text:p>0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holding reg." calcext:value-type="string">
            <text:p>holding reg.</text:p>
          </table:table-cell>
          <table:table-cell table:style-name="ce17" table:formula="of:=[$List.I200]" office:value-type="string" office:string-value="SIM_AMPLIFIER_CUP3_ELECTRODE1" calcext:value-type="string">
            <text:p>SIM_AMPLIFIER_CUP3_ELECTRODE1</text:p>
          </table:table-cell>
          <table:table-cell table:style-name="ce17" table:formula="of:=[$List.G200]" office:value-type="float" office:value="0" calcext:value-type="float">
            <text:p>0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holding reg." calcext:value-type="string">
            <text:p>holding reg.</text:p>
          </table:table-cell>
          <table:table-cell table:style-name="ce17" table:formula="of:=[$List.I201]" office:value-type="string" office:string-value="SIM_AMPLIFIER_CUP3_ELECTRODE2" calcext:value-type="string">
            <text:p>SIM_AMPLIFIER_CUP3_ELECTRODE2</text:p>
          </table:table-cell>
          <table:table-cell table:style-name="ce17" table:formula="of:=[$List.G201]" office:value-type="float" office:value="0" calcext:value-type="float">
            <text:p>0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202]" office:value-type="string" office:string-value="holding reg." calcext:value-type="string">
            <text:p>holding reg.</text:p>
          </table:table-cell>
          <table:table-cell table:style-name="ce17" table:formula="of:=[$List.I202]" office:value-type="string" office:string-value="SIM_AMPLIFIER_CUP3_ELECTRODE3" calcext:value-type="string">
            <text:p>SIM_AMPLIFIER_CUP3_ELECTRODE3</text:p>
          </table:table-cell>
          <table:table-cell table:style-name="ce17" table:formula="of:=[$List.G202]" office:value-type="float" office:value="0" calcext:value-type="float">
            <text:p>0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holding reg." calcext:value-type="string">
            <text:p>holding reg.</text:p>
          </table:table-cell>
          <table:table-cell table:style-name="ce17" table:formula="of:=[$List.I203]" office:value-type="string" office:string-value="SIM_AMPLIFIER_CUP3_ELECTRODE4" calcext:value-type="string">
            <text:p>SIM_AMPLIFIER_CUP3_ELECTRODE4</text:p>
          </table:table-cell>
          <table:table-cell table:style-name="ce17" table:formula="of:=[$List.G203]" office:value-type="float" office:value="0" calcext:value-type="float">
            <text:p>0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204]" office:value-type="float" office:value="0" calcext:value-type="float">
            <text:p>0</text:p>
          </table:table-cell>
          <table:table-cell table:style-name="ce17" table:formula="of:=[$List.I204]">
            <text:p/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205]" office:value-type="string" office:string-value="holding reg." calcext:value-type="string">
            <text:p>holding reg.</text:p>
          </table:table-cell>
          <table:table-cell table:style-name="ce17" table:formula="of:=[$List.I205]" office:value-type="string" office:string-value="SIM_AMPLIFIER_RANDOM_RATE" calcext:value-type="string">
            <text:p>SIM_AMPLIFIER_RANDOM_RATE</text:p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6]" office:value-type="string" office:string-value="holding reg." calcext:value-type="string">
            <text:p>holding reg.</text:p>
          </table:table-cell>
          <table:table-cell table:style-name="ce17" table:formula="of:=[$List.I206]" office:value-type="string" office:string-value="SIM_AMPLIFIER_RANDOM_OFFSET" calcext:value-type="string">
            <text:p>SIM_AMPLIFIER_RANDOM_OFFSET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7]" office:value-type="float" office:value="0" calcext:value-type="float">
            <text:p>0</text:p>
          </table:table-cell>
          <table:table-cell table:style-name="ce17" table:formula="of:=[$List.I207]">
            <text:p/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8]" office:value-type="string" office:string-value="holding reg." calcext:value-type="string">
            <text:p>holding reg.</text:p>
          </table:table-cell>
          <table:table-cell table:style-name="ce17" table:formula="of:=[$List.I208]" office:value-type="string" office:string-value="SIM_EXTERNAL_LOCK_PERIOD" calcext:value-type="string">
            <text:p>SIM_EXTERNAL_LOCK_PERIOD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9]" office:value-type="string" office:string-value="holding reg." calcext:value-type="string">
            <text:p>holding reg.</text:p>
          </table:table-cell>
          <table:table-cell table:style-name="ce17" table:formula="of:=[$List.I209]" office:value-type="string" office:string-value="SIM_EXTERNAL_LOCK_DURATION" calcext:value-type="string">
            <text:p>SIM_EXTERNAL_LOCK_DURATION</text:p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10]" office:value-type="string" office:string-value="holding reg." calcext:value-type="string">
            <text:p>holding reg.</text:p>
          </table:table-cell>
          <table:table-cell table:style-name="ce17" table:formula="of:=[$List.I210]" office:value-type="string" office:string-value="SIM_EXTERNAL_LOCK_DELAY" calcext:value-type="string">
            <text:p>SIM_EXTERNAL_LOCK_DELAY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11]" office:value-type="float" office:value="0" calcext:value-type="float">
            <text:p>0</text:p>
          </table:table-cell>
          <table:table-cell table:style-name="ce17" table:formula="of:=[$List.I211]">
            <text:p/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12]" office:value-type="string" office:string-value="holding reg." calcext:value-type="string">
            <text:p>holding reg.</text:p>
          </table:table-cell>
          <table:table-cell table:style-name="ce17" table:formula="of:=[$List.I212]" office:value-type="string" office:string-value="SIM_EVENT_CODE" calcext:value-type="string">
            <text:p>SIM_EVENT_CODE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13]" office:value-type="string" office:string-value="holding reg." calcext:value-type="string">
            <text:p>holding reg.</text:p>
          </table:table-cell>
          <table:table-cell table:style-name="ce17" table:formula="of:=[$List.I213]" office:value-type="string" office:string-value="SIM_EVENT_PERIOD" calcext:value-type="string">
            <text:p>SIM_EVENT_PERIOD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14]" office:value-type="string" office:string-value="holding reg." calcext:value-type="string">
            <text:p>holding reg.</text:p>
          </table:table-cell>
          <table:table-cell table:style-name="ce17" table:formula="of:=[$List.I214]" office:value-type="string" office:string-value="SIM_EVENT_DURATION" calcext:value-type="string">
            <text:p>SIM_EVENT_DURATION</text:p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15]" office:value-type="string" office:string-value="holding reg." calcext:value-type="string">
            <text:p>holding reg.</text:p>
          </table:table-cell>
          <table:table-cell table:style-name="ce17" table:formula="of:=[$List.I215]" office:value-type="string" office:string-value="SIM_EVENT_DELAY" calcext:value-type="string">
            <text:p>SIM_EVENT_DELAY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6]" office:value-type="float" office:value="0" calcext:value-type="float">
            <text:p>0</text:p>
          </table:table-cell>
          <table:table-cell table:style-name="ce17" table:formula="of:=[$List.I216]">
            <text:p/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7]" office:value-type="string" office:string-value="holding reg." calcext:value-type="string">
            <text:p>holding reg.</text:p>
          </table:table-cell>
          <table:table-cell table:style-name="ce17" table:formula="of:=[$List.I217]" office:value-type="string" office:string-value="DEBUG_PRINTOUTS" calcext:value-type="string">
            <text:p>DEBUG_PRINTOUTS</text:p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8]" office:value-type="string" office:string-value="holding reg." calcext:value-type="string">
            <text:p>holding reg.</text:p>
          </table:table-cell>
          <table:table-cell table:style-name="ce17" table:formula="of:=[$List.I218]" office:value-type="string" office:string-value="DEBUG_ARGUMENT1" calcext:value-type="string">
            <text:p>DEBUG_ARGUMENT1</text:p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9]" office:value-type="string" office:string-value="holding reg." calcext:value-type="string">
            <text:p>holding reg.</text:p>
          </table:table-cell>
          <table:table-cell table:style-name="ce17" table:formula="of:=[$List.I219]" office:value-type="string" office:string-value="DEBUG_ARGUMENT2" calcext:value-type="string">
            <text:p>DEBUG_ARGUMENT2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20]" office:value-type="float" office:value="0" calcext:value-type="float">
            <text:p>0</text:p>
          </table:table-cell>
          <table:table-cell table:style-name="ce17" table:formula="of:=[$List.I220]" office:value-type="float" office:value="0" calcext:value-type="float">
            <text:p>0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21]" office:value-type="float" office:value="0" calcext:value-type="float">
            <text:p>0</text:p>
          </table:table-cell>
          <table:table-cell table:style-name="ce17" table:formula="of:=[$List.I221]">
            <text:p/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22]" office:value-type="string" office:string-value="input reg." calcext:value-type="string">
            <text:p>input reg.</text:p>
          </table:table-cell>
          <table:table-cell table:style-name="ce17" table:formula="of:=[$List.I222]" office:value-type="string" office:string-value="CUP1_CHANNEL1_SAMPLE" calcext:value-type="string">
            <text:p>CUP1_CHANNEL1_SAMPLE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23]" office:value-type="string" office:string-value="input reg." calcext:value-type="string">
            <text:p>input reg.</text:p>
          </table:table-cell>
          <table:table-cell table:style-name="ce17" table:formula="of:=[$List.I223]" office:value-type="string" office:string-value="CUP1_CHANNEL2_SAMPLE" calcext:value-type="string">
            <text:p>CUP1_CHANNEL2_SAMPLE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24]" office:value-type="string" office:string-value="input reg." calcext:value-type="string">
            <text:p>input reg.</text:p>
          </table:table-cell>
          <table:table-cell table:style-name="ce17" table:formula="of:=[$List.I224]" office:value-type="string" office:string-value="CUP1_CHANNEL3_SAMPLE" calcext:value-type="string">
            <text:p>CUP1_CHANNEL3_SAMPLE</text:p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25]" office:value-type="string" office:string-value="input reg." calcext:value-type="string">
            <text:p>input reg.</text:p>
          </table:table-cell>
          <table:table-cell table:style-name="ce17" table:formula="of:=[$List.I225]" office:value-type="string" office:string-value="CUP1_CHANNEL4_SAMPLE" calcext:value-type="string">
            <text:p>CUP1_CHANNEL4_SAMPLE</text:p>
          </table:table-cell>
          <table:table-cell table:style-name="ce17" table:formula="of:=[$List.G225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6]" office:value-type="string" office:string-value="input reg." calcext:value-type="string">
            <text:p>input reg.</text:p>
          </table:table-cell>
          <table:table-cell table:style-name="ce17" table:formula="of:=[$List.I226]" office:value-type="string" office:string-value="CUP1_CHANNEL_ERROR" calcext:value-type="string">
            <text:p>CUP1_CHANNEL_ERROR</text:p>
          </table:table-cell>
          <table:table-cell table:style-name="ce17" table:formula="of:=[$List.G226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7]" office:value-type="float" office:value="0" calcext:value-type="float">
            <text:p>0</text:p>
          </table:table-cell>
          <table:table-cell table:style-name="ce17" table:formula="of:=[$List.I227]">
            <text:p/>
          </table:table-cell>
          <table:table-cell table:style-name="ce17" table:formula="of:=[$List.G227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8]" office:value-type="string" office:string-value="input reg." calcext:value-type="string">
            <text:p>input reg.</text:p>
          </table:table-cell>
          <table:table-cell table:style-name="ce17" table:formula="of:=[$List.I228]" office:value-type="string" office:string-value="CUP2_CHANNEL1_SAMPLE" calcext:value-type="string">
            <text:p>CUP2_CHANNEL1_SAMPLE</text:p>
          </table:table-cell>
          <table:table-cell table:style-name="ce17" table:formula="of:=[$List.G228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9]" office:value-type="string" office:string-value="input reg." calcext:value-type="string">
            <text:p>input reg.</text:p>
          </table:table-cell>
          <table:table-cell table:style-name="ce17" table:formula="of:=[$List.I229]" office:value-type="string" office:string-value="CUP2_CHANNEL2_SAMPLE" calcext:value-type="string">
            <text:p>CUP2_CHANNEL2_SAMPLE</text:p>
          </table:table-cell>
          <table:table-cell table:style-name="ce17" table:formula="of:=[$List.G229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30]" office:value-type="string" office:string-value="input reg." calcext:value-type="string">
            <text:p>input reg.</text:p>
          </table:table-cell>
          <table:table-cell table:style-name="ce17" table:formula="of:=[$List.I230]" office:value-type="string" office:string-value="CUP2_CHANNEL3_SAMPLE" calcext:value-type="string">
            <text:p>CUP2_CHANNEL3_SAMPLE</text:p>
          </table:table-cell>
          <table:table-cell table:style-name="ce17" table:formula="of:=[$List.G230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>
          <table:table-cell table:style-name="ce17" table:formula="of:=[$List.B231]" office:value-type="string" office:string-value="input reg." calcext:value-type="string">
            <text:p>input reg.</text:p>
          </table:table-cell>
          <table:table-cell table:style-name="ce17" table:formula="of:=[$List.I231]" office:value-type="string" office:string-value="CUP2_CHANNEL4_SAMPLE" calcext:value-type="string">
            <text:p>CUP2_CHANNEL4_SAMPLE</text:p>
          </table:table-cell>
          <table:table-cell table:style-name="ce17" table:formula="of:=[$List.G231]" office:value-type="float" office:value="0" calcext:value-type="float">
            <text:p>0</text:p>
          </table:table-cell>
          <table:table-cell table:formula="of:=IF(AND(([.A231]=&quot;coil&quot;);([.C231]=&quot;true&quot;)); 1; &quot;&quot;)">
            <text:p/>
          </table:table-cell>
          <table:table-cell table:formula="of:=IF(AND(([.A231]=&quot;holding reg.&quot;);([.C231] &lt;&gt; 0)); 1; &quot;&quot;)">
            <text:p/>
          </table:table-cell>
          <table:table-cell/>
          <table:table-cell table:formula="of:=IF([.D231]=1; COM.MICROSOFT.CONCAT(&quot;ModbusCoils[coilIndexFromAddress(MODBUS_ADDR_&quot;; [.B231]; &quot;)] = &quot;; [.C231]; &quot;;&quot;); IF([.E231]=1; COM.MICROSOFT.CONCAT(&quot;ModbusHoldingRegisters[holdingIndexFromAddress(MODBUS_ADDR_&quot;; [.B231]; &quot;)] = &quot;; [.C231]; &quot;u;&quot;); &quot;&quot;))">
            <text:p/>
          </table:table-cell>
        </table:table-row>
        <table:table-row table:style-name="ro1">
          <table:table-cell table:style-name="ce17" table:formula="of:=[$List.B232]" office:value-type="string" office:string-value="input reg." calcext:value-type="string">
            <text:p>input reg.</text:p>
          </table:table-cell>
          <table:table-cell table:style-name="ce17" table:formula="of:=[$List.I232]" office:value-type="string" office:string-value="CUP2_CHANNEL_ERROR" calcext:value-type="string">
            <text:p>CUP2_CHANNEL_ERROR</text:p>
          </table:table-cell>
          <table:table-cell table:style-name="ce17" table:formula="of:=[$List.G232]" office:value-type="float" office:value="0" calcext:value-type="float">
            <text:p>0</text:p>
          </table:table-cell>
          <table:table-cell table:formula="of:=IF(AND(([.A232]=&quot;coil&quot;);([.C232]=&quot;true&quot;)); 1; &quot;&quot;)">
            <text:p/>
          </table:table-cell>
          <table:table-cell table:formula="of:=IF(AND(([.A232]=&quot;holding reg.&quot;);([.C232] &lt;&gt; 0)); 1; &quot;&quot;)">
            <text:p/>
          </table:table-cell>
          <table:table-cell/>
          <table:table-cell table:formula="of:=IF([.D232]=1; COM.MICROSOFT.CONCAT(&quot;ModbusCoils[coilIndexFromAddress(MODBUS_ADDR_&quot;; [.B232]; &quot;)] = &quot;; [.C232]; &quot;;&quot;); IF([.E232]=1; COM.MICROSOFT.CONCAT(&quot;ModbusHoldingRegisters[holdingIndexFromAddress(MODBUS_ADDR_&quot;; [.B232]; &quot;)] = &quot;; [.C232]; &quot;u;&quot;); &quot;&quot;))">
            <text:p/>
          </table:table-cell>
        </table:table-row>
        <table:table-row table:style-name="ro1">
          <table:table-cell table:style-name="ce17" table:formula="of:=[$List.B233]" office:value-type="float" office:value="0" calcext:value-type="float">
            <text:p>0</text:p>
          </table:table-cell>
          <table:table-cell table:style-name="ce17" table:formula="of:=[$List.I233]">
            <text:p/>
          </table:table-cell>
          <table:table-cell table:style-name="ce17" table:formula="of:=[$List.G233]" office:value-type="float" office:value="0" calcext:value-type="float">
            <text:p>0</text:p>
          </table:table-cell>
          <table:table-cell table:formula="of:=IF(AND(([.A233]=&quot;coil&quot;);([.C233]=&quot;true&quot;)); 1; &quot;&quot;)">
            <text:p/>
          </table:table-cell>
          <table:table-cell table:formula="of:=IF(AND(([.A233]=&quot;holding reg.&quot;);([.C233] &lt;&gt; 0)); 1; &quot;&quot;)">
            <text:p/>
          </table:table-cell>
          <table:table-cell/>
          <table:table-cell table:formula="of:=IF([.D233]=1; COM.MICROSOFT.CONCAT(&quot;ModbusCoils[coilIndexFromAddress(MODBUS_ADDR_&quot;; [.B233]; &quot;)] = &quot;; [.C233]; &quot;;&quot;); IF([.E233]=1; COM.MICROSOFT.CONCAT(&quot;ModbusHoldingRegisters[holdingIndexFromAddress(MODBUS_ADDR_&quot;; [.B233]; &quot;)] = &quot;; [.C233]; &quot;u;&quot;); &quot;&quot;))">
            <text:p/>
          </table:table-cell>
        </table:table-row>
        <table:table-row table:style-name="ro1">
          <table:table-cell table:style-name="ce17" table:formula="of:=[$List.B234]" office:value-type="string" office:string-value="input reg." calcext:value-type="string">
            <text:p>input reg.</text:p>
          </table:table-cell>
          <table:table-cell table:style-name="ce17" table:formula="of:=[$List.I234]" office:value-type="string" office:string-value="CUP3_CHANNEL1_SAMPLE" calcext:value-type="string">
            <text:p>CUP3_CHANNEL1_SAMPLE</text:p>
          </table:table-cell>
          <table:table-cell table:style-name="ce17" table:formula="of:=[$List.G234]" office:value-type="float" office:value="0" calcext:value-type="float">
            <text:p>0</text:p>
          </table:table-cell>
          <table:table-cell table:formula="of:=IF(AND(([.A234]=&quot;coil&quot;);([.C234]=&quot;true&quot;)); 1; &quot;&quot;)">
            <text:p/>
          </table:table-cell>
          <table:table-cell table:formula="of:=IF(AND(([.A234]=&quot;holding reg.&quot;);([.C234] &lt;&gt; 0)); 1; &quot;&quot;)">
            <text:p/>
          </table:table-cell>
          <table:table-cell/>
          <table:table-cell table:formula="of:=IF([.D234]=1; COM.MICROSOFT.CONCAT(&quot;ModbusCoils[coilIndexFromAddress(MODBUS_ADDR_&quot;; [.B234]; &quot;)] = &quot;; [.C234]; &quot;;&quot;); IF([.E234]=1; COM.MICROSOFT.CONCAT(&quot;ModbusHoldingRegisters[holdingIndexFromAddress(MODBUS_ADDR_&quot;; [.B234]; &quot;)] = &quot;; [.C234]; &quot;u;&quot;); &quot;&quot;))">
            <text:p/>
          </table:table-cell>
        </table:table-row>
        <table:table-row table:style-name="ro1">
          <table:table-cell table:style-name="ce17" table:formula="of:=[$List.B235]" office:value-type="string" office:string-value="input reg." calcext:value-type="string">
            <text:p>input reg.</text:p>
          </table:table-cell>
          <table:table-cell table:style-name="ce17" table:formula="of:=[$List.I235]" office:value-type="string" office:string-value="CUP3_CHANNEL2_SAMPLE" calcext:value-type="string">
            <text:p>CUP3_CHANNEL2_SAMPLE</text:p>
          </table:table-cell>
          <table:table-cell table:style-name="ce17" table:formula="of:=[$List.G235]" office:value-type="float" office:value="0" calcext:value-type="float">
            <text:p>0</text:p>
          </table:table-cell>
          <table:table-cell table:formula="of:=IF(AND(([.A235]=&quot;coil&quot;);([.C235]=&quot;true&quot;)); 1; &quot;&quot;)">
            <text:p/>
          </table:table-cell>
          <table:table-cell table:formula="of:=IF(AND(([.A235]=&quot;holding reg.&quot;);([.C235] &lt;&gt; 0)); 1; &quot;&quot;)">
            <text:p/>
          </table:table-cell>
          <table:table-cell/>
          <table:table-cell table:formula="of:=IF([.D235]=1; COM.MICROSOFT.CONCAT(&quot;ModbusCoils[coilIndexFromAddress(MODBUS_ADDR_&quot;; [.B235]; &quot;)] = &quot;; [.C235]; &quot;;&quot;); IF([.E235]=1; COM.MICROSOFT.CONCAT(&quot;ModbusHoldingRegisters[holdingIndexFromAddress(MODBUS_ADDR_&quot;; [.B235]; &quot;)] = &quot;; [.C235]; &quot;u;&quot;); &quot;&quot;))">
            <text:p/>
          </table:table-cell>
        </table:table-row>
        <table:table-row table:style-name="ro1">
          <table:table-cell table:style-name="ce17" table:formula="of:=[$List.B236]" office:value-type="string" office:string-value="input reg." calcext:value-type="string">
            <text:p>input reg.</text:p>
          </table:table-cell>
          <table:table-cell table:style-name="ce17" table:formula="of:=[$List.I236]" office:value-type="string" office:string-value="CUP3_CHANNEL3_SAMPLE" calcext:value-type="string">
            <text:p>CUP3_CHANNEL3_SAMPLE</text:p>
          </table:table-cell>
          <table:table-cell table:style-name="ce17" table:formula="of:=[$List.G236]" office:value-type="float" office:value="0" calcext:value-type="float">
            <text:p>0</text:p>
          </table:table-cell>
          <table:table-cell table:formula="of:=IF(AND(([.A236]=&quot;coil&quot;);([.C236]=&quot;true&quot;)); 1; &quot;&quot;)">
            <text:p/>
          </table:table-cell>
          <table:table-cell table:formula="of:=IF(AND(([.A236]=&quot;holding reg.&quot;);([.C236] &lt;&gt; 0)); 1; &quot;&quot;)">
            <text:p/>
          </table:table-cell>
          <table:table-cell/>
          <table:table-cell table:formula="of:=IF([.D236]=1; COM.MICROSOFT.CONCAT(&quot;ModbusCoils[coilIndexFromAddress(MODBUS_ADDR_&quot;; [.B236]; &quot;)] = &quot;; [.C236]; &quot;;&quot;); IF([.E236]=1; COM.MICROSOFT.CONCAT(&quot;ModbusHoldingRegisters[holdingIndexFromAddress(MODBUS_ADDR_&quot;; [.B236]; &quot;)] = &quot;; [.C236]; &quot;u;&quot;); &quot;&quot;))">
            <text:p/>
          </table:table-cell>
        </table:table-row>
        <table:table-row table:style-name="ro1">
          <table:table-cell table:style-name="ce17" table:formula="of:=[$List.B237]" office:value-type="string" office:string-value="input reg." calcext:value-type="string">
            <text:p>input reg.</text:p>
          </table:table-cell>
          <table:table-cell table:style-name="ce17" table:formula="of:=[$List.I237]" office:value-type="string" office:string-value="CUP3_CHANNEL4_SAMPLE" calcext:value-type="string">
            <text:p>CUP3_CHANNEL4_SAMPLE</text:p>
          </table:table-cell>
          <table:table-cell table:style-name="ce17" table:formula="of:=[$List.G237]" office:value-type="float" office:value="0" calcext:value-type="float">
            <text:p>0</text:p>
          </table:table-cell>
          <table:table-cell table:formula="of:=IF(AND(([.A237]=&quot;coil&quot;);([.C237]=&quot;true&quot;)); 1; &quot;&quot;)">
            <text:p/>
          </table:table-cell>
          <table:table-cell table:formula="of:=IF(AND(([.A237]=&quot;holding reg.&quot;);([.C237] &lt;&gt; 0)); 1; &quot;&quot;)">
            <text:p/>
          </table:table-cell>
          <table:table-cell/>
          <table:table-cell table:formula="of:=IF([.D237]=1; COM.MICROSOFT.CONCAT(&quot;ModbusCoils[coilIndexFromAddress(MODBUS_ADDR_&quot;; [.B237]; &quot;)] = &quot;; [.C237]; &quot;;&quot;); IF([.E237]=1; COM.MICROSOFT.CONCAT(&quot;ModbusHoldingRegisters[holdingIndexFromAddress(MODBUS_ADDR_&quot;; [.B237]; &quot;)] = &quot;; [.C237]; &quot;u;&quot;); &quot;&quot;))">
            <text:p/>
          </table:table-cell>
        </table:table-row>
        <table:table-row table:style-name="ro1">
          <table:table-cell table:style-name="ce17" table:formula="of:=[$List.B238]" office:value-type="string" office:string-value="input reg." calcext:value-type="string">
            <text:p>input reg.</text:p>
          </table:table-cell>
          <table:table-cell table:style-name="ce17" table:formula="of:=[$List.I238]" office:value-type="string" office:string-value="CUP3_CHANNEL_ERROR" calcext:value-type="string">
            <text:p>CUP3_CHANNEL_ERROR</text:p>
          </table:table-cell>
          <table:table-cell table:style-name="ce17" table:formula="of:=[$List.G238]" office:value-type="float" office:value="0" calcext:value-type="float">
            <text:p>0</text:p>
          </table:table-cell>
          <table:table-cell table:formula="of:=IF(AND(([.A238]=&quot;coil&quot;);([.C238]=&quot;true&quot;)); 1; &quot;&quot;)">
            <text:p/>
          </table:table-cell>
          <table:table-cell table:formula="of:=IF(AND(([.A238]=&quot;holding reg.&quot;);([.C238] &lt;&gt; 0)); 1; &quot;&quot;)">
            <text:p/>
          </table:table-cell>
          <table:table-cell/>
          <table:table-cell table:formula="of:=IF([.D238]=1; COM.MICROSOFT.CONCAT(&quot;ModbusCoils[coilIndexFromAddress(MODBUS_ADDR_&quot;; [.B238]; &quot;)] = &quot;; [.C238]; &quot;;&quot;); IF([.E238]=1; COM.MICROSOFT.CONCAT(&quot;ModbusHoldingRegisters[holdingIndexFromAddress(MODBUS_ADDR_&quot;; [.B238]; &quot;)] = &quot;; [.C238]; &quot;u;&quot;); &quot;&quot;))">
            <text:p/>
          </table:table-cell>
        </table:table-row>
        <table:table-row table:style-name="ro1">
          <table:table-cell table:style-name="ce17" table:formula="of:=[$List.B239]" office:value-type="float" office:value="0" calcext:value-type="float">
            <text:p>0</text:p>
          </table:table-cell>
          <table:table-cell table:style-name="ce17" table:formula="of:=[$List.I239]" office:value-type="float" office:value="0" calcext:value-type="float">
            <text:p>0</text:p>
          </table:table-cell>
          <table:table-cell table:style-name="ce17" table:formula="of:=[$List.G239]" office:value-type="float" office:value="0" calcext:value-type="float">
            <text:p>0</text:p>
          </table:table-cell>
          <table:table-cell table:formula="of:=IF(AND(([.A239]=&quot;coil&quot;);([.C239]=&quot;true&quot;)); 1; &quot;&quot;)">
            <text:p/>
          </table:table-cell>
          <table:table-cell table:formula="of:=IF(AND(([.A239]=&quot;holding reg.&quot;);([.C239] &lt;&gt; 0)); 1; &quot;&quot;)">
            <text:p/>
          </table:table-cell>
          <table:table-cell/>
          <table:table-cell table:formula="of:=IF([.D239]=1; COM.MICROSOFT.CONCAT(&quot;ModbusCoils[coilIndexFromAddress(MODBUS_ADDR_&quot;; [.B239]; &quot;)] = &quot;; [.C239]; &quot;;&quot;); IF([.E239]=1; COM.MICROSOFT.CONCAT(&quot;ModbusHoldingRegisters[holdingIndexFromAddress(MODBUS_ADDR_&quot;; [.B239]; &quot;)] = &quot;; [.C239]; &quot;u;&quot;); &quot;&quot;))">
            <text:p/>
          </table:table-cell>
        </table:table-row>
        <table:table-row table:style-name="ro1">
          <table:table-cell table:style-name="ce17" table:formula="of:=[$List.B240]" office:value-type="float" office:value="0" calcext:value-type="float">
            <text:p>0</text:p>
          </table:table-cell>
          <table:table-cell table:style-name="ce17" table:formula="of:=[$List.I240]" office:value-type="float" office:value="0" calcext:value-type="float">
            <text:p>0</text:p>
          </table:table-cell>
          <table:table-cell table:style-name="ce17" table:formula="of:=[$List.G240]" office:value-type="float" office:value="0" calcext:value-type="float">
            <text:p>0</text:p>
          </table:table-cell>
          <table:table-cell table:formula="of:=IF(AND(([.A240]=&quot;coil&quot;);([.C240]=&quot;true&quot;)); 1; &quot;&quot;)">
            <text:p/>
          </table:table-cell>
          <table:table-cell table:formula="of:=IF(AND(([.A240]=&quot;holding reg.&quot;);([.C240] &lt;&gt; 0)); 1; &quot;&quot;)">
            <text:p/>
          </table:table-cell>
          <table:table-cell/>
          <table:table-cell table:formula="of:=IF([.D240]=1; COM.MICROSOFT.CONCAT(&quot;ModbusCoils[coilIndexFromAddress(MODBUS_ADDR_&quot;; [.B240]; &quot;)] = &quot;; [.C240]; &quot;;&quot;); IF([.E240]=1; COM.MICROSOFT.CONCAT(&quot;ModbusHoldingRegisters[holdingIndexFromAddress(MODBUS_ADDR_&quot;; [.B240]; &quot;)] = &quot;; [.C240]; &quot;u;&quot;); &quot;&quot;))">
            <text:p/>
          </table:table-cell>
        </table:table-row>
        <table:table-row table:style-name="ro1">
          <table:table-cell table:style-name="ce17" table:formula="of:=[$List.B241]" office:value-type="float" office:value="0" calcext:value-type="float">
            <text:p>0</text:p>
          </table:table-cell>
          <table:table-cell table:style-name="ce17" table:formula="of:=[$List.I241]" office:value-type="float" office:value="0" calcext:value-type="float">
            <text:p>0</text:p>
          </table:table-cell>
          <table:table-cell table:style-name="ce17" table:formula="of:=[$List.G241]" office:value-type="float" office:value="0" calcext:value-type="float">
            <text:p>0</text:p>
          </table:table-cell>
          <table:table-cell table:formula="of:=IF(AND(([.A241]=&quot;coil&quot;);([.C241]=&quot;true&quot;)); 1; &quot;&quot;)">
            <text:p/>
          </table:table-cell>
          <table:table-cell table:formula="of:=IF(AND(([.A241]=&quot;holding reg.&quot;);([.C241] &lt;&gt; 0)); 1; &quot;&quot;)">
            <text:p/>
          </table:table-cell>
          <table:table-cell/>
          <table:table-cell table:formula="of:=IF([.D241]=1; COM.MICROSOFT.CONCAT(&quot;ModbusCoils[coilIndexFromAddress(MODBUS_ADDR_&quot;; [.B241]; &quot;)] = &quot;; [.C241]; &quot;;&quot;); IF([.E241]=1; COM.MICROSOFT.CONCAT(&quot;ModbusHoldingRegisters[holdingIndexFromAddress(MODBUS_ADDR_&quot;; [.B241]; &quot;)] = &quot;; [.C241]; &quot;u;&quot;); &quot;&quot;))">
            <text:p/>
          </table:table-cell>
        </table:table-row>
        <table:table-row table:style-name="ro1">
          <table:table-cell table:style-name="ce17" table:formula="of:=[$List.B242]" office:value-type="float" office:value="0" calcext:value-type="float">
            <text:p>0</text:p>
          </table:table-cell>
          <table:table-cell table:style-name="ce17" table:formula="of:=[$List.I242]" office:value-type="float" office:value="0" calcext:value-type="float">
            <text:p>0</text:p>
          </table:table-cell>
          <table:table-cell table:style-name="ce17" table:formula="of:=[$List.G242]" office:value-type="float" office:value="0" calcext:value-type="float">
            <text:p>0</text:p>
          </table:table-cell>
          <table:table-cell table:formula="of:=IF(AND(([.A242]=&quot;coil&quot;);([.C242]=&quot;true&quot;)); 1; &quot;&quot;)">
            <text:p/>
          </table:table-cell>
          <table:table-cell table:formula="of:=IF(AND(([.A242]=&quot;holding reg.&quot;);([.C242] &lt;&gt; 0)); 1; &quot;&quot;)">
            <text:p/>
          </table:table-cell>
          <table:table-cell/>
          <table:table-cell table:formula="of:=IF([.D242]=1; COM.MICROSOFT.CONCAT(&quot;ModbusCoils[coilIndexFromAddress(MODBUS_ADDR_&quot;; [.B242]; &quot;)] = &quot;; [.C242]; &quot;;&quot;); IF([.E242]=1; COM.MICROSOFT.CONCAT(&quot;ModbusHoldingRegisters[holdingIndexFromAddress(MODBUS_ADDR_&quot;; [.B242]; &quot;)] = &quot;; [.C242]; &quot;u;&quot;); &quot;&quot;))">
            <text:p/>
          </table:table-cell>
        </table:table-row>
        <table:table-row table:style-name="ro1">
          <table:table-cell table:style-name="ce17" table:formula="of:=[$List.B243]" office:value-type="float" office:value="0" calcext:value-type="float">
            <text:p>0</text:p>
          </table:table-cell>
          <table:table-cell table:style-name="ce17" table:formula="of:=[$List.I243]" office:value-type="float" office:value="0" calcext:value-type="float">
            <text:p>0</text:p>
          </table:table-cell>
          <table:table-cell table:style-name="ce17" table:formula="of:=[$List.G243]" office:value-type="float" office:value="0" calcext:value-type="float">
            <text:p>0</text:p>
          </table:table-cell>
          <table:table-cell table:formula="of:=IF(AND(([.A243]=&quot;coil&quot;);([.C243]=&quot;true&quot;)); 1; &quot;&quot;)">
            <text:p/>
          </table:table-cell>
          <table:table-cell table:formula="of:=IF(AND(([.A243]=&quot;holding reg.&quot;);([.C243] &lt;&gt; 0)); 1; &quot;&quot;)">
            <text:p/>
          </table:table-cell>
          <table:table-cell/>
          <table:table-cell table:formula="of:=IF([.D243]=1; COM.MICROSOFT.CONCAT(&quot;ModbusCoils[coilIndexFromAddress(MODBUS_ADDR_&quot;; [.B243]; &quot;)] = &quot;; [.C243]; &quot;;&quot;); IF([.E243]=1; COM.MICROSOFT.CONCAT(&quot;ModbusHoldingRegisters[holdingIndexFromAddress(MODBUS_ADDR_&quot;; [.B243]; &quot;)] = &quot;; [.C243]; &quot;u;&quot;); &quot;&quot;))">
            <text:p/>
          </table:table-cell>
        </table:table-row>
        <table:table-row table:style-name="ro1">
          <table:table-cell table:style-name="ce17" table:formula="of:=[$List.B244]" office:value-type="float" office:value="0" calcext:value-type="float">
            <text:p>0</text:p>
          </table:table-cell>
          <table:table-cell table:style-name="ce17" table:formula="of:=[$List.I244]" office:value-type="float" office:value="0" calcext:value-type="float">
            <text:p>0</text:p>
          </table:table-cell>
          <table:table-cell table:style-name="ce17" table:formula="of:=[$List.G244]" office:value-type="float" office:value="0" calcext:value-type="float">
            <text:p>0</text:p>
          </table:table-cell>
          <table:table-cell table:formula="of:=IF(AND(([.A244]=&quot;coil&quot;);([.C244]=&quot;true&quot;)); 1; &quot;&quot;)">
            <text:p/>
          </table:table-cell>
          <table:table-cell table:formula="of:=IF(AND(([.A244]=&quot;holding reg.&quot;);([.C244] &lt;&gt; 0)); 1; &quot;&quot;)">
            <text:p/>
          </table:table-cell>
          <table:table-cell/>
          <table:table-cell table:formula="of:=IF([.D244]=1; COM.MICROSOFT.CONCAT(&quot;ModbusCoils[coilIndexFromAddress(MODBUS_ADDR_&quot;; [.B244]; &quot;)] = &quot;; [.C244]; &quot;;&quot;); IF([.E244]=1; COM.MICROSOFT.CONCAT(&quot;ModbusHoldingRegisters[holdingIndexFromAddress(MODBUS_ADDR_&quot;; [.B244]; &quot;)] = &quot;; [.C244]; &quot;u;&quot;); &quot;&quot;))">
            <text:p/>
          </table:table-cell>
        </table:table-row>
        <table:table-row table:style-name="ro1">
          <table:table-cell table:style-name="ce17" table:formula="of:=[$List.B245]" office:value-type="float" office:value="0" calcext:value-type="float">
            <text:p>0</text:p>
          </table:table-cell>
          <table:table-cell table:style-name="ce17" table:formula="of:=[$List.I245]" office:value-type="float" office:value="0" calcext:value-type="float">
            <text:p>0</text:p>
          </table:table-cell>
          <table:table-cell table:style-name="ce17" table:formula="of:=[$List.G245]" office:value-type="float" office:value="0" calcext:value-type="float">
            <text:p>0</text:p>
          </table:table-cell>
          <table:table-cell table:formula="of:=IF(AND(([.A245]=&quot;coil&quot;);([.C245]=&quot;true&quot;)); 1; &quot;&quot;)">
            <text:p/>
          </table:table-cell>
          <table:table-cell table:formula="of:=IF(AND(([.A245]=&quot;holding reg.&quot;);([.C245] &lt;&gt; 0)); 1; &quot;&quot;)">
            <text:p/>
          </table:table-cell>
          <table:table-cell/>
          <table:table-cell table:formula="of:=IF([.D245]=1; COM.MICROSOFT.CONCAT(&quot;ModbusCoils[coilIndexFromAddress(MODBUS_ADDR_&quot;; [.B245]; &quot;)] = &quot;; [.C245]; &quot;;&quot;); IF([.E245]=1; COM.MICROSOFT.CONCAT(&quot;ModbusHoldingRegisters[holdingIndexFromAddress(MODBUS_ADDR_&quot;; [.B245]; &quot;)] = &quot;; [.C245]; &quot;u;&quot;); &quot;&quot;))">
            <text:p/>
          </table:table-cell>
        </table:table-row>
        <table:table-row table:style-name="ro1">
          <table:table-cell table:style-name="ce17" table:formula="of:=[$List.B246]" office:value-type="float" office:value="0" calcext:value-type="float">
            <text:p>0</text:p>
          </table:table-cell>
          <table:table-cell table:style-name="ce17" table:formula="of:=[$List.I246]" office:value-type="float" office:value="0" calcext:value-type="float">
            <text:p>0</text:p>
          </table:table-cell>
          <table:table-cell table:style-name="ce17" table:formula="of:=[$List.G246]" office:value-type="float" office:value="0" calcext:value-type="float">
            <text:p>0</text:p>
          </table:table-cell>
          <table:table-cell table:formula="of:=IF(AND(([.A246]=&quot;coil&quot;);([.C246]=&quot;true&quot;)); 1; &quot;&quot;)">
            <text:p/>
          </table:table-cell>
          <table:table-cell table:formula="of:=IF(AND(([.A246]=&quot;holding reg.&quot;);([.C246] &lt;&gt; 0)); 1; &quot;&quot;)">
            <text:p/>
          </table:table-cell>
          <table:table-cell/>
          <table:table-cell table:formula="of:=IF([.D246]=1; COM.MICROSOFT.CONCAT(&quot;ModbusCoils[coilIndexFromAddress(MODBUS_ADDR_&quot;; [.B246]; &quot;)] = &quot;; [.C246]; &quot;;&quot;); IF([.E246]=1; COM.MICROSOFT.CONCAT(&quot;ModbusHoldingRegisters[holdingIndexFromAddress(MODBUS_ADDR_&quot;; [.B246]; &quot;)] = &quot;; [.C246]; &quot;u;&quot;); &quot;&quot;))">
            <text:p/>
          </table:table-cell>
        </table:table-row>
        <table:table-row table:style-name="ro1">
          <table:table-cell table:style-name="ce17" table:formula="of:=[$List.B247]" office:value-type="float" office:value="0" calcext:value-type="float">
            <text:p>0</text:p>
          </table:table-cell>
          <table:table-cell table:style-name="ce17" table:formula="of:=[$List.I247]" office:value-type="float" office:value="0" calcext:value-type="float">
            <text:p>0</text:p>
          </table:table-cell>
          <table:table-cell table:style-name="ce17" table:formula="of:=[$List.G247]" office:value-type="float" office:value="0" calcext:value-type="float">
            <text:p>0</text:p>
          </table:table-cell>
          <table:table-cell table:formula="of:=IF(AND(([.A247]=&quot;coil&quot;);([.C247]=&quot;true&quot;)); 1; &quot;&quot;)">
            <text:p/>
          </table:table-cell>
          <table:table-cell table:formula="of:=IF(AND(([.A247]=&quot;holding reg.&quot;);([.C247] &lt;&gt; 0)); 1; &quot;&quot;)">
            <text:p/>
          </table:table-cell>
          <table:table-cell/>
          <table:table-cell table:formula="of:=IF([.D247]=1; COM.MICROSOFT.CONCAT(&quot;ModbusCoils[coilIndexFromAddress(MODBUS_ADDR_&quot;; [.B247]; &quot;)] = &quot;; [.C247]; &quot;;&quot;); IF([.E247]=1; COM.MICROSOFT.CONCAT(&quot;ModbusHoldingRegisters[holdingIndexFromAddress(MODBUS_ADDR_&quot;; [.B247]; &quot;)] = &quot;; [.C247]; &quot;u;&quot;); &quot;&quot;))">
            <text:p/>
          </table:table-cell>
        </table:table-row>
        <table:table-row table:style-name="ro1">
          <table:table-cell table:style-name="ce17" table:formula="of:=[$List.B248]" office:value-type="float" office:value="0" calcext:value-type="float">
            <text:p>0</text:p>
          </table:table-cell>
          <table:table-cell table:style-name="ce17" table:formula="of:=[$List.I248]" office:value-type="float" office:value="0" calcext:value-type="float">
            <text:p>0</text:p>
          </table:table-cell>
          <table:table-cell table:style-name="ce17" table:formula="of:=[$List.G248]" office:value-type="float" office:value="0" calcext:value-type="float">
            <text:p>0</text:p>
          </table:table-cell>
          <table:table-cell table:formula="of:=IF(AND(([.A248]=&quot;coil&quot;);([.C248]=&quot;true&quot;)); 1; &quot;&quot;)">
            <text:p/>
          </table:table-cell>
          <table:table-cell table:formula="of:=IF(AND(([.A248]=&quot;holding reg.&quot;);([.C248] &lt;&gt; 0)); 1; &quot;&quot;)">
            <text:p/>
          </table:table-cell>
          <table:table-cell/>
          <table:table-cell table:formula="of:=IF([.D248]=1; COM.MICROSOFT.CONCAT(&quot;ModbusCoils[coilIndexFromAddress(MODBUS_ADDR_&quot;; [.B248]; &quot;)] = &quot;; [.C248]; &quot;;&quot;); IF([.E248]=1; COM.MICROSOFT.CONCAT(&quot;ModbusHoldingRegisters[holdingIndexFromAddress(MODBUS_ADDR_&quot;; [.B248]; &quot;)] = &quot;; [.C248]; &quot;u;&quot;); &quot;&quot;))">
            <text:p/>
          </table:table-cell>
        </table:table-row>
        <table:table-row table:style-name="ro1">
          <table:table-cell table:style-name="ce17" table:formula="of:=[$List.B249]" office:value-type="float" office:value="0" calcext:value-type="float">
            <text:p>0</text:p>
          </table:table-cell>
          <table:table-cell table:style-name="ce17" table:formula="of:=[$List.I249]" office:value-type="float" office:value="0" calcext:value-type="float">
            <text:p>0</text:p>
          </table:table-cell>
          <table:table-cell table:style-name="ce17" table:formula="of:=[$List.G249]" office:value-type="float" office:value="0" calcext:value-type="float">
            <text:p>0</text:p>
          </table:table-cell>
          <table:table-cell table:formula="of:=IF(AND(([.A249]=&quot;coil&quot;);([.C249]=&quot;true&quot;)); 1; &quot;&quot;)">
            <text:p/>
          </table:table-cell>
          <table:table-cell table:formula="of:=IF(AND(([.A249]=&quot;holding reg.&quot;);([.C249] &lt;&gt; 0)); 1; &quot;&quot;)">
            <text:p/>
          </table:table-cell>
          <table:table-cell/>
          <table:table-cell table:formula="of:=IF([.D249]=1; COM.MICROSOFT.CONCAT(&quot;ModbusCoils[coilIndexFromAddress(MODBUS_ADDR_&quot;; [.B249]; &quot;)] = &quot;; [.C249]; &quot;;&quot;); IF([.E249]=1; COM.MICROSOFT.CONCAT(&quot;ModbusHoldingRegisters[holdingIndexFromAddress(MODBUS_ADDR_&quot;; [.B249]; &quot;)] = &quot;; [.C249]; &quot;u;&quot;); &quot;&quot;))">
            <text:p/>
          </table:table-cell>
        </table:table-row>
        <table:table-row table:style-name="ro1">
          <table:table-cell table:style-name="ce17" table:formula="of:=[$List.B250]" office:value-type="float" office:value="0" calcext:value-type="float">
            <text:p>0</text:p>
          </table:table-cell>
          <table:table-cell table:style-name="ce17" table:formula="of:=[$List.I250]" office:value-type="float" office:value="0" calcext:value-type="float">
            <text:p>0</text:p>
          </table:table-cell>
          <table:table-cell table:style-name="ce17" table:formula="of:=[$List.G250]" office:value-type="float" office:value="0" calcext:value-type="float">
            <text:p>0</text:p>
          </table:table-cell>
          <table:table-cell table:formula="of:=IF(AND(([.A250]=&quot;coil&quot;);([.C250]=&quot;true&quot;)); 1; &quot;&quot;)">
            <text:p/>
          </table:table-cell>
          <table:table-cell table:formula="of:=IF(AND(([.A250]=&quot;holding reg.&quot;);([.C250] &lt;&gt; 0)); 1; &quot;&quot;)">
            <text:p/>
          </table:table-cell>
          <table:table-cell/>
          <table:table-cell table:formula="of:=IF([.D250]=1; COM.MICROSOFT.CONCAT(&quot;ModbusCoils[coilIndexFromAddress(MODBUS_ADDR_&quot;; [.B250]; &quot;)] = &quot;; [.C250]; &quot;;&quot;); IF([.E250]=1; COM.MICROSOFT.CONCAT(&quot;ModbusHoldingRegisters[holdingIndexFromAddress(MODBUS_ADDR_&quot;; [.B250]; &quot;)] = &quot;; [.C250]; &quot;u;&quot;); &quot;&quot;))">
            <text:p/>
          </table:table-cell>
        </table:table-row>
        <table:table-row table:style-name="ro1" table:number-rows-repeated="10483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1:48:05.804315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25T11:57:05.401187332</dc:date>
    <meta:editing-duration>P1DT21H43M57S</meta:editing-duration>
    <meta:editing-cycles>221</meta:editing-cycles>
    <meta:generator>LibreOffice/24.2.7.2$Linux_X86_64 LibreOffice_project/420$Build-2</meta:generator>
    <meta:document-statistic meta:table-count="3" meta:cell-count="4730" meta:object-count="0"/>
  </office:meta>
</office:document-meta>
</file>