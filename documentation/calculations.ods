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63" style:family="table-cell" style:parent-style-name="Default">
      <style:table-cell-properties fo:border-bottom="none" fo:border-left="none" fo:border-right="0.74pt solid #000000" fo:border-top="none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67" style:family="table-cell" style:parent-style-name="Default" style:data-style-name="N129">
      <style:table-cell-properties fo:border-bottom="none" fo:background-color="#ffff00" fo:border-left="0.74pt solid #000000" fo:border-right="none" fo:border-top="none"/>
    </style:style>
    <style:style style:name="ce68" style:family="table-cell" style:parent-style-name="Default" style:data-style-name="N130">
      <style:table-cell-properties fo:border-bottom="0.74pt solid #000000" fo:background-color="#ffff00" fo:border-left="0.74pt solid #000000" fo:border-right="none" fo:border-top="none"/>
    </style:style>
    <style:style style:name="ce69" style:family="table-cell" style:parent-style-name="Default" style:data-style-name="N131"/>
    <style:style style:name="ce6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0" style:family="table-cell" style:parent-style-name="Default" style:data-style-name="N130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7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51" office:value-type="string" calcext:value-type="string">
            <text:p>FFFF</text:p>
          </table:table-cell>
          <table:table-cell table:style-name="ce54" table:formula="of:=HEX2DEC([.B2])" office:value-type="float" office:value="65535" calcext:value-type="float">
            <text:p>65535</text:p>
          </table:table-cell>
          <table:table-cell table:style-name="ce55" table:formula="of:=LOG([.C2])/LOG(2)" office:value-type="float" office:value="15.9999779860527" calcext:value-type="float">
            <text:p>16.000</text:p>
          </table:table-cell>
          <table:table-cell/>
          <table:table-cell table:formula="of:=[.C2]/[.C3]" office:value-type="float" office:value="128.248532289628" calcext:value-type="float">
            <text:p>128.248532289628</text:p>
          </table:table-cell>
          <table:table-cell table:number-columns-repeated="9"/>
        </table:table-row>
        <table:table-row table:style-name="ro1">
          <table:table-cell/>
          <table:table-cell table:style-name="ce51" office:value-type="string" calcext:value-type="string">
            <text:p>01FF</text:p>
          </table:table-cell>
          <table:table-cell table:style-name="ce54" table:formula="of:=HEX2DEC([.B3])" office:value-type="float" office:value="511" calcext:value-type="float">
            <text:p>511</text:p>
          </table:table-cell>
          <table:table-cell table:style-name="ce55" table:formula="of:=LOG([.C3])/LOG(2)" office:value-type="float" office:value="8.99717948093762" calcext:value-type="float">
            <text:p>8.997</text:p>
          </table:table-cell>
          <table:table-cell table:number-columns-repeated="4"/>
          <table:table-cell table:style-name="ce56" office:value-type="string" calcext:value-type="string">
            <text:p>Próbnik</text:p>
          </table:table-cell>
          <table:table-cell table:number-columns-repeated="2"/>
          <table:table-cell table:style-name="ce15" office:value-type="float" office:value="8" calcext:value-type="float">
            <text:p>8.00</text:p>
          </table:table-cell>
          <table:table-cell table:style-name="ce6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57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2" office:value-type="float" office:value="10020000" calcext:value-type="float">
            <text:p>10020000</text:p>
          </table:table-cell>
          <table:table-cell table:style-name="ce66" table:formula="of:=1000000*[.$L$3]/[.I5]" office:value-type="float" office:value="160.320641282565" calcext:value-type="float">
            <text:p>160.32</text:p>
          </table:table-cell>
          <table:table-cell table:style-name="ce70" table:formula="of:=1000000*[.$L$3]/[.K5]" office:value-type="float" office:value="0.798403193612775" calcext:value-type="float">
            <text:p>0.7984</text:p>
          </table:table-cell>
          <table:table-cell table:style-name="ce73" office:value-type="string" calcext:value-type="string">
            <text:p>uA</text:p>
          </table:table-cell>
          <table:table-cell/>
        </table:table-row>
        <table:table-row table:style-name="ro1">
          <table:table-cell table:number-columns-repeated="8"/>
          <table:table-cell table:style-name="ce58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63"/>
          <table:table-cell table:style-name="ce67" table:formula="of:=1000000*[.$L$3]/[.I6]" office:value-type="float" office:value="25" calcext:value-type="float">
            <text:p>25.000</text:p>
          </table:table-cell>
          <table:table-cell table:style-name="ce71"/>
          <table:table-cell table:style-name="ce74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58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63"/>
          <table:table-cell table:style-name="ce67" table:formula="of:=1000000*[.$L$3]/[.I7]" office:value-type="float" office:value="10.1394169835234" calcext:value-type="float">
            <text:p>10.139</text:p>
          </table:table-cell>
          <table:table-cell table:style-name="ce71"/>
          <table:table-cell table:style-name="ce74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/V</text:p>
          </table:table-cell>
          <table:table-cell table:number-columns-repeated="5"/>
          <table:table-cell table:style-name="ce59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64"/>
          <table:table-cell table:style-name="ce68" table:formula="of:=1000000*[.$L$3]/[.I8]" office:value-type="float" office:value="6.35424940428912" calcext:value-type="float">
            <text:p>6.3542</text:p>
          </table:table-cell>
          <table:table-cell table:style-name="ce72"/>
          <table:table-cell table:style-name="ce75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table:style-name="ce52" table:formula="of:=[.B7]/[.B8]" office:value-type="float" office:value="0.0303030303030303" calcext:value-type="float">
            <text:p>0.030303030303030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V/A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9]/[.B10]" office:value-type="float" office:value="0.0000151515151515152" calcext:value-type="float">
            <text:p>1.51515151515152E-0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11]*1000000" office:value-type="float" office:value="15.1515151515152" calcext:value-type="float">
            <text:p>15.1515151515152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j.ADC</text:p>
          </table:table-cell>
          <table:table-cell office:value-type="float" office:value="1753" calcext:value-type="float">
            <text:p>1753</text:p>
          </table:table-cell>
          <table:table-cell office:value-type="float" office:value="182" calcext:value-type="float">
            <text:p>182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9.82" calcext:value-type="float">
            <text:p>9.8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/j.ADC</text:p>
          </table:table-cell>
          <table:table-cell table:formula="of:=[.L14]/[.L13]" office:value-type="float" office:value="0.0138049058756418" calcext:value-type="float">
            <text:p>0.0138049058756418</text:p>
          </table:table-cell>
          <table:table-cell table:formula="of:=[.M14]/[.M13]" office:value-type="float" office:value="0.132967032967033" calcext:value-type="float">
            <text:p>0.132967032967033</text:p>
          </table:table-cell>
          <table:table-cell table:formula="of:=[.N14]/[.N13]" office:value-type="float" office:value="0.0148787878787879" calcext:value-type="float">
            <text:p>0.0148787878787879</text:p>
          </table:table-cell>
          <table:table-cell table:formula="of:=[.O14]/[.O13]" office:value-type="float" office:value="0.140285714285714" calcext:value-type="float">
            <text:p>0.1402857142857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/j.ADC</text:p>
          </table:table-cell>
          <table:table-cell table:style-name="ce69" table:formula="of:=[.L15]*1000000" office:value-type="float" office:value="13804.9058756418" calcext:value-type="float">
            <text:p>13804.9</text:p>
          </table:table-cell>
          <table:table-cell table:style-name="ce69" table:formula="of:=[.M15]*1000000" office:value-type="float" office:value="132967.032967033" calcext:value-type="float">
            <text:p>132967.0</text:p>
          </table:table-cell>
          <table:table-cell table:style-name="ce69" table:formula="of:=[.N15]*1000000" office:value-type="float" office:value="14878.7878787879" calcext:value-type="float">
            <text:p>14878.8</text:p>
          </table:table-cell>
          <table:table-cell table:style-name="ce69" table:formula="of:=[.O15]*1000000" office:value-type="float" office:value="140285.714285714" calcext:value-type="float">
            <text:p>140285.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18]/[.B19]" office:value-type="float" office:value="0.000015" calcext:value-type="float">
            <text:p>0.00001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20]*1000000" office:value-type="float" office:value="15" calcext:value-type="float">
            <text:p>15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005" calcext:value-type="float">
            <text:p>0.00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22]/[.K23]" office:value-type="float" office:value="1400" calcext:value-type="float">
            <text:p>14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22]*[.K23]" office:value-type="float" office:value="0.035" calcext:value-type="float">
            <text:p>0.03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HEX2DEC([.B26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/>
          <table:table-cell table:style-name="ce53" office:value-type="string" calcext:value-type="string">
            <text:p>2^12</text:p>
          </table:table-cell>
          <table:table-cell table:formula="of:=2^12" office:value-type="float" office:value="4096" calcext:value-type="float">
            <text:p>4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00" calcext:value-type="float">
            <text:p>-1000</text:p>
          </table:table-cell>
          <table:table-cell table:style-name="ce54" table:formula="of:=DEC2HEX([.B28])" office:value-type="string" office:string-value="FFFFFFFC18" calcext:value-type="string">
            <text:p>FFFFFFFC18</text:p>
          </table:table-cell>
          <table:table-cell table:number-columns-repeated="12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14:36:32.342184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6-19T15:51:59.277858817</dc:date>
    <meta:editing-duration>PT5H20M36S</meta:editing-duration>
    <meta:editing-cycles>15</meta:editing-cycles>
    <meta:document-statistic meta:table-count="5" meta:cell-count="118" meta:object-count="0"/>
  </office:meta>
</office:document-meta>
</file>