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rIS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formula="of:=[.B2]/[.B3]" office:value-type="float" office:value="125" calcext:value-type="float">
            <text:p>125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table:formula="of:=[.B2]/[.B5]" office:value-type="float" office:value="15.625" calcext:value-type="float">
            <text:p>15.625</text:p>
          </table:table-cell>
          <table:table-cell office:value-type="string" calcext:value-type="string">
            <text:p>Hz</text:p>
          </table:table-cell>
        </table:table-row>
      </table:table>
      <table:table table:name="Baudrate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]/[.A4]"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4]/[.A5]" office:value-type="float" office:value="54.8571428571429" calcext:value-type="float">
            <text:p>54.8571428571429</text:p>
          </table:table-cell>
        </table:table-row>
      </table:table>
      <table:table table:name="ADC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FFFF</text:p>
          </table:table-cell>
          <table:table-cell table:style-name="ce2" table:formula="of:=HEX2DEC([.B2])" office:value-type="float" office:value="65535" calcext:value-type="float">
            <text:p>65535</text:p>
          </table:table-cell>
          <table:table-cell table:style-name="ce3" table:formula="of:=LOG([.C2])/LOG(2)" office:value-type="float" office:value="15.9999779860527" calcext:value-type="float">
            <text:p>16.000</text:p>
          </table:table-cell>
          <table:table-cell/>
          <table:table-cell table:formula="of:=[.C2]/[.C3]" office:value-type="float" office:value="128.248532289628" calcext:value-type="float">
            <text:p>128.248532289628</text:p>
          </table:table-cell>
        </table:table-row>
        <table:table-row table:style-name="ro1">
          <table:table-cell/>
          <table:table-cell table:style-name="ce1" office:value-type="string" calcext:value-type="string">
            <text:p>01FF</text:p>
          </table:table-cell>
          <table:table-cell table:style-name="ce2" table:formula="of:=HEX2DEC([.B3])" office:value-type="float" office:value="511" calcext:value-type="float">
            <text:p>511</text:p>
          </table:table-cell>
          <table:table-cell table:style-name="ce3" table:formula="of:=LOG([.C3])/LOG(2)" office:value-type="float" office:value="8.99717948093762" calcext:value-type="float">
            <text:p>8.997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/V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[.B7]/[.B8]" office:value-type="float" office:value="0.0303030303030303" calcext:value-type="float">
            <text:p>0.030303030303030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V/A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[.B9]/[.B10]" office:value-type="float" office:value="0.0000151515151515152" calcext:value-type="float">
            <text:p>1.51515151515152E-0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[.B11]*1000000" office:value-type="float" office:value="15.1515151515152" calcext:value-type="float">
            <text:p>15.1515151515152</text:p>
          </table:table-cell>
          <table:table-cell office:value-type="string" calcext:value-type="string">
            <text:p>uA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[.B18]/[.B19]" office:value-type="float" office:value="0.000015" calcext:value-type="float">
            <text:p>0.00001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[.B20]*1000000" office:value-type="float" office:value="15" calcext:value-type="float">
            <text:p>15</text:p>
          </table:table-cell>
          <table:table-cell office:value-type="string" calcext:value-type="string">
            <text:p>uA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2">00/00/0000</text:date>, <text:time style:data-style-name="N2" text:time-value="14:17:58.0078261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1T10:27:12.233140545</meta:creation-date>
    <meta:generator>LibreOffice/24.2.7.2$Linux_X86_64 LibreOffice_project/420$Build-2</meta:generator>
    <dc:date>2026-05-22T14:24:00.006526609</dc:date>
    <meta:editing-duration>PT17M17S</meta:editing-duration>
    <meta:editing-cycles>4</meta:editing-cycles>
    <meta:document-statistic meta:table-count="3" meta:cell-count="40" meta:object-count="0"/>
  </office:meta>
</office:document-meta>
</file>